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300000206AC22C40C.png" manifest:media-type="image/png"/>
  <manifest:file-entry manifest:full-path="Pictures/100000010000046E00000242B7EC24A1.png" manifest:media-type="image/png"/>
  <manifest:file-entry manifest:full-path="Pictures/10000001000001AA0000012559FA2874.png" manifest:media-type="image/png"/>
  <manifest:file-entry manifest:full-path="Pictures/10000001000002CA000004D8DD72DF1E.png" manifest:media-type="image/png"/>
  <manifest:file-entry manifest:full-path="Pictures/100000010000052600000171079C6F8C.png" manifest:media-type="image/png"/>
  <manifest:file-entry manifest:full-path="Pictures/1000000100000094000000A5C6F1C763.png" manifest:media-type="image/png"/>
  <manifest:file-entry manifest:full-path="Pictures/100000010000038F000001D8693B3904.png" manifest:media-type="image/png"/>
  <manifest:file-entry manifest:full-path="Pictures/1000000100000561000003B6042725EA.png" manifest:media-type="image/png"/>
  <manifest:file-entry manifest:full-path="Pictures/10000001000002CF00000094317AA322.png" manifest:media-type="image/png"/>
  <manifest:file-entry manifest:full-path="Pictures/1000000100000561000003B69152960B.png" manifest:media-type="image/png"/>
  <manifest:file-entry manifest:full-path="Pictures/10000001000006850000048DE77F53FD.png" manifest:media-type="image/png"/>
  <manifest:file-entry manifest:full-path="Pictures/10000001000002C20000009AB34A9DC8.png" manifest:media-type="image/png"/>
  <manifest:file-entry manifest:full-path="Pictures/10000001000004630000024CC4E5B859.png" manifest:media-type="image/png"/>
  <manifest:file-entry manifest:full-path="Pictures/100000010000001C0000002296E3C9AD.png" manifest:media-type="image/png"/>
  <manifest:file-entry manifest:full-path="Pictures/10000001000004D10000026E60E66923.png" manifest:media-type="image/png"/>
  <manifest:file-entry manifest:full-path="Pictures/10000001000004310000014F6D357A83.png" manifest:media-type="image/png"/>
  <manifest:file-entry manifest:full-path="Pictures/10000001000005A700000376506FAE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Table1" style:family="table">
      <style:table-properties style:width="4.9222in" fo:margin-left="0.3153in" fo:margin-top="0in" fo:margin-bottom="0in" table:align="left" style:writing-mode="lr-tb"/>
    </style:style>
    <style:style style:name="Table1.A" style:family="table-column">
      <style:table-column-properties style:column-width="1.4771in"/>
    </style:style>
    <style:style style:name="Table1.B" style:family="table-column">
      <style:table-column-properties style:column-width="3.4451in"/>
    </style:style>
    <style:style style:name="Table1.1" style:family="table-row">
      <style:table-row-properties fo:keep-together="auto"/>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Table2" style:family="table">
      <style:table-properties style:width="5.9896in" fo:margin-left="-0.0069in" fo:margin-top="0in" fo:margin-bottom="0in" table:align="left" style:writing-mode="page"/>
    </style:style>
    <style:style style:name="Table2.A" style:family="table-column">
      <style:table-column-properties style:column-width="1.75in"/>
    </style:style>
    <style:style style:name="Table2.B" style:family="table-column">
      <style:table-column-properties style:column-width="4.2396in"/>
    </style:style>
    <style:style style:name="Table2.1" style:family="table-row">
      <style:table-row-properties fo:keep-together="auto"/>
    </style:style>
    <style:style style:name="Table2.A1" style:family="table-cell">
      <style:table-cell-properties fo:padding-left="0.0694in" fo:padding-right="0.0694in" fo:padding-top="0.0694in" fo:padding-bottom="0.0417in" fo:border="1pt solid #000000"/>
    </style:style>
    <style:style style:name="Table2.B1" style:family="table-cell">
      <style:table-cell-properties fo:padding-left="0.0694in" fo:padding-right="0.0694in" fo:padding-top="0.0694in" fo:padding-bottom="0.0417in" fo:border-left="0.75pt solid #000000" fo:border-right="1pt solid #000000" fo:border-top="1pt solid #000000" fo:border-bottom="1pt solid #000000"/>
    </style:style>
    <style:style style:name="Table2.A2" style:family="table-cell">
      <style:table-cell-properties fo:padding-left="0.0694in" fo:padding-right="0.0694in" fo:padding-top="0.0694in" fo:padding-bottom="0.0417in" fo:border-left="1pt solid #000000" fo:border-right="1pt solid #000000" fo:border-top="0.75pt solid #000000" fo:border-bottom="1pt solid #000000"/>
    </style:style>
    <style:style style:name="Table2.B2" style:family="table-cell">
      <style:table-cell-properties fo:padding-left="0.0694in" fo:padding-right="0.0694in" fo:padding-top="0.0694in" fo:padding-bottom="0.0417in" fo:border-left="0.75pt solid #000000" fo:border-right="1pt solid #000000" fo:border-top="0.75pt solid #000000" fo:border-bottom="1pt solid #000000"/>
    </style:style>
    <style:style style:name="P1" style:family="paragraph" style:parent-style-name="Standard" style:master-page-name="Standard">
      <style:paragraph-properties fo:text-align="center" style:justify-single-word="false" style:page-number="1"/>
      <style:text-properties style:font-name="Calibri"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text-properties style:font-name="Calibri" fo:font-size="24pt" fo:language="en" fo:country="GB" fo:font-weight="bold" style:font-size-asian="24pt" style:font-weight-asian="bold" style:font-size-complex="2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alibri" fo:language="en" fo:country="GB" fo:font-style="italic" style:font-style-asian="italic" style:font-name-complex="Calibri1"/>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center" style:justify-single-word="false"/>
      <style:text-properties style:font-name="Calibri" fo:font-size="16pt" fo:font-weight="bold" style:font-size-asian="16pt" style:font-weight-asian="bold"/>
    </style:style>
    <style:style style:name="P7" style:family="paragraph">
      <loext:graphic-properties draw:fill="solid" draw:fill-color="#ffffff"/>
      <style:paragraph-properties fo:text-align="left"/>
      <style:text-properties fo:font-size="18pt"/>
    </style:style>
    <style:style style:name="P8" style:family="paragraph" style:parent-style-name="Standard">
      <style:text-properties style:font-name="Calibri" fo:language="en" fo:country="GB"/>
    </style:style>
    <style:style style:name="P9" style:family="paragraph" style:parent-style-name="Standard">
      <style:paragraph-properties fo:margin-top="0in" fo:margin-bottom="0in" style:contextual-spacing="false" fo:break-before="page"/>
      <style:text-properties style:font-name="Calibri" fo:language="en" fo:country="GB"/>
    </style:style>
    <style:style style:name="P10" style:family="paragraph" style:parent-style-name="Standard">
      <style:paragraph-properties fo:text-align="center" style:justify-single-word="false"/>
      <style:text-properties style:font-name="Calibri" fo:language="en" fo:country="GB"/>
    </style:style>
    <style:style style:name="P11" style:family="paragraph" style:parent-style-name="Standard">
      <style:paragraph-properties fo:text-align="center" style:justify-single-word="false"/>
      <style:text-properties fo:language="en" fo:country="GB"/>
    </style:style>
    <style:style style:name="P12" style:family="paragraph" style:parent-style-name="Standard">
      <style:text-properties style:font-name="Calibri" fo:font-size="16pt" fo:font-weight="bold" style:font-size-asian="16pt" style:font-weight-asian="bold"/>
    </style:style>
    <style:style style:name="P13" style:family="paragraph" style:parent-style-name="Standard">
      <style:paragraph-properties fo:margin-top="0in" fo:margin-bottom="0in" style:contextual-spacing="false" fo:text-align="center" style:justify-single-word="false" fo:break-before="page"/>
    </style:style>
    <style:style style:name="P14" style:family="paragraph" style:parent-style-name="Standard">
      <style:paragraph-properties fo:text-align="center" style:justify-single-word="false"/>
      <style:text-properties style:font-name="Calibri" style:font-name-complex="Calibri1"/>
    </style:style>
    <style:style style:name="P15" style:family="paragraph" style:parent-style-name="Contents_20_3">
      <style:paragraph-properties>
        <style:tab-stops>
          <style:tab-stop style:position="1in"/>
          <style:tab-stop style:position="6.261in" style:type="right" style:leader-style="dotted" style:leader-text="."/>
        </style:tab-stops>
      </style:paragraph-properties>
    </style:style>
    <style:style style:name="P16" style:family="paragraph" style:parent-style-name="Heading_20_1">
      <style:paragraph-properties fo:margin-left="0.248in" fo:text-indent="-0.248in" style:auto-text-indent="false" fo:break-before="page"/>
    </style:style>
    <style:style style:name="P17" style:family="paragraph" style:parent-style-name="Standard">
      <style:paragraph-properties fo:margin-top="0.0835in" fo:margin-bottom="0in" style:contextual-spacing="false"/>
    </style:style>
    <style:style style:name="P18" style:family="paragraph" style:parent-style-name="Standard">
      <style:text-properties style:font-name-complex="Calibri1" style:font-size-complex="12pt"/>
    </style:style>
    <style:style style:name="P19" style:family="paragraph" style:parent-style-name="No_20_Spacing">
      <style:paragraph-properties fo:keep-with-next="always"/>
    </style:style>
    <style:style style:name="P20" style:family="paragraph" style:parent-style-name="Standard" style:list-style-name="WWNum15">
      <style:paragraph-properties fo:margin-left="0.4957in" fo:margin-top="0.1665in" fo:margin-bottom="0in" style:contextual-spacing="false" fo:text-indent="-0.248in" style:auto-text-indent="false" fo:keep-with-next="always"/>
    </style:style>
    <style:style style:name="P21" style:family="paragraph" style:parent-style-name="Standard">
      <style:paragraph-properties fo:margin-left="1in" fo:margin-top="0.0417in" fo:margin-bottom="0in" style:contextual-spacing="false" fo:keep-with-next="always"/>
    </style:style>
    <style:style style:name="P22" style:family="paragraph" style:parent-style-name="Standard">
      <style:text-properties style:font-name="Calibri" fo:language="en" fo:country="GB" style:language-asian="fr" style:country-asian="FR"/>
    </style:style>
    <style:style style:name="P23" style:family="paragraph" style:parent-style-name="Standard">
      <style:paragraph-properties fo:margin-top="0in" fo:margin-bottom="0.0835in" style:contextual-spacing="false"/>
    </style:style>
    <style:style style:name="P24" style:family="paragraph" style:parent-style-name="No_20_Spacing" style:list-style-name="WWNum11"/>
    <style:style style:name="P25" style:family="paragraph" style:parent-style-name="Heading_20_2">
      <style:paragraph-properties fo:margin-left="0.3937in" fo:text-indent="-0.3937in" style:auto-text-indent="false"/>
    </style:style>
    <style:style style:name="P26" style:family="paragraph" style:parent-style-name="Standard">
      <style:paragraph-properties fo:margin-top="0.1665in" fo:margin-bottom="0in" style:contextual-spacing="false" fo:keep-with-next="always"/>
    </style:style>
    <style:style style:name="P27" style:family="paragraph" style:parent-style-name="List_20_Paragraph" style:list-style-name="WWNum42">
      <style:paragraph-properties fo:margin-top="0.1665in" fo:margin-bottom="0in" style:contextual-spacing="false" fo:line-height="100%"/>
    </style:style>
    <style:style style:name="P28" style:family="paragraph" style:parent-style-name="Standard">
      <style:paragraph-properties fo:keep-with-next="always"/>
      <style:text-properties fo:font-size="7pt" fo:language="en" fo:country="GB" style:font-size-asian="7pt"/>
    </style:style>
    <style:style style:name="P29" style:family="paragraph" style:parent-style-name="Standard">
      <style:paragraph-properties fo:margin-left="0.5in"/>
    </style:style>
    <style:style style:name="P30" style:family="paragraph" style:parent-style-name="Standard">
      <style:paragraph-properties fo:margin-left="0.4898in"/>
    </style:style>
    <style:style style:name="P31" style:family="paragraph" style:parent-style-name="List_20_Paragraph" style:list-style-name="WWNum42">
      <style:paragraph-properties fo:margin-left="0.4957in" fo:line-height="100%" fo:text-indent="-0.248in" style:auto-text-indent="false" fo:keep-with-next="always"/>
    </style:style>
    <style:style style:name="P32" style:family="paragraph" style:parent-style-name="List_20_Paragraph">
      <style:paragraph-properties fo:line-height="100%"/>
      <style:text-properties fo:language="en" fo:country="GB"/>
    </style:style>
    <style:style style:name="P33" style:family="paragraph" style:parent-style-name="Standard">
      <style:text-properties fo:language="en" fo:country="GB"/>
    </style:style>
    <style:style style:name="P34" style:family="paragraph" style:parent-style-name="List_20_Paragraph" style:list-style-name="WWNum48">
      <style:paragraph-properties fo:line-height="100%"/>
    </style:style>
    <style:style style:name="P35" style:family="paragraph" style:parent-style-name="List_20_Paragraph">
      <style:paragraph-properties fo:line-height="100%"/>
    </style:style>
    <style:style style:name="P36" style:family="paragraph" style:parent-style-name="List_20_Paragraph">
      <style:text-properties fo:language="en" fo:country="GB"/>
    </style:style>
    <style:style style:name="P37" style:family="paragraph" style:parent-style-name="List_20_Paragraph">
      <style:paragraph-properties fo:keep-with-next="always"/>
    </style:style>
    <style:style style:name="P38" style:family="paragraph" style:parent-style-name="List_20_Paragraph">
      <style:paragraph-properties fo:margin-left="1in"/>
    </style:style>
    <style:style style:name="P39" style:family="paragraph" style:parent-style-name="Standard">
      <style:paragraph-properties fo:margin-left="1in"/>
    </style:style>
    <style:style style:name="P40" style:family="paragraph" style:parent-style-name="Standard">
      <loext:graphic-properties draw:fill="solid" draw:fill-color="#f2f2f2"/>
      <style:paragraph-properties fo:margin-left="0.5in" fo:background-color="#f2f2f2" fo:padding="0.0835in" fo:border="0.51pt solid #ffffff" style:shadow="none"/>
    </style:style>
    <style:style style:name="P41" style:family="paragraph" style:parent-style-name="No_20_Spacing">
      <style:paragraph-properties fo:margin-left="0.5in"/>
      <style:text-properties style:font-name="Calibri" style:font-name-complex="Calibri1"/>
    </style:style>
    <style:style style:name="P42" style:family="paragraph" style:parent-style-name="Heading_20_2">
      <style:paragraph-properties fo:margin-left="0.3126in" fo:margin-top="0.1665in" fo:margin-bottom="0.0417in" style:contextual-spacing="false" fo:text-indent="-0.2992in" style:auto-text-indent="false">
        <style:tab-stops>
          <style:tab-stop style:position="0.3752in"/>
        </style:tab-stops>
      </style:paragraph-properties>
    </style:style>
    <style:style style:name="P43" style:family="paragraph" style:parent-style-name="List_20_Paragraph" style:list-style-name="WWNum40">
      <style:paragraph-properties fo:margin-top="0.1665in" fo:margin-bottom="0in" style:contextual-spacing="false" fo:line-height="100%"/>
    </style:style>
    <style:style style:name="P44" style:family="paragraph" style:parent-style-name="List_20_Paragraph">
      <style:paragraph-properties fo:margin-top="0.0835in" fo:margin-bottom="0in" style:contextual-spacing="false"/>
    </style:style>
    <style:style style:name="P45" style:family="paragraph" style:parent-style-name="Standard" style:list-style-name="WWNum28">
      <style:paragraph-properties fo:line-height="100%"/>
    </style:style>
    <style:style style:name="P46" style:family="paragraph" style:parent-style-name="Standard">
      <style:paragraph-properties fo:margin-left="0.25in"/>
      <style:text-properties fo:language="en" fo:country="GB"/>
    </style:style>
    <style:style style:name="P47" style:family="paragraph" style:parent-style-name="Standard" style:list-style-name="WWNum28">
      <style:paragraph-properties fo:margin-left="0.5in" fo:line-height="100%" fo:text-indent="-0.248in" style:auto-text-indent="false" fo:keep-with-next="always"/>
    </style:style>
    <style:style style:name="P48" style:family="paragraph" style:parent-style-name="Standard">
      <style:paragraph-properties fo:margin-left="0.252in"/>
    </style:style>
    <style:style style:name="P49" style:family="paragraph" style:parent-style-name="Standard">
      <style:paragraph-properties fo:margin-left="0.5in"/>
      <style:text-properties fo:language="en" fo:country="GB"/>
    </style:style>
    <style:style style:name="P50" style:family="paragraph" style:parent-style-name="Standard">
      <style:paragraph-properties fo:margin-left="0.5in" fo:keep-with-next="always"/>
      <style:text-properties fo:language="en" fo:country="GB"/>
    </style:style>
    <style:style style:name="P51" style:family="paragraph" style:parent-style-name="Standard">
      <style:paragraph-properties fo:margin-left="0.5in" fo:keep-with-next="always"/>
    </style:style>
    <style:style style:name="P52" style:family="paragraph" style:parent-style-name="Standard">
      <style:paragraph-properties fo:keep-with-next="always"/>
      <style:text-properties fo:language="en" fo:country="GB"/>
    </style:style>
    <style:style style:name="P53" style:family="paragraph" style:parent-style-name="Standard">
      <style:paragraph-properties fo:margin-left="0.4925in" fo:margin-top="0in" fo:margin-bottom="0.0835in" style:contextual-spacing="false" fo:keep-with-next="always"/>
    </style:style>
    <style:style style:name="P54" style:family="paragraph" style:parent-style-name="List_20_Paragraph" style:list-style-name="WWNum41">
      <style:paragraph-properties fo:line-height="100%" fo:keep-with-next="always"/>
    </style:style>
    <style:style style:name="P55" style:family="paragraph" style:parent-style-name="Standard">
      <style:paragraph-properties fo:margin-top="0in" fo:margin-bottom="0in" style:contextual-spacing="false" fo:line-height="100%" fo:text-align="left"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56" style:family="paragraph" style:parent-style-name="Standard">
      <style:paragraph-properties fo:margin-top="0.0835in" fo:margin-bottom="0.0835in" style:contextual-spacing="false"/>
    </style:style>
    <style:style style:name="P57" style:family="paragraph" style:parent-style-name="List_20_Paragraph" style:list-style-name="WWNum12"/>
    <style:style style:name="P58" style:family="paragraph" style:parent-style-name="Standard">
      <style:paragraph-properties fo:line-height="100%"/>
    </style:style>
    <style:style style:name="P59" style:family="paragraph" style:parent-style-name="Standard">
      <style:paragraph-properties fo:margin-top="0in" fo:margin-bottom="0.3335in" style:contextual-spacing="false"/>
    </style:style>
    <style:style style:name="P60" style:family="paragraph" style:parent-style-name="List_20_Paragraph" style:list-style-name="WWNum37">
      <style:paragraph-properties fo:margin-top="0.0835in" fo:margin-bottom="0in" style:contextual-spacing="false"/>
    </style:style>
    <style:style style:name="P61" style:family="paragraph" style:parent-style-name="List_20_Paragraph" style:list-style-name="WWNum37">
      <style:paragraph-properties fo:margin-left="0.5in" fo:margin-top="0.0835in" fo:margin-bottom="0in" style:contextual-spacing="false" fo:text-indent="0.248in" style:auto-text-indent="false"/>
    </style:style>
    <style:style style:name="P62" style:family="paragraph" style:parent-style-name="Standard">
      <style:paragraph-properties fo:keep-together="always" fo:keep-with-next="always"/>
    </style:style>
    <style:style style:name="P63" style:family="paragraph" style:parent-style-name="Standard">
      <style:paragraph-properties fo:keep-together="always" fo:keep-with-next="always"/>
      <style:text-properties style:font-name-complex="Calibri1" style:font-size-complex="12pt"/>
    </style:style>
    <style:style style:name="P64" style:family="paragraph" style:parent-style-name="Standard" style:list-style-name="WWNum13">
      <style:paragraph-properties fo:margin-left="0.4957in" fo:margin-top="0.0835in" fo:margin-bottom="0in" style:contextual-spacing="false" fo:text-indent="-0.248in" style:auto-text-indent="false"/>
    </style:style>
    <style:style style:name="P65" style:family="paragraph" style:parent-style-name="Standard">
      <style:paragraph-properties fo:margin-top="0.0835in" fo:margin-bottom="0in" style:contextual-spacing="false" fo:keep-together="always" fo:keep-with-next="always"/>
    </style:style>
    <style:style style:name="P66" style:family="paragraph" style:parent-style-name="Standard">
      <style:paragraph-properties fo:margin-top="0.1665in" fo:margin-bottom="0in" style:contextual-spacing="false"/>
    </style:style>
    <style:style style:name="P67" style:family="paragraph" style:parent-style-name="Standard" style:list-style-name="WWNum1">
      <style:paragraph-properties fo:margin-left="0.4957in" fo:margin-top="0.0835in" fo:margin-bottom="0in" style:contextual-spacing="false" fo:text-indent="-0.248in" style:auto-text-indent="false"/>
    </style:style>
    <style:style style:name="P68" style:family="paragraph" style:parent-style-name="Standard">
      <style:paragraph-properties fo:margin-left="0.4957in" fo:margin-top="0.0835in" fo:margin-bottom="0in" style:contextual-spacing="false"/>
    </style:style>
    <style:style style:name="P69" style:family="paragraph" style:parent-style-name="Standard">
      <style:text-properties fo:language="en" fo:country="GB" style:language-asian="fr" style:country-asian="FR"/>
    </style:style>
    <style:style style:name="P70" style:family="paragraph" style:parent-style-name="List_20_Paragraph" style:list-style-name="WWNum43"/>
    <style:style style:name="P71" style:family="paragraph" style:parent-style-name="List_20_Paragraph" style:list-style-name="WWNum45"/>
    <style:style style:name="P72" style:family="paragraph" style:parent-style-name="List_20_Paragraph" style:list-style-name="WWNum46"/>
    <style:style style:name="P73" style:family="paragraph" style:parent-style-name="List_20_Paragraph" style:list-style-name="WWNum47"/>
    <style:style style:name="P74" style:family="paragraph" style:parent-style-name="Standard">
      <style:paragraph-properties fo:margin-top="0.1665in" fo:margin-bottom="0in" style:contextual-spacing="false" fo:keep-together="always" fo:keep-with-next="always"/>
    </style:style>
    <style:style style:name="P75" style:family="paragraph" style:parent-style-name="Standard">
      <style:text-properties style:language-asian="fr" style:country-asian="FR"/>
    </style:style>
    <style:style style:name="P76" style:family="paragraph" style:parent-style-name="Standard">
      <style:paragraph-properties fo:margin-top="0.1665in" fo:margin-bottom="0.1665in" style:contextual-spacing="false"/>
    </style:style>
    <style:style style:name="P77" style:family="paragraph" style:parent-style-name="Standard">
      <style:paragraph-properties fo:margin-top="0.0835in" fo:margin-bottom="0in" style:contextual-spacing="false" fo:keep-with-next="always"/>
    </style:style>
    <style:style style:name="P78" style:family="paragraph" style:parent-style-name="Standard">
      <style:paragraph-properties fo:line-height="100%" fo:text-align="center" style:justify-single-word="false"/>
    </style:style>
    <style:style style:name="P79" style:family="paragraph" style:parent-style-name="Standard">
      <style:paragraph-properties fo:line-height="100%"/>
      <style:text-properties style:font-name="Courier New" fo:font-size="10pt" style:font-size-asian="10pt" style:font-name-complex="Courier New1"/>
    </style:style>
    <style:style style:name="P80" style:family="paragraph" style:parent-style-name="Standard">
      <style:paragraph-properties fo:line-height="100%"/>
      <style:text-properties style:font-name="Calibri" style:font-name-complex="Calibri1"/>
    </style:style>
    <style:style style:name="P81" style:family="paragraph" style:parent-style-name="Standard">
      <style:paragraph-properties fo:margin-top="0.1665in" fo:margin-bottom="0.1665in" style:contextual-spacing="false"/>
      <style:text-properties style:font-name-complex="Calibri1" style:font-size-complex="12pt"/>
    </style:style>
    <style:style style:name="T1" style:family="text">
      <style:text-properties style:font-name="Calibri" fo:font-size="24pt" fo:language="en" fo:country="GB" fo:font-weight="bold" style:font-size-asian="24pt" style:font-weight-asian="bold" style:font-size-complex="24pt"/>
    </style:style>
    <style:style style:name="T2" style:family="text">
      <style:text-properties style:font-name="Calibri" fo:font-size="36pt" fo:language="en" fo:country="GB" fo:font-weight="bold" style:font-size-asian="36pt" style:font-weight-asian="bold" style:font-name-complex="Calibri1" style:font-size-complex="20pt"/>
    </style:style>
    <style:style style:name="T3" style:family="text">
      <style:text-properties style:font-name="Calibri" fo:language="en" fo:country="GB" fo:font-style="italic" style:font-style-asian="italic" style:font-name-complex="Calibri1"/>
    </style:style>
    <style:style style:name="T4" style:family="text">
      <style:text-properties style:font-name="Calibri"/>
    </style:style>
    <style:style style:name="T5" style:family="text">
      <style:text-properties style:font-name="Calibri" fo:font-size="16pt" fo:font-weight="bold" style:font-size-asian="16pt" style:font-weight-asian="bold"/>
    </style:style>
    <style:style style:name="T6" style:family="text">
      <style:text-properties style:font-name="Calibri" fo:language="en" fo:country="GB"/>
    </style:style>
    <style:style style:name="T7" style:family="text">
      <style:text-properties style:font-name="Calibri" fo:font-size="16pt" fo:language="en" fo:country="GB" style:font-size-asian="16pt"/>
    </style:style>
    <style:style style:name="T8" style:family="text">
      <style:text-properties fo:language="en" fo:country="GB"/>
    </style:style>
    <style:style style:name="T9" style:family="text">
      <style:text-properties fo:language="en" fo:country="GB" fo:font-style="italic" style:font-style-asian="italic"/>
    </style:style>
    <style:style style:name="T10" style:family="text">
      <style:text-properties style:font-name="Calibri" style:font-name-complex="Calibri1"/>
    </style:style>
    <style:style style:name="T11" style:family="text">
      <style:text-properties style:use-window-font-color="true" loext:opacity="0%" fo:font-weight="normal" style:letter-kerning="true" style:font-name-asian="新細明體" style:font-weight-asian="normal" style:font-name-complex="Arial1" style:font-size-complex="12pt"/>
    </style:style>
    <style:style style:name="T12" style:family="text">
      <style:text-properties style:font-name-complex="Times New Roman1"/>
    </style:style>
    <style:style style:name="T13" style:family="text">
      <style:text-properties text:display="true"/>
    </style:style>
    <style:style style:name="T14" style:family="text">
      <style:text-properties style:use-window-font-color="true" loext:opacity="0%" style:letter-kerning="true" style:font-name-asian="新細明體" style:font-name-complex="Arial1" style:font-size-complex="12pt"/>
    </style:style>
    <style:style style:name="T15" style:family="text">
      <style:text-properties style:use-window-font-color="true" loext:opacity="0%" style:font-name="Calibri" style:letter-kerning="true" style:font-name-asian="新細明體" style:font-name-complex="Arial1" style:font-size-complex="12pt"/>
    </style:style>
    <style:style style:name="T16" style:family="text">
      <style:text-properties fo:language="en" fo:country="GB" style:font-name-complex="Times New Roman1"/>
    </style:style>
    <style:style style:name="T17" style:family="text">
      <style:text-properties style:font-name-complex="Calibri1" style:font-size-complex="12pt"/>
    </style:style>
    <style:style style:name="T18" style:family="text">
      <style:text-properties fo:language="en" fo:country="GB" style:language-asian="fr" style:country-asian="FR"/>
    </style:style>
    <style:style style:name="T19" style:family="text">
      <style:text-properties fo:font-weight="bold" style:font-weight-asian="bold" style:font-name-complex="Calibri1" style:font-size-complex="12pt" style:font-weight-complex="bold"/>
    </style:style>
    <style:style style:name="T20" style:family="text">
      <style:text-properties style:font-name="Calibri" fo:language="en" fo:country="GB" style:language-asian="fr" style:country-asian="FR"/>
    </style:style>
    <style:style style:name="T21" style:family="text">
      <style:text-properties style:font-name="Calibri" style:font-name-complex="Calibri1" style:font-size-complex="12pt"/>
    </style:style>
    <style:style style:name="T22" style:family="text">
      <style:text-properties fo:language="en" fo:country="GB" fo:font-weight="bold" style:font-weight-asian="bold" style:font-weight-complex="bold"/>
    </style:style>
    <style:style style:name="T23" style:family="text">
      <style:text-properties fo:font-size="7pt" fo:language="en" fo:country="GB" style:font-size-asian="7pt"/>
    </style:style>
    <style:style style:name="T24" style:family="text">
      <style:text-properties fo:language="en" fo:country="GB" style:text-underline-style="solid" style:text-underline-width="auto" style:text-underline-color="font-color" fo:font-weight="bold" style:font-weight-asian="bold" style:font-weight-complex="bold"/>
    </style:style>
    <style:style style:name="T25" style:family="text">
      <style:text-properties fo:language="en" fo:country="GB" style:text-underline-style="solid" style:text-underline-width="auto" style:text-underline-color="font-color" fo:font-weight="bold" style:font-weight-asian="bold"/>
    </style:style>
    <style:style style:name="T26" style:family="text">
      <style:text-properties fo:language="en" fo:country="GB" fo:font-weight="bold" style:font-weight-asian="bold"/>
    </style:style>
    <style:style style:name="T27" style:family="text">
      <style:text-properties fo:font-family="Wingdings" style:font-family-generic="swiss" style:font-pitch="variable" fo:language="en" fo:country="GB" style:font-family-asian="Wingdings" style:font-family-generic-asian="system" style:font-pitch-asian="variable" style:font-family-complex="Wingdings" style:font-family-generic-complex="system" style:font-pitch-complex="variable"/>
    </style:style>
    <style:style style:name="T28" style:family="text">
      <style:text-properties fo:language="en" fo:country="GB" fo:font-style="italic" fo:font-weight="bold" style:font-style-asian="italic" style:font-weight-asian="bold" style:font-style-complex="italic"/>
    </style:style>
    <style:style style:name="T29" style:family="text">
      <style:text-properties fo:font-weight="bold" style:font-weight-asian="bold"/>
    </style:style>
    <style:style style:name="T30" style:family="text">
      <style:text-properties fo:language="en" fo:country="GB" style:text-underline-style="solid" style:text-underline-width="auto" style:text-underline-color="font-color"/>
    </style:style>
    <style:style style:name="T31" style:family="text">
      <style:text-properties fo:font-size="10pt" fo:language="en" fo:country="GB" fo:font-weight="bold" style:font-size-asian="10pt" style:font-weight-asian="bold"/>
    </style:style>
    <style:style style:name="T32" style:family="text">
      <style:text-properties fo:font-size="10pt" fo:language="en" fo:country="GB" style:font-size-asian="10pt"/>
    </style:style>
    <style:style style:name="T33" style:family="text">
      <style:text-properties style:font-name-complex="Calibri1"/>
    </style:style>
    <style:style style:name="T34" style:family="text">
      <style:text-properties fo:font-weight="bold" style:font-weight-asian="bold" style:font-name-complex="Calibri1"/>
    </style:style>
    <style:style style:name="T35" style:family="text">
      <style:text-properties style:font-name-complex="Calibri1" style:font-size-complex="12pt" fo:background-color="#ffffff"/>
    </style:style>
    <style:style style:name="T36" style:family="text">
      <style:text-properties style:language-asian="fr" style:country-asian="FR"/>
    </style:style>
    <style:style style:name="T37" style:family="text">
      <style:text-properties style:font-name="Courier New" fo:font-size="10pt" style:font-size-asian="10pt" style:language-asian="fr" style:country-asian="FR" style:font-name-complex="Courier New1"/>
    </style:style>
    <style:style style:name="T38" style:family="text">
      <style:text-properties fo:color="#333333" loext:opacity="100%" style:font-name="Courier New" fo:font-size="10pt" fo:background-color="#f8f8f8" loext:char-shading-value="0" style:font-name-asian="Times New Roman1" style:font-size-asian="10pt" style:language-asian="zh" style:country-asian="TW" style:font-name-complex="Courier New1" style:font-size-complex="10.5pt"/>
    </style:style>
    <style:style style:name="T39" style:family="text">
      <style:text-properties fo:color="#333333" loext:opacity="100%" style:font-name="Courier New" fo:font-size="10pt" style:font-name-asian="Times New Roman1" style:font-size-asian="10pt" style:language-asian="zh" style:country-asian="TW" style:font-name-complex="Courier New1" style:font-size-complex="10.5pt" style:font-weight-complex="bold"/>
    </style:style>
    <style:style style:name="T40" style:family="text">
      <style:text-properties style:use-window-font-color="true" loext:opacity="0%" style:font-name="Times New Roman" fo:font-size="11pt" style:font-name-asian="Times New Roman1" style:font-size-asian="11pt" style:language-asian="zh" style:country-asian="TW" style:font-name-complex="Times New Roman1" style:font-size-complex="12pt"/>
    </style:style>
    <style:style style:name="T41" style:family="text">
      <style:text-properties style:font-name="Courier New" fo:font-size="11pt" style:font-size-asian="11pt" style:font-name-complex="Courier New1" style:font-size-complex="12pt"/>
    </style:style>
    <style:style style:name="T42" style:family="text">
      <style:text-properties fo:font-weight="bold" style:font-weight-asian="bold" style:font-name-complex="Calibri1" style:font-size-complex="12pt"/>
    </style:style>
    <style:style style:name="T43" style:family="text">
      <style:text-properties fo:language="en" fo:country="GB" fo:font-style="italic" style:language-asian="fr" style:country-asian="FR" style:font-style-asian="italic" style:font-style-complex="italic"/>
    </style:style>
    <style:style style:name="T44" style:family="text">
      <style:text-properties fo:color="#1155cc" loext:opacity="100%" style:text-underline-style="solid" style:text-underline-width="auto" style:text-underline-color="font-color" style:font-name-complex="Calibri1" style:font-size-complex="12pt"/>
    </style:style>
    <style:style style:name="T45" style:family="text">
      <style:text-properties fo:font-weight="bold" style:font-weight-asian="bold" style:font-name-complex="Calibri1" style:font-weight-complex="bold"/>
    </style:style>
    <style:style style:name="T46" style:family="text">
      <style:text-properties fo:font-family="Wingdings" style:font-family-generic="swiss" style:font-pitch="variable" fo:font-size="10pt" style:font-family-asian="Wingdings" style:font-family-generic-asian="system" style:font-pitch-asian="variable" style:font-size-asian="10pt" style:font-family-complex="Wingdings" style:font-family-generic-complex="system" style:font-pitch-complex="variable"/>
    </style:style>
    <style:style style:name="T47" style:family="text">
      <style:text-properties fo:language="en" fo:country="GB" fo:font-style="italic" style:font-style-asian="italic" style:font-style-complex="italic"/>
    </style:style>
    <style:style style:name="T48" style:family="text">
      <style:text-properties fo:language="en" fo:country="GB" fo:font-style="italic" fo:font-weight="bold" style:font-style-asian="italic" style:font-weight-asian="bold" style:font-style-complex="italic" style:font-weight-complex="bold"/>
    </style:style>
    <style:style style:name="T49" style:family="text">
      <style:text-properties fo:font-style="italic" fo:font-weight="bold" style:font-style-asian="italic" style:font-weight-asian="bold" style:font-name-complex="Calibri1" style:font-size-complex="12pt"/>
    </style:style>
    <style:style style:name="T50" style:family="text">
      <style:text-properties fo:font-style="italic" fo:font-weight="bold" style:font-style-asian="italic" style:font-weight-asian="bold" style:font-name-complex="Calibri1" style:font-size-complex="12pt" style:font-style-complex="italic" style:font-weight-complex="bold"/>
    </style:style>
    <style:style style:name="T51" style:family="text">
      <style:text-properties fo:font-style="italic" style:font-style-asian="italic" style:font-name-complex="Calibri1" style:font-size-complex="12pt"/>
    </style:style>
    <style:style style:name="T52" style:family="text">
      <style:text-properties fo:font-style="italic" fo:font-weight="bold" style:language-asian="fr" style:country-asian="FR" style:font-style-asian="italic" style:font-weight-asian="bold" style:font-style-complex="italic" style:font-weight-complex="bold"/>
    </style:style>
    <style:style style:name="T53" style:family="text">
      <style:text-properties fo:font-weight="bold" style:language-asian="fr" style:country-asian="FR" style:font-weight-asian="bold" style:font-weight-complex="bold"/>
    </style:style>
    <style:style style:name="T54" style:family="text">
      <style:text-properties fo:font-style="italic" style:language-asian="fr" style:country-asian="FR" style:font-style-asian="italic" style:font-style-complex="italic"/>
    </style:style>
    <style:style style:name="T55" style:family="text">
      <style:text-properties fo:font-family="Wingdings" style:font-family-generic="swiss" style:font-pitch="variable" style:font-charset="x-symbol" fo:font-size="10pt" style:font-family-asian="Wingdings" style:font-family-generic-asian="system" style:font-pitch-asian="variable" style:font-size-asian="10pt" style:font-family-complex="Wingdings" style:font-family-generic-complex="system" style:font-pitch-complex="variable"/>
    </style:style>
    <style:style style:name="T56" style:family="text">
      <style:text-properties style:font-name="Calibri" fo:font-weight="bold" style:font-weight-asian="bold" style:font-name-complex="Calibri1" style:font-size-complex="12pt"/>
    </style:style>
    <style:style style:name="T57" style:family="text">
      <style:text-properties style:font-name="Courier New" fo:font-size="10pt" style:font-size-asian="10pt" style:font-name-complex="Courier New1"/>
    </style:style>
    <style:style style:name="T58" style:family="text">
      <style:text-properties style:font-name="Courier New" fo:font-size="10pt" style:font-name-asian="Courier New1" style:font-size-asian="10pt" style:font-name-complex="Courier New1"/>
    </style:style>
    <style:style style:name="T59" style:family="text">
      <style:text-properties fo:color="#2a00ff" loext:opacity="100%" style:font-name="Calibri" fo:font-size="10pt" style:font-size-asian="10pt" style:font-size-complex="10pt"/>
    </style:style>
    <style:style style:name="T60" style:family="text">
      <style:text-properties style:font-name="Calibri" fo:font-weight="bold" style:font-weight-asian="bold"/>
    </style:style>
    <style:style style:name="T61" style:family="text">
      <style:text-properties style:font-name="Courier New" fo:font-size="9pt" style:font-name-asian="Courier New1" style:font-size-asian="9pt" style:font-name-complex="Courier New1" style:font-size-complex="9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5972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ffffff" draw:stroke-linejoin="miter" svg:stroke-linecap="butt" draw:fill="solid" draw:fill-color="#ffffff" draw:textarea-vertical-align="top" draw:auto-grow-height="false" fo:min-height="0.1929in" fo:min-width="0.072in" fo:padding-top="0.0492in" fo:padding-bottom="0.0492in" fo:padding-left="0.0984in" fo:padding-right="0.0984in" fo:wrap-option="wrap" loext:decorative="false" fo:margin-left="0in" fo:margin-right="0.0236in" fo:margin-top="0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2" style:family="graphic">
      <style:graphic-properties draw:stroke="solid" svg:stroke-width="0.0102in" svg:stroke-color="#000000" draw:stroke-linejoin="miter" draw:fill="solid" draw:fill-color="#ffffff" draw:textarea-vertical-align="top" draw:auto-grow-height="false" fo:min-height="0.0173in" fo:min-width="0.2646in" fo:padding-top="0.0492in" fo:padding-bottom="0.0492in" fo:padding-left="0.0984in" fo:padding-right="0.0984in" fo:wrap-option="wrap" loext:decorative="false" fo:margin-left="0in" fo:margin-right="0in" fo:margin-top="0.1043in" fo:margin-bottom="0.0602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482021567"/></text:p>
      <text:p text:style-name="P2" loext:marker-style-name="T1"/>
      <text:p text:style-name="P2" loext:marker-style-name="T1"/>
      <text:p text:style-name="P2" loext:marker-style-name="T1"/>
      <text:p text:style-name="P3" loext:marker-style-name="T1"><draw:frame draw:style-name="fr1" draw:name="Picture 11" text:anchor-type="as-char" svg:width="5.3957in" svg:height="1.6772in"><draw:image xlink:href="Pictures/100000010000052600000171079C6F8C.png" xlink:type="simple" xlink:show="embed" xlink:actuate="onLoad" draw:mime-type="image/png"/></draw:frame></text:p>
      <text:p text:style-name="P2" loext:marker-style-name="T1"/>
      <text:p text:style-name="P2" loext:marker-style-name="T1"/>
      <text:p text:style-name="P2" loext:marker-style-name="T1"/>
      <text:p text:style-name="P3" loext:marker-style-name="T2"><text:span text:style-name="T2">Installing and <text:line-break/>Building Apps on a Mac</text:span><text:span text:style-name="T2"/></text:p>
      <text:p text:style-name="P4" loext:marker-style-name="T3"/>
      <text:p text:style-name="P4" loext:marker-style-name="T3"/>
      <text:p text:style-name="P3" loext:marker-style-name="T3"><text:span text:style-name="T3"><text:line-break/></text:span><text:span text:style-name="T3"/></text:p>
      <text:p text:style-name="P4" loext:marker-style-name="T3"/>
      <text:p text:style-name="P4" loext:marker-style-name="T3"/>
      <text:p text:style-name="P3" loext:marker-style-name="T3"><draw:frame draw:style-name="fr2" draw:name="Picture 52" text:anchor-type="as-char" svg:width="0.672in" svg:height="0.752in"><draw:image xlink:href="Pictures/1000000100000094000000A5C6F1C763.png" xlink:type="simple" xlink:show="embed" xlink:actuate="onLoad" draw:mime-type="image/png"/><svg:desc>Logo

Description automatically generated</svg:desc></draw:frame></text:p>
      <text:p text:style-name="P5" loext:marker-style-name="T4"/>
      <text:p text:style-name="Standard" loext:marker-style-name="T4"><text:span text:style-name="T4"><text:s/></text:span><text:span text:style-name="T4"/></text:p>
      <text:p text:style-name="P6" loext:marker-style-name="T5"><draw:custom-shape text:anchor-type="char" draw:z-index="0" draw:name="Rectangle 16" draw:style-name="gr1" draw:text-style-name="P7" svg:width="0.2689in" svg:height="0.2913in" svg:x="3.0299in" svg:y="0.5807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loext:marker-style-name="T6"/>
      <text:p text:style-name="P9"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10" loext:marker-style-name="T6"/>
      <text:p text:style-name="P3" loext:marker-style-name="T7"><text:span text:style-name="T7">Keyboard App Builder: <text:line-break/>Installing and Building Apps on a Mac</text:span><text:span text:style-name="T7"/></text:p>
      <text:p text:style-name="P10" loext:marker-style-name="T6"/>
      <text:p text:style-name="P3" loext:marker-style-name="T8"><text:span text:style-name="T8">© 2021, SIL International</text:span><text:span text:style-name="T8"/></text:p>
      <text:p text:style-name="P11" loext:marker-style-name="T8"/>
      <text:p text:style-name="P3" loext:marker-style-name="T9"><text:span text:style-name="T9">Last updated: 25 March 2025</text:span><text:span text:style-name="T9"/></text:p>
      <text:p text:style-name="P10" loext:marker-style-name="T6"/>
      <text:p text:style-name="P10" loext:marker-style-name="T6"/>
      <text:p text:style-name="P10" loext:marker-style-name="T6"/>
      <text:p text:style-name="P10" loext:marker-style-name="T6"/>
      <text:p text:style-name="P10" loext:marker-style-name="T6"/>
      <text:p text:style-name="P3" loext:marker-style-name="T4"><text:span text:style-name="T4">You are free to print this manual for personal use and for training workshops.</text:span><text:span text:style-name="T4"/></text:p>
      <text:p text:style-name="P5" loext:marker-style-name="T4"/>
      <text:p text:style-name="P3" loext:marker-style-name="T4"><text:span text:style-name="T4">The latest version is available at</text:span><text:span text:style-name="T4"/></text:p>
      <text:p text:style-name="P3" loext:marker-style-name="T6"><text:a xlink:type="simple" xlink:href="http://software.sil.org/keyboardappbuilder/resources/" text:style-name="Internet_20_link" text:visited-style-name="Visited_20_Internet_20_Link"><text:span text:style-name="Internet_20_link"><text:span text:style-name="T4">http://software.sil.org/keyboardappbuilder/resources/</text:span></text:span></text:a><text:span text:style-name="T6"> <text:s/></text:span></text:p>
      <text:p text:style-name="P10" loext:marker-style-name="T6"/>
      <text:p text:style-name="P3" loext:marker-style-name="T6"><text:span text:style-name="T6">and on the Help menu of Keyboard App Builder.</text:span><text:span text:style-name="T6"/></text:p>
      <text:p text:style-name="P12" loext:marker-style-name="T5"/>
      <text:p text:style-name="P13" loext:marker-style-name="T5"><text:span text:style-name="T5">Contents</text:span><text:span text:style-name="T5"/></text:p>
      <text:p text:style-name="P14" loext:marker-style-name="T10"/>
      <text:p text:style-name="P14"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1"><text:a xlink:type="simple" xlink:href="#_Toc228363873" text:style-name="Index_20_Link" text:visited-style-name="Index_20_Link"><text:span text:style-name="T12">1.</text:span><text:span text:style-name="T11"><text:tab/></text:span>Introduction<text:span text:style-name="T13"><text:tab/>5</text:span></text:a></text:p>
          <text:p text:style-name="Contents_20_1" loext:marker-style-name="T11"><text:a xlink:type="simple" xlink:href="#_Toc228363874" text:style-name="Index_20_Link" text:visited-style-name="Index_20_Link"><text:span text:style-name="T12">2.</text:span><text:span text:style-name="T11"><text:tab/></text:span>Installing Keyboard App Builder<text:span text:style-name="T13"><text:tab/>5</text:span></text:a></text:p>
          <text:p text:style-name="Contents_20_1" loext:marker-style-name="T11"><text:a xlink:type="simple" xlink:href="#_Toc228363875" text:style-name="Index_20_Link" text:visited-style-name="Index_20_Link"><text:span text:style-name="T12">3.</text:span><text:span text:style-name="T11"><text:tab/></text:span>Installing Prerequisites for Android<text:span text:style-name="T13"><text:tab/>5</text:span></text:a></text:p>
          <text:p text:style-name="Contents_20_2" loext:marker-style-name="T14"><text:a xlink:type="simple" xlink:href="#_Toc228363876" text:style-name="Index_20_Link" text:visited-style-name="Index_20_Link">3.1.<text:span text:style-name="T14"><text:tab/></text:span>Java Development Kit (JDK)<text:span text:style-name="T13"><text:tab/>5</text:span></text:a></text:p>
          <text:p text:style-name="Contents_20_2" loext:marker-style-name="T14"><text:a xlink:type="simple" xlink:href="#_Toc228363877" text:style-name="Index_20_Link" text:visited-style-name="Index_20_Link"><text:span text:style-name="T8">3.2.</text:span><text:span text:style-name="T14"><text:tab/></text:span><text:span text:style-name="T8">Installing Android Software Development Kit (SDK)</text:span><text:span text:style-name="T13"><text:tab/>7</text:span></text:a></text:p>
          <text:p text:style-name="P15" loext:marker-style-name="T15"><text:a xlink:type="simple" xlink:href="#_Toc228363878" text:style-name="Index_20_Link" text:visited-style-name="Index_20_Link"><text:span text:style-name="T16">3.2.1.</text:span><text:span text:style-name="T15"><text:tab/></text:span><text:span text:style-name="T8">Downloading the Android SDK packages from the internet</text:span><text:span text:style-name="T13"><text:tab/>7</text:span></text:a></text:p>
          <text:p text:style-name="P15" loext:marker-style-name="T15"><text:a xlink:type="simple" xlink:href="#_Toc228363879" text:style-name="Index_20_Link" text:visited-style-name="Index_20_Link"><text:span text:style-name="T16">3.2.2.</text:span><text:span text:style-name="T15"><text:tab/></text:span><text:span text:style-name="T8">Copying the Android SDK files from someone else</text:span><text:span text:style-name="T13"><text:tab/>9</text:span></text:a></text:p>
          <text:p text:style-name="Contents_20_1" loext:marker-style-name="T11"><text:a xlink:type="simple" xlink:href="#_Toc228363880" text:style-name="Index_20_Link" text:visited-style-name="Index_20_Link"><text:span text:style-name="T12">4.</text:span><text:span text:style-name="T11"><text:tab/></text:span>Installing Prerequisites for iOS<text:span text:style-name="T13"><text:tab/>10</text:span></text:a></text:p>
          <text:p text:style-name="Contents_20_2" loext:marker-style-name="T14"><text:a xlink:type="simple" xlink:href="#_Toc228363881" text:style-name="Index_20_Link" text:visited-style-name="Index_20_Link">4.1.<text:span text:style-name="T14"><text:tab/></text:span>Install Xcode<text:span text:style-name="T13"><text:tab/>10</text:span></text:a></text:p>
          <text:p text:style-name="Contents_20_2" loext:marker-style-name="T14"><text:a xlink:type="simple" xlink:href="#_Toc228363882" text:style-name="Index_20_Link" text:visited-style-name="Index_20_Link">4.2.<text:span text:style-name="T14"><text:tab/></text:span>Verify Xcode Installation<text:span text:style-name="T13"><text:tab/>10</text:span></text:a></text:p>
          <text:p text:style-name="Contents_20_2" loext:marker-style-name="T14"><text:a xlink:type="simple" xlink:href="#_Toc228363883" text:style-name="Index_20_Link" text:visited-style-name="Index_20_Link">4.3.<text:span text:style-name="T14"><text:tab/></text:span>Install Transporter<text:span text:style-name="T13"><text:tab/>11</text:span></text:a></text:p>
          <text:p text:style-name="Contents_20_1" loext:marker-style-name="T11"><text:a xlink:type="simple" xlink:href="#_Toc228363884" text:style-name="Index_20_Link" text:visited-style-name="Index_20_Link"><text:span text:style-name="T12">5.</text:span><text:span text:style-name="T11"><text:tab/></text:span>Building a Keyboard App for iOS<text:span text:style-name="T13"><text:tab/>11</text:span></text:a></text:p>
          <text:p text:style-name="Contents_20_2" loext:marker-style-name="T14"><text:a xlink:type="simple" xlink:href="#_Toc228363885" text:style-name="Index_20_Link" text:visited-style-name="Index_20_Link"><text:span text:style-name="T8">5.1.</text:span><text:span text:style-name="T14"><text:tab/></text:span><text:span text:style-name="T8">Apple Development Store Setup</text:span><text:span text:style-name="T13"><text:tab/>11</text:span></text:a></text:p>
          <text:p text:style-name="P15" loext:marker-style-name="T15"><text:a xlink:type="simple" xlink:href="#_Toc228363886" text:style-name="Index_20_Link" text:visited-style-name="Index_20_Link"><text:span text:style-name="T16">5.1.1.</text:span><text:span text:style-name="T15"><text:tab/></text:span><text:span text:style-name="T8">Enroll in the Apple Developer Program</text:span><text:span text:style-name="T13"><text:tab/>11</text:span></text:a></text:p>
          <text:p text:style-name="P15" loext:marker-style-name="T15"><text:a xlink:type="simple" xlink:href="#_Toc228363887" text:style-name="Index_20_Link" text:visited-style-name="Index_20_Link"><text:span text:style-name="T16">5.1.2.</text:span><text:span text:style-name="T15"><text:tab/></text:span><text:span text:style-name="T8">Create Signing Certificate</text:span><text:span text:style-name="T13"><text:tab/>12</text:span></text:a></text:p>
          <text:p text:style-name="P15" loext:marker-style-name="T15"><text:a xlink:type="simple" xlink:href="#_Toc228363888" text:style-name="Index_20_Link" text:visited-style-name="Index_20_Link"><text:span text:style-name="T16">5.1.3.</text:span><text:span text:style-name="T15"><text:tab/></text:span><text:span text:style-name="T8">Create App Identifiers</text:span><text:span text:style-name="T13"><text:tab/>13</text:span></text:a></text:p>
          <text:p text:style-name="P15" loext:marker-style-name="T15"><text:a xlink:type="simple" xlink:href="#_Toc228363889" text:style-name="Index_20_Link" text:visited-style-name="Index_20_Link"><text:span text:style-name="T16">5.1.4.</text:span><text:span text:style-name="T15"><text:tab/></text:span><text:span text:style-name="T8">Create App Group</text:span><text:span text:style-name="T13"><text:tab/>14</text:span></text:a></text:p>
          <text:p text:style-name="P15" loext:marker-style-name="T15"><text:a xlink:type="simple" xlink:href="#_Toc228363890" text:style-name="Index_20_Link" text:visited-style-name="Index_20_Link"><text:span text:style-name="T16">5.1.5.</text:span><text:span text:style-name="T15"><text:tab/></text:span><text:span text:style-name="T8">Associate App Identifiers to App Group</text:span><text:span text:style-name="T13"><text:tab/>14</text:span></text:a></text:p>
          <text:p text:style-name="P15" loext:marker-style-name="T15"><text:a xlink:type="simple" xlink:href="#_Toc228363891" text:style-name="Index_20_Link" text:visited-style-name="Index_20_Link"><text:span text:style-name="T16">5.1.6.</text:span><text:span text:style-name="T15"><text:tab/></text:span><text:span text:style-name="T8">Create Provisioning Profiles</text:span><text:span text:style-name="T13"><text:tab/>15</text:span></text:a></text:p>
          <text:p text:style-name="Contents_20_2" loext:marker-style-name="T14"><text:a xlink:type="simple" xlink:href="#_Toc228363892" text:style-name="Index_20_Link" text:visited-style-name="Index_20_Link"><text:span text:style-name="T8">5.2.</text:span><text:span text:style-name="T14"><text:tab/></text:span><text:span text:style-name="T8">Building iOS App using Keyboard App Builder</text:span><text:span text:style-name="T13"><text:tab/>15</text:span></text:a></text:p>
          <text:p text:style-name="P15" loext:marker-style-name="T15"><text:a xlink:type="simple" xlink:href="#_Toc228363893" text:style-name="Index_20_Link" text:visited-style-name="Index_20_Link"><text:span text:style-name="T16">5.2.1.</text:span><text:span text:style-name="T15"><text:tab/></text:span><text:span text:style-name="T8">IPA Tab</text:span><text:span text:style-name="T13"><text:tab/>15</text:span></text:a></text:p>
          <text:p text:style-name="P15" loext:marker-style-name="T15"><text:a xlink:type="simple" xlink:href="#_Toc228363894" text:style-name="Index_20_Link" text:visited-style-name="Index_20_Link"><text:span text:style-name="T16">5.2.2.</text:span><text:span text:style-name="T15"><text:tab/></text:span><text:span text:style-name="T8">Signing (iOS) Tab</text:span><text:span text:style-name="T13"><text:tab/>17</text:span></text:a></text:p>
          <text:p text:style-name="P15" loext:marker-style-name="T15"><text:a xlink:type="simple" xlink:href="#_Toc228363895" text:style-name="Index_20_Link" text:visited-style-name="Index_20_Link"><text:span text:style-name="T16">5.2.3.</text:span><text:span text:style-name="T15"><text:tab/></text:span><text:span text:style-name="T8">Build iOS App</text:span><text:span text:style-name="T13"><text:tab/>20</text:span></text:a></text:p>
          <text:p text:style-name="P15" loext:marker-style-name="T15"><text:a xlink:type="simple" xlink:href="#_Toc228363896" text:style-name="Index_20_Link" text:visited-style-name="Index_20_Link"><text:span text:style-name="T16">5.2.4.</text:span><text:span text:style-name="T15"><text:tab/></text:span><text:span text:style-name="T8">Run iOS App in Simulator</text:span><text:span text:style-name="T13"><text:tab/>20</text:span></text:a></text:p>
          <text:p text:style-name="Contents_20_1" loext:marker-style-name="T11"><text:a xlink:type="simple" xlink:href="#_Toc228363897" text:style-name="Index_20_Link" text:visited-style-name="Index_20_Link"><text:span text:style-name="T12">6.</text:span><text:span text:style-name="T11"><text:tab/></text:span>Building from Terminal<text:span text:style-name="T13"><text:tab/>21</text:span></text:a></text:p>
          <text:p text:style-name="Contents_20_2" loext:marker-style-name="T14"><text:a xlink:type="simple" xlink:href="#_Toc228363898" text:style-name="Index_20_Link" text:visited-style-name="Index_20_Link">6.1.<text:span text:style-name="T14"><text:tab/></text:span>Installing Command Line Interface<text:span text:style-name="T13"><text:tab/>21</text:span></text:a></text:p>
          <text:p text:style-name="Contents_20_2" loext:marker-style-name="T14"><text:a xlink:type="simple" xlink:href="#_Toc228363899" text:style-name="Index_20_Link" text:visited-style-name="Index_20_Link">6.2.<text:span text:style-name="T14"><text:tab/></text:span>Command Line Interface Options<text:span text:style-name="T13"><text:tab/>22</text:span></text:a></text:p>
        </text:index-body>
      </text:table-of-content>
      <text:p text:style-name="P5" loext:marker-style-name="T4"/>
      <text:h text:style-name="P16" text:outline-level="1"><text:bookmark text:name="_ib23mk4syx17"/><text:bookmark-start text:name="_Toc228363873"/><text:bookmark-start text:name="_Toc475369911"/>Introduction<text:bookmark-end text:name="_Toc228363873"/><text:bookmark-end text:name="_Toc475369911"/></text:h>
      <text:p text:style-name="Standard" loext:marker-style-name="T17"><text:span text:style-name="T17">This document provides information on how to install Keyboard App Builder and build apps on an Apple macOS system. Creating an Android app on a Mac is essentially the same process as it is for Windows or Linux.</text:span><text:span text:style-name="T17"/></text:p>
      <text:p text:style-name="P17" loext:marker-style-name="T17"><text:span text:style-name="T17">Keyboard App Builder only builds apps for Android. There is currently no iOS app. </text:span><text:span text:style-name="T17"/></text:p>
      <text:p text:style-name="P18" loext:marker-style-name="T17"/>
      <text:h text:style-name="Heading_20_1" text:outline-level="1"><text:bookmark text:name="_aavgtmmhk0r5"/><text:bookmark-start text:name="_Toc475369912"/><text:bookmark-start text:name="OLE_LINK2"/><text:bookmark-start text:name="OLE_LINK1"/><text:bookmark-start text:name="_Toc228363874"/>Installing Keyboard App Builder<text:bookmark-end text:name="OLE_LINK2"/><text:bookmark-end text:name="OLE_LINK1"/><text:bookmark-end text:name="_Toc228363874"/></text:h>
      <text:p text:style-name="P19" loext:marker-style-name="T18"><text:span text:style-name="T18">To install the Keyboard App Builder program files:</text:span><text:span text:style-name="T18"/></text:p>
      <text:list text:style-name="WWNum15">
        <text:list-item>
          <text:p text:style-name="P20" loext:marker-style-name="T17"><text:span text:style-name="T17">Download the current Mac installer file (dmg) from the KAB website:</text:span><text:span text:style-name="T17"/></text:p>
        </text:list-item>
      </text:list>
      <text:p text:style-name="P21" loext:marker-style-name="T17"><text:a xlink:type="simple" xlink:href="http://software.sil.org/keyboardappbuilder/download/" text:style-name="Internet_20_link" text:visited-style-name="Visited_20_Internet_20_Link"><text:span text:style-name="Internet_20_link"><text:span text:style-name="T17">http://software.sil.org/keyboardappbuilder/download/</text:span></text:span></text:a><text:span text:style-name="T17"> </text:span></text:p>
      <text:list text:continue-numbering="true" text:style-name="WWNum15">
        <text:list-item>
          <text:p text:style-name="P20" loext:marker-style-name="T17"><text:span text:style-name="T17">Double click on the file within </text:span><text:span text:style-name="T19">Finder</text:span><text:span text:style-name="T17"> to open the disk image that contains the Keyboard App Builder application.</text:span></text:p>
        </text:list-item>
        <text:list-item>
          <text:p text:style-name="P20" loext:marker-style-name="T17"><text:span text:style-name="T17">Copy the </text:span><text:span text:style-name="T19">Keyboard App Builder</text:span><text:span text:style-name="T17"> application to your </text:span><text:span text:style-name="T19">Application</text:span><text:span text:style-name="T17"> folder. This can be done by dragging the Keyboard App Builder icon from the disk image window to the shortcut of the Applications folder in the same window.</text:span></text:p>
        </text:list-item>
      </text:list>
      <text:p text:style-name="P22" loext:marker-style-name="T20"/>
      <text:h text:style-name="Heading_20_1" text:outline-level="1"><text:bookmark-start text:name="_Toc228363875"/>Installing Prerequisites<text:bookmark-end text:name="_Toc475369912"/> for Android<text:bookmark-end text:name="_Toc228363875"/></text:h>
      <text:p text:style-name="P23" loext:marker-style-name="T17"><text:span text:style-name="T17">If you want to build Android apps, you need to install the following components on your computer:</text:span><text:span text:style-name="T17"/></text:p>
      <text:list text:style-name="WWNum11">
        <text:list-item>
          <text:p text:style-name="P24" loext:marker-style-name="T21"><text:span text:style-name="T21">Java Development Kit (JDK)</text:span><text:span text:style-name="T21"/></text:p>
        </text:list-item>
        <text:list-item>
          <text:p text:style-name="P24" loext:marker-style-name="T21"><text:span text:style-name="T21">Android Software Development Kit (SDK)</text:span><text:span text:style-name="T21"/></text:p>
        </text:list-item>
      </text:list>
      <text:h text:style-name="P25" text:outline-level="2"><text:bookmark text:name="_b03t0hmdkkzk"/><text:bookmark-start text:name="_Toc228363876"/><text:bookmark-start text:name="_Toc475369913"/>Java Development Kit (JDK)<text:bookmark-end text:name="_Toc228363876"/><text:bookmark-end text:name="_Toc475369913"/></text:h>
      <text:p text:style-name="P26" loext:marker-style-name="T8"><text:bookmark-start text:name="_Hlk534311866"/><text:span text:style-name="T8">You will need version 17 of the Java Development Kit (JDK) to build apps. We recommend you use Zulu, which is a free distribution of OpenJDK from Azul.</text:span><text:bookmark-end text:name="_Hlk534311866"/><text:span text:style-name="T8"/></text:p>
      <text:list text:style-name="WWNum42">
        <text:list-item>
          <text:p text:style-name="P27" loext:marker-style-name="T8"><text:span text:style-name="T8">Go to the </text:span><text:span text:style-name="T22">Download Zulu Builds of OpenJDK</text:span><text:span text:style-name="T8"> website:</text:span></text:p>
        </text:list-item>
      </text:list>
      <text:p text:style-name="P28" loext:marker-style-name="T23"/>
      <text:p text:style-name="P28" loext:marker-style-name="T23"/>
      <text:p text:style-name="P29"><text:a xlink:type="simple" xlink:href="https://www.azul.com/downloads/?version=java-17-lts&amp;os=macos&amp;architecture=arm-64-bit&amp;package=jdk-fx#zulu" text:style-name="Internet_20_link" text:visited-style-name="Visited_20_Internet_20_Link"><text:span text:style-name="Internet_20_link">https://www.azul.com/downloads/?version=java-17-lts&amp;os=macos&amp;architecture=arm-64-bit&amp;package=jdk-fx#zulu</text:span></text:a></text:p>
      <text:p text:style-name="Standard"/>
      <text:p text:style-name="P30" loext:marker-style-name="T8"><text:span text:style-name="T8">There are many downloads on this page, but the above link will filter the ones you see (Java Version: Java 17 LTS; Operating System: MacOS; Architecture: ARM 64-bit; Java Package: Java FX).</text:span><text:span text:style-name="T8"/></text:p>
      <text:p text:style-name="Standard"/>
      <text:p text:style-name="Standard"/>
      <text:list text:continue-numbering="true" text:style-name="WWNum42">
        <text:list-item>
          <text:p text:style-name="P31" loext:marker-style-name="T8"><text:span text:style-name="T8">Scroll down the page until you see the downloads under the heading </text:span><text:span text:style-name="T22">Download Azul Zulu Builds of OpenJDK</text:span><text:span text:style-name="T8">:</text:span></text:p>
        </text:list-item>
      </text:list>
      <text:p text:style-name="P32" loext:marker-style-name="T8"/>
      <text:p text:style-name="Standard" loext:marker-style-name="T8"><draw:frame draw:style-name="fr2" draw:name="Picture 2" text:anchor-type="as-char" svg:width="6.2638in" svg:height="4.372in"><draw:image xlink:href="Pictures/10000001000006850000048DE77F53FD.png" xlink:type="simple" xlink:show="embed" xlink:actuate="onLoad" draw:mime-type="image/png"/></draw:frame></text:p>
      <text:p text:style-name="P33" loext:marker-style-name="T8"/>
      <text:p text:style-name="P33" loext:marker-style-name="T8"/>
      <text:list text:style-name="WWNum48">
        <text:list-item>
          <text:p text:style-name="P34" loext:marker-style-name="T8"><text:span text:style-name="T8">You have a choice between two different architectures: </text:span><text:span text:style-name="T22">x86 64-bit</text:span><text:span text:style-name="T8"> and </text:span><text:span text:style-name="T22">ARM 64-bit</text:span><text:span text:style-name="T8">. You can find the processor type of your machine by clicking on the Apple symbol at the top left of your screen and selecting </text:span><text:span text:style-name="T22">About This Mac</text:span><text:span text:style-name="T8">. If you have an older Mac running with an Intel x86 chip, select x86 (64 bit) otherwise you will need the ARM 64-bit.</text:span></text:p>
        </text:list-item>
      </text:list>
      <text:p text:style-name="P32" loext:marker-style-name="T8"/>
      <text:p text:style-name="P35" loext:marker-style-name="T8"><text:span text:style-name="T8">Once you have identified your device architecture, you have a choice between a </text:span><text:span text:style-name="T22">dmg</text:span><text:span text:style-name="T8"> file, a </text:span><text:span text:style-name="T22">tar.gz</text:span><text:span text:style-name="T8"> file and a </text:span><text:span text:style-name="T22">zip</text:span><text:span text:style-name="T8"> file. </text:span><text:span text:style-name="T22">Download the .dmg file</text:span><text:span text:style-name="T8"> since it comes with its own installer program. </text:span></text:p>
      <text:p text:style-name="P36" loext:marker-style-name="T8"/>
      <text:p text:style-name="P37" loext:marker-style-name="T8"><text:span text:style-name="T8">The file you download will have a filename something like this:</text:span><text:span text:style-name="T8"/></text:p>
      <text:p text:style-name="P38" loext:marker-style-name="T8"><text:span text:style-name="T22">zulu17.64.17-ca-fx-jdk17.0.18-macosx_x64.dmg</text:span><text:span text:style-name="T8"><text:line-break/></text:span></text:p>
      <text:list text:continue-numbering="true" text:style-name="WWNum48">
        <text:list-item>
          <text:p text:style-name="P34" loext:marker-style-name="T8"><text:span text:style-name="T22">Double-click the file</text:span><text:span text:style-name="T8"> </text:span><text:span text:style-name="T22">in Finder </text:span><text:span text:style-name="T8">and follow the instructions in the installation wizard to install it. By default, the installer will install the JDK to the following folder:</text:span></text:p>
        </text:list-item>
      </text:list>
      <text:p text:style-name="P33" loext:marker-style-name="T8"/>
      <text:p text:style-name="P39" loext:marker-style-name="T22"><text:span text:style-name="T22">/Library/Java/JavaVirtualMachines/zulu-17.jdk/Contents/Home</text:span><text:span text:style-name="T22"/></text:p>
      <text:p text:style-name="P33" loext:marker-style-name="T8"/>
      <text:p text:style-name="P40" loext:marker-style-name="T8"><text:span text:style-name="T24">Important</text:span><text:span text:style-name="T8">: If you change the JDK install folder to something other than the default folder, you will need to remember the location of the folder so you can tell Keyboard App Builder where to find the JDK.</text:span></text:p>
      <text:p text:style-name="P33" loext:marker-style-name="T8"/>
      <text:p text:style-name="P41" loext:marker-style-name="T10"/>
      <text:h text:style-name="P42" text:outline-level="2" loext:marker-style-name="T8"><text:bookmark text:name="_mcyrni6cg1av"/><text:bookmark-start text:name="OLE_LINK6"/><text:bookmark-start text:name="OLE_LINK5"/><text:bookmark-start text:name="_Toc228363877"/><text:bookmark-start text:name="_Toc78622942"/><text:bookmark-start text:name="_Toc482020490"/><text:bookmark-start text:name="OLE_LINK4"/><text:bookmark-start text:name="OLE_LINK3"/><text:span text:style-name="T8">Installing Android </text:span><text:bookmark-end text:name="OLE_LINK4"/><text:bookmark-end text:name="OLE_LINK3"/><text:span text:style-name="T8">Software Development Kit (SDK)</text:span><text:bookmark-end text:name="OLE_LINK6"/><text:bookmark-end text:name="OLE_LINK5"/><text:bookmark-end text:name="_Toc228363877"/><text:bookmark-end text:name="_Toc78622942"/><text:bookmark-end text:name="_Toc482020490"/><text:span text:style-name="T8"/></text:h>
      <text:p text:style-name="P26" loext:marker-style-name="T8"><text:span text:style-name="T8">The Android Software Development Kit (SDK) is needed for building Android apps. There are two ways of installing the Android SDK:</text:span><text:span text:style-name="T8"/></text:p>
      <text:list text:style-name="WWNum40">
        <text:list-item>
          <text:p text:style-name="P43" loext:marker-style-name="T8"><text:span text:style-name="T25">Online</text:span><text:span text:style-name="T26">: Download the Android SDK packages from the internet: </text:span><text:span text:style-name="T8"><text:line-break/>Use the Android SDK Installation wizard to download and install the command line tools and three additional packages. This method will require an internet connection. </text:span></text:p>
        </text:list-item>
      </text:list>
      <text:p text:style-name="P44" loext:marker-style-name="T8"><text:span text:style-name="T8">See 3.2.1 for more details.<text:line-break/></text:span><text:span text:style-name="T8"/></text:p>
      <text:list text:continue-numbering="true" text:style-name="WWNum40">
        <text:list-item>
          <text:p text:style-name="P43" loext:marker-style-name="T8"><text:span text:style-name="T25">Offline</text:span><text:span text:style-name="T26">: Copy the Android SDK files from someone else:</text:span><text:span text:style-name="T8"><text:line-break/>If you know someone who has already downloaded and installed the Android SDK, you can copy all the files from them.</text:span></text:p>
        </text:list-item>
      </text:list>
      <text:p text:style-name="P44" loext:marker-style-name="T8"><text:span text:style-name="T8">This method is especially useful in a training workshop where several people need to install the SDK but have limited internet bandwidth. </text:span><text:span text:style-name="T8"/></text:p>
      <text:p text:style-name="P44" loext:marker-style-name="T8"><text:span text:style-name="T8">See 3.2.2 for more details.</text:span><text:span text:style-name="T8"/></text:p>
      <text:p text:style-name="P33" loext:marker-style-name="T8"/>
      <text:h text:style-name="Heading_20_3" text:outline-level="3" loext:marker-style-name="T8"><text:bookmark-start text:name="_Toc77851809"/><text:bookmark-start text:name="OLE_LINK8"/><text:bookmark-start text:name="OLE_LINK7"/><text:bookmark-start text:name="_Toc228363878"/><text:bookmark-start text:name="_Toc78622943"/><text:span text:style-name="T8">Downloading the Android SDK packages from the internet</text:span><text:bookmark-end text:name="_Toc77851809"/><text:bookmark-end text:name="OLE_LINK8"/><text:bookmark-end text:name="OLE_LINK7"/><text:bookmark-end text:name="_Toc228363878"/><text:bookmark-end text:name="_Toc78622943"/><text:span text:style-name="T8"/></text:h>
      <text:p text:style-name="Standard" loext:marker-style-name="T8"><text:span text:style-name="T8">To install the Android SDK from the internet: </text:span><text:span text:style-name="T8"/></text:p>
      <text:p text:style-name="P33" loext:marker-style-name="T8"/>
      <text:list text:style-name="WWNum28">
        <text:list-item>
          <text:p text:style-name="P45" loext:marker-style-name="T8"><text:span text:style-name="T8">Launch </text:span><text:span text:style-name="T26">Keyboard App Builder</text:span><text:span text:style-name="T8">. </text:span></text:p>
        </text:list-item>
      </text:list>
      <text:p text:style-name="P46" loext:marker-style-name="T8"/>
      <text:list text:continue-numbering="true" text:style-name="WWNum28">
        <text:list-item>
          <text:p text:style-name="P45" loext:marker-style-name="T8"><text:span text:style-name="T8">Select </text:span><text:span text:style-name="T26">Keyboard App Builder</text:span><text:span text:style-name="T8"> </text:span><text:span text:style-name="T27">Ø</text:span><text:span text:style-name="T8"> </text:span><text:span text:style-name="T26">Preferences</text:span><text:span text:style-name="T8"> from the main menu.</text:span></text:p>
        </text:list-item>
      </text:list>
      <text:p text:style-name="P36" loext:marker-style-name="T8"/>
      <text:list text:continue-numbering="true" text:style-name="WWNum28">
        <text:list-item>
          <text:p text:style-name="P45" loext:marker-style-name="T8"><text:span text:style-name="T8">Go to the </text:span><text:span text:style-name="T26">Android SDK</text:span><text:span text:style-name="T8"> tab, which is the second tab.</text:span></text:p>
        </text:list-item>
      </text:list>
      <text:p text:style-name="P46" loext:marker-style-name="T8"/>
      <text:p text:style-name="P46" loext:marker-style-name="T8"/>
      <text:list text:continue-numbering="true" text:style-name="WWNum28">
        <text:list-item>
          <text:p text:style-name="P47" loext:marker-style-name="T8"><text:span text:style-name="T8">Click the </text:span><text:span text:style-name="T22">Install Android SDK</text:span><text:span text:style-name="T8"> button.</text:span></text:p>
        </text:list-item>
      </text:list>
      <text:p text:style-name="P48" loext:marker-style-name="T8"><draw:custom-shape text:anchor-type="char" draw:z-index="1" draw:name="AutoShape 7" draw:style-name="gr2" draw:text-style-name="P7" svg:width="0.548in" svg:height="0.2315in" draw:transform="rotate (0.602662190713642) translate (-0.0000382764654418195in 1.50756233595801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2" draw:name="Picture 61" text:anchor-type="as-char" svg:width="6.2547in" svg:height="4.3209in"><draw:image xlink:href="Pictures/1000000100000561000003B6042725EA.png" xlink:type="simple" xlink:show="embed" xlink:actuate="onLoad" draw:mime-type="image/png"/><svg:desc>Table

Description automatically generated</svg:desc></draw:frame></text:p>
      <text:p text:style-name="P49" loext:marker-style-name="T8"/>
      <text:p text:style-name="P49" loext:marker-style-name="T8"/>
      <text:list text:continue-numbering="true" text:style-name="WWNum28">
        <text:list-item>
          <text:p text:style-name="P47" loext:marker-style-name="T8"><text:span text:style-name="T8">Follow the instructions on each page of the </text:span><text:span text:style-name="T22">Install Android SDK</text:span><text:span text:style-name="T8"> wizard to download each of the Android SDK packages and install them.</text:span></text:p>
        </text:list-item>
      </text:list>
      <text:p text:style-name="P50" loext:marker-style-name="T8"/>
      <text:p text:style-name="P51" loext:marker-style-name="T8"><text:span text:style-name="T8">When you are asked to specify a target folder, a good place is:</text:span><text:span text:style-name="T8"/></text:p>
      <text:p text:style-name="P51" loext:marker-style-name="T8"><text:span text:style-name="T8"><text:s text:c="8"/></text:span><text:span text:style-name="T26">/Users/</text:span><text:span text:style-name="T28">your-name</text:span><text:span text:style-name="T26">/Android-SDK</text:span><text:span text:style-name="T8">.</text:span></text:p>
      <text:p text:style-name="P52" loext:marker-style-name="T8"/>
      <text:p text:style-name="P53" loext:marker-style-name="T8"><text:span text:style-name="T8">Four packages will be downloaded and installed:</text:span><text:span text:style-name="T8"/></text:p>
      <text:list text:style-name="WWNum41">
        <text:list-item>
          <text:p text:style-name="P54" loext:marker-style-name="T8"><text:span text:style-name="T8">Command line tools, </text:span><text:span text:style-name="T8"/></text:p>
        </text:list-item>
        <text:list-item>
          <text:p text:style-name="P54" loext:marker-style-name="T8"><text:span text:style-name="T8">Build Tools, </text:span><text:span text:style-name="T8"/></text:p>
        </text:list-item>
        <text:list-item>
          <text:p text:style-name="P54" loext:marker-style-name="T8"><text:span text:style-name="T8">Platform Tools, and </text:span><text:span text:style-name="T8"/></text:p>
        </text:list-item>
        <text:list-item>
          <text:p text:style-name="P54" loext:marker-style-name="T8"><text:span text:style-name="T8">Platform API.</text:span><text:span text:style-name="T8"/></text:p>
        </text:list-item>
      </text:list>
      <text:p text:style-name="P50" loext:marker-style-name="T8"/>
      <text:p text:style-name="P29" loext:marker-style-name="T8"><text:span text:style-name="T8">If the installation was successful, you will see the version numbers displayed in green.</text:span><text:span text:style-name="T8"/></text:p>
      <text:p text:style-name="P3" loext:marker-style-name="T29"><draw:frame draw:style-name="fr2" draw:name="Picture 62" text:anchor-type="as-char" svg:width="6.2547in" svg:height="4.3209in"><draw:image xlink:href="Pictures/1000000100000561000003B69152960B.png" xlink:type="simple" xlink:show="embed" xlink:actuate="onLoad" draw:mime-type="image/png"/><svg:desc>Graphical user interface, application, table

Description automatically generated</svg:desc></draw:frame></text:p>
      <text:p text:style-name="P33" loext:marker-style-name="T8"/>
      <text:p text:style-name="Standard" loext:marker-style-name="T8"><text:span text:style-name="T8">If any of the Build Tools, Platform Tools or Platform API is listed as “Not Found” (displayed in red), click the </text:span><text:span text:style-name="T22">Install Packages</text:span><text:span text:style-name="T8"> button to install them.</text:span></text:p>
      <text:p text:style-name="P33" loext:marker-style-name="T8"/>
      <text:p text:style-name="Standard" loext:marker-style-name="T8"><text:span text:style-name="T8">Click the </text:span><text:span text:style-name="T22">Check Installation</text:span><text:span text:style-name="T8"> button to confirm that all the packages have been installed correctly.<text:line-break/></text:span></text:p>
      <text:h text:style-name="Heading_20_3" text:outline-level="3" loext:marker-style-name="T8"><text:bookmark-start text:name="_Toc77851810"/><text:bookmark-start text:name="_Toc228363879"/><text:bookmark-start text:name="_Toc78622944"/><text:span text:style-name="T8">Copying the Android SDK files from someone else</text:span><text:bookmark-end text:name="_Toc77851810"/><text:bookmark-end text:name="_Toc228363879"/><text:bookmark-end text:name="_Toc78622944"/><text:span text:style-name="T8"/></text:h>
      <text:p text:style-name="Standard" loext:marker-style-name="T8"><text:span text:style-name="T8">If you know someone who has already downloaded and installed the Android SDK and is successfully building apps with it, you can copy all of their Android SDK files to a folder on your computer.</text:span><text:span text:style-name="T8"/></text:p>
      <text:p text:style-name="P17" loext:marker-style-name="T8"><text:span text:style-name="T8">You need to look for the top-level Android SDK folder, such as </text:span><text:span text:style-name="T26">/Users/</text:span><text:span text:style-name="T28">user-name</text:span><text:span text:style-name="T26">/Android-SDK</text:span><text:span text:style-name="T8">, and copy the whole folder and its contents to your computer. A location such as </text:span><text:span text:style-name="T26">/Users/</text:span><text:span text:style-name="T28">your-name</text:span><text:span text:style-name="T26">/Android-SDK</text:span><text:span text:style-name="T8"> is good. If it makes it easier, you can zip the folders and then unzip them onto your computer.</text:span></text:p>
      <text:p text:style-name="P17" loext:marker-style-name="T8"><text:span text:style-name="T8">Note that there is </text:span><text:span text:style-name="T30">no setup program to run</text:span><text:span text:style-name="T8">. Copying the files from one computer to another is sufficient.</text:span></text:p>
      <text:p text:style-name="P33" loext:marker-style-name="T8"/>
      <text:p text:style-name="P17" loext:marker-style-name="T8"><text:span text:style-name="T26">Tip</text:span><text:span text:style-name="T8">: A typical Android SDK folder can be quite large (over 1 GB, depending on which additional packages have been installed). To build an app, you do not actually need all of the Android SDK files. If you want to cut down the number of files, here is a list of the essential and optional folders:</text:span></text:p>
      <text:p text:style-name="P33" loext:marker-style-name="T8"/>
      <table:table table:name="Table1" table:style-name="Table1">
        <table:table-column table:style-name="Table1.A"/>
        <table:table-column table:style-name="Table1.B"/>
        <table:table-header-rows>
          <table:table-row table:style-name="Table1.1">
            <table:table-cell table:style-name="Table1.A1" office:value-type="string">
              <text:p text:style-name="P55" loext:marker-style-name="T31"><text:span text:style-name="T31">Android SDK Folder</text:span><text:span text:style-name="T31"/></text:p>
            </table:table-cell>
            <table:table-cell table:style-name="Table1.A1" office:value-type="string">
              <text:p text:style-name="P55" loext:marker-style-name="T31"><text:span text:style-name="T31">Required for building apps?</text:span><text:span text:style-name="T31"/></text:p>
            </table:table-cell>
          </table:table-row>
        </table:table-header-rows>
        <table:table-row table:style-name="Table1.1">
          <table:table-cell table:style-name="Table1.A2" office:value-type="string">
            <text:p text:style-name="P55" loext:marker-style-name="T32"><text:span text:style-name="T32">cmdline-tools (or tools)</text:span><text:span text:style-name="T32"/></text:p>
          </table:table-cell>
          <table:table-cell table:style-name="Table1.B2" office:value-type="string">
            <text:p text:style-name="P55" loext:marker-style-name="T32"><text:span text:style-name="T32">Yes</text:span><text:span text:style-name="T32"/></text:p>
          </table:table-cell>
        </table:table-row>
        <table:table-row table:style-name="Table1.1">
          <table:table-cell table:style-name="Table1.A3" office:value-type="string">
            <text:p text:style-name="P55" loext:marker-style-name="T32"><text:span text:style-name="T32">build-tools</text:span><text:span text:style-name="T32"/></text:p>
          </table:table-cell>
          <table:table-cell table:style-name="Table1.B3" office:value-type="string">
            <text:p text:style-name="P55" loext:marker-style-name="T32"><text:span text:style-name="T32">Yes <text:s/>(you only need the sub-folder for the latest version)</text:span><text:span text:style-name="T32"/></text:p>
          </table:table-cell>
        </table:table-row>
        <table:table-row table:style-name="Table1.1">
          <table:table-cell table:style-name="Table1.A4" office:value-type="string">
            <text:p text:style-name="P55" loext:marker-style-name="T32"><text:span text:style-name="T32">platforms</text:span><text:span text:style-name="T32"/></text:p>
          </table:table-cell>
          <table:table-cell table:style-name="Table1.B4" office:value-type="string">
            <text:p text:style-name="P55" loext:marker-style-name="T32"><text:span text:style-name="T32">Yes <text:s/>(you only need android-30 for now)</text:span><text:span text:style-name="T32"/></text:p>
          </table:table-cell>
        </table:table-row>
        <table:table-row table:style-name="Table1.1">
          <table:table-cell table:style-name="Table1.A5" office:value-type="string">
            <text:p text:style-name="P55" loext:marker-style-name="T32"><text:span text:style-name="T32">platform-tools</text:span><text:span text:style-name="T32"/></text:p>
          </table:table-cell>
          <table:table-cell table:style-name="Table1.B5" office:value-type="string">
            <text:p text:style-name="P55" loext:marker-style-name="T32"><text:span text:style-name="T32">Yes</text:span><text:span text:style-name="T32"/></text:p>
          </table:table-cell>
        </table:table-row>
        <table:table-row table:style-name="Table1.1">
          <table:table-cell table:style-name="Table1.A6" office:value-type="string">
            <text:p text:style-name="P55" loext:marker-style-name="T32"><text:span text:style-name="T32">add-ons</text:span><text:span text:style-name="T32"/></text:p>
          </table:table-cell>
          <table:table-cell table:style-name="Table1.B6" office:value-type="string">
            <text:p text:style-name="P55" loext:marker-style-name="T32"><text:span text:style-name="T32">No</text:span><text:span text:style-name="T32"/></text:p>
          </table:table-cell>
        </table:table-row>
        <table:table-row table:style-name="Table1.1">
          <table:table-cell table:style-name="Table1.A7" office:value-type="string">
            <text:p text:style-name="P55" loext:marker-style-name="T32"><text:span text:style-name="T32">docs</text:span><text:span text:style-name="T32"/></text:p>
          </table:table-cell>
          <table:table-cell table:style-name="Table1.B7" office:value-type="string">
            <text:p text:style-name="P55" loext:marker-style-name="T32"><text:span text:style-name="T32">No</text:span><text:span text:style-name="T32"/></text:p>
          </table:table-cell>
        </table:table-row>
        <table:table-row table:style-name="Table1.1">
          <table:table-cell table:style-name="Table1.A8" office:value-type="string">
            <text:p text:style-name="P55" loext:marker-style-name="T32"><text:span text:style-name="T32">emulator</text:span><text:span text:style-name="T32"/></text:p>
          </table:table-cell>
          <table:table-cell table:style-name="Table1.B8" office:value-type="string">
            <text:p text:style-name="P55" loext:marker-style-name="T32"><text:span text:style-name="T32">No, unless you want to use an emulator</text:span><text:span text:style-name="T32"/></text:p>
          </table:table-cell>
        </table:table-row>
        <table:table-row table:style-name="Table1.1">
          <table:table-cell table:style-name="Table1.A9" office:value-type="string">
            <text:p text:style-name="P55" loext:marker-style-name="T32"><text:span text:style-name="T32">extras</text:span><text:span text:style-name="T32"/></text:p>
          </table:table-cell>
          <table:table-cell table:style-name="Table1.B9" office:value-type="string">
            <text:p text:style-name="P55" loext:marker-style-name="T32"><text:span text:style-name="T32">No</text:span><text:span text:style-name="T32"/></text:p>
          </table:table-cell>
        </table:table-row>
        <table:table-row table:style-name="Table1.1">
          <table:table-cell table:style-name="Table1.A10" office:value-type="string">
            <text:p text:style-name="P55" loext:marker-style-name="T32"><text:span text:style-name="T32">licenses</text:span><text:span text:style-name="T32"/></text:p>
          </table:table-cell>
          <table:table-cell table:style-name="Table1.B10" office:value-type="string">
            <text:p text:style-name="P55" loext:marker-style-name="T32"><text:span text:style-name="T32">Yes</text:span><text:span text:style-name="T32"/></text:p>
          </table:table-cell>
        </table:table-row>
        <table:table-row table:style-name="Table1.1">
          <table:table-cell table:style-name="Table1.A11" office:value-type="string">
            <text:p text:style-name="P55" loext:marker-style-name="T32"><text:span text:style-name="T32">sources</text:span><text:span text:style-name="T32"/></text:p>
          </table:table-cell>
          <table:table-cell table:style-name="Table1.B11" office:value-type="string">
            <text:p text:style-name="P55" loext:marker-style-name="T32"><text:span text:style-name="T32">No</text:span><text:span text:style-name="T32"/></text:p>
          </table:table-cell>
        </table:table-row>
        <table:table-row table:style-name="Table1.1">
          <table:table-cell table:style-name="Table1.A12" office:value-type="string">
            <text:p text:style-name="P55" loext:marker-style-name="T32"><text:span text:style-name="T32">system-images</text:span><text:span text:style-name="T32"/></text:p>
          </table:table-cell>
          <table:table-cell table:style-name="Table1.B12" office:value-type="string">
            <text:p text:style-name="P55" loext:marker-style-name="T32"><text:span text:style-name="T32">No, unless you want to use an emulator</text:span><text:span text:style-name="T32"/></text:p>
          </table:table-cell>
        </table:table-row>
        <table:table-row table:style-name="Table1.1">
          <table:table-cell table:style-name="Table1.A13" office:value-type="string">
            <text:p text:style-name="P55" loext:marker-style-name="T32"><text:span text:style-name="T32">temp</text:span><text:span text:style-name="T32"/></text:p>
          </table:table-cell>
          <table:table-cell table:style-name="Table1.B13" office:value-type="string">
            <text:p text:style-name="P55" loext:marker-style-name="T32"><text:span text:style-name="T32">No</text:span><text:span text:style-name="T32"/></text:p>
          </table:table-cell>
        </table:table-row>
      </table:table>
      <text:h text:style-name="Heading_20_1" text:outline-level="1"><text:bookmark-start text:name="_Toc94080772"/><text:bookmark-start text:name="_Toc228363880"/>Installing Prerequisites for iOS<text:bookmark-end text:name="_Toc94080772"/><text:bookmark-end text:name="_Toc228363880"/></text:h>
      <text:p text:style-name="P56" loext:marker-style-name="T17"><text:span text:style-name="T17">If you want to build iOS apps and upload them to the Apple App Store, you need to install the following components: </text:span><text:span text:style-name="T17"/></text:p>
      <text:list text:style-name="WWNum12">
        <text:list-item>
          <text:p text:style-name="P57" loext:marker-style-name="T33"><text:span text:style-name="T34">Xcode</text:span><text:span text:style-name="T34"/></text:p>
        </text:list-item>
        <text:list-item>
          <text:p text:style-name="P57" loext:marker-style-name="T33"><text:span text:style-name="T34">Transporter</text:span><text:span text:style-name="T34"/></text:p>
        </text:list-item>
      </text:list>
      <text:h text:style-name="P25" text:outline-level="2"><text:bookmark text:name="_8y9itz56qcum"/><text:bookmark-start text:name="_Toc228363881"/><text:bookmark-start text:name="_Toc94080773"/><text:bookmark-start text:name="_Toc475369915"/>Install Xcode<text:bookmark-end text:name="_Toc228363881"/><text:bookmark-end text:name="_Toc94080773"/><text:bookmark-end text:name="_Toc475369915"/></text:h>
      <text:p text:style-name="Standard" loext:marker-style-name="T17"><text:span text:style-name="T19">Xcode</text:span><text:span text:style-name="T17"> is required to build iOS Apps. </text:span><text:span text:style-name="T35">To install Xcode, simply search for Xcode in the Mac App Store and install it. Open Xcode at least once to agree to the licensing restrictions and install components.</text:span></text:p>
      <text:p text:style-name="P3" loext:marker-style-name="T17"><draw:frame draw:style-name="fr2" draw:name="Picture 36" text:anchor-type="as-char" svg:width="4.5028in" svg:height="0.9835in"><draw:image xlink:href="Pictures/10000001000002C20000009AB34A9DC8.png" xlink:type="simple" xlink:show="embed" xlink:actuate="onLoad" draw:mime-type="image/png"/><svg:desc>A screenshot of a phone

Description automatically generated</svg:desc></draw:frame></text:p>
      <text:h text:style-name="P25" text:outline-level="2"><text:bookmark-start text:name="_Toc94080774"/><text:bookmark-start text:name="OLE_LINK43"/><text:bookmark-start text:name="OLE_LINK42"/><text:bookmark-start text:name="_Toc228363882"/>Verify Xcode Installation<text:bookmark-end text:name="_Toc94080774"/><text:bookmark-end text:name="_Toc228363882"/></text:h>
      <text:p text:style-name="Standard" loext:marker-style-name="T36"><text:span text:style-name="T36">To verify that you have successfully installed Xcode and that it will be correctly used by Scripture App Builder, please open Terminal and run the following command to print the path to the active developer directory: </text:span><text:span text:style-name="T37">xcode-select -p</text:span></text:p>
      <text:p text:style-name="Standard" loext:marker-style-name="T38"><text:span text:style-name="T17"><text:line-break/></text:span><text:span text:style-name="T38">$ xcode-</text:span><text:span text:style-name="T39">select</text:span><text:span text:style-name="T38"> -p</text:span></text:p>
      <text:p text:style-name="P58" loext:marker-style-name="T40"><text:span text:style-name="T38">/Applications/Xcode.app/</text:span><text:span text:style-name="T39">Contents</text:span><text:span text:style-name="T38">/Developer</text:span></text:p>
      <text:p text:style-name="P59" loext:marker-style-name="T17"><text:span text:style-name="T17"><text:line-break/>If you have had Xcode Command-line Tools installed previously, it might still be pointing to that installation directory and Scripture App Builder will not work correctly.<text:line-break/><text:line-break/></text:span><text:span text:style-name="T38">$ xcode-</text:span><text:span text:style-name="T39">select</text:span><text:span text:style-name="T38"> -p </text:span><text:span text:style-name="T41"><text:line-break/></text:span><text:span text:style-name="T38">/</text:span><text:span text:style-name="T39">Library</text:span><text:span text:style-name="T38">/Developer/CommandLineTools</text:span></text:p>
      <text:p text:style-name="P59" loext:marker-style-name="T17"><text:span text:style-name="T17">To correct this situation, run the following command to set the active developer directory.<text:line-break/><text:line-break/></text:span><text:span text:style-name="T38">sudo xcode-select -s /Applications/Xcode.app/Contents/Developer</text:span></text:p>
      <text:h text:style-name="P25" text:outline-level="2"><text:bookmark-end text:name="OLE_LINK42"/><text:bookmark-end text:name="OLE_LINK43"/><text:bookmark text:name="_m0jnku21w8d3"/><text:bookmark text:name="_gyx6c51bzyd"/><text:bookmark-start text:name="_Toc228363883"/><text:bookmark-start text:name="_Toc94080775"/><text:bookmark-start text:name="_Toc475369917"/>Install <text:bookmark-end text:name="_Toc475369917"/>Transporter<text:bookmark-end text:name="_Toc228363883"/><text:bookmark-end text:name="_Toc94080775"/></text:h>
      <text:p text:style-name="Standard" loext:marker-style-name="T17"><text:span text:style-name="T42">Transporter</text:span><text:span text:style-name="T17"> is used to upload iOS apps to App Store Connect. </text:span><text:span text:style-name="T35">To install Transporter, simply search for Transporter in the Mac App Store and install it.</text:span><text:bookmark text:name="_vv76das93ezq"/></text:p>
      <text:p text:style-name="P18" loext:marker-style-name="T17"/>
      <text:p text:style-name="P3" loext:marker-style-name="T8"><draw:frame draw:style-name="fr2" draw:name="Picture 34" text:anchor-type="as-char" svg:width="4.4972in" svg:height="0.9283in"><draw:image xlink:href="Pictures/10000001000002CF00000094317AA322.png" xlink:type="simple" xlink:show="embed" xlink:actuate="onLoad" draw:mime-type="image/png"/><svg:desc>A screenshot of a phone

Description automatically generated</svg:desc></draw:frame></text:p>
      <text:p text:style-name="P33" loext:marker-style-name="T8"/>
      <text:h text:style-name="Heading_20_1" text:outline-level="1"><text:bookmark-start text:name="_Toc228363884"/>Building a Keyboard App for iOS<text:bookmark-end text:name="_Toc228363884"/></text:h>
      <text:p text:style-name="Standard" loext:marker-style-name="T18"><text:span text:style-name="T18">The process for building an Android App on a Mac follows the steps laid out in </text:span><text:bookmark-start text:name="OLE_LINK31"/><text:bookmark-start text:name="OLE_LINK30"/><text:span text:style-name="T43">the Keyboard App Builder 02 Building Apps</text:span><text:span text:style-name="T18"> </text:span><text:bookmark-end text:name="OLE_LINK31"/><text:bookmark-end text:name="OLE_LINK30"/><text:span text:style-name="T18">document. <text:s/>Building one for iOS has several additional considerations, including getting provisioning profiles for app.</text:span></text:p>
      <text:h text:style-name="P42" text:outline-level="2" loext:marker-style-name="T8"><text:bookmark-start text:name="_Toc228363885"/><text:bookmark-start text:name="OLE_LINK29"/><text:bookmark-start text:name="OLE_LINK28"/><text:span text:style-name="T8">Apple Development Store Setup</text:span><text:bookmark-end text:name="_Toc228363885"/><text:span text:style-name="T8"/></text:h>
      <text:h text:style-name="Heading_20_3" text:outline-level="3" loext:marker-style-name="T8"><text:bookmark-end text:name="OLE_LINK28"/><text:bookmark-end text:name="OLE_LINK29"/><text:bookmark-start text:name="OLE_LINK18"/><text:bookmark-start text:name="OLE_LINK17"/><text:bookmark-start text:name="_Toc228363886"/><text:span text:style-name="T8">Enroll in the Apple Developer Program</text:span><text:bookmark-end text:name="OLE_LINK18"/><text:bookmark-end text:name="OLE_LINK17"/><text:bookmark-end text:name="_Toc228363886"/><text:span text:style-name="T8"/></text:h>
      <text:p text:style-name="Standard" loext:marker-style-name="T17"><text:span text:style-name="T17">To build iOS apps and distribute them through the Apple App Store, you will need to be enrolled in the Apple Developer Program. You can do this as either (i) an individual, or (ii) an organisation. The cost is USD $99 per year.</text:span><text:span text:style-name="T17"/></text:p>
      <text:p text:style-name="P17" loext:marker-style-name="T17"><text:span text:style-name="T17">To enroll:</text:span><text:span text:style-name="T17"/></text:p>
      <text:list text:style-name="WWNum37">
        <text:list-item>
          <text:p text:style-name="P60" loext:marker-style-name="T17"><text:span text:style-name="T17">Go to </text:span><text:a xlink:type="simple" xlink:href="https://developer.apple.com/programs/enroll/" text:style-name="ListLabel_20_436" text:visited-style-name="ListLabel_20_436"><text:span text:style-name="T44">https://developer.apple.com/programs/enroll/</text:span></text:a></text:p>
        </text:list-item>
        <text:list-item>
          <text:p text:style-name="P61" loext:marker-style-name="T17"><text:span text:style-name="T17">Press the </text:span><text:span text:style-name="T42">Start Your Enrollment</text:span><text:span text:style-name="T17"> button to start.</text:span></text:p>
        </text:list-item>
      </text:list>
      <text:h text:style-name="Heading_20_3" text:outline-level="3" loext:marker-style-name="T8"><text:bookmark-start text:name="_Toc228363887"/><text:span text:style-name="T8">Create Signing Certificate</text:span><text:bookmark-end text:name="_Toc228363887"/><text:span text:style-name="T8"/></text:h>
      <text:p text:style-name="P62" loext:marker-style-name="T17"><text:span text:style-name="T17">When you create an iOS app, it needs to be signed with a certificate.</text:span><text:span text:style-name="T17"/></text:p>
      <text:p text:style-name="P63" loext:marker-style-name="T17"/>
      <text:p text:style-name="Standard" loext:marker-style-name="T17"><text:span text:style-name="T17">To create a certificate:</text:span><text:span text:style-name="T17"/></text:p>
      <text:list text:style-name="WWNum13">
        <text:list-item>
          <text:p text:style-name="P64" loext:marker-style-name="T17"><text:span text:style-name="T17">Go to the </text:span><text:a xlink:type="simple" xlink:href="https://developer.apple.com/" text:style-name="Internet_20_link" text:visited-style-name="Visited_20_Internet_20_Link"><text:span text:style-name="Internet_20_link"><text:span text:style-name="T17">Apple Developer</text:span></text:span></text:a><text:span text:style-name="T17"> website and log in to your account if you are not already.</text:span></text:p>
        </text:list-item>
        <text:list-item>
          <text:p text:style-name="P64" loext:marker-style-name="T17"><text:span text:style-name="T17">Select </text:span><text:span text:style-name="T42">Certificates, Identifiers &amp; Profiles</text:span><text:span text:style-name="T17">.</text:span></text:p>
        </text:list-item>
        <text:list-item>
          <text:p text:style-name="P64" loext:marker-style-name="T33"><text:span text:style-name="T33">Click the</text:span><draw:frame draw:style-name="fr2" draw:name="Picture 1127969481" text:anchor-type="as-char" svg:width="0.1945in" svg:height="0.2362in"><draw:image xlink:href="Pictures/100000010000001C0000002296E3C9AD.png" xlink:type="simple" xlink:show="embed" xlink:actuate="onLoad" draw:mime-type="image/png"/></draw:frame><text:span text:style-name="T33"> button to the right of the </text:span><text:span text:style-name="T45">Certificates</text:span><text:span text:style-name="T33"> header.</text:span></text:p>
        </text:list-item>
        <text:list-item>
          <text:p text:style-name="P64" loext:marker-style-name="T17"><text:span text:style-name="T17">On the </text:span><text:span text:style-name="T42">Create a New Certificates </text:span><text:span text:style-name="T17">page, select </text:span><text:span text:style-name="T42">Apple Distribution</text:span><text:span text:style-name="T17">. Then press the </text:span><text:span text:style-name="T42">Continue</text:span><text:span text:style-name="T17"> button.</text:span></text:p>
        </text:list-item>
        <text:list-item>
          <text:p text:style-name="P64" loext:marker-style-name="T17"><text:span text:style-name="T17">Upload a Certificate Signing Request. Press the </text:span><text:span text:style-name="T42">Learn more</text:span><text:span text:style-name="T17"> link for instructions on how to use Keychain Access on your Mac computer to complete this task. Then press the </text:span><text:span text:style-name="T42">Continue</text:span><text:span text:style-name="T17"> button.</text:span></text:p>
        </text:list-item>
        <text:list-item>
          <text:p text:style-name="P64" loext:marker-style-name="T17"><text:span text:style-name="T17">On the </text:span><text:span text:style-name="T42">Download Your Certificate</text:span><text:span text:style-name="T17"> page, press the </text:span><text:span text:style-name="T42">Download</text:span><text:span text:style-name="T17"> button to download the certificate (distribution.cer) to your Mac.</text:span></text:p>
        </text:list-item>
        <text:list-item>
          <text:p text:style-name="P64" loext:marker-style-name="T17"><text:span text:style-name="T17">Open the Keychain Access application. Choose the </text:span><text:span text:style-name="T42">login</text:span><text:span text:style-name="T17"> item from the Keychains section on the left. Choose the </text:span><text:span text:style-name="T42">File</text:span><text:span text:style-name="T17"> </text:span><text:span text:style-name="T46">Ø</text:span><text:span text:style-name="T17"> </text:span><text:span text:style-name="T42">Import Items…</text:span><text:span text:style-name="T17"> menu item and browse to the Downloads folder and select the certificate (distribution.cer).</text:span></text:p>
        </text:list-item>
      </text:list>
      <text:p text:style-name="P18" loext:marker-style-name="T17"/>
      <text:p text:style-name="Standard" loext:marker-style-name="T17"><text:span text:style-name="T17">Now that the certificate is installed in the Keychain, you will be able to access it from within Scripture App Builder.</text:span><text:span text:style-name="T17"/></text:p>
      <text:p text:style-name="P65" loext:marker-style-name="T17"><text:span text:style-name="T17">Note: To work with certificates, you will need the Apple Worldwide Developer Relations (WWDR) Certification Authority. It should have been installed with Xcode. When viewing your certificate in the Keychain Access application, if there is an error stating the certificate is not trusted, then install the certification authority.</text:span><text:span text:style-name="T17"/></text:p>
      <text:p text:style-name="P66" loext:marker-style-name="T17"><text:span text:style-name="T17">To get the certification authority:</text:span><text:span text:style-name="T17"/></text:p>
      <text:list text:style-name="WWNum1">
        <text:list-item>
          <text:p text:style-name="P67" loext:marker-style-name="T17"><text:span text:style-name="T17">Download the Apple WWDR Certification Authority from:<text:line-break/></text:span><text:a xlink:type="simple" xlink:href="https://developer.apple.com/certificationauthority/AppleWWDRCA.cer" text:style-name="Internet_20_link" text:visited-style-name="Visited_20_Internet_20_Link"><text:span text:style-name="Internet_20_link"><text:span text:style-name="T17">https://developer.apple.com/certificationauthority/AppleWWDRCA.cer</text:span></text:span></text:a></text:p>
        </text:list-item>
      </text:list>
      <text:p text:style-name="P68" loext:marker-style-name="T17"><text:span text:style-name="T17">For signing certificates created after January 28, 2021:<text:line-break/></text:span><text:a xlink:type="simple" xlink:href="https://www.apple.com/certificateauthority/AppleWWDRCAG3.cer" text:style-name="Internet_20_link" text:visited-style-name="Visited_20_Internet_20_Link"><text:span text:style-name="Internet_20_link"><text:span text:style-name="T17">https://www.apple.com/certificateauthority/AppleWWDRCAG3.cer</text:span></text:span></text:a><text:span text:style-name="T17"> </text:span></text:p>
      <text:list text:continue-numbering="true" text:style-name="WWNum1">
        <text:list-item>
          <text:p text:style-name="P67" loext:marker-style-name="T17"><text:span text:style-name="T17">Open the Keychain Access application. Choose the </text:span><text:span text:style-name="T42">System</text:span><text:span text:style-name="T17"> item from the Keychains section on the left. Choose the </text:span><text:span text:style-name="T42">File</text:span><text:span text:style-name="T17"> </text:span><text:span text:style-name="T46">Ø</text:span><text:span text:style-name="T17"> </text:span><text:span text:style-name="T42">Import Items…</text:span><text:span text:style-name="T17"> menu item and browse to the Downloads folder and select the certification authority (AppleWWDRCA.cer). You will be prompted for a username and password that has admin privileges in order to modify the </text:span><text:span text:style-name="T42">System</text:span><text:span text:style-name="T17"> Keychain.</text:span></text:p>
        </text:list-item>
        <text:list-item>
          <text:p text:style-name="P67" loext:marker-style-name="T17"><text:span text:style-name="T17">Choose the </text:span><text:span text:style-name="T42">File</text:span><text:span text:style-name="T17"> </text:span><text:span text:style-name="T46">Ø</text:span><text:span text:style-name="T17"> </text:span><text:span text:style-name="T42">Lock Keychain “System” </text:span><text:span text:style-name="T17">menu item.</text:span></text:p>
        </text:list-item>
      </text:list>
      <text:p text:style-name="P69" loext:marker-style-name="T18"/>
      <text:h text:style-name="Heading_20_3" text:outline-level="3" loext:marker-style-name="T8"><text:bookmark-start text:name="_Toc228363888"/><text:bookmark-start text:name="OLE_LINK14"/><text:bookmark-start text:name="OLE_LINK10"/><text:bookmark-start text:name="OLE_LINK9"/><text:span text:style-name="T8">Create App Identifiers</text:span><text:bookmark-end text:name="_Toc228363888"/><text:span text:style-name="T8"> </text:span><text:bookmark-end text:name="OLE_LINK14"/><text:bookmark-end text:name="OLE_LINK10"/><text:bookmark-end text:name="OLE_LINK9"/><text:span text:style-name="T8"/></text:h>
      <text:p text:style-name="Standard" loext:marker-style-name="T8"><text:span text:style-name="T8">First, select an app package name as described in section 4.1 of the </text:span><text:span text:style-name="T47">Building Apps</text:span><text:span text:style-name="T8"> document. <text:s/>Log into the Apple Developer web site and select </text:span><text:span text:style-name="T47">Identifiers</text:span><text:span text:style-name="T8">. <text:s/>You will need to add two new identifiers to support your keyboard app, both belonging to a common unique group. <text:s/>For this example, a package name of </text:span><text:span text:style-name="T47">org.sil.kabtest</text:span><text:span text:style-name="T8"> will be used. <text:s/></text:span></text:p>
      <text:p text:style-name="P33" loext:marker-style-name="T8"/>
      <text:p text:style-name="Standard" loext:marker-style-name="T8"><text:span text:style-name="T8">For an iOS keyboard app, a second identifier is required to support the app extension that runs when a keyboard is used by another app. <text:s/>This identifier must be the original app package name with “.swkeyboard” appended to the end. <text:s/>So for this example, the second identifier will have a bundle ID of </text:span><text:span text:style-name="T47">org.sil.kabtest.swkeyboard”</text:span><text:span text:style-name="T8">. <text:s/></text:span></text:p>
      <text:p text:style-name="P33" loext:marker-style-name="T8"/>
      <text:p text:style-name="Standard" loext:marker-style-name="T8"><text:span text:style-name="T8">These steps should be followed to create the app identifiers for this app:</text:span><text:span text:style-name="T8"/></text:p>
      <text:p text:style-name="P33" loext:marker-style-name="T8"/>
      <text:list text:style-name="WWNum43">
        <text:list-item>
          <text:p text:style-name="P70" loext:marker-style-name="T8"><text:span text:style-name="T8">Press the “+” sign at the top of the identifiers list to create a new identifier.</text:span><text:span text:style-name="T8"/></text:p>
        </text:list-item>
        <text:list-item>
          <text:p text:style-name="P70" loext:marker-style-name="T8"><text:span text:style-name="T8">The next screen should say “Register a new identifier” and App Ids should already be selected. <text:s/>Press “Continue”.</text:span><text:span text:style-name="T8"/></text:p>
        </text:list-item>
        <text:list-item>
          <text:p text:style-name="P70" loext:marker-style-name="T8"><text:span text:style-name="T8">The next screen says “Register a new identifier” with options of “App” or “App Clip” with “App” selected. <text:s/>Press “Continue”</text:span><text:span text:style-name="T8"/></text:p>
        </text:list-item>
        <text:list-item>
          <text:p text:style-name="P70" loext:marker-style-name="T8"><text:span text:style-name="T8">The “Register an App ID” screen is displayed next. <text:s/>You must fill out the </text:span><text:span text:style-name="T47">Description</text:span><text:span text:style-name="T8"> field with a description of your choice. <text:s/>The </text:span><text:span text:style-name="T47">Bundle ID </text:span><text:span text:style-name="T8">field should be completed using the app package name (for our example: </text:span><text:span text:style-name="T47">org.sil.kabtest</text:span><text:span text:style-name="T8">). <text:s/>In the capabilities section, App Groups must be enabled. <text:s/>The following screen shot shows a completed entry: </text:span><draw:frame draw:style-name="fr2" draw:name="Picture 1" text:anchor-type="as-char" svg:width="5.5425in" svg:height="2.7957in"><draw:image xlink:href="Pictures/10000001000004D10000026E60E66923.png" xlink:type="simple" xlink:show="embed" xlink:actuate="onLoad" draw:mime-type="image/png"/><svg:desc>A screenshot of a computer

Description automatically generated</svg:desc></draw:frame></text:p>
        </text:list-item>
        <text:list-item>
          <text:p text:style-name="P70" loext:marker-style-name="T8"><text:span text:style-name="T8">Press “Continue”. <text:s text:c="2"/>A confirmation screen appears with the information you have entered. <text:s/>Verify that you have entered the Bundle Id correctly and that App Groups is checked. <text:s/>Then press “Register”.</text:span><text:span text:style-name="T8"/></text:p>
        </text:list-item>
        <text:list-item>
          <text:p text:style-name="P70" loext:marker-style-name="T8"><text:span text:style-name="T8">Repeat steps 1-5 using the keyboard bundle ID (example: </text:span><text:span text:style-name="T47">org.sil.kabtest.swkeyboard)</text:span><text:span text:style-name="T8"> to create the second identifier for the app.</text:span></text:p>
        </text:list-item>
      </text:list>
      <text:h text:style-name="Heading_20_3" text:outline-level="3" loext:marker-style-name="T8"><text:bookmark-start text:name="_Toc228363889"/><text:bookmark-start text:name="OLE_LINK13"/><text:bookmark-start text:name="OLE_LINK12"/><text:bookmark-start text:name="OLE_LINK11"/><text:span text:style-name="T8">Create App Group</text:span><text:bookmark-end text:name="_Toc228363889"/><text:bookmark-end text:name="OLE_LINK13"/><text:bookmark-end text:name="OLE_LINK12"/><text:bookmark-end text:name="OLE_LINK11"/><text:span text:style-name="T8"/></text:h>
      <text:p text:style-name="Standard" loext:marker-style-name="T8"><text:span text:style-name="T8">Both of the identifiers that have been created must belong to the same group. <text:s/>The group identifier that will be created must use your app package name with “group.” appended to the front. <text:s/>For our example, we will create an app group with identifier </text:span><text:span text:style-name="T47">group.org.sil.kabtest</text:span><text:span text:style-name="T8">.</text:span></text:p>
      <text:p text:style-name="P33" loext:marker-style-name="T8"/>
      <text:p text:style-name="Standard" loext:marker-style-name="T8"><text:span text:style-name="T8">Start at the Identifiers list page, which is the same page that you started </text:span><text:span text:style-name="T47">Section 5.1.3</text:span><text:span text:style-name="T8"> from. <text:s/>Follow these steps to create the app group:</text:span></text:p>
      <text:list text:style-name="WWNum45">
        <text:list-item>
          <text:p text:style-name="P71" loext:marker-style-name="T8"><text:span text:style-name="T8">Press the “+” sign at the top of the identifiers list to create a new identifier.</text:span><text:span text:style-name="T8"/></text:p>
        </text:list-item>
        <text:list-item>
          <text:p text:style-name="P71" loext:marker-style-name="T8"><text:span text:style-name="T8">The next screen displays “Register a new identifier” and “App IDs” should be selected. <text:s/>Change the selection to “App Groups”. Press “Continue”</text:span><text:span text:style-name="T8"/></text:p>
        </text:list-item>
        <text:list-item>
          <text:p text:style-name="P71" loext:marker-style-name="T8"><text:span text:style-name="T8">The “Register an App Group” screen displays next. <text:s/>Fill the </text:span><text:span text:style-name="T47">Description</text:span><text:span text:style-name="T8"> field with a description of your choice. <text:s/>Typing in the identifier will automatically start with </text:span><text:span text:style-name="T47">group.</text:span><text:span text:style-name="T8"> So type in your package name to complete the group identifier (example </text:span><text:span text:style-name="T47">org.sil.kabtest </text:span><text:span text:style-name="T8"><text:s/>to create </text:span><text:span text:style-name="T47">group.org,sil.kabtest</text:span><text:span text:style-name="T8">). <text:s/>The following screen shot shows a completed entry:</text:span><draw:frame draw:style-name="fr2" draw:name="Image2" text:anchor-type="as-char" svg:width="6.2681in" svg:height="1.9571in"><draw:image xlink:href="Pictures/10000001000004310000014F6D357A83.png" xlink:type="simple" xlink:show="embed" xlink:actuate="onLoad" draw:mime-type="image/png"/><svg:desc>A screenshot of a computer

Description automatically generated</svg:desc></draw:frame></text:p>
        </text:list-item>
        <text:list-item>
          <text:p text:style-name="P71" loext:marker-style-name="T8"><text:span text:style-name="T8">Press “Continue”. <text:s/>A confirmation screen appears with the information you have entered. <text:s/>Verify that the identifier is entered correctly and press “Register”.</text:span><text:span text:style-name="T8"/></text:p>
        </text:list-item>
      </text:list>
      <text:h text:style-name="Heading_20_3" text:outline-level="3" loext:marker-style-name="T8"><text:bookmark-start text:name="_Toc228363890"/><text:span text:style-name="T8">Associate App Identifiers to App Group</text:span><text:bookmark-end text:name="_Toc228363890"/><text:span text:style-name="T8"/></text:h>
      <text:p text:style-name="Standard" loext:marker-style-name="T8"><text:span text:style-name="T8">When you created the app identifiers, the App Groups capability was enabled, but there was no option at that point to set the group. <text:s/>This must now be configured for both of the two app identifiers which were created.</text:span><text:span text:style-name="T8"/></text:p>
      <text:p text:style-name="P33" loext:marker-style-name="T8"/>
      <text:p text:style-name="Standard" loext:marker-style-name="T8"><text:span text:style-name="T8">Start at the identifiers list page. <text:s/>If “App IDs” is not selected on the right, change the selection so that the list of app identifiers is displayed.</text:span><text:span text:style-name="T8"/></text:p>
      <text:list text:style-name="WWNum46">
        <text:list-item>
          <text:p text:style-name="P72" loext:marker-style-name="T8"><text:span text:style-name="T8">Find the entry for your first identifier and select it. <text:s/>(Example: </text:span><text:span text:style-name="T47">org.sil.kabtest</text:span><text:span text:style-name="T8">)</text:span></text:p>
        </text:list-item>
        <text:list-item>
          <text:p text:style-name="P72" loext:marker-style-name="T8"><text:span text:style-name="T8">The “Edit your App ID Configuration” screen will be displayed. <text:s/>Beside the checked “App Groups” entry, there will now be a “Configure” button. <text:s/>Press the “Configure” button.</text:span><text:span text:style-name="T8"/></text:p>
        </text:list-item>
        <text:list-item>
          <text:p text:style-name="P72" loext:marker-style-name="T8"><text:span text:style-name="T8">A list of the current group definitions will appear. <text:s/>Check the one that was created in the previous step for this app (</text:span><text:span text:style-name="T47">group.org.sil.kabtest</text:span><text:span text:style-name="T8">) and press “Continue”.</text:span></text:p>
        </text:list-item>
        <text:list-item>
          <text:p text:style-name="P72" loext:marker-style-name="T8"><text:span text:style-name="T8">This will return you to the “Edit your App ID Configuration” screen. <text:s/>The “Configure” button has been replaced with an “Edit” button and it should display “Enabled App Groups (1)”. <text:s/>Press “Save”.</text:span><text:span text:style-name="T8"/></text:p>
        </text:list-item>
        <text:list-item>
          <text:p text:style-name="P72" loext:marker-style-name="T8"><text:span text:style-name="T8">A warning screen will display, press “Confirm”</text:span><text:span text:style-name="T8"/></text:p>
        </text:list-item>
        <text:list-item>
          <text:p text:style-name="P72" loext:marker-style-name="T8"><text:span text:style-name="T8">The identifier list page should be redisplayed. <text:s/>Repeat steps 1-5 for the keyboard identifier (Example: </text:span><text:span text:style-name="T47">org.sil.kabtest.swkeyboard</text:span><text:span text:style-name="T8">) associating it with the same group (</text:span><text:span text:style-name="T47">group.org.sil.kabtest</text:span><text:span text:style-name="T8">) as the first identifier. <text:s/>So when this step is complete, both identifiers will be associated with the same group.</text:span></text:p>
        </text:list-item>
      </text:list>
      <text:h text:style-name="Heading_20_3" text:outline-level="3" loext:marker-style-name="T8"><text:bookmark-start text:name="_Toc228363891"/><text:bookmark-start text:name="OLE_LINK33"/><text:bookmark-start text:name="OLE_LINK32"/><text:span text:style-name="T8">Create Provisioning Profiles</text:span><text:bookmark-end text:name="_Toc228363891"/><text:bookmark-end text:name="OLE_LINK33"/><text:bookmark-end text:name="OLE_LINK32"/><text:span text:style-name="T8"/></text:h>
      <text:p text:style-name="Standard" loext:marker-style-name="T8"><text:span text:style-name="T8">Provisioning profiles must be created for both of the applications that were registered. <text:s/>For publishing to the App Store, the app should be signed with profiles for the App Store. <text:s/>Within the Apple Developer website, navigate to the “Profiles” section. <text:s/>Use the following steps to create the required provisioning profiles:</text:span><text:span text:style-name="T8"/></text:p>
      <text:list text:style-name="WWNum47">
        <text:list-item>
          <text:p text:style-name="P73" loext:marker-style-name="T8"><text:span text:style-name="T8">From the “Profiles” page, press the “+” button to create a new profile.</text:span><text:span text:style-name="T8"/></text:p>
        </text:list-item>
        <text:list-item>
          <text:p text:style-name="P73" loext:marker-style-name="T8"><text:span text:style-name="T8">The “Register a New Provisioning Profile” screen will display. <text:s/>Select “App Store” as the type of profile to be created and press the “Continue” button.</text:span><text:span text:style-name="T8"/></text:p>
        </text:list-item>
        <text:list-item>
          <text:p text:style-name="P73" loext:marker-style-name="T8"><text:span text:style-name="T8">The screen to select an app id displays. <text:s/>Select the app id that was created for the app package name in section 5.1.3. <text:s/>(Example: </text:span><text:span text:style-name="T47">org.sil.kabtest</text:span><text:span text:style-name="T8">). <text:s/>Press “Continue”.</text:span></text:p>
        </text:list-item>
        <text:list-item>
          <text:p text:style-name="P73" loext:marker-style-name="T8"><text:span text:style-name="T8">The Certificate Selection screen will display next. <text:s/>Display a distribution certificate for your organization and press “Continue”.</text:span><text:span text:style-name="T8"/></text:p>
        </text:list-item>
        <text:list-item>
          <text:p text:style-name="P73" loext:marker-style-name="T8"><text:span text:style-name="T8">The next screen asks for a name for the certificate. <text:s/>Add an appropriate name for the profile to be created and press “Generate”.</text:span><text:span text:style-name="T8"/></text:p>
        </text:list-item>
        <text:list-item>
          <text:p text:style-name="P73" loext:marker-style-name="T8"><text:span text:style-name="T8">After the profile has been generated, the “Download and Install” screen displays. <text:s/>Press the “Download” button to copy the profile to your local Mac.</text:span><text:span text:style-name="T8"/></text:p>
        </text:list-item>
        <text:list-item>
          <text:p text:style-name="P73" loext:marker-style-name="T8"><text:span text:style-name="T8">Repeat steps 1-6 to generate a provisioning profile for the keyboard app id (example: “org.sil.kabtest.swkeyboard”</text:span><text:span text:style-name="T8"/></text:p>
        </text:list-item>
      </text:list>
      <text:p text:style-name="P33" loext:marker-style-name="T8"/>
      <text:h text:style-name="P42" text:outline-level="2" loext:marker-style-name="T8"><text:bookmark-start text:name="_Toc228363892"/><text:span text:style-name="T8">Building iOS App using Keyboard App Builder</text:span><text:bookmark-end text:name="_Toc228363892"/><text:span text:style-name="T8"/></text:h>
      <text:p text:style-name="Standard" loext:marker-style-name="T18"><text:span text:style-name="T18">Most of the setup for building an app using Keyboard App Builder is described in the </text:span><text:span text:style-name="T43">the Keyboard App Builder 02 Building Apps. </text:span><text:span text:style-name="T18">This section will discuss the specific sections that are required for an iOS app.</text:span></text:p>
      <text:h text:style-name="Heading_20_3" text:outline-level="3" loext:marker-style-name="T8"><text:bookmark-start text:name="_Toc228363893"/><text:bookmark-start text:name="OLE_LINK16"/><text:bookmark-start text:name="OLE_LINK15"/><text:span text:style-name="T8">IPA Tab</text:span><text:bookmark-end text:name="_Toc228363893"/><text:bookmark-end text:name="OLE_LINK16"/><text:bookmark-end text:name="OLE_LINK15"/><text:span text:style-name="T8"/></text:h>
      <text:p text:style-name="Standard" loext:marker-style-name="T8"><text:span text:style-name="T8">The </text:span><text:span text:style-name="T48">IPA Tab</text:span><text:span text:style-name="T8"> contains the information needed by the builder to produce the IPA file, which is the final product of the builder. <text:s/>The IPA file is what you will send to the Apple App Store to publish. </text:span></text:p>
      <text:p text:style-name="Standard" loext:marker-style-name="T8"><draw:frame draw:style-name="fr2" draw:name="Picture 3" text:anchor-type="as-char" svg:width="6.2681in" svg:height="3.2819in"><draw:image xlink:href="Pictures/10000001000004630000024CC4E5B859.png" xlink:type="simple" xlink:show="embed" xlink:actuate="onLoad" draw:mime-type="image/png"/><svg:desc>A screenshot of a computer

AI-generated content may be incorrect.</svg:desc></draw:frame></text:p>
      <text:p text:style-name="P17" loext:marker-style-name="T17"><text:span text:style-name="T17">The </text:span><text:span text:style-name="T49">Filename</text:span><text:span text:style-name="T17"> field on the screen for the </text:span><text:span text:style-name="T50">IPA File</text:span><text:span text:style-name="T17"> section specifies the base name of the ipa file to be generated. <text:s/>If the checkbox at the bottom of the screen for </text:span><text:span text:style-name="T51">Append version name to ipa filename</text:span><text:span text:style-name="T17"> is checked, then the version indicated by the </text:span><text:span text:style-name="T51">Version Name</text:span><text:span text:style-name="T17"> fields is added to the base filename. <text:s/></text:span></text:p>
      <text:p text:style-name="P66" loext:marker-style-name="T17"><text:span text:style-name="T17">The </text:span><text:span text:style-name="T49">Build</text:span><text:span text:style-name="T51"> </text:span><text:span text:style-name="T17">field referenced as </text:span><text:span text:style-name="T51">Build </text:span><text:span text:style-name="T17">is also called </text:span><text:span text:style-name="T51">Bundle Version String, Bundle Version</text:span><text:span text:style-name="T17"> or </text:span><text:span text:style-name="T51">CFBundleVersion</text:span><text:span text:style-name="T17"> within Xcode and ITunes Connect. It represents the build number. The </text:span><text:span text:style-name="T51">Build</text:span><text:span text:style-name="T17"> field expects an integer value and should be incremented with each file that is submitted to the ITunes Connect for release or testing. </text:span></text:p>
      <text:p text:style-name="P66" loext:marker-style-name="T17"><text:span text:style-name="T17">The </text:span><text:span text:style-name="T49">Version Name</text:span><text:span text:style-name="T51"> </text:span><text:span text:style-name="T17">field is referenced as </text:span><text:span text:style-name="T51">Version, Bundle Short Version String, Bundle versions string, short </text:span><text:span text:style-name="T17">and </text:span><text:span text:style-name="T51">CFBundleShortVersionString </text:span><text:span text:style-name="T17">within Xcode and ITunes Connect. The field is created as a concatenation of the values of the three fields separated by a period. If the final field has a value of 0, then the version string is created from just the first two values. For values of 1, 2 and 0, the resulting string is “1.2”. <text:s/>For values of 1, 2 and 3, the resulting version string is “1.2.3”.</text:span></text:p>
      <text:p text:style-name="P74" loext:marker-style-name="T17"><text:span text:style-name="T17">The </text:span><text:span text:style-name="T19">Apple ID</text:span><text:span text:style-name="T17"> field is the id assigned by App Store Connect to the application in the app store. <text:s/>It can be obtained from </text:span><text:span text:style-name="T19">Apple ID </text:span><text:span text:style-name="T17">filed on the App Information tab in the App Store Connect entry for the app as shown below</text:span></text:p>
      <text:p text:style-name="Standard" loext:marker-style-name="T8"><draw:frame draw:style-name="fr2" draw:name="Image3" text:anchor-type="as-char" svg:width="6.2681in" svg:height="3.8382in"><draw:image xlink:href="Pictures/10000001000005A700000376506FAEEB.png" xlink:type="simple" xlink:show="embed" xlink:actuate="onLoad" draw:mime-type="image/png"/></draw:frame></text:p>
      <text:p text:style-name="P74" loext:marker-style-name="T19"><text:span text:style-name="T17">The </text:span><text:span text:style-name="T19">Bundle ID</text:span><text:span text:style-name="T17"> section allows the user to specify a Bundle ID for the app that is different than the package name. <text:s/>By default, the </text:span><text:span text:style-name="T50">Package Name </text:span><text:span text:style-name="T17">field from the </text:span><text:span text:style-name="T50">Package</text:span><text:span text:style-name="T17"> tab is used as the Application Bundle ID that is used in creating the provisioning profiles and as the application identifier for the Apple App Store. <text:s/>If the user wants the iOS version of the app to have an identifier that is different than the package name that is used for the Android version of the app, press the </text:span><text:span text:style-name="T50">Specify a Bundle ID</text:span><text:span text:style-name="T17"> button and then enter the ID to be used in the text box labelled </text:span><text:span text:style-name="T50">Bundle ID.</text:span></text:p>
      <text:h text:style-name="Heading_20_3" text:outline-level="3" loext:marker-style-name="T8"><text:bookmark-start text:name="_Toc228363894"/><text:bookmark-start text:name="OLE_LINK35"/><text:bookmark-start text:name="OLE_LINK34"/><text:span text:style-name="T8">Signing (iOS) Tab</text:span><text:bookmark-end text:name="_Toc228363894"/><text:bookmark-end text:name="OLE_LINK35"/><text:bookmark-end text:name="OLE_LINK34"/><text:span text:style-name="T8"/></text:h>
      <text:p text:style-name="Standard" loext:marker-style-name="T36"><text:span text:style-name="T36">The </text:span><text:span text:style-name="T52">Signing (iOS)</text:span><text:span text:style-name="T36"> tab is used to identify the certificate and provisioning profiles that the builder will require to sign the app in creating the IPA file. <text:s/></text:span></text:p>
      <text:p text:style-name="Standard" loext:marker-style-name="T36"><draw:frame draw:style-name="fr2" draw:name="Image4" text:anchor-type="as-char" svg:width="6.2681in" svg:height="3.2472in"><draw:image xlink:href="Pictures/100000010000038F000001D8693B3904.png" xlink:type="simple" xlink:show="embed" xlink:actuate="onLoad" draw:mime-type="image/png"/></draw:frame></text:p>
      <text:p text:style-name="P75" loext:marker-style-name="T36"/>
      <text:p text:style-name="Standard" loext:marker-style-name="T36"><text:span text:style-name="T36">Select the </text:span><text:span text:style-name="T53">Signing Identity</text:span><text:span text:style-name="T36"> from the drop down list of signing certificates which have been downloaded and installed to this system in the earlier steps. <text:s/>The certificate must match the signing certificate that was specified when building the provisioning profiles in the </text:span><text:span text:style-name="T54">Create Provsioning Profiles</text:span><text:span text:style-name="T36"> section above.</text:span></text:p>
      <text:p text:style-name="P75" loext:marker-style-name="T36"/>
      <text:p text:style-name="Standard" loext:marker-style-name="T36"><text:span text:style-name="T36">For the </text:span><text:span text:style-name="T53">Provisioning Profile</text:span><text:span text:style-name="T36"> entry, enter or browse to the mobile provisioning file that associated with the main app (example: </text:span><text:span text:style-name="T54">org.sil.kabtest</text:span><text:span text:style-name="T36">) in the </text:span><text:span text:style-name="T54">Create Provisioning Profiles </text:span><text:span text:style-name="T36">section above</text:span></text:p>
      <text:p text:style-name="P75" loext:marker-style-name="T36"/>
      <text:p text:style-name="Standard" loext:marker-style-name="T36"><text:span text:style-name="T36">For the </text:span><text:span text:style-name="T53">Extenstion App Provisioning Profile</text:span><text:span text:style-name="T36"> entry, enter or browse to the mobile provisioning file that was associated with the keyboard app (example: </text:span><text:span text:style-name="T54">org.sil.kabtest.swkeyboard</text:span><text:span text:style-name="T36">) in the </text:span><text:span text:style-name="T54">Create Provisioning Profiles</text:span><text:span text:style-name="T36"> section above.</text:span></text:p>
      <text:p text:style-name="P75" loext:marker-style-name="T36"/>
      <text:p text:style-name="Standard" loext:marker-style-name="T36"><text:span text:style-name="T36">Each of the provisioning profiles has a </text:span><text:span text:style-name="T53">Details</text:span><text:span text:style-name="T36"> button. <text:s/>Once a provisioning file has been selected, pressing this button will display the details associated with the selected file. <text:s/>It will identify the type of the profile (Appstore, adHoc or development), the app id and team id used to create the app, and the list of entitlements associated with the app. <text:s/>For an adHoc or development profile, it will provide a list of the ids of all devices that are registered as eligible devices for this profile. <text:s/>Below are a couple of examples of the </text:span><text:span text:style-name="T53">Details </text:span><text:span text:style-name="T36"><text:s/>display:</text:span></text:p>
      <text:p text:style-name="P3" loext:marker-style-name="T36"><draw:frame draw:style-name="fr2" draw:name="Picture 4" text:anchor-type="as-char" svg:width="2.6945in" svg:height="1.8535in"><draw:image xlink:href="Pictures/10000001000001AA0000012559FA2874.png" xlink:type="simple" xlink:show="embed" xlink:actuate="onLoad" draw:mime-type="image/png"/><svg:desc>A screenshot of a computer

Description automatically generated</svg:desc></draw:frame></text:p>
      <text:p text:style-name="P3" loext:marker-style-name="T36"><draw:frame draw:style-name="fr2" draw:name="Picture 5" text:anchor-type="as-char" svg:width="2.722in" svg:height="4.728in"><draw:image xlink:href="Pictures/10000001000002CA000004D8DD72DF1E.png" xlink:type="simple" xlink:show="embed" xlink:actuate="onLoad" draw:mime-type="image/png"/><svg:desc>A screenshot of a computer

Description automatically generated</svg:desc></draw:frame></text:p>
      <text:p text:style-name="P75" loext:marker-style-name="T36"/>
      <text:p text:style-name="P75" loext:marker-style-name="T36"/>
      <text:h text:style-name="Heading_20_3" text:outline-level="3" loext:marker-style-name="T8"><text:bookmark-start text:name="_Toc228363895"/><text:bookmark-start text:name="OLE_LINK39"/><text:bookmark-start text:name="OLE_LINK38"/><text:span text:style-name="T8">Build iOS App</text:span><text:bookmark-end text:name="_Toc228363895"/><text:bookmark-end text:name="OLE_LINK39"/><text:bookmark-end text:name="OLE_LINK38"/><text:span text:style-name="T8"/></text:h>
      <text:p text:style-name="Standard" loext:marker-style-name="T8"><text:span text:style-name="T8">Click on the </text:span><text:span text:style-name="T22">Build iOS App </text:span><text:span text:style-name="T8"><text:s/>button at the top of the screen. <text:s/>A window will open which will display a log for the build script that is run to produce the iOS App.</text:span><draw:frame draw:style-name="fr2" draw:name="Picture 6" text:anchor-type="as-char" svg:width="6.2681in" svg:height="3.1953in"><draw:image xlink:href="Pictures/100000010000046E00000242B7EC24A1.png" xlink:type="simple" xlink:show="embed" xlink:actuate="onLoad" draw:mime-type="image/png"/></draw:frame></text:p>
      <text:p text:style-name="P33" loext:marker-style-name="T8"/>
      <text:p text:style-name="Standard" loext:marker-style-name="T36"><text:span text:style-name="T36">Examine the log window once the script has been completed. <text:s/>The message “Signed release IPA build successfully.” should appear in the window if the app has been build successfully. <text:s/></text:span><text:span text:style-name="T36"/></text:p>
      <text:p text:style-name="P75" loext:marker-style-name="T36"/>
      <text:p text:style-name="P76" loext:marker-style-name="T17"><text:span text:style-name="T36">The results of the build are an IPA file and an app that can be run in the simulator. <text:s/>They can be found in </text:span><text:span text:style-name="T17">~/App Builder/Keyboard Apps/Ipa Output/ and </text:span><text:bookmark-start text:name="OLE_LINK41"/><text:bookmark-start text:name="OLE_LINK40"/><text:span text:style-name="T17">~/App Builder/Keyboard Apps/Sim Output/.</text:span></text:p>
      <text:h text:style-name="Heading_20_3" text:outline-level="3" loext:marker-style-name="T8"><text:bookmark-end text:name="OLE_LINK40"/><text:bookmark-end text:name="OLE_LINK41"/><text:bookmark-start text:name="_Toc228363896"/><text:span text:style-name="T8">Run iOS App in Simulator</text:span><text:bookmark-end text:name="_Toc228363896"/><text:span text:style-name="T8"/></text:h>
      <text:p text:style-name="Standard" loext:marker-style-name="T8"><text:span text:style-name="T8">This option is similar to the </text:span><text:span text:style-name="T22">Build iOS App </text:span><text:span text:style-name="T8">button but only produces the simulator app. <text:s/>It does not generate the ipa file for the app store. <text:s/>Click on the </text:span><text:span text:style-name="T22">Run iOS App in Simulator </text:span><text:span text:style-name="T8">button at the top of the screen. <text:s/>A dialog will pop up.</text:span></text:p>
      <text:p text:style-name="P3" loext:marker-style-name="T8"><draw:frame draw:style-name="fr2" draw:name="Picture 7" text:anchor-type="as-char" svg:width="3.722in" svg:height="2.9984in"><draw:image xlink:href="Pictures/100000010000028300000206AC22C40C.png" xlink:type="simple" xlink:show="embed" xlink:actuate="onLoad" draw:mime-type="image/png"/><svg:desc>A screenshot of a computer

Description automatically generated</svg:desc></draw:frame></text:p>
      <text:p text:style-name="P76" loext:marker-style-name="T17"><text:span text:style-name="T17">Pressing the </text:span><text:span text:style-name="T19">Start</text:span><text:span text:style-name="T17"> button will start an instance of the iPhone simulator installed with XCode.</text:span></text:p>
      <text:p text:style-name="P76" loext:marker-style-name="T17"><text:span text:style-name="T17">The </text:span><text:span text:style-name="T19">Project Name</text:span><text:span text:style-name="T17"> drop down will initially be set to the name of the current project selected within KAB. <text:s/>If you want to build a different project, select the project from the drop down list of available projects. <text:s/></text:span></text:p>
      <text:p text:style-name="P76" loext:marker-style-name="T17"><text:span text:style-name="T17">The </text:span><text:span text:style-name="T19">Build</text:span><text:span text:style-name="T17"> button will trigger a build of the app for the simulator and will display a window similar to the one for the </text:span><text:span text:style-name="T19">Build iOS App</text:span><text:span text:style-name="T17">. <text:s/>Any error that are encountered will be displayed in the log window. <text:s/>If everything is successful, a message: “Copying sim to output folder” should appear near the end of the log.</text:span></text:p>
      <text:p text:style-name="P76" loext:marker-style-name="T17"><text:span text:style-name="T19">Open Output Folder</text:span><text:span text:style-name="T17"> will open a Finder window for the ~/App Builder/Keyboard Apps/Sim Output/ folder where the generated simulator apps are located. <text:s/>The app may be installed to the simulator by dragging it from Finder to the Simulator window. <text:s/></text:span><text:span text:style-name="T50">Due to coding limitations, only one keyboard app may be installed to a simulator instance at one time for testing. <text:s/>More than one KAB app will result in unpredictable results.</text:span></text:p>
      <text:h text:style-name="Heading_20_1" text:outline-level="1"><text:bookmark-start text:name="_Toc228354474"/><text:bookmark-start text:name="_Toc228363897"/>Building from Terminal<text:bookmark-end text:name="_Toc228354474"/><text:bookmark-end text:name="_Toc228363897"/></text:h>
      <text:p text:style-name="P17" loext:marker-style-name="T21"><text:span text:style-name="T21">Keyboard App Builder has a command line interface which allows you to create a new app and build it or load an existing app and build it. <text:s/></text:span><text:span text:style-name="T21"/></text:p>
      <text:h text:style-name="P25" text:outline-level="2"><text:bookmark-start text:name="_Toc228353930"/><text:bookmark-start text:name="_Toc228363898"/><text:bookmark-start text:name="_Toc228354475"/><text:bookmark-start text:name="_Toc228354156"/>Installing Command Line Interface<text:bookmark-end text:name="_Toc228353930"/><text:bookmark-end text:name="_Toc228363898"/><text:bookmark-end text:name="_Toc228354475"/><text:bookmark-end text:name="_Toc228354156"/></text:h>
      <text:p text:style-name="Standard" loext:marker-style-name="T36"><text:span text:style-name="T17">Choose the </text:span><text:span text:style-name="T42">Tools</text:span><text:span text:style-name="T17"> </text:span><text:span text:style-name="T55"></text:span><text:span text:style-name="T17"> </text:span><text:span text:style-name="T42">Install kab command in PATH</text:span><text:span text:style-name="T17"> </text:span><text:span text:style-name="T36">menu item to enable the use of the command line interface. <text:s/>You will be prompted to enter your login password to install the command.</text:span></text:p>
      <text:h text:style-name="P25" text:outline-level="2"><text:bookmark-start text:name="_Toc228353931"/><text:bookmark-start text:name="_Toc228363899"/><text:bookmark-start text:name="_Toc228354476"/><text:bookmark-start text:name="_Toc228354157"/>Command Line Interface Options<text:bookmark-end text:name="_Toc228353931"/><text:bookmark-end text:name="_Toc228363899"/><text:bookmark-end text:name="_Toc228354476"/><text:bookmark-end text:name="_Toc228354157"/></text:h>
      <text:p text:style-name="P17" loext:marker-style-name="T21"><text:span text:style-name="T21">Run the following command to run the </text:span><text:span text:style-name="T17">Keyboard</text:span><text:span text:style-name="T21"> App Builder application followed by a series of options described below. <text:s/>The command is:</text:span></text:p>
      <text:p text:style-name="P17" loext:marker-style-name="T21"><text:span text:style-name="T17">k</text:span><text:span text:style-name="T21">ab</text:span></text:p>
      <text:p text:style-name="P17" loext:marker-style-name="T21"><text:span text:style-name="T21"><text:s/></text:span><text:span text:style-name="T21"/></text:p>
      <text:p text:style-name="P77" loext:marker-style-name="T21"><text:span text:style-name="T21">The available parameters are:</text:span><text:span text:style-name="T21"/></text:p>
      <text:p text:style-name="P17" loext:marker-style-name="T21"><text:span text:style-name="T21"><text:s/></text:span><text:span text:style-name="T21"/></text:p>
      <table:table table:name="Table2" table:style-name="Table2">
        <table:table-column table:style-name="Table2.A"/>
        <table:table-column table:style-name="Table2.B"/>
        <table:table-row table:style-name="Table2.1">
          <table:table-cell table:style-name="Table2.A1" office:value-type="string">
            <text:p text:style-name="P78" loext:marker-style-name="T21"><text:span text:style-name="T56">Option</text:span><text:span text:style-name="T56"/></text:p>
          </table:table-cell>
          <table:table-cell table:style-name="Table2.B1" office:value-type="string">
            <text:p text:style-name="P78" loext:marker-style-name="T21"><text:span text:style-name="T56">Description</text:span><text:span text:style-name="T56"/></text:p>
          </table:table-cell>
        </table:table-row>
        <table:table-row table:style-name="Table2.1">
          <table:table-cell table:style-name="Table2.A2" office:value-type="string">
            <text:p text:style-name="P58" loext:marker-style-name="T57"><text:span text:style-name="T58">-new</text:span><text:span text:style-name="T58"/></text:p>
          </table:table-cell>
          <table:table-cell table:style-name="Table2.B2" office:value-type="string">
            <text:p text:style-name="P58" loext:marker-style-name="T10"><text:span text:style-name="T10">Create a new app project</text:span><text:span text:style-name="T10"/></text:p>
          </table:table-cell>
        </table:table-row>
        <table:table-row table:style-name="Table2.1">
          <table:table-cell table:style-name="Table2.A2" office:value-type="string">
            <text:p text:style-name="P58" loext:marker-style-name="T57"><text:span text:style-name="T58">-load &lt;project&gt;</text:span><text:span text:style-name="T58"/></text:p>
          </table:table-cell>
          <table:table-cell table:style-name="Table2.B2" office:value-type="string">
            <text:p text:style-name="P58" loext:marker-style-name="T10"><text:span text:style-name="T10">Load an existing app project</text:span><text:span text:style-name="T10"/></text:p>
          </table:table-cell>
        </table:table-row>
        <table:table-row table:style-name="Table2.1">
          <table:table-cell table:style-name="Table2.A2" office:value-type="string">
            <text:p text:style-name="P58" loext:marker-style-name="T57"><text:span text:style-name="T58">-build</text:span><text:span text:style-name="T58"/></text:p>
          </table:table-cell>
          <table:table-cell table:style-name="Table2.B2" office:value-type="string">
            <text:p text:style-name="P58" loext:marker-style-name="T10"><text:span text:style-name="T10">Build app project (use with either -new or -load)</text:span><text:span text:style-name="T10"/></text:p>
          </table:table-cell>
        </table:table-row>
        <table:table-row table:style-name="Table2.1">
          <table:table-cell table:style-name="Table2.A2" office:value-type="string">
            <text:p text:style-name="P58" loext:marker-style-name="T57"><text:span text:style-name="T58">-no-save</text:span></text:p>
          </table:table-cell>
          <table:table-cell table:style-name="Table2.B2" office:value-type="string">
            <text:p text:style-name="P58" loext:marker-style-name="T10"><text:span text:style-name="T10">Do not save changes to app (use with -load)</text:span><text:span text:style-name="T10"/></text:p>
          </table:table-cell>
        </table:table-row>
        <table:table-row table:style-name="Table2.1">
          <table:table-cell table:style-name="Table2.A2" office:value-type="string">
            <text:p text:style-name="P58" loext:marker-style-name="T57"><text:span text:style-name="T58">-resign</text:span><text:span text:style-name="T58"/></text:p>
          </table:table-cell>
          <table:table-cell table:style-name="Table2.B2" office:value-type="string">
            <text:p text:style-name="P58" loext:marker-style-name="T10"><text:span text:style-name="T10">Resign iOS Template App (use with either -new or -load)</text:span><text:span text:style-name="T10"/></text:p>
          </table:table-cell>
        </table:table-row>
        <table:table-row table:style-name="Table2.1">
          <table:table-cell table:style-name="Table2.A2" office:value-type="string">
            <text:p text:style-name="P58" loext:marker-style-name="T57"><text:span text:style-name="T58"/></text:p>
          </table:table-cell>
          <table:table-cell table:style-name="Table2.B2" office:value-type="string">
            <text:p text:style-name="P58" loext:marker-style-name="T10"><text:span text:style-name="T10"/></text:p>
          </table:table-cell>
        </table:table-row>
        <table:table-row table:style-name="Table2.1">
          <table:table-cell table:style-name="Table2.A2" office:value-type="string">
            <text:p text:style-name="P58" loext:marker-style-name="T57"><text:span text:style-name="T58">-?</text:span><text:span text:style-name="T58"/></text:p>
          </table:table-cell>
          <table:table-cell table:style-name="Table2.B2" office:value-type="string">
            <text:p text:style-name="P58" loext:marker-style-name="T10"><text:span text:style-name="T10">Show command line help</text:span><text:span text:style-name="T10"/></text:p>
          </table:table-cell>
        </table:table-row>
        <table:table-row table:style-name="Table2.1">
          <table:table-cell table:style-name="Table2.A2" office:value-type="string">
            <text:p text:style-name="P58" loext:marker-style-name="T57"><text:span text:style-name="T58"/></text:p>
          </table:table-cell>
          <table:table-cell table:style-name="Table2.B2" office:value-type="string">
            <text:p text:style-name="P58" loext:marker-style-name="T10"><text:span text:style-name="T10"/></text:p>
          </table:table-cell>
        </table:table-row>
        <table:table-row table:style-name="Table2.1">
          <table:table-cell table:style-name="Table2.A2" office:value-type="string">
            <text:p text:style-name="P58" loext:marker-style-name="T57"><text:span text:style-name="T58">-n &lt;app-name&gt;</text:span></text:p>
          </table:table-cell>
          <table:table-cell table:style-name="Table2.B2" office:value-type="string">
            <text:p text:style-name="P58" loext:marker-style-name="T10"><text:span text:style-name="T10">Set app name.</text:span><text:span text:style-name="T10"/></text:p>
            <text:p text:style-name="P58" loext:marker-style-name="T10"><text:span text:style-name="T10">Enclose the name in "double quotes" if it contains spaces.</text:span><text:span text:style-name="T10"/></text:p>
          </table:table-cell>
        </table:table-row>
        <table:table-row table:style-name="Table2.1">
          <table:table-cell table:style-name="Table2.A2" office:value-type="string">
            <text:p text:style-name="P58" loext:marker-style-name="T57"><text:span text:style-name="T58">-p &lt;package-name&gt;</text:span></text:p>
          </table:table-cell>
          <table:table-cell table:style-name="Table2.B2" office:value-type="string">
            <text:p text:style-name="P58" loext:marker-style-name="T10"><text:span text:style-name="T10">Set package name, e.g. com.myorg.language.appname</text:span><text:span text:style-name="T10"/></text:p>
          </table:table-cell>
        </table:table-row>
        <table:table-row table:style-name="Table2.1">
          <table:table-cell table:style-name="Table2.A2" office:value-type="string">
            <text:p text:style-name="P58" loext:marker-style-name="T57"><text:span text:style-name="T58">-b &lt;filename&gt;</text:span></text:p>
          </table:table-cell>
          <table:table-cell table:style-name="Table2.B2" office:value-type="string">
            <text:p text:style-name="P58" loext:marker-style-name="T10"><text:span text:style-name="T10">Add book or bundle file. This could be a USFM file or a zipped set of USFM files. It could also be a Digital Bible Library text release bundle.</text:span><text:span text:style-name="T10"/></text:p>
          </table:table-cell>
        </table:table-row>
        <table:table-row table:style-name="Table2.1">
          <table:table-cell table:style-name="Table2.A2" office:value-type="string">
            <text:p text:style-name="P58" loext:marker-style-name="T57"><text:span text:style-name="T58">-i &lt;filename&gt;</text:span></text:p>
          </table:table-cell>
          <table:table-cell table:style-name="Table2.B2" office:value-type="string">
            <text:p text:style-name="P58" loext:marker-style-name="T10"><text:span text:style-name="T10">Include additional parameters file.</text:span><text:span text:style-name="T10"/></text:p>
            <text:p text:style-name="P58" loext:marker-style-name="T10"><text:span text:style-name="T10">Use the full path of the file and enclose it in "double quotes" if there is a space in the path.</text:span><text:span text:style-name="T10"/></text:p>
          </table:table-cell>
        </table:table-row>
        <table:table-row table:style-name="Table2.1">
          <table:table-cell table:style-name="Table2.A2" office:value-type="string">
            <text:p text:style-name="P58" loext:marker-style-name="T57"><text:span text:style-name="T58"/></text:p>
          </table:table-cell>
          <table:table-cell table:style-name="Table2.B2" office:value-type="string">
            <text:p text:style-name="P58" loext:marker-style-name="T10"><text:span text:style-name="T10"/></text:p>
          </table:table-cell>
        </table:table-row>
        <table:table-row table:style-name="Table2.1">
          <table:table-cell table:style-name="Table2.A2" office:value-type="string">
            <text:p text:style-name="P58" loext:marker-style-name="T57"><text:span text:style-name="T58">-a &lt;filename&gt;</text:span></text:p>
          </table:table-cell>
          <table:table-cell table:style-name="Table2.B2" office:value-type="string">
            <text:p text:style-name="P58" loext:marker-style-name="T10"><text:span text:style-name="T10">Set about box text, contained in text file.</text:span><text:span text:style-name="T10"/></text:p>
            <text:p text:style-name="P58" loext:marker-style-name="T10"><text:span text:style-name="T10">Use the full path of the file and enclose it in "double quotes" if there is a space in the path.</text:span><text:span text:style-name="T10"/></text:p>
          </table:table-cell>
        </table:table-row>
        <table:table-row table:style-name="Table2.1">
          <table:table-cell table:style-name="Table2.A2" office:value-type="string">
            <text:p text:style-name="P58" loext:marker-style-name="T57"><text:span text:style-name="T58">-f &lt;fontname&gt;</text:span></text:p>
          </table:table-cell>
          <table:table-cell table:style-name="Table2.B2" office:value-type="string">
            <text:p text:style-name="P58" loext:marker-style-name="T10"><text:span text:style-name="T10">Set font name or filename, e.g. "Charis SIL Compact", "c:\fonts\myfont.ttf"</text:span><text:span text:style-name="T10"/></text:p>
            <text:p text:style-name="P58" loext:marker-style-name="T10"><text:span text:style-name="T10">The font name must be one of the items in the list of fonts in the New App wizard. For other fonts, specify the full path to the font filename.</text:span><text:span text:style-name="T10"/></text:p>
          </table:table-cell>
        </table:table-row>
        <table:table-row table:style-name="Table2.1">
          <table:table-cell table:style-name="Table2.A2" office:value-type="string">
            <text:p text:style-name="P58" loext:marker-style-name="T57"><text:span text:style-name="T58">-g</text:span></text:p>
          </table:table-cell>
          <table:table-cell table:style-name="Table2.B2" office:value-type="string">
            <text:p text:style-name="P58" loext:marker-style-name="T10"><text:span text:style-name="T10">Use Grandroid</text:span><text:span text:style-name="T10"/></text:p>
          </table:table-cell>
        </table:table-row>
        <table:table-row table:style-name="Table2.1">
          <table:table-cell table:style-name="Table2.A2" office:value-type="string">
            <text:p text:style-name="P58" loext:marker-style-name="T57"><text:span text:style-name="T58">-ic &lt;filename&gt;</text:span></text:p>
          </table:table-cell>
          <table:table-cell table:style-name="Table2.B2" office:value-type="string">
            <text:p text:style-name="P58" loext:marker-style-name="T10"><text:span text:style-name="T10">Add launcher icon (one or more .png files).</text:span><text:span text:style-name="T10"/></text:p>
            <text:p text:style-name="P58" loext:marker-style-name="T10"><text:span text:style-name="T10">Use the full path of the files and enclose them in "double quotes" if there is a space in the path.</text:span><text:span text:style-name="T10"/></text:p>
          </table:table-cell>
        </table:table-row>
        <table:table-row table:style-name="Table2.1">
          <table:table-cell table:style-name="Table2.A2" office:value-type="string">
            <text:p text:style-name="P58" loext:marker-style-name="T57"><text:span text:style-name="T58">-l &lt;lang-code&gt;</text:span></text:p>
          </table:table-cell>
          <table:table-cell table:style-name="Table2.B2" office:value-type="string">
            <text:p text:style-name="P58" loext:marker-style-name="T10"><text:span text:style-name="T10">Set language for menu items and settings, e.g. en, fr, es</text:span><text:span text:style-name="T10"/></text:p>
          </table:table-cell>
        </table:table-row>
        <table:table-row table:style-name="Table2.1">
          <table:table-cell table:style-name="Table2.A2" office:value-type="string">
            <text:p text:style-name="P58" loext:marker-style-name="T57"><text:span text:style-name="T58">-ft &lt;feature=value&gt;</text:span><text:span text:style-name="T58"/></text:p>
          </table:table-cell>
          <table:table-cell table:style-name="Table2.B2" office:value-type="string">
            <text:p text:style-name="P58" loext:marker-style-name="T10"><text:span text:style-name="T10">Set a feature, e.g. book-select=grid</text:span><text:span text:style-name="T10"/></text:p>
          </table:table-cell>
        </table:table-row>
        <table:table-row table:style-name="Table2.1">
          <table:table-cell table:style-name="Table2.A2" office:value-type="string">
            <text:p text:style-name="P58" loext:marker-style-name="T57"><text:span text:style-name="T58"/></text:p>
          </table:table-cell>
          <table:table-cell table:style-name="Table2.B2" office:value-type="string">
            <text:p text:style-name="P58" loext:marker-style-name="T10"><text:span text:style-name="T10"/></text:p>
          </table:table-cell>
        </table:table-row>
        <table:table-row table:style-name="Table2.1">
          <table:table-cell table:style-name="Table2.A2" office:value-type="string">
            <text:p text:style-name="P58" loext:marker-style-name="T57"><text:span text:style-name="T58">-vc &lt;integer&gt;</text:span></text:p>
          </table:table-cell>
          <table:table-cell table:style-name="Table2.B2" office:value-type="string">
            <text:p text:style-name="P58" loext:marker-style-name="T10"><text:span text:style-name="T10">Set version code, e.g. 1, 2, 3, or +1 to increment the current version code by 1.</text:span><text:span text:style-name="T10"/></text:p>
          </table:table-cell>
        </table:table-row>
        <table:table-row table:style-name="Table2.1">
          <table:table-cell table:style-name="Table2.A2" office:value-type="string">
            <text:p text:style-name="P58" loext:marker-style-name="T57"><text:span text:style-name="T58">-vn &lt;string&gt;</text:span></text:p>
          </table:table-cell>
          <table:table-cell table:style-name="Table2.B2" office:value-type="string">
            <text:p text:style-name="P58" loext:marker-style-name="T10"><text:span text:style-name="T10">Set version name, e.g. 1.0, 2.1.4, or use +1, +0.1, +0.0.1 to increment the current value.</text:span><text:span text:style-name="T10"/></text:p>
          </table:table-cell>
        </table:table-row>
        <table:table-row table:style-name="Table2.1">
          <table:table-cell table:style-name="Table2.A2" office:value-type="string">
            <text:p text:style-name="P58" loext:marker-style-name="T57"><text:span text:style-name="T58"/></text:p>
          </table:table-cell>
          <table:table-cell table:style-name="Table2.B2" office:value-type="string">
            <text:p text:style-name="P58" loext:marker-style-name="T10"><text:span text:style-name="T10"/></text:p>
          </table:table-cell>
        </table:table-row>
        <table:table-row table:style-name="Table2.1">
          <table:table-cell table:style-name="Table2.A2" office:value-type="string">
            <text:p text:style-name="P58" loext:marker-style-name="T57"><text:span text:style-name="T58">-ks &lt;filename&gt;</text:span></text:p>
          </table:table-cell>
          <table:table-cell table:style-name="Table2.B2" office:value-type="string">
            <text:p text:style-name="P58" loext:marker-style-name="T10"><text:span text:style-name="T10">Set keystore filename.</text:span><text:span text:style-name="T10"/></text:p>
            <text:p text:style-name="P58" loext:marker-style-name="T10"><text:span text:style-name="T10">Use the full path of the file and enclose it in "double quotes" if there is a space in the path.</text:span><text:span text:style-name="T10"/></text:p>
          </table:table-cell>
        </table:table-row>
        <table:table-row table:style-name="Table2.1">
          <table:table-cell table:style-name="Table2.A2" office:value-type="string">
            <text:p text:style-name="P58" loext:marker-style-name="T57"><text:span text:style-name="T58">-ksp &lt;password&gt;</text:span></text:p>
          </table:table-cell>
          <table:table-cell table:style-name="Table2.B2" office:value-type="string">
            <text:p text:style-name="P58" loext:marker-style-name="T10"><text:span text:style-name="T10">Set keystore password</text:span><text:span text:style-name="T10"/></text:p>
          </table:table-cell>
        </table:table-row>
        <table:table-row table:style-name="Table2.1">
          <table:table-cell table:style-name="Table2.A2" office:value-type="string">
            <text:p text:style-name="P58" loext:marker-style-name="T57"><text:span text:style-name="T58">-ka &lt;alias&gt;</text:span></text:p>
          </table:table-cell>
          <table:table-cell table:style-name="Table2.B2" office:value-type="string">
            <text:p text:style-name="P58" loext:marker-style-name="T10"><text:span text:style-name="T10">Set key alias</text:span><text:span text:style-name="T10"/></text:p>
          </table:table-cell>
        </table:table-row>
        <table:table-row table:style-name="Table2.1">
          <table:table-cell table:style-name="Table2.A2" office:value-type="string">
            <text:p text:style-name="P58" loext:marker-style-name="T57"><text:span text:style-name="T58">-kap &lt;password&gt;</text:span></text:p>
          </table:table-cell>
          <table:table-cell table:style-name="Table2.B2" office:value-type="string">
            <text:p text:style-name="P58" loext:marker-style-name="T10"><text:span text:style-name="T10">Set key alias password</text:span><text:span text:style-name="T10"/></text:p>
          </table:table-cell>
        </table:table-row>
        <table:table-row table:style-name="Table2.1">
          <table:table-cell table:style-name="Table2.A2" office:value-type="string">
            <text:p text:style-name="P58" loext:marker-style-name="T57"><text:span text:style-name="T58"/></text:p>
          </table:table-cell>
          <table:table-cell table:style-name="Table2.B2" office:value-type="string">
            <text:p text:style-name="P58" loext:marker-style-name="T10"><text:span text:style-name="T10"/></text:p>
          </table:table-cell>
        </table:table-row>
        <table:table-row table:style-name="Table2.1">
          <table:table-cell table:style-name="Table2.A2" office:value-type="string">
            <text:p text:style-name="P58" loext:marker-style-name="T57"><text:span text:style-name="T58">-fp &lt;folder=path&gt;</text:span></text:p>
          </table:table-cell>
          <table:table-cell table:style-name="Table2.B2" office:value-type="string">
            <text:p text:style-name="P58" loext:marker-style-name="T10"><text:span text:style-name="T10">Set a folder path, e.g. "app.builder=/Developer/Reading App Builder".</text:span><text:span text:style-name="T10"/></text:p>
          </table:table-cell>
        </table:table-row>
        <table:table-row table:style-name="Table2.1">
          <table:table-cell table:style-name="Table2.A2" office:value-type="string">
            <text:p text:style-name="P58" loext:marker-style-name="T57"><text:span text:style-name="T58">-ta &lt;target-api&gt;</text:span></text:p>
          </table:table-cell>
          <table:table-cell table:style-name="Table2.B2" office:value-type="string">
            <text:p text:style-name="P58" loext:marker-style-name="T10"><text:span text:style-name="T10">Set Target API, e.g. 21 for Android 5.0, 22 for Android 5.1.</text:span><text:span text:style-name="T10"/></text:p>
          </table:table-cell>
        </table:table-row>
        <table:table-row table:style-name="Table2.1">
          <table:table-cell table:style-name="Table2.A2" office:value-type="string">
            <text:p text:style-name="P79" loext:marker-style-name="T57"/>
          </table:table-cell>
          <table:table-cell table:style-name="Table2.B2" office:value-type="string">
            <text:p text:style-name="P80" loext:marker-style-name="T10"/>
          </table:table-cell>
        </table:table-row>
        <table:table-row table:style-name="Table2.1">
          <table:table-cell table:style-name="Table2.A2" office:value-type="string">
            <text:p text:style-name="P58" loext:marker-style-name="T57"><text:span text:style-name="T58">-si &lt;signing identity&gt;</text:span><text:span text:style-name="T58"/></text:p>
          </table:table-cell>
          <table:table-cell table:style-name="Table2.B2" office:value-type="string">
            <text:p text:style-name="P58" loext:marker-style-name="T10"><text:span text:style-name="T10">Set Signing Identity to use for iOS Resigning</text:span><text:span text:style-name="T10"/></text:p>
          </table:table-cell>
        </table:table-row>
        <table:table-row table:style-name="Table2.1">
          <table:table-cell table:style-name="Table2.A2" office:value-type="string">
            <text:p text:style-name="P58" loext:marker-style-name="T57"><text:span text:style-name="T58">-pp &lt;provisioning profile&gt;</text:span><text:span text:style-name="T58"/></text:p>
          </table:table-cell>
          <table:table-cell table:style-name="Table2.B2" office:value-type="string">
            <text:p text:style-name="P58" loext:marker-style-name="T10"><text:span text:style-name="T10">Set full path to provisioning profile for iOS resigning</text:span><text:span text:style-name="T10"/></text:p>
          </table:table-cell>
        </table:table-row>
        <table:table-row table:style-name="Table2.1">
          <table:table-cell table:style-name="Table2.A2" office:value-type="string">
            <text:p text:style-name="P58" loext:marker-style-name="T57"><text:span text:style-name="T58">-bn &lt;integer&gt;</text:span><text:span text:style-name="T58"/></text:p>
          </table:table-cell>
          <table:table-cell table:style-name="Table2.B2" office:value-type="string">
            <text:p text:style-name="P58" loext:marker-style-name="T10"><text:span text:style-name="T10">Set build number for ipa file, e.g. 1, 2, 3, or +1 to increment by 1</text:span><text:span text:style-name="T10"/></text:p>
          </table:table-cell>
        </table:table-row>
        <table:table-row table:style-name="Table2.1">
          <table:table-cell table:style-name="Table2.A2" office:value-type="string">
            <text:p text:style-name="P58" loext:marker-style-name="T57"><text:span text:style-name="T58">-vs &lt;string&gt;</text:span><text:span text:style-name="T58"/></text:p>
          </table:table-cell>
          <table:table-cell table:style-name="Table2.B2" office:value-type="string">
            <text:p text:style-name="P58" loext:marker-style-name="T10"><text:span text:style-name="T10">Set version string for ipa file, e.g. 1.0, 2.1.4 or +1, +0.1, +0.0.1</text:span><text:span text:style-name="T10"/></text:p>
          </table:table-cell>
        </table:table-row>
      </table:table>
      <text:p text:style-name="P17" loext:marker-style-name="T4"><text:span text:style-name="T59"><text:s/></text:span><text:span text:style-name="T59"/></text:p>
      <text:p text:style-name="Standard" loext:marker-style-name="T4"><text:span text:style-name="T60">Examples:</text:span><text:span text:style-name="T60"/></text:p>
      <text:p text:style-name="P17" loext:marker-style-name="T21"><text:span text:style-name="T61">kab -load "Mali" -resign -bn "5" -vs "2.3.2" -si "iPhone Distribution: Summer Institute of Linguistics, Inc (SIL) (4YF5X97M4H) " -pp "/Users/builder/Documents/MobileProvision/AdHoc_org.wycliffe.app.mali.mobileprovision"</text:span><text:span text:style-name="T21"> </text:span></text:p>
      <text:p text:style-name="P17" loext:marker-style-name="T21"><text:span text:style-name="T21">Running the command line with no parameters will start the Keyboard App Builder UI from the command line.</text:span><text:span text:style-name="T21"/></text:p>
      <text:p text:style-name="P81" loext:marker-style-name="T17"/>
      <text:p text:style-name="P81" loext:marker-style-name="T17"/>
      <text:p text:style-name="P81" loext:marker-style-name="T17"/>
      <text:p text:style-name="P81" loext:marker-style-name="T17"/>
      <text:p text:style-name="P81" loext:marker-style-name="T17"/>
      <text:p text:style-name="P75" loext:marker-style-name="T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left" style:justify-single-word="false" fo:orphans="2" fo:widows="2" style:writing-mode="lr-tb"/>
      <style:text-properties style:font-name="Calibri" fo:font-family="Calibri" style:font-family-generic="swiss" style:font-pitch="variable"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line-height="100%" fo:keep-with-next="always"/>
      <style:text-properties style:use-window-font-color="true" loext:opacity="0%"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937in" fo:margin-top="0.25in" fo:margin-bottom="0.0417in" style:contextual-spacing="false" fo:line-height="100%" fo:text-indent="-0.3937in" style:auto-text-indent="false" fo:keep-with-next="always">
        <style:tab-stops>
          <style:tab-stop style:position="0.3937in"/>
        </style:tab-stops>
      </style:paragraph-properties>
      <style:text-properties style:use-window-font-color="true" loext:opacity="0%"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222in" fo:margin-bottom="0.0555in" style:contextual-spacing="true" fo:keep-together="always" fo:keep-with-next="always"/>
      <style:text-properties style:use-window-font-color="true" loext:opacity="0%" fo:font-weight="bold" style:font-weight-asian="bold" style:font-size-complex="14pt"/>
    </style:style>
    <style:style style:name="Heading_20_4" style:display-name="Heading 4" style:family="paragraph" style:parent-style-name="Standard" style:next-style-name="Standard" style:default-outline-level="4" style:list-style-name="" style:class="chapter">
      <style:paragraph-properties fo:margin-top="0.1945in" fo:margin-bottom="0.0555in" style:contextual-spacing="true" fo:keep-together="always" fo:keep-with-next="always"/>
      <style:text-properties fo:color="#666666" loext:opacity="100%" style:font-size-complex="12pt"/>
    </style:style>
    <style:style style:name="Heading_20_5" style:display-name="Heading 5" style:family="paragraph" style:parent-style-name="Standard" style:next-style-name="Standard" style:default-outline-level="5" style:list-style-name="" style:class="chapter">
      <style:paragraph-properties fo:margin-top="0.1665in" fo:margin-bottom="0.0555in" style:contextual-spacing="tru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chapter">
      <style:paragraph-properties fo:margin-top="0.1665in" fo:margin-bottom="0.0555in" style:contextual-spacing="true" fo:keep-together="always" fo:keep-with-next="always"/>
      <style:text-properties fo:color="#666666" loext:opacity="100%" fo:font-style="italic" style:font-style-asian="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style:class="chapter">
      <style:paragraph-properties fo:margin-top="0in" fo:margin-bottom="0.0417in" style:contextual-spacing="tru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true" fo:keep-together="always" fo:keep-with-next="always"/>
      <style:text-properties fo:color="#666666" loext:opacity="100%" fo:font-size="15pt" style:font-size-asian="15pt" style:font-size-complex="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fo:text-indent="0in" style:auto-text-indent="false"/>
      <style:text-properties fo:color="#2f5496" loext:opacity="100%" style:font-name="Calibri Light" fo:font-family="'Calibri Light'" style:font-family-generic="swiss" style:font-pitch="variable" fo:language="en" fo:country="US" fo:font-weight="normal" style:letter-kerning="false" style:font-name-asian="新細明體" style:font-family-asian="新細明體" style:font-family-generic-asian="system" style:font-pitch-asian="variable" style:language-asian="en" style:country-asian="US" style:font-weight-asian="normal" style:font-name-complex="Times New Roman1" style:font-family-complex="'Times New Roman'"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1665in" fo:margin-bottom="0.0693in" style:contextual-spacing="false">
        <style:tab-stops>
          <style:tab-stop style:position="0.3055in"/>
          <style:tab-stop style:position="6.2681in" style:type="right" style:leader-style="dotted" style:leader-text="."/>
        </style:tab-stops>
      </style:paragraph-properties>
      <style:text-properties style:font-name="Calibri" fo:font-family="Calibri" style:font-family-generic="swiss" style:font-pitch="variable" fo:font-weight="bold" style:font-weight-asian="bold" style:font-name-complex="Calibri1"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ab-stops>
          <style:tab-stop style:position="0.611in"/>
          <style:tab-stop style:position="6.261in" style:type="right" style:leader-style="dotted" style:leader-text="."/>
        </style:tab-stops>
      </style:paragraph-properties>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List_20_Paragraph" style:display-name="List Paragraph" style:family="paragraph" style:parent-style-name="Standard">
      <style:paragraph-properties fo:margin-left="0.5in" fo:margin-top="0in" fo:margin-bottom="0in" style:contextual-spacing="true"/>
    </style:style>
    <style:style style:name="FAQ" style:family="paragraph" style:parent-style-name="Standard" style:list-style-name="WWNum10" style:list-level="3"/>
    <style:style style:name="No_20_Spacing" style:display-name="No Spacing" style:family="paragraph">
      <style:paragraph-properties fo:margin-top="0in" fo:margin-bottom="0in" style:contextual-spacing="false" fo:line-height="100%" fo:text-align="left" style:justify-single-word="false" fo:orphans="2" fo:widows="2" style:writing-mode="lr-tb"/>
      <style:text-properties style:font-name="Calibri" fo:font-family="Calibri" style:font-family-generic="swiss" style:font-pitch="variable" fo:font-size="12pt" style:font-size-asian="12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line-height="100%" fo:background-color="#f2f2f2" fo:padding="0.0835in" fo:border="0.51pt solid #ffffff" style:shadow="none"/>
      <style:text-properties fo:color="#0070c0" loext:opacity="100%" style:font-name="Courier New" fo:font-family="'Courier New'" style:font-family-generic="swiss" style:font-pitch="variable" fo:font-size="10pt" fo:language="en" fo:country="GB" fo:font-weight="bold" style:font-name-asian="Times New Roman1" style:font-family-asian="'Times New Roman'" style:font-family-generic-asian="system" style:font-pitch-asian="variable" style:font-size-asian="10pt" style:language-asian="fr" style:country-asian="FR" style:font-weight-asian="bold" style:font-name-complex="Courier New1"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loext:linked-style-name="Balloon_20_Text_20_Char">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loext:linked-style-name="Heading_20_1">
      <style:text-properties style:use-window-font-color="true" loext:opacity="0%" style:font-name="Calibri" fo:font-family="Calibri" style:font-family-generic="swiss" style:font-pitch="variable"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_20_Char" style:display-name="Heading 2 Char" style:family="text" loext:linked-style-name="Heading_20_2">
      <style:text-properties style:use-window-font-color="true" loext:opacity="0%" style:font-name="Calibri" fo:font-family="Calibri" style:font-family-generic="swiss"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loext:linked-style-name="Heading_20_3">
      <style:text-properties style:use-window-font-color="true" loext:opacity="0%" style:font-name="Calibri" fo:font-family="Calibri" style:font-family-generic="swiss" style:font-pitch="variable" fo:font-size="12pt" fo:font-weight="bold" style:font-size-asian="12pt" style:font-weight-asian="bold" style:font-size-complex="1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1" style:font-family-complex="'Times New Roman'" style:font-family-generic-complex="system" style:font-pitch-complex="variable"/>
    </style:style>
    <style:style style:name="ListLabel_20_3" style:display-name="ListLabel 3" style:family="text">
      <style:text-properties style:text-underline-style="none" style:font-name-complex="Times New Roman1" style:font-family-complex="'Times New Roman'" style:font-family-generic-complex="system" style:font-pitch-complex="variable"/>
    </style:style>
    <style:style style:name="ListLabel_20_4" style:display-name="ListLabel 4" style:family="text">
      <style:text-properties style:text-underline-style="none" style:font-name-complex="Times New Roman1" style:font-family-complex="'Times New Roman'" style:font-family-generic-complex="system" style:font-pitch-complex="variable"/>
    </style:style>
    <style:style style:name="ListLabel_20_5" style:display-name="ListLabel 5" style:family="text">
      <style:text-properties style:text-underline-style="none" style:font-name-complex="Times New Roman1" style:font-family-complex="'Times New Roman'" style:font-family-generic-complex="system" style:font-pitch-complex="variable"/>
    </style:style>
    <style:style style:name="ListLabel_20_6" style:display-name="ListLabel 6" style:family="text">
      <style:text-properties style:text-underline-style="none" style:font-name-complex="Times New Roman1" style:font-family-complex="'Times New Roman'" style:font-family-generic-complex="system" style:font-pitch-complex="variable"/>
    </style:style>
    <style:style style:name="ListLabel_20_7" style:display-name="ListLabel 7" style:family="text">
      <style:text-properties style:text-underline-style="none" style:font-name-complex="Times New Roman1" style:font-family-complex="'Times New Roman'" style:font-family-generic-complex="system" style:font-pitch-complex="variable"/>
    </style:style>
    <style:style style:name="ListLabel_20_8" style:display-name="ListLabel 8" style:family="text">
      <style:text-properties style:text-underline-style="none" style:font-name-complex="Times New Roman1" style:font-family-complex="'Times New Roman'" style:font-family-generic-complex="system" style:font-pitch-complex="variable"/>
    </style:style>
    <style:style style:name="ListLabel_20_9" style:display-name="ListLabel 9" style:family="text">
      <style:text-properties style:text-underline-style="none" style:font-name-complex="Times New Roman1" style:font-family-complex="'Times New Roman'"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font-name-complex="Times New Roman1" style:font-family-complex="'Times New Roman'" style:font-family-generic-complex="system" style:font-pitch-complex="variable"/>
    </style:style>
    <style:style style:name="ListLabel_20_12" style:display-name="ListLabel 12" style:family="text">
      <style:text-properties style:text-underline-style="none" style:font-name-complex="Times New Roman1" style:font-family-complex="'Times New Roman'" style:font-family-generic-complex="system" style:font-pitch-complex="variable"/>
    </style:style>
    <style:style style:name="ListLabel_20_13" style:display-name="ListLabel 13" style:family="text">
      <style:text-properties style:text-underline-style="none" style:font-name-complex="Times New Roman1" style:font-family-complex="'Times New Roman'" style:font-family-generic-complex="system" style:font-pitch-complex="variable"/>
    </style:style>
    <style:style style:name="ListLabel_20_14" style:display-name="ListLabel 14" style:family="text">
      <style:text-properties style:text-underline-style="none" style:font-name-complex="Times New Roman1" style:font-family-complex="'Times New Roman'" style:font-family-generic-complex="system" style:font-pitch-complex="variable"/>
    </style:style>
    <style:style style:name="ListLabel_20_15" style:display-name="ListLabel 15" style:family="text">
      <style:text-properties style:text-underline-style="none" style:font-name-complex="Times New Roman1" style:font-family-complex="'Times New Roman'" style:font-family-generic-complex="system" style:font-pitch-complex="variable"/>
    </style:style>
    <style:style style:name="ListLabel_20_16" style:display-name="ListLabel 16" style:family="text">
      <style:text-properties style:text-underline-style="none" style:font-name-complex="Times New Roman1" style:font-family-complex="'Times New Roman'" style:font-family-generic-complex="system" style:font-pitch-complex="variable"/>
    </style:style>
    <style:style style:name="ListLabel_20_17" style:display-name="ListLabel 17" style:family="text">
      <style:text-properties style:text-underline-style="none" style:font-name-complex="Times New Roman1" style:font-family-complex="'Times New Roman'" style:font-family-generic-complex="system" style:font-pitch-complex="variable"/>
    </style:style>
    <style:style style:name="ListLabel_20_18" style:display-name="ListLabel 18" style:family="text">
      <style:text-properties style:text-underline-style="none" style:font-name-complex="Times New Roman1" style:font-family-complex="'Times New Roman'"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font-name-complex="Times New Roman1" style:font-family-complex="'Times New Roman'" style:font-family-generic-complex="system" style:font-pitch-complex="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Times New Roman1" style:font-family-complex="'Times New Roman'" style:font-family-generic-complex="system" style:font-pitch-complex="variable"/>
    </style:style>
    <style:style style:name="ListLabel_20_41" style:display-name="ListLabel 41" style:family="text">
      <style:text-properties style:text-underline-style="none" style:font-name-complex="Times New Roman1" style:font-family-complex="'Times New Roman'" style:font-family-generic-complex="system" style:font-pitch-complex="variable"/>
    </style:style>
    <style:style style:name="ListLabel_20_42" style:display-name="ListLabel 42" style:family="text">
      <style:text-properties style:text-underline-style="none" style:font-name-complex="Times New Roman1" style:font-family-complex="'Times New Roman'" style:font-family-generic-complex="system" style:font-pitch-complex="variable"/>
    </style:style>
    <style:style style:name="ListLabel_20_43" style:display-name="ListLabel 43" style:family="text">
      <style:text-properties style:text-underline-style="none" style:font-name-complex="Times New Roman1" style:font-family-complex="'Times New Roman'" style:font-family-generic-complex="system" style:font-pitch-complex="variable"/>
    </style:style>
    <style:style style:name="ListLabel_20_44" style:display-name="ListLabel 44" style:family="text">
      <style:text-properties style:text-underline-style="none" style:font-name-complex="Times New Roman1" style:font-family-complex="'Times New Roman'" style:font-family-generic-complex="system" style:font-pitch-complex="variable"/>
    </style:style>
    <style:style style:name="ListLabel_20_45" style:display-name="ListLabel 45" style:family="text">
      <style:text-properties style:text-underline-style="none" style:font-name-complex="Times New Roman1" style:font-family-complex="'Times New Roman'"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font-name-complex="Times New Roman1" style:font-family-complex="'Times New Roman'" style:font-family-generic-complex="system" style:font-pitch-complex="variable"/>
    </style:style>
    <style:style style:name="ListLabel_20_49" style:display-name="ListLabel 49" style:family="text">
      <style:text-properties style:text-underline-style="none" style:font-name-complex="Times New Roman1" style:font-family-complex="'Times New Roman'" style:font-family-generic-complex="system" style:font-pitch-complex="variable"/>
    </style:style>
    <style:style style:name="ListLabel_20_50" style:display-name="ListLabel 50" style:family="text">
      <style:text-properties style:text-underline-style="none" style:font-name-complex="Times New Roman1" style:font-family-complex="'Times New Roman'" style:font-family-generic-complex="system" style:font-pitch-complex="variable"/>
    </style:style>
    <style:style style:name="ListLabel_20_51" style:display-name="ListLabel 51" style:family="text">
      <style:text-properties style:text-underline-style="none" style:font-name-complex="Times New Roman1" style:font-family-complex="'Times New Roman'" style:font-family-generic-complex="system" style:font-pitch-complex="variable"/>
    </style:style>
    <style:style style:name="ListLabel_20_52" style:display-name="ListLabel 52" style:family="text">
      <style:text-properties style:text-underline-style="none" style:font-name-complex="Times New Roman1" style:font-family-complex="'Times New Roman'" style:font-family-generic-complex="system" style:font-pitch-complex="variable"/>
    </style:style>
    <style:style style:name="ListLabel_20_53" style:display-name="ListLabel 53" style:family="text">
      <style:text-properties style:text-underline-style="none" style:font-name-complex="Times New Roman1" style:font-family-complex="'Times New Roman'" style:font-family-generic-complex="system" style:font-pitch-complex="variable"/>
    </style:style>
    <style:style style:name="ListLabel_20_54" style:display-name="ListLabel 54" style:family="text">
      <style:text-properties style:text-underline-style="none" style:font-name-complex="Times New Roman1" style:font-family-complex="'Times New Roman'"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font-name-complex="Times New Roman1" style:font-family-complex="'Times New Roman'" style:font-family-generic-complex="system" style:font-pitch-complex="variable"/>
    </style:style>
    <style:style style:name="ListLabel_20_111" style:display-name="ListLabel 111" style:family="text">
      <style:text-properties style:text-underline-style="none" style:font-name-complex="Times New Roman1" style:font-family-complex="'Times New Roman'" style:font-family-generic-complex="system" style:font-pitch-complex="variable"/>
    </style:style>
    <style:style style:name="ListLabel_20_112" style:display-name="ListLabel 112" style:family="text">
      <style:text-properties style:text-underline-style="none" style:font-name-complex="Times New Roman1" style:font-family-complex="'Times New Roman'" style:font-family-generic-complex="system" style:font-pitch-complex="variable"/>
    </style:style>
    <style:style style:name="ListLabel_20_113" style:display-name="ListLabel 113" style:family="text">
      <style:text-properties style:text-underline-style="none" style:font-name-complex="Times New Roman1" style:font-family-complex="'Times New Roman'" style:font-family-generic-complex="system" style:font-pitch-complex="variable"/>
    </style:style>
    <style:style style:name="ListLabel_20_114" style:display-name="ListLabel 114" style:family="text">
      <style:text-properties style:text-underline-style="none" style:font-name-complex="Times New Roman1" style:font-family-complex="'Times New Roman'" style:font-family-generic-complex="system" style:font-pitch-complex="variable"/>
    </style:style>
    <style:style style:name="ListLabel_20_115" style:display-name="ListLabel 115" style:family="text">
      <style:text-properties style:text-underline-style="none" style:font-name-complex="Times New Roman1" style:font-family-complex="'Times New Roman'" style:font-family-generic-complex="system" style:font-pitch-complex="variable"/>
    </style:style>
    <style:style style:name="ListLabel_20_116" style:display-name="ListLabel 116" style:family="text">
      <style:text-properties style:text-underline-style="none" style:font-name-complex="Times New Roman1" style:font-family-complex="'Times New Roman'" style:font-family-generic-complex="system" style:font-pitch-complex="variable"/>
    </style:style>
    <style:style style:name="ListLabel_20_117" style:display-name="ListLabel 117" style:family="text">
      <style:text-properties style:text-underline-style="none" style:font-name-complex="Times New Roman1" style:font-family-complex="'Times New Roman'" style:font-family-generic-complex="system" style:font-pitch-complex="variabl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font-name-complex="Times New Roman1" style:font-family-complex="'Times New Roman'" style:font-family-generic-complex="system" style:font-pitch-complex="variable"/>
    </style:style>
    <style:style style:name="ListLabel_20_120" style:display-name="ListLabel 120" style:family="text">
      <style:text-properties style:text-underline-style="none" style:font-name-complex="Times New Roman1" style:font-family-complex="'Times New Roman'" style:font-family-generic-complex="system" style:font-pitch-complex="variable"/>
    </style:style>
    <style:style style:name="ListLabel_20_121" style:display-name="ListLabel 121" style:family="text">
      <style:text-properties style:text-underline-style="none" style:font-name-complex="Times New Roman1" style:font-family-complex="'Times New Roman'" style:font-family-generic-complex="system" style:font-pitch-complex="variable"/>
    </style:style>
    <style:style style:name="ListLabel_20_122" style:display-name="ListLabel 122" style:family="text">
      <style:text-properties style:text-underline-style="none" style:font-name-complex="Times New Roman1" style:font-family-complex="'Times New Roman'" style:font-family-generic-complex="system" style:font-pitch-complex="variable"/>
    </style:style>
    <style:style style:name="ListLabel_20_123" style:display-name="ListLabel 123" style:family="text">
      <style:text-properties style:text-underline-style="none" style:font-name-complex="Times New Roman1" style:font-family-complex="'Times New Roman'" style:font-family-generic-complex="system" style:font-pitch-complex="variable"/>
    </style:style>
    <style:style style:name="ListLabel_20_124" style:display-name="ListLabel 124" style:family="text">
      <style:text-properties style:text-underline-style="none" style:font-name-complex="Times New Roman1" style:font-family-complex="'Times New Roman'" style:font-family-generic-complex="system" style:font-pitch-complex="variable"/>
    </style:style>
    <style:style style:name="ListLabel_20_125" style:display-name="ListLabel 125" style:family="text">
      <style:text-properties style:text-underline-style="none" style:font-name-complex="Times New Roman1" style:font-family-complex="'Times New Roman'" style:font-family-generic-complex="system" style:font-pitch-complex="variable"/>
    </style:style>
    <style:style style:name="ListLabel_20_126" style:display-name="ListLabel 126" style:family="text">
      <style:text-properties style:text-underline-style="none" style:font-name-complex="Times New Roman1" style:font-family-complex="'Times New Roman'"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font-name-complex="Times New Roman1" style:font-family-complex="'Times New Roman'" style:font-family-generic-complex="system" style:font-pitch-complex="variable"/>
    </style:style>
    <style:style style:name="ListLabel_20_129" style:display-name="ListLabel 129" style:family="text">
      <style:text-properties style:text-underline-style="none" style:font-name-complex="Times New Roman1" style:font-family-complex="'Times New Roman'" style:font-family-generic-complex="system" style:font-pitch-complex="variable"/>
    </style:style>
    <style:style style:name="ListLabel_20_130" style:display-name="ListLabel 130" style:family="text">
      <style:text-properties style:text-underline-style="none" style:font-name-complex="Times New Roman1" style:font-family-complex="'Times New Roman'" style:font-family-generic-complex="system" style:font-pitch-complex="variable"/>
    </style:style>
    <style:style style:name="ListLabel_20_131" style:display-name="ListLabel 131" style:family="text">
      <style:text-properties style:text-underline-style="none" style:font-name-complex="Times New Roman1" style:font-family-complex="'Times New Roman'" style:font-family-generic-complex="system" style:font-pitch-complex="variable"/>
    </style:style>
    <style:style style:name="ListLabel_20_132" style:display-name="ListLabel 132" style:family="text">
      <style:text-properties style:text-underline-style="none" style:font-name-complex="Times New Roman1" style:font-family-complex="'Times New Roman'" style:font-family-generic-complex="system" style:font-pitch-complex="variable"/>
    </style:style>
    <style:style style:name="ListLabel_20_133" style:display-name="ListLabel 133" style:family="text">
      <style:text-properties style:text-underline-style="none" style:font-name-complex="Times New Roman1" style:font-family-complex="'Times New Roman'" style:font-family-generic-complex="system" style:font-pitch-complex="variable"/>
    </style:style>
    <style:style style:name="ListLabel_20_134" style:display-name="ListLabel 134" style:family="text">
      <style:text-properties style:text-underline-style="none" style:font-name-complex="Times New Roman1" style:font-family-complex="'Times New Roman'" style:font-family-generic-complex="system" style:font-pitch-complex="variable"/>
    </style:style>
    <style:style style:name="ListLabel_20_135" style:display-name="ListLabel 135" style:family="text">
      <style:text-properties style:text-underline-style="none" style:font-name-complex="Times New Roman1" style:font-family-complex="'Times New Roman'" style:font-family-generic-complex="system" style:font-pitch-complex="variabl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font-name-complex="Times New Roman1" style:font-family-complex="'Times New Roman'" style:font-family-generic-complex="system" style:font-pitch-complex="variable"/>
    </style:style>
    <style:style style:name="ListLabel_20_147" style:display-name="ListLabel 147" style:family="text">
      <style:text-properties style:text-underline-style="none" style:font-name-complex="Times New Roman1" style:font-family-complex="'Times New Roman'" style:font-family-generic-complex="system" style:font-pitch-complex="variable"/>
    </style:style>
    <style:style style:name="ListLabel_20_148" style:display-name="ListLabel 148" style:family="text">
      <style:text-properties style:text-underline-style="none" style:font-name-complex="Times New Roman1" style:font-family-complex="'Times New Roman'" style:font-family-generic-complex="system" style:font-pitch-complex="variable"/>
    </style:style>
    <style:style style:name="ListLabel_20_149" style:display-name="ListLabel 149" style:family="text">
      <style:text-properties style:text-underline-style="none" style:font-name-complex="Times New Roman1" style:font-family-complex="'Times New Roman'" style:font-family-generic-complex="system" style:font-pitch-complex="variable"/>
    </style:style>
    <style:style style:name="ListLabel_20_150" style:display-name="ListLabel 150" style:family="text">
      <style:text-properties style:text-underline-style="none" style:font-name-complex="Times New Roman1" style:font-family-complex="'Times New Roman'" style:font-family-generic-complex="system" style:font-pitch-complex="variable"/>
    </style:style>
    <style:style style:name="ListLabel_20_151" style:display-name="ListLabel 151" style:family="text">
      <style:text-properties style:text-underline-style="none" style:font-name-complex="Times New Roman1" style:font-family-complex="'Times New Roman'" style:font-family-generic-complex="system" style:font-pitch-complex="variable"/>
    </style:style>
    <style:style style:name="ListLabel_20_152" style:display-name="ListLabel 152" style:family="text">
      <style:text-properties style:text-underline-style="none" style:font-name-complex="Times New Roman1" style:font-family-complex="'Times New Roman'" style:font-family-generic-complex="system" style:font-pitch-complex="variable"/>
    </style:style>
    <style:style style:name="ListLabel_20_153" style:display-name="ListLabel 153" style:family="text">
      <style:text-properties style:text-underline-style="none" style:font-name-complex="Times New Roman1" style:font-family-complex="'Times New Roman'" style:font-family-generic-complex="system" style:font-pitch-complex="variabl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font-name-complex="Times New Roman1" style:font-family-complex="'Times New Roman'" style:font-family-generic-complex="system" style:font-pitch-complex="variable"/>
    </style:style>
    <style:style style:name="ListLabel_20_156" style:display-name="ListLabel 156" style:family="text">
      <style:text-properties style:text-underline-style="none" style:font-name-complex="Times New Roman1" style:font-family-complex="'Times New Roman'" style:font-family-generic-complex="system" style:font-pitch-complex="variable"/>
    </style:style>
    <style:style style:name="ListLabel_20_157" style:display-name="ListLabel 157" style:family="text">
      <style:text-properties style:text-underline-style="none" style:font-name-complex="Times New Roman1" style:font-family-complex="'Times New Roman'" style:font-family-generic-complex="system" style:font-pitch-complex="variable"/>
    </style:style>
    <style:style style:name="ListLabel_20_158" style:display-name="ListLabel 158" style:family="text">
      <style:text-properties style:text-underline-style="none" style:font-name-complex="Times New Roman1" style:font-family-complex="'Times New Roman'" style:font-family-generic-complex="system" style:font-pitch-complex="variable"/>
    </style:style>
    <style:style style:name="ListLabel_20_159" style:display-name="ListLabel 159" style:family="text">
      <style:text-properties style:text-underline-style="none" style:font-name-complex="Times New Roman1" style:font-family-complex="'Times New Roman'" style:font-family-generic-complex="system" style:font-pitch-complex="variable"/>
    </style:style>
    <style:style style:name="ListLabel_20_160" style:display-name="ListLabel 160" style:family="text">
      <style:text-properties style:text-underline-style="none" style:font-name-complex="Times New Roman1" style:font-family-complex="'Times New Roman'" style:font-family-generic-complex="system" style:font-pitch-complex="variable"/>
    </style:style>
    <style:style style:name="ListLabel_20_161" style:display-name="ListLabel 161" style:family="text">
      <style:text-properties style:text-underline-style="none" style:font-name-complex="Times New Roman1" style:font-family-complex="'Times New Roman'" style:font-family-generic-complex="system" style:font-pitch-complex="variable"/>
    </style:style>
    <style:style style:name="ListLabel_20_162" style:display-name="ListLabel 162" style:family="text">
      <style:text-properties style:text-underline-style="none" style:font-name-complex="Times New Roman1" style:font-family-complex="'Times New Roman'" style:font-family-generic-complex="system" style:font-pitch-complex="variable"/>
    </style:style>
    <style:style style:name="ListLabel_20_163" style:display-name="ListLabel 163"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font-name-complex="Times New Roman1" style:font-family-complex="'Times New Roman'" style:font-family-generic-complex="system" style:font-pitch-complex="variable"/>
    </style:style>
    <style:style style:name="ListLabel_20_193" style:display-name="ListLabel 193" style:family="text">
      <style:text-properties style:text-underline-style="none" style:font-name-complex="Times New Roman1" style:font-family-complex="'Times New Roman'" style:font-family-generic-complex="system" style:font-pitch-complex="variable"/>
    </style:style>
    <style:style style:name="ListLabel_20_194" style:display-name="ListLabel 194" style:family="text">
      <style:text-properties style:text-underline-style="none" style:font-name-complex="Times New Roman1" style:font-family-complex="'Times New Roman'" style:font-family-generic-complex="system" style:font-pitch-complex="variable"/>
    </style:style>
    <style:style style:name="ListLabel_20_195" style:display-name="ListLabel 195" style:family="text">
      <style:text-properties style:text-underline-style="none" style:font-name-complex="Times New Roman1" style:font-family-complex="'Times New Roman'" style:font-family-generic-complex="system" style:font-pitch-complex="variable"/>
    </style:style>
    <style:style style:name="ListLabel_20_196" style:display-name="ListLabel 196" style:family="text">
      <style:text-properties style:text-underline-style="none" style:font-name-complex="Times New Roman1" style:font-family-complex="'Times New Roman'" style:font-family-generic-complex="system" style:font-pitch-complex="variable"/>
    </style:style>
    <style:style style:name="ListLabel_20_197" style:display-name="ListLabel 197" style:family="text">
      <style:text-properties style:text-underline-style="none" style:font-name-complex="Times New Roman1" style:font-family-complex="'Times New Roman'" style:font-family-generic-complex="system" style:font-pitch-complex="variable"/>
    </style:style>
    <style:style style:name="ListLabel_20_198" style:display-name="ListLabel 198" style:family="text">
      <style:text-properties style:text-underline-style="none" style:font-name-complex="Times New Roman1" style:font-family-complex="'Times New Roman'" style:font-family-generic-complex="system" style:font-pitch-complex="variabl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font-name-complex="Times New Roman1" style:font-family-complex="'Times New Roman'" style:font-family-generic-complex="system" style:font-pitch-complex="variable"/>
    </style:style>
    <style:style style:name="ListLabel_20_202" style:display-name="ListLabel 202" style:family="text">
      <style:text-properties style:text-underline-style="none" style:font-name-complex="Times New Roman1" style:font-family-complex="'Times New Roman'" style:font-family-generic-complex="system" style:font-pitch-complex="variable"/>
    </style:style>
    <style:style style:name="ListLabel_20_203" style:display-name="ListLabel 203" style:family="text">
      <style:text-properties style:text-underline-style="none" style:font-name-complex="Times New Roman1" style:font-family-complex="'Times New Roman'" style:font-family-generic-complex="system" style:font-pitch-complex="variable"/>
    </style:style>
    <style:style style:name="ListLabel_20_204" style:display-name="ListLabel 204" style:family="text">
      <style:text-properties style:text-underline-style="none" style:font-name-complex="Times New Roman1" style:font-family-complex="'Times New Roman'" style:font-family-generic-complex="system" style:font-pitch-complex="variable"/>
    </style:style>
    <style:style style:name="ListLabel_20_205" style:display-name="ListLabel 205" style:family="text">
      <style:text-properties style:text-underline-style="none" style:font-name-complex="Times New Roman1" style:font-family-complex="'Times New Roman'" style:font-family-generic-complex="system" style:font-pitch-complex="variable"/>
    </style:style>
    <style:style style:name="ListLabel_20_206" style:display-name="ListLabel 206" style:family="text">
      <style:text-properties style:text-underline-style="none" style:font-name-complex="Times New Roman1" style:font-family-complex="'Times New Roman'" style:font-family-generic-complex="system" style:font-pitch-complex="variable"/>
    </style:style>
    <style:style style:name="ListLabel_20_207" style:display-name="ListLabel 207" style:family="text">
      <style:text-properties style:text-underline-style="none" style:font-name-complex="Times New Roman1" style:font-family-complex="'Times New Roman'" style:font-family-generic-complex="system" style:font-pitch-complex="variabl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font-name-complex="Times New Roman1" style:font-family-complex="'Times New Roman'" style:font-family-generic-complex="system" style:font-pitch-complex="variable"/>
    </style:style>
    <style:style style:name="ListLabel_20_211" style:display-name="ListLabel 211" style:family="text">
      <style:text-properties style:text-underline-style="none" style:font-name-complex="Times New Roman1" style:font-family-complex="'Times New Roman'" style:font-family-generic-complex="system" style:font-pitch-complex="variable"/>
    </style:style>
    <style:style style:name="ListLabel_20_212" style:display-name="ListLabel 212" style:family="text">
      <style:text-properties style:text-underline-style="none" style:font-name-complex="Times New Roman1" style:font-family-complex="'Times New Roman'" style:font-family-generic-complex="system" style:font-pitch-complex="variable"/>
    </style:style>
    <style:style style:name="ListLabel_20_213" style:display-name="ListLabel 213" style:family="text">
      <style:text-properties style:text-underline-style="none" style:font-name-complex="Times New Roman1" style:font-family-complex="'Times New Roman'" style:font-family-generic-complex="system" style:font-pitch-complex="variable"/>
    </style:style>
    <style:style style:name="ListLabel_20_214" style:display-name="ListLabel 214" style:family="text">
      <style:text-properties style:text-underline-style="none" style:font-name-complex="Times New Roman1" style:font-family-complex="'Times New Roman'" style:font-family-generic-complex="system" style:font-pitch-complex="variable"/>
    </style:style>
    <style:style style:name="ListLabel_20_215" style:display-name="ListLabel 215" style:family="text">
      <style:text-properties style:text-underline-style="none" style:font-name-complex="Times New Roman1" style:font-family-complex="'Times New Roman'" style:font-family-generic-complex="system" style:font-pitch-complex="variable"/>
    </style:style>
    <style:style style:name="ListLabel_20_216" style:display-name="ListLabel 216" style:family="text">
      <style:text-properties style:text-underline-style="none" style:font-name-complex="Times New Roman1" style:font-family-complex="'Times New Roman'" style:font-family-generic-complex="system" style:font-pitch-complex="variabl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font-name-complex="Times New Roman1" style:font-family-complex="'Times New Roman'" style:font-family-generic-complex="system" style:font-pitch-complex="variable"/>
    </style:style>
    <style:style style:name="ListLabel_20_219" style:display-name="ListLabel 219" style:family="text">
      <style:text-properties style:text-underline-style="none" style:font-name-complex="Times New Roman1" style:font-family-complex="'Times New Roman'" style:font-family-generic-complex="system" style:font-pitch-complex="variable"/>
    </style:style>
    <style:style style:name="ListLabel_20_220" style:display-name="ListLabel 220" style:family="text">
      <style:text-properties style:text-underline-style="none" style:font-name-complex="Times New Roman1" style:font-family-complex="'Times New Roman'" style:font-family-generic-complex="system" style:font-pitch-complex="variable"/>
    </style:style>
    <style:style style:name="ListLabel_20_221" style:display-name="ListLabel 221" style:family="text">
      <style:text-properties style:text-underline-style="none" style:font-name-complex="Times New Roman1" style:font-family-complex="'Times New Roman'" style:font-family-generic-complex="system" style:font-pitch-complex="variable"/>
    </style:style>
    <style:style style:name="ListLabel_20_222" style:display-name="ListLabel 222" style:family="text">
      <style:text-properties style:text-underline-style="none" style:font-name-complex="Times New Roman1" style:font-family-complex="'Times New Roman'" style:font-family-generic-complex="system" style:font-pitch-complex="variable"/>
    </style:style>
    <style:style style:name="ListLabel_20_223" style:display-name="ListLabel 223" style:family="text">
      <style:text-properties style:text-underline-style="none" style:font-name-complex="Times New Roman1" style:font-family-complex="'Times New Roman'" style:font-family-generic-complex="system" style:font-pitch-complex="variable"/>
    </style:style>
    <style:style style:name="ListLabel_20_224" style:display-name="ListLabel 224" style:family="text">
      <style:text-properties style:text-underline-style="none" style:font-name-complex="Times New Roman1" style:font-family-complex="'Times New Roman'" style:font-family-generic-complex="system" style:font-pitch-complex="variable"/>
    </style:style>
    <style:style style:name="ListLabel_20_225" style:display-name="ListLabel 225" style:family="text">
      <style:text-properties style:text-underline-style="none"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complex="Times New Roman1" style:font-family-complex="'Times New Roman'" style:font-family-generic-complex="system" style:font-pitch-complex="variable"/>
    </style:style>
    <style:style style:name="ListLabel_20_272" style:display-name="ListLabel 272" style:family="text">
      <style:text-properties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style style:name="ListLabel_20_335" style:display-name="ListLabel 335" style:family="text"/>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alibri" fo:font-family="Calibri" style:font-family-generic="swiss" style:font-pitch="variable"/>
    </style:style>
    <style:style style:name="ListLabel_20_434" style:display-name="ListLabel 434" style:family="text">
      <style:text-properties style:font-name-complex="Calibri1" style:font-family-complex="Calibri" style:font-family-generic-complex="system" style:font-pitch-complex="variable" style:font-size-complex="12pt"/>
    </style:style>
    <style:style style:name="ListLabel_20_435" style:display-name="ListLabel 435" style:family="text"/>
    <style:style style:name="ListLabel_20_436" style:display-name="ListLabel 436" style:family="text">
      <style:text-properties fo:color="#1155cc" loext:opacity="100%" style:text-underline-style="solid" style:text-underline-width="auto" style:text-underline-color="font-color" style:font-name-complex="Calibri1" style:font-family-complex="Calibri"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164"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65"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66"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67"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68"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9"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0"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71"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48"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0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1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5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6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67"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70"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36"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0"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Calibri"/>
    </style:style>
    <style:style style:name="MT1" style:family="text">
      <style:text-properties style:font-name="Calibri"/>
    </style:style>
    <style:style style:name="MT2" style:family="text">
      <style:text-properties style:font-name="Calibri" style:font-name-complex="Calibri1" style:font-size-complex="12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2"><text:page-number text:select-page="current">4</text:page-number></text:span></text:p>
        <text:p text:style-name="MP2" loext:marker-style-name="MT1"/>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Keyboard App Builder: Installing and Building on Mac</dc:title>
    <meta:initial-creator>David Moore</meta:initial-creator>
    <dc:creator>David Moore</dc:creator>
    <meta:editing-cycles>3</meta:editing-cycles>
    <meta:print-date>2023-10-24T14:11:00</meta:print-date>
    <meta:creation-date>2026-04-29T18:03:00</meta:creation-date>
    <dc:date>2026-04-29T18:04:00</dc:date>
    <meta:editing-duration>PT1M</meta:editing-duration>
    <meta:generator>LibreOffice/26.2.3.2$Linux_X86_64 LibreOffice_project/620$Build-2</meta:generator>
    <meta:document-statistic meta:table-count="2" meta:image-count="17" meta:object-count="0" meta:page-count="4" meta:paragraph-count="310" meta:word-count="4282" meta:character-count="25767" meta:non-whitespace-character-count="21729"/>
    <meta:user-defined meta:name="AppVersion">16.0000</meta:user-defined>
    <meta:template xlink:type="simple" xlink:actuate="onRequest" xlink:title="Normal.dotm" xlink:href=""/>
  </office:meta>
</office:document-meta>
</file>