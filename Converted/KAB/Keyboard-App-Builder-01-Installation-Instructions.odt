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3000002328EF02B45.png" manifest:media-type="image/png"/>
  <manifest:file-entry manifest:full-path="Pictures/1000000100000CB00000082D4252AE4D.png" manifest:media-type="image/png"/>
  <manifest:file-entry manifest:full-path="Pictures/10000001000005EC000002B34FD923C1.png" manifest:media-type="image/png"/>
  <manifest:file-entry manifest:full-path="Pictures/100000010000006200000036B65513BC.png" manifest:media-type="image/png"/>
  <manifest:file-entry manifest:full-path="Pictures/10000001000008BA00000270EA09DA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9222in" fo:margin-left="0.3938in" fo:margin-top="0in" fo:margin-bottom="0in" table:align="left" style:writing-mode="lr-tb"/>
    </style:style>
    <style:style style:name="Table1.A" style:family="table-column">
      <style:table-column-properties style:column-width="1.4771in"/>
    </style:style>
    <style:style style:name="Table1.B" style:family="table-column">
      <style:table-column-properties style:column-width="3.4451in"/>
    </style:style>
    <style:style style:name="Table1.1" style:family="table-row">
      <style:table-row-properties fo:keep-together="auto"/>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style:style>
    <style:style style:name="P5" style:family="paragraph" style:parent-style-name="Standard">
      <style:paragraph-properties fo:margin-top="0in" fo:margin-bottom="0in" style:contextual-spacing="false" fo:text-align="center" style:justify-single-word="false" fo:break-before="page"/>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margin-top="0in" fo:margin-bottom="0in" style:contextual-spacing="false" fo:text-align="center" style:justify-single-word="false" fo:break-before="page"/>
    </style:style>
    <style:style style:name="P8" style:family="paragraph" style:parent-style-name="Standard">
      <style:paragraph-properties fo:text-align="center" style:justify-single-word="false"/>
      <style:text-properties fo:font-size="16pt" fo:language="en" fo:country="GB" fo:font-weight="bold" style:font-size-asian="16pt" style:font-weight-asian="bold" style:font-size-complex="16pt"/>
    </style:style>
    <style:style style:name="P9" style:family="paragraph" style:parent-style-name="Heading_20_1">
      <style:paragraph-properties fo:margin-top="0in" fo:margin-bottom="0.0417in" style:contextual-spacing="false" fo:break-before="page"/>
    </style:style>
    <style:style style:name="P10" style:family="paragraph" style:parent-style-name="Standard">
      <style:paragraph-properties fo:margin-top="0.25in" fo:margin-bottom="0.1665in" style:contextual-spacing="false"/>
    </style:style>
    <style:style style:name="P11" style:family="paragraph" style:parent-style-name="Standard" style:list-style-name="WWNum1">
      <style:paragraph-properties fo:margin-left="0.4957in" fo:margin-top="0.0835in" fo:margin-bottom="0in" style:contextual-spacing="false" fo:text-indent="-0.248in" style:auto-text-indent="false"/>
    </style:style>
    <style:style style:name="P12" style:family="paragraph" style:parent-style-name="Standard" style:list-style-name="WWNum1"/>
    <style:style style:name="P13" style:family="paragraph" style:parent-style-name="Heading_20_2">
      <style:paragraph-properties>
        <style:tab-stops>
          <style:tab-stop style:position="0.0984in"/>
        </style:tab-stops>
      </style:paragraph-properties>
    </style:style>
    <style:style style:name="P14" style:family="paragraph" style:parent-style-name="Standard">
      <style:paragraph-properties fo:margin-top="0.1665in" fo:margin-bottom="0in" style:contextual-spacing="false"/>
    </style:style>
    <style:style style:name="P15" style:family="paragraph" style:parent-style-name="List_20_Paragraph" style:list-style-name="WWNum38">
      <style:paragraph-properties fo:margin-top="0.1665in" fo:margin-bottom="0in" style:contextual-spacing="false"/>
    </style:style>
    <style:style style:name="P16" style:family="paragraph" style:parent-style-name="Standard">
      <style:paragraph-properties fo:margin-top="0.1665in" fo:margin-bottom="0in" style:contextual-spacing="false" fo:keep-with-next="always"/>
    </style:style>
    <style:style style:name="P17" style:family="paragraph" style:parent-style-name="List_20_Paragraph" style:list-style-name="WWNum46">
      <style:paragraph-properties fo:margin-top="0.1665in" fo:margin-bottom="0in" style:contextual-spacing="true" fo:keep-with-next="always"/>
    </style:style>
    <style:style style:name="P18" style:family="paragraph" style:parent-style-name="List_20_Paragraph" style:list-style-name="WWNum46">
      <style:paragraph-properties fo:margin-top="0.1665in" fo:margin-bottom="0in" style:contextual-spacing="false"/>
    </style:style>
    <style:style style:name="P19" style:family="paragraph" style:parent-style-name="List_20_Paragraph">
      <style:paragraph-properties fo:margin-top="0.1665in" fo:margin-bottom="0in" style:contextual-spacing="false"/>
      <style:text-properties fo:language="en" fo:country="GB"/>
    </style:style>
    <style:style style:name="P20" style:family="paragraph" style:parent-style-name="List_20_Paragraph" style:list-style-name="WWNum45">
      <style:paragraph-properties fo:margin-top="0.1665in" fo:margin-bottom="0in" style:contextual-spacing="false"/>
    </style:style>
    <style:style style:name="P21" style:family="paragraph" style:parent-style-name="Standard">
      <style:paragraph-properties fo:margin-top="0.25in" fo:margin-bottom="0in" style:contextual-spacing="false"/>
    </style:style>
    <style:style style:name="P22" style:family="paragraph" style:parent-style-name="Standard">
      <style:paragraph-properties fo:margin-top="0.1665in" fo:margin-bottom="0in" style:contextual-spacing="false"/>
      <style:text-properties fo:language="en" fo:country="GB"/>
    </style:style>
    <style:style style:name="P23" style:family="paragraph" style:parent-style-name="List_20_Paragraph" style:list-style-name="WWNum41">
      <style:paragraph-properties fo:margin-top="0.1665in" fo:margin-bottom="0in" style:contextual-spacing="false"/>
    </style:style>
    <style:style style:name="P24" style:family="paragraph" style:parent-style-name="Standard">
      <style:paragraph-properties fo:keep-with-next="always"/>
      <style:text-properties fo:font-size="7pt" fo:language="en" fo:country="GB" style:font-size-asian="7pt"/>
    </style:style>
    <style:style style:name="P25" style:family="paragraph" style:parent-style-name="Standard">
      <style:paragraph-properties fo:margin-left="0.4898in"/>
    </style:style>
    <style:style style:name="P26" style:family="paragraph" style:parent-style-name="Standard">
      <style:paragraph-properties fo:margin-left="0.4898in"/>
      <style:text-properties fo:language="en" fo:country="GB"/>
    </style:style>
    <style:style style:name="P27" style:family="paragraph" style:parent-style-name="List_20_Paragraph" style:list-style-name="WWNum41"/>
    <style:style style:name="P28" style:family="paragraph">
      <loext:graphic-properties draw:fill="solid" draw:fill-color="#ffffff"/>
      <style:paragraph-properties fo:text-align="left"/>
      <style:text-properties fo:font-size="18pt"/>
    </style:style>
    <style:style style:name="P29" style:family="paragraph" style:parent-style-name="List_20_Paragraph">
      <style:text-properties fo:language="en" fo:country="GB"/>
    </style:style>
    <style:style style:name="P30" style:family="paragraph" style:parent-style-name="List_20_Paragraph">
      <style:paragraph-properties fo:keep-with-next="always"/>
    </style:style>
    <style:style style:name="P31" style:family="paragraph" style:parent-style-name="Standard">
      <style:paragraph-properties fo:margin-left="0.4917in" fo:margin-top="0.0835in" fo:margin-bottom="0in" style:contextual-spacing="false" fo:text-indent="0.4917in" style:auto-text-indent="false"/>
    </style:style>
    <style:style style:name="P32" style:family="paragraph" style:parent-style-name="Standard">
      <style:paragraph-properties fo:margin-left="0.4909in" fo:margin-top="0.0835in" fo:margin-bottom="0in" style:contextual-spacing="false" fo:text-indent="0.4925in" style:auto-text-indent="false"/>
    </style:style>
    <style:style style:name="P33" style:family="paragraph" style:parent-style-name="Standard">
      <style:text-properties fo:language="de" fo:country="DE"/>
    </style:style>
    <style:style style:name="P34" style:family="paragraph" style:parent-style-name="Standard">
      <loext:graphic-properties draw:fill="solid" draw:fill-color="#f2f2f2"/>
      <style:paragraph-properties fo:margin-left="0.5in" fo:background-color="#f2f2f2" fo:padding="0.0835in" fo:border="0.51pt solid #ffffff" style:shadow="none"/>
    </style:style>
    <style:style style:name="P35" style:family="paragraph" style:parent-style-name="Heading_20_2">
      <style:paragraph-properties fo:margin-left="0.0516in" fo:text-indent="-0.2992in" style:auto-text-indent="false">
        <style:tab-stops>
          <style:tab-stop style:position="0.1972in"/>
        </style:tab-stops>
      </style:paragraph-properties>
    </style:style>
    <style:style style:name="P36" style:family="paragraph" style:parent-style-name="List_20_Paragraph" style:list-style-name="WWNum43">
      <style:paragraph-properties fo:margin-top="0.1665in" fo:margin-bottom="0in" style:contextual-spacing="false"/>
    </style:style>
    <style:style style:name="P37" style:family="paragraph" style:parent-style-name="List_20_Paragraph">
      <style:paragraph-properties fo:margin-top="0.0835in" fo:margin-bottom="0in" style:contextual-spacing="false"/>
    </style:style>
    <style:style style:name="P38" style:family="paragraph" style:parent-style-name="Standard" style:list-style-name="WWNum28"/>
    <style:style style:name="P39" style:family="paragraph" style:parent-style-name="Standard">
      <style:paragraph-properties fo:margin-left="0.25in"/>
      <style:text-properties fo:language="en" fo:country="GB"/>
    </style:style>
    <style:style style:name="P40" style:family="paragraph" style:parent-style-name="Standard" style:list-style-name="WWNum28">
      <style:paragraph-properties fo:margin-left="0.5in" fo:text-indent="-0.248in" style:auto-text-indent="false" fo:keep-with-next="always"/>
    </style:style>
    <style:style style:name="P41" style:family="paragraph" style:parent-style-name="Standard">
      <style:paragraph-properties fo:margin-left="0.5in" fo:keep-with-next="always"/>
      <style:text-properties fo:language="en" fo:country="GB"/>
    </style:style>
    <style:style style:name="P42" style:family="paragraph" style:parent-style-name="Standard">
      <style:paragraph-properties fo:margin-left="0.5in" fo:keep-with-next="always"/>
    </style:style>
    <style:style style:name="P43" style:family="paragraph" style:parent-style-name="Standard">
      <style:paragraph-properties fo:keep-with-next="always"/>
      <style:text-properties fo:language="en" fo:country="GB"/>
    </style:style>
    <style:style style:name="P44" style:family="paragraph" style:parent-style-name="Standard">
      <style:paragraph-properties fo:margin-left="0.4925in" fo:margin-top="0in" fo:margin-bottom="0.0835in" style:contextual-spacing="false" fo:keep-with-next="always"/>
    </style:style>
    <style:style style:name="P45" style:family="paragraph" style:parent-style-name="List_20_Paragraph" style:list-style-name="WWNum44">
      <style:paragraph-properties fo:keep-with-next="always"/>
    </style:style>
    <style:style style:name="P46" style:family="paragraph" style:parent-style-name="Standard">
      <style:paragraph-properties fo:margin-left="0.5in"/>
    </style:style>
    <style:style style:name="P47" style:family="paragraph" style:parent-style-name="Standard">
      <style:paragraph-properties fo:text-align="center" style:justify-single-word="false"/>
      <style:text-properties fo:language="en" fo:country="GB" fo:font-weight="bold" style:font-weight-asian="bold"/>
    </style:style>
    <style:style style:name="P48" style:family="paragraph" style:parent-style-name="Standard">
      <style:paragraph-properties fo:margin-top="0.0835in" fo:margin-bottom="0in" style:contextual-spacing="false"/>
      <style:text-properties fo:language="en" fo:country="GB"/>
    </style:style>
    <style:style style:name="P49" style:family="paragraph" style:parent-style-name="Standard">
      <style:paragraph-properties fo:margin-top="0.0835in" fo:margin-bottom="0in" style:contextual-spacing="false"/>
    </style:style>
    <style:style style:name="P50"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51" style:family="paragraph" style:parent-style-name="Standard" style:list-style-name="WWNum33">
      <style:paragraph-properties fo:margin-top="0.0835in" fo:margin-bottom="0in" style:contextual-spacing="false"/>
    </style:style>
    <style:style style:name="P52" style:family="paragraph" style:parent-style-name="Standard" style:list-style-name="WWNum33"/>
    <style:style style:name="P53" style:family="paragraph" style:parent-style-name="List_20_Paragraph" style:list-style-name="WWNum47"/>
    <style:style style:name="P54" style:family="paragraph" style:parent-style-name="Heading_20_2">
      <style:paragraph-properties>
        <style:tab-stops>
          <style:tab-stop style:position="0.1252in"/>
          <style:tab-stop style:position="0.3154in"/>
        </style:tab-stops>
      </style:paragraph-properties>
    </style:style>
    <style:style style:name="P55" style:family="paragraph" style:parent-style-name="List_20_Paragraph" style:list-style-name="WWNum48"/>
    <style:style style:name="P56" style:family="paragraph" style:parent-style-name="List_20_Paragraph" style:list-style-name="WWNum40">
      <style:paragraph-properties fo:margin-left="0.4957in" fo:margin-top="0.0835in" fo:margin-bottom="0in" style:contextual-spacing="false" fo:text-indent="-0.248in" style:auto-text-indent="false"/>
    </style:style>
    <style:style style:name="P57" style:family="paragraph" style:parent-style-name="List_20_Paragraph" style:list-style-name="WWNum37"/>
    <style:style style:name="P58" style:family="paragraph" style:parent-style-name="Command_20_Line">
      <style:paragraph-properties fo:margin-left="0.5in"/>
    </style:style>
    <style:style style:name="P59" style:family="paragraph" style:parent-style-name="Standard">
      <style:paragraph-properties fo:keep-together="always" fo:keep-with-next="always"/>
    </style:style>
    <style:style style:name="P60" style:family="paragraph" style:parent-style-name="Command_20_Line">
      <style:paragraph-properties fo:keep-together="always" fo:keep-with-next="always"/>
    </style:style>
    <style:style style:name="P61" style:family="paragraph" style:parent-style-name="Standard">
      <style:text-properties style:font-name="Consolas" fo:font-size="11pt" fo:language="en" fo:country="GB" style:font-size-asian="11pt" style:font-size-complex="11pt"/>
    </style:style>
    <style:style style:name="P62" style:family="paragraph" style:parent-style-name="Standard">
      <style:paragraph-properties fo:keep-with-next="always"/>
    </style:style>
    <style:style style:name="P63" style:family="paragraph" style:parent-style-name="Standard">
      <style:paragraph-properties>
        <style:tab-stops>
          <style:tab-stop style:position="3.9618in"/>
        </style:tab-stops>
      </style:paragraph-properties>
    </style:style>
    <style:style style:name="P64" style:family="paragraph" style:parent-style-name="Command_20_Line">
      <style:paragraph-properties fo:keep-with-next="always"/>
    </style:style>
    <style:style style:name="P65" style:family="paragraph" style:parent-style-name="Heading_20_1">
      <style:paragraph-properties fo:text-indent="-0.248in" style:auto-text-indent="false" fo:break-before="page"/>
    </style:style>
    <style:style style:name="P66" style:family="paragraph" style:parent-style-name="Standard">
      <style:text-properties style:font-name="Courier New" fo:font-size="10pt" fo:language="en" fo:country="GB" style:font-size-asian="10pt" style:font-name-complex="Courier New1" style:font-size-complex="10pt"/>
    </style:style>
    <style:style style:name="P67"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font-size="16pt" fo:language="en" fo:country="GB" fo:font-weight="bold" style:font-size-asian="16pt" style:font-weight-asian="bold" style:font-size-complex="16pt"/>
    </style:style>
    <style:style style:name="T8" style:family="text">
      <style:text-properties fo:font-family="Calibri" style:font-family-generic="roman" style:font-pitch="variable" fo:language="en" fo:country="US" fo:font-weight="normal" style:letter-kerning="true" style:font-family-asian="'ＭＳ 明朝'" style:font-family-generic-asian="system" style:font-pitch-asian="variable" style:language-asian="zh" style:country-asian="TW" style:font-weight-asian="normal" style:font-name-complex="Arial1"/>
    </style:style>
    <style:style style:name="T9" style:family="text">
      <style:text-properties style:font-name="Calibri" fo:language="en" fo:country="US" fo:font-weight="normal" style:letter-kerning="true" style:font-family-asian="'ＭＳ 明朝'" style:font-family-generic-asian="system" style:font-pitch-asian="variable" style:language-asian="zh" style:country-asian="TW" style:font-weight-asian="normal" style:font-name-complex="Arial1"/>
    </style:style>
    <style:style style:name="T10" style:family="text">
      <style:text-properties text:display="true"/>
    </style:style>
    <style:style style:name="T11" style:family="text">
      <style:text-properties fo:font-family="Calibri" style:font-family-generic="roman" style:font-pitch="variable" fo:font-style="normal" style:letter-kerning="true" style:font-family-asian="'ＭＳ 明朝'" style:font-family-generic-asian="system" style:font-pitch-asian="variable" style:language-asian="zh" style:country-asian="TW" style:font-style-asian="normal" style:font-name-complex="Arial1"/>
    </style:style>
    <style:style style:name="T12" style:family="text">
      <style:text-properties style:font-name="Calibri" fo:font-style="normal" style:letter-kerning="true" style:font-family-asian="'ＭＳ 明朝'" style:font-family-generic-asian="system" style:font-pitch-asian="variable" style:language-asian="zh" style:country-asian="TW" style:font-style-asian="normal" style:font-name-complex="Arial1"/>
    </style:style>
    <style:style style:name="T13" style:family="text">
      <style:text-properties fo:font-family="Calibri" style:font-family-generic="roman" style:font-pitch="variable" fo:font-size="12pt" style:letter-kerning="true" style:font-family-asian="'ＭＳ 明朝'" style:font-family-generic-asian="system" style:font-pitch-asian="variable" style:font-size-asian="12pt" style:language-asian="zh" style:country-asian="TW" style:font-name-complex="Arial1"/>
    </style:style>
    <style:style style:name="T14" style:family="text">
      <style:text-properties style:font-name="Calibri" fo:font-size="12pt" style:letter-kerning="true" style:font-family-asian="'ＭＳ 明朝'" style:font-family-generic-asian="system" style:font-pitch-asian="variable" style:font-size-asian="12pt" style:language-asian="zh" style:country-asian="TW" style:font-name-complex="Arial1"/>
    </style:style>
    <style:style style:name="T15" style:family="text">
      <style:text-properties fo:language="en" fo:country="GB" fo:font-weight="bold" style:font-weight-asian="bold" style:font-weight-complex="bold"/>
    </style:style>
    <style:style style:name="T16" style:family="text">
      <style:text-properties fo:language="en" fo:country="GB" fo:font-weight="bold" style:font-weight-asian="bold"/>
    </style:style>
    <style:style style:name="T17"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18" style:family="text">
      <style:text-properties fo:font-size="7pt" fo:language="en" fo:country="GB" style:font-size-asian="7pt"/>
    </style:style>
    <style:style style:name="T19" style:family="text">
      <style:text-properties fo:font-size="11pt" fo:language="en" fo:country="GB" style:font-size-asian="11pt" style:font-size-complex="11pt"/>
    </style:style>
    <style:style style:name="T20" style:family="text">
      <style:text-properties fo:language="de" fo:country="DE"/>
    </style:style>
    <style:style style:name="T21" style:family="text">
      <style:text-properties fo:language="en" fo:country="GB" style:text-underline-style="solid" style:text-underline-width="auto" style:text-underline-color="font-color" fo:font-weight="bold" style:font-weight-asian="bold" style:font-weight-complex="bold"/>
    </style:style>
    <style:style style:name="T22" style:family="text">
      <style:text-properties fo:language="en" fo:country="GB" style:text-underline-style="solid" style:text-underline-width="auto" style:text-underline-color="font-color" fo:font-weight="bold" style:font-weight-asian="bold"/>
    </style:style>
    <style:style style:name="T23" style:family="text">
      <style:text-properties fo:font-weight="bold" style:font-weight-asian="bold"/>
    </style:style>
    <style:style style:name="T24" style:family="text">
      <style:text-properties fo:language="en" fo:country="GB" style:text-underline-style="solid" style:text-underline-width="auto" style:text-underline-color="font-color"/>
    </style:style>
    <style:style style:name="T25" style:family="text">
      <style:text-properties fo:font-size="10pt" fo:language="en" fo:country="GB" fo:font-weight="bold" style:font-size-asian="10pt" style:font-weight-asian="bold"/>
    </style:style>
    <style:style style:name="T26" style:family="text">
      <style:text-properties fo:font-size="10pt" fo:language="en" fo:country="GB" style:font-size-asian="10pt"/>
    </style:style>
    <style:style style:name="T27" style:family="text">
      <style:text-properties fo:language="en" fo:country="GB" style:font-weight-complex="bold"/>
    </style:style>
    <style:style style:name="T28" style:family="text">
      <style:text-properties fo:language="fr" fo:country="FR"/>
    </style:style>
    <style:style style:name="T29" style:family="text">
      <style:text-properties style:font-name="Consolas" fo:font-size="11pt" fo:language="en" fo:country="GB" style:font-size-asian="11pt" style:font-size-complex="11pt"/>
    </style:style>
    <style:style style:name="T30" style:family="text">
      <style:text-properties style:font-name="Courier New" fo:font-size="10pt" fo:language="en" fo:country="GB"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1.4846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solid" draw:fill-color="#ffffff" draw:textarea-vertical-align="top" draw:auto-grow-height="false" fo:min-height="0.0181in" fo:min-width="0.2244in" fo:padding-top="0.0492in" fo:padding-bottom="0.0492in" fo:padding-left="0.0984in" fo:padding-right="0.0984in" fo:wrap-option="wrap" loext:decorative="false" fo:margin-left="0.0752in" fo:margin-right="0.1102in" fo:margin-top="0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30" text:anchor-type="as-char" svg:width="5.3854in" svg:height="1.6709in"><draw:image xlink:href="Pictures/10000001000008BA00000270EA09DAFB.png" xlink:type="simple" xlink:show="embed" xlink:actuate="onLoad" draw:mime-type="image/png"/></draw:frame></text:p>
      <text:p text:style-name="P1" loext:marker-style-name="T1"/>
      <text:p text:style-name="P1" loext:marker-style-name="T1"/>
      <text:p text:style-name="P1" loext:marker-style-name="T1"/>
      <text:p text:style-name="P2" loext:marker-style-name="T2"><text:span text:style-name="T2">Installation Instruction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2" draw:name="Picture 1" text:anchor-type="as-char" svg:width="1.2193in" svg:height="0.6646in"><draw:image xlink:href="Pictures/100000010000006200000036B65513BC.png" xlink:type="simple" xlink:show="embed" xlink:actuate="onLoad" draw:mime-type="image/png"/><svg:desc>Icon

Description automatically generated</svg:desc></draw:frame></text:p>
      <text:p text:style-name="P3" loext:marker-style-name="T3"/>
      <text:p text:style-name="P3" loext:marker-style-name="T3"/>
      <text:p text:style-name="P4" loext:marker-style-name="T4"/>
      <text:p text:style-name="P4" loext:marker-style-name="T4"/>
      <text:p text:style-name="P5"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2" loext:marker-style-name="T5"><text:span text:style-name="T5">Keyboard App Builder: Installation Instructions</text:span><text:span text:style-name="T5"/></text:p>
      <text:p text:style-name="P6" loext:marker-style-name="T4"/>
      <text:p text:style-name="P2" loext:marker-style-name="T4"><text:span text:style-name="T4">© 2025, SIL Global</text:span><text:span text:style-name="T4"/></text:p>
      <text:p text:style-name="P6" loext:marker-style-name="T4"/>
      <text:p text:style-name="P2" loext:marker-style-name="T6"><text:span text:style-name="T6">Last updated: 02 September 2025</text:span><text:span text:style-name="T6"/></text:p>
      <text:p text:style-name="P6" loext:marker-style-name="T4"/>
      <text:p text:style-name="P6" loext:marker-style-name="T4"/>
      <text:p text:style-name="P6" loext:marker-style-name="T4"/>
      <text:p text:style-name="P6" loext:marker-style-name="T4"/>
      <text:p text:style-name="P6" loext:marker-style-name="T4"/>
      <text:p text:style-name="P2" loext:marker-style-name="T4"><text:span text:style-name="T4">You are free to print this manual for personal use and for training workshops.</text:span><text:span text:style-name="T4"/></text:p>
      <text:p text:style-name="P6" loext:marker-style-name="T4"/>
      <text:p text:style-name="P2" loext:marker-style-name="T4"><text:span text:style-name="T4">The latest version is available at</text:span><text:span text:style-name="T4"/></text:p>
      <text:p text:style-name="P2" loext:marker-style-name="T4"><text:a xlink:type="simple" xlink:href="http://software.sil.org/keyboardappbuilder/resources/" text:style-name="Internet_20_link" text:visited-style-name="Visited_20_Internet_20_Link"><text:span text:style-name="Internet_20_link"><text:span text:style-name="T4">http://software.sil.org/keyboardappbuilder/resources/</text:span></text:span></text:a><text:span text:style-name="T4"> </text:span></text:p>
      <text:p text:style-name="P6" loext:marker-style-name="T4"/>
      <text:p text:style-name="P2" loext:marker-style-name="T4"><text:span text:style-name="T4">and on the Help menu of Keyboard App Builder.</text:span><text:span text:style-name="T4"/></text:p>
      <text:p text:style-name="P1" loext:marker-style-name="T1"/>
      <text:p text:style-name="P4" loext:marker-style-name="T4"/>
      <text:p text:style-name="P7" loext:marker-style-name="T7"><text:span text:style-name="T7">Contents</text:span><text:span text:style-name="T7"/></text:p>
      <text:p text:style-name="P8" loext:marker-style-name="T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8"><text:a xlink:type="simple" xlink:href="#_Toc207703072" text:style-name="Index_20_Link" text:visited-style-name="Index_20_Link"><text:span text:style-name="T4">1.</text:span><text:span text:style-name="T9"><text:tab/></text:span><text:span text:style-name="T4">Introduction</text:span><text:span text:style-name="T10"><text:tab/>4</text:span></text:a></text:p>
          <text:p text:style-name="Contents_20_1" loext:marker-style-name="T8"><text:a xlink:type="simple" xlink:href="#_Toc207703073" text:style-name="Index_20_Link" text:visited-style-name="Index_20_Link"><text:span text:style-name="T4">2.</text:span><text:span text:style-name="T9"><text:tab/></text:span><text:span text:style-name="T4">Windows Installation</text:span><text:span text:style-name="T10"><text:tab/>4</text:span></text:a></text:p>
          <text:p text:style-name="Contents_20_2" loext:marker-style-name="T11"><text:a xlink:type="simple" xlink:href="#_Toc207703074" text:style-name="Index_20_Link" text:visited-style-name="Index_20_Link"><text:span text:style-name="T4">2.1.</text:span><text:span text:style-name="T12"><text:tab/></text:span><text:span text:style-name="T4">Installing Keyboard App Builder</text:span><text:span text:style-name="T10"><text:tab/>5</text:span></text:a></text:p>
          <text:p text:style-name="Contents_20_2" loext:marker-style-name="T11"><text:a xlink:type="simple" xlink:href="#_Toc207703075" text:style-name="Index_20_Link" text:visited-style-name="Index_20_Link"><text:span text:style-name="T4">2.2.</text:span><text:span text:style-name="T12"><text:tab/></text:span><text:span text:style-name="T4">Installing Java Development Kit (JDK)</text:span><text:span text:style-name="T10"><text:tab/>5</text:span></text:a></text:p>
          <text:p text:style-name="Contents_20_3" loext:marker-style-name="T13"><text:a xlink:type="simple" xlink:href="#_Toc207703076" text:style-name="Index_20_Link" text:visited-style-name="Index_20_Link"><text:span text:style-name="T4">2.2.1.</text:span><text:span text:style-name="T14"><text:tab/></text:span><text:span text:style-name="T4">Installing the JDK using the Install JDK wizard</text:span><text:span text:style-name="T10"><text:tab/>5</text:span></text:a></text:p>
          <text:p text:style-name="Contents_20_3" loext:marker-style-name="T13"><text:a xlink:type="simple" xlink:href="#_Toc207703077" text:style-name="Index_20_Link" text:visited-style-name="Index_20_Link"><text:span text:style-name="T4">2.2.2.</text:span><text:span text:style-name="T14"><text:tab/></text:span><text:span text:style-name="T4">Installing the JDK from the Azul website</text:span><text:span text:style-name="T10"><text:tab/>5</text:span></text:a></text:p>
          <text:p text:style-name="Contents_20_2" loext:marker-style-name="T11"><text:a xlink:type="simple" xlink:href="#_Toc207703078" text:style-name="Index_20_Link" text:visited-style-name="Index_20_Link"><text:span text:style-name="T4">2.3.</text:span><text:span text:style-name="T12"><text:tab/></text:span><text:span text:style-name="T4">Installing Android Software Development Kit (SDK)</text:span><text:span text:style-name="T10"><text:tab/>7</text:span></text:a></text:p>
          <text:p text:style-name="Contents_20_3" loext:marker-style-name="T13"><text:a xlink:type="simple" xlink:href="#_Toc207703079" text:style-name="Index_20_Link" text:visited-style-name="Index_20_Link"><text:span text:style-name="T4">2.3.1.</text:span><text:span text:style-name="T14"><text:tab/></text:span><text:span text:style-name="T4">Downloading the Android SDK packages from the internet</text:span><text:span text:style-name="T10"><text:tab/>7</text:span></text:a></text:p>
          <text:p text:style-name="Contents_20_3" loext:marker-style-name="T13"><text:a xlink:type="simple" xlink:href="#_Toc207703080" text:style-name="Index_20_Link" text:visited-style-name="Index_20_Link"><text:span text:style-name="T4">2.3.2.</text:span><text:span text:style-name="T14"><text:tab/></text:span><text:span text:style-name="T4">Copying the Android SDK files from someone else</text:span><text:span text:style-name="T10"><text:tab/>8</text:span></text:a></text:p>
          <text:p text:style-name="Contents_20_1" loext:marker-style-name="T8"><text:a xlink:type="simple" xlink:href="#_Toc207703081" text:style-name="Index_20_Link" text:visited-style-name="Index_20_Link"><text:span text:style-name="T4">3.</text:span><text:span text:style-name="T9"><text:tab/></text:span><text:span text:style-name="T4">Linux Installation</text:span><text:span text:style-name="T10"><text:tab/>10</text:span></text:a></text:p>
          <text:p text:style-name="Contents_20_2" loext:marker-style-name="T11"><text:a xlink:type="simple" xlink:href="#_Toc207703082" text:style-name="Index_20_Link" text:visited-style-name="Index_20_Link">3.1.<text:span text:style-name="T12"><text:tab/></text:span>Flathub<text:span text:style-name="T10"><text:tab/>10</text:span></text:a></text:p>
          <text:p text:style-name="Contents_20_2" loext:marker-style-name="T11"><text:a xlink:type="simple" xlink:href="#_Toc207703083" text:style-name="Index_20_Link" text:visited-style-name="Index_20_Link"><text:span text:style-name="T4">3.2.</text:span><text:span text:style-name="T12"><text:tab/></text:span>SIL repository for Ubuntu<text:span text:style-name="T10"><text:tab/>10</text:span></text:a></text:p>
          <text:p text:style-name="Contents_20_3" loext:marker-style-name="T13"><text:a xlink:type="simple" xlink:href="#_Toc207703084" text:style-name="Index_20_Link" text:visited-style-name="Index_20_Link">3.2.1.<text:span text:style-name="T14"><text:tab/></text:span>Add SIL repository for Ubuntu<text:span text:style-name="T10"><text:tab/>10</text:span></text:a></text:p>
          <text:p text:style-name="Contents_20_3" loext:marker-style-name="T13"><text:a xlink:type="simple" xlink:href="#_Toc207703085" text:style-name="Index_20_Link" text:visited-style-name="Index_20_Link">3.2.2.<text:span text:style-name="T14"><text:tab/></text:span>Installing all packages from the Internet<text:span text:style-name="T10"><text:tab/>11</text:span></text:a></text:p>
          <text:p text:style-name="Contents_20_3" loext:marker-style-name="T13"><text:a xlink:type="simple" xlink:href="#_Toc207703086" text:style-name="Index_20_Link" text:visited-style-name="Index_20_Link">3.2.3.<text:span text:style-name="T14"><text:tab/></text:span>Downloading the Android SDK files prior to package installation<text:span text:style-name="T10"><text:tab/>11</text:span></text:a></text:p>
          <text:p text:style-name="Contents_20_3" loext:marker-style-name="T13"><text:a xlink:type="simple" xlink:href="#_Toc207703087" text:style-name="Index_20_Link" text:visited-style-name="Index_20_Link"><text:span text:style-name="T4">3.2.4.</text:span><text:span text:style-name="T14"><text:tab/></text:span>Downloading<text:span text:style-name="T4"> the Android SDK files</text:span><text:span text:style-name="T10"><text:tab/>11</text:span></text:a></text:p>
          <text:p text:style-name="Contents_20_3" loext:marker-style-name="T13"><text:a xlink:type="simple" xlink:href="#_Toc207703088" text:style-name="Index_20_Link" text:visited-style-name="Index_20_Link"><text:span text:style-name="T4">3.2.5.</text:span><text:span text:style-name="T14"><text:tab/></text:span><text:span text:style-name="T4">Provide zip files during the package install</text:span><text:span text:style-name="T10"><text:tab/>12</text:span></text:a></text:p>
          <text:p text:style-name="Contents_20_3" loext:marker-style-name="T13"><text:a xlink:type="simple" xlink:href="#_Toc207703089" text:style-name="Index_20_Link" text:visited-style-name="Index_20_Link">3.2.6.<text:span text:style-name="T14"><text:tab/></text:span>Installing without Android SDK<text:span text:style-name="T10"><text:tab/>12</text:span></text:a></text:p>
          <text:p text:style-name="Contents_20_3" loext:marker-style-name="T13"><text:a xlink:type="simple" xlink:href="#_Toc207703090" text:style-name="Index_20_Link" text:visited-style-name="Index_20_Link">3.2.7.<text:span text:style-name="T14"><text:tab/></text:span>Automating Android SDK installation<text:span text:style-name="T10"><text:tab/>12</text:span></text:a></text:p>
          <text:p text:style-name="Contents_20_1" loext:marker-style-name="T8"><text:a xlink:type="simple" xlink:href="#_Toc207703091" text:style-name="Index_20_Link" text:visited-style-name="Index_20_Link"><text:span text:style-name="T4">4.</text:span><text:span text:style-name="T9"><text:tab/></text:span><text:span text:style-name="T4">How to build your first app</text:span><text:span text:style-name="T10"><text:tab/>13</text:span></text:a></text:p>
        </text:index-body>
      </text:table-of-content>
      <text:p text:style-name="P4" loext:marker-style-name="T4"/>
      <text:p text:style-name="P4" loext:marker-style-name="T4"/>
      <text:h text:style-name="P9" text:outline-level="1" loext:marker-style-name="T4"><text:bookmark-start text:name="_Toc207703072"/><text:span text:style-name="T4">Introduction</text:span><text:bookmark-end text:name="_Toc207703072"/><text:span text:style-name="T4"/></text:h>
      <text:p text:style-name="Standard" loext:marker-style-name="T4"><text:span text:style-name="T15">Keyboard App Builder</text:span><text:span text:style-name="T4"> does what its name suggests: it helps you to build customized keyboard apps for smartphones and tablets. A keyboard app allows users to add a system keyboard to their device, enabling them to type in their language within other apps such as Gmail, Facebook and WhatsApp.</text:span></text:p>
      <text:p text:style-name="P4" loext:marker-style-name="T4"/>
      <text:p text:style-name="Standard" loext:marker-style-name="T4"><text:span text:style-name="T4">The keyboards are created using </text:span><text:span text:style-name="T15">Keyman Developer</text:span><text:span text:style-name="T4"> (</text:span><text:a xlink:type="simple" xlink:href="https://keyman.com/developer/" text:style-name="Internet_20_link" text:visited-style-name="Visited_20_Internet_20_Link"><text:span text:style-name="Internet_20_link"><text:span text:style-name="T4">https://keyman.com/developer/</text:span></text:span></text:a><text:span text:style-name="T4">).</text:span></text:p>
      <text:p text:style-name="P4" loext:marker-style-name="T4"/>
      <text:p text:style-name="Standard" loext:marker-style-name="T4"><text:span text:style-name="T4">To build an app, you specify the Keyman keyboard layouts and lexical models to use, the app name, fonts, colours, about box information, illustrations, and the icons. Keyboard App Builder will package everything together and build the customized app for you. You then install it on your mobile device, send it to others by Bluetooth or Wi-Fi transfer app, share it on microSD memory cards and publish it to app stores on the Internet.</text:span><text:span text:style-name="T4"/></text:p>
      <text:p text:style-name="P4" loext:marker-style-name="T4"/>
      <text:p text:style-name="P4" loext:marker-style-name="T4"/>
      <text:p text:style-name="Standard" loext:marker-style-name="T4"><draw:frame draw:style-name="fr2" draw:name="Image2" text:anchor-type="as-char" svg:width="6.0465in" svg:height="2.7563in"><draw:image xlink:href="Pictures/10000001000005EC000002B34FD923C1.png" xlink:type="simple" xlink:show="embed" xlink:actuate="onLoad" draw:mime-type="image/png"/></draw:frame></text:p>
      <text:p text:style-name="P10" loext:marker-style-name="T4"><text:span text:style-name="T4">To install Keyboard App Builder on </text:span><text:span text:style-name="T16">Windows</text:span><text:span text:style-name="T4">, please follow the instructions in section 2. For </text:span><text:span text:style-name="T16">Linux</text:span><text:span text:style-name="T4">, please find the instructions in section 3.</text:span></text:p>
      <text:p text:style-name="P4" loext:marker-style-name="T4"/>
      <text:h text:style-name="Heading_20_1" text:outline-level="1" loext:marker-style-name="T4"><text:bookmark-start text:name="_Toc207703073"/><text:span text:style-name="T4">Windows Installation</text:span><text:bookmark-end text:name="_Toc207703073"/><text:span text:style-name="T4"/></text:h>
      <text:p text:style-name="Standard" loext:marker-style-name="T4"><text:span text:style-name="T4">In order to run Keyboard App Builder on Windows, you need to have three components installed on your computer:</text:span><text:span text:style-name="T4"/></text:p>
      <text:list text:style-name="WWNum1">
        <text:list-item>
          <text:p text:style-name="P11" loext:marker-style-name="T4"><text:span text:style-name="T4">Keyboard App Builder (KAB)</text:span><text:span text:style-name="T4"/></text:p>
        </text:list-item>
        <text:list-item>
          <text:p text:style-name="P12" loext:marker-style-name="T4"><text:span text:style-name="T4">Java Development Kit (JDK)</text:span><text:span text:style-name="T4"/></text:p>
        </text:list-item>
        <text:list-item>
          <text:p text:style-name="P12" loext:marker-style-name="T4"><text:span text:style-name="T4">Android Software Development Kit (SDK)</text:span><text:span text:style-name="T4"/></text:p>
        </text:list-item>
      </text:list>
      <text:p text:style-name="P4" loext:marker-style-name="T4"/>
      <text:p text:style-name="Standard" loext:marker-style-name="T4"><text:span text:style-name="T4">Here are more details on installing each of these three components.</text:span><text:span text:style-name="T4"/></text:p>
      <text:p text:style-name="P4" loext:marker-style-name="T4"/>
      <text:h text:style-name="P13" text:outline-level="2" loext:marker-style-name="T4"><text:bookmark-start text:name="_Toc207703074"/><text:span text:style-name="T4">Installing Keyboard App Builder</text:span><text:bookmark-end text:name="_Toc207703074"/><text:span text:style-name="T4"/></text:h>
      <text:p text:style-name="P14" loext:marker-style-name="T4"><text:span text:style-name="T4">To install the Keyboard App Builder program, do the following:</text:span><text:span text:style-name="T4"/></text:p>
      <text:list text:style-name="WWNum38">
        <text:list-item>
          <text:p text:style-name="P15" loext:marker-style-name="T4"><text:span text:style-name="T4">Go to the </text:span><text:span text:style-name="T16">Download</text:span><text:span text:style-name="T4"> page of the Keyboard App Builder website: </text:span><text:a xlink:type="simple" xlink:href="http://software.sil.org/keyboardappbuilder/download" text:style-name="Internet_20_link" text:visited-style-name="Visited_20_Internet_20_Link"><text:span text:style-name="Internet_20_link"><text:span text:style-name="T4">http://software.sil.org/keyboardappbuilder/download</text:span></text:span></text:a></text:p>
        </text:list-item>
        <text:list-item>
          <text:p text:style-name="P15" loext:marker-style-name="T4"><text:span text:style-name="T4">Download the latest setup program for Windows.</text:span><text:span text:style-name="T4"/></text:p>
        </text:list-item>
        <text:list-item>
          <text:p text:style-name="P15" loext:marker-style-name="T4"><text:span text:style-name="T4">Run the setup program, </text:span><text:span text:style-name="T15">Keyboard</text:span><text:span text:style-name="T16">-App-Builder-x.x-Setup.exe</text:span><text:span text:style-name="T4">, to install Keyboard App Builder on your computer.</text:span></text:p>
        </text:list-item>
      </text:list>
      <text:p text:style-name="P4" loext:marker-style-name="T4"/>
      <text:p text:style-name="P4" loext:marker-style-name="T4"/>
      <text:h text:style-name="P13" text:outline-level="2" loext:marker-style-name="T4"><text:bookmark-start text:name="_Toc207703075"/><text:span text:style-name="T4">Installing Java Development Kit (JDK)</text:span><text:bookmark-end text:name="_Toc207703075"/><text:span text:style-name="T4"/></text:h>
      <text:p text:style-name="P16" loext:marker-style-name="T4"><text:bookmark-start text:name="_Hlk534311866"/><text:span text:style-name="T4">You will need version 17 of the Java Development Kit (JDK) to build apps. There are two ways of installing it:</text:span><text:span text:style-name="T4"/></text:p>
      <text:list text:style-name="WWNum46">
        <text:list-item>
          <text:p text:style-name="P17" loext:marker-style-name="T4"><text:span text:style-name="T4">Use the Install JDK wizard within Keyboard App Builder (see section 2.2.1), or</text:span><text:span text:style-name="T4"/></text:p>
        </text:list-item>
        <text:list-item>
          <text:p text:style-name="P18" loext:marker-style-name="T4"><text:span text:style-name="T4">Download the JDK setup file from the Azul website and run the installer (see section 2.2.2).</text:span><text:span text:style-name="T4"/></text:p>
        </text:list-item>
      </text:list>
      <text:p text:style-name="P19" loext:marker-style-name="T4"/>
      <text:h text:style-name="Heading_20_3" text:outline-level="3" loext:marker-style-name="T4"><text:bookmark-start text:name="_Toc100826020"/><text:bookmark-start text:name="_Toc207703076"/><text:span text:style-name="T4">Installing the JDK using the Install JDK wizard</text:span><text:bookmark-end text:name="_Toc100826020"/><text:bookmark-end text:name="_Toc207703076"/><text:span text:style-name="T4"/></text:h>
      <text:p text:style-name="P16" loext:marker-style-name="T4"><text:span text:style-name="T4">The easiest way to install the Java Development Kit (JDK) is to use the Install JDK wizard within Keyboard App Builder:</text:span><text:span text:style-name="T4"/></text:p>
      <text:list text:style-name="WWNum45">
        <text:list-item>
          <text:p text:style-name="P20" loext:marker-style-name="T4"><text:span text:style-name="T4">Launch </text:span><text:span text:style-name="T15">Keyboard App Builder</text:span><text:span text:style-name="T4">.</text:span></text:p>
        </text:list-item>
        <text:list-item>
          <text:p text:style-name="P20" loext:marker-style-name="T4"><text:span text:style-name="T4">Click the </text:span><text:span text:style-name="T15">Install JDK </text:span><text:span text:style-name="T4">button on the welcome page (or select </text:span><text:span text:style-name="T15">Tools</text:span><text:span text:style-name="T4"> </text:span><text:span text:style-name="T17"></text:span><text:span text:style-name="T4"> </text:span><text:span text:style-name="T15">Install JDK</text:span><text:span text:style-name="T4"> from the main menu).</text:span></text:p>
        </text:list-item>
        <text:list-item>
          <text:p text:style-name="P20" loext:marker-style-name="T4"><text:span text:style-name="T4">Follow the instructions in the wizard to download and install the JDK.</text:span><text:span text:style-name="T4"/></text:p>
        </text:list-item>
      </text:list>
      <text:p text:style-name="P21" loext:marker-style-name="T4"><text:span text:style-name="T4">If the JDK was installed successfully, skip section 2.2.2 and go to section 2.3 to install the Android SDK.</text:span><text:span text:style-name="T4"/></text:p>
      <text:p text:style-name="P22" loext:marker-style-name="T4"/>
      <text:h text:style-name="Heading_20_3" text:outline-level="3" loext:marker-style-name="T4"><text:bookmark-start text:name="_Toc100826021"/><text:bookmark-start text:name="_Toc207703077"/><text:span text:style-name="T4">Installing the JDK from the Azul website</text:span><text:bookmark-end text:name="_Toc100826021"/><text:bookmark-end text:name="_Toc207703077"/><text:bookmark-end text:name="_Hlk534311866"/><text:span text:style-name="T4"/></text:h>
      <text:p text:style-name="P16" loext:marker-style-name="T4"><text:span text:style-name="T4">We recommend you use Zulu, which is a free distribution of OpenJDK from Azul.</text:span><text:span text:style-name="T4"/></text:p>
      <text:list text:style-name="WWNum41">
        <text:list-item>
          <text:p text:style-name="P23" loext:marker-style-name="T4"><text:span text:style-name="T4">Go to the </text:span><text:span text:style-name="T15">Download Zulu Builds of OpenJDK</text:span><text:span text:style-name="T4"> website:</text:span></text:p>
        </text:list-item>
      </text:list>
      <text:p text:style-name="P24" loext:marker-style-name="T18"/>
      <text:p text:style-name="P25" loext:marker-style-name="T19"><text:a xlink:type="simple" xlink:href="https://www.azul.com/downloads/?version=java-17-lts&amp;os=windows&amp;architecture=x86-64-bit&amp;package=jdk#zulu" text:style-name="Internet_20_link" text:visited-style-name="Visited_20_Internet_20_Link"><text:span text:style-name="Internet_20_link"><text:span text:style-name="T19">https://www.azul.com/downloads/?version=java-17-lts&amp;os=windows&amp;architecture=x86-64-bit&amp;package=jdk#zulu</text:span></text:span></text:a><text:span text:style-name="T19"/></text:p>
      <text:p text:style-name="P26" loext:marker-style-name="T4"/>
      <text:p text:style-name="P25" loext:marker-style-name="T4"><text:span text:style-name="T4">There are many downloads on this page, but the above link will filter the ones you see (Java Version: Java 17 LTS; Operating System: Windows; Architecture: x86 64-bit; Java Package: JDK).</text:span><text:span text:style-name="T4"/></text:p>
      <text:p text:style-name="P4" loext:marker-style-name="T4"/>
      <text:p text:style-name="P4" loext:marker-style-name="T4"/>
      <text:list text:continue-numbering="true" text:style-name="WWNum41">
        <text:list-item>
          <text:p text:style-name="P27" loext:marker-style-name="T4"><text:span text:style-name="T4">Scroll down the page until you see the downloads:</text:span><text:span text:style-name="T4"/></text:p>
        </text:list-item>
      </text:list>
      <text:p text:style-name="P4" loext:marker-style-name="T4"/>
      <text:p text:style-name="Standard" loext:marker-style-name="T4"><draw:custom-shape text:anchor-type="char" draw:z-index="0" draw:name="AutoShape 7" draw:style-name="gr1" draw:text-style-name="P28" svg:width="0.5079in" svg:height="0.2323in" draw:transform="rotate (-0.867952237016781) translate (5.55238407699038in 2.30622812773403in)"><text:p/><draw:enhanced-geometry draw:mirror-horizontal="false" draw:mirror-vertical="false" draw:glue-points="?f5 0 0 ?f7 ?f5 ?f14 ?f13 ?f7" draw:text-areas="?f12 ?f8 ?f13 ?f9" svg:viewBox="0 0 0 0" draw:type="ooxml-leftArrow" draw:modifiers="50000 75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2" draw:name="Image3" text:anchor-type="as-char" svg:width="5.9846in" svg:height="2.5575in"><draw:image xlink:href="Pictures/1000000100000523000002328EF02B45.png" xlink:type="simple" xlink:show="embed" xlink:actuate="onLoad" draw:mime-type="image/png"/><svg:desc>A screenshot of a computer

Description automatically generated</svg:desc></draw:frame></text:p>
      <text:p text:style-name="P4" loext:marker-style-name="T4"/>
      <text:p text:style-name="P4" loext:marker-style-name="T4"/>
      <text:list text:continue-numbering="true" text:style-name="WWNum41">
        <text:list-item>
          <text:p text:style-name="P27" loext:marker-style-name="T4"><text:span text:style-name="T4">You have a choice between a zip file and an msi file. </text:span><text:span text:style-name="T15">Download the .msi file</text:span><text:span text:style-name="T4"> since it comes with its own installer program. </text:span></text:p>
        </text:list-item>
      </text:list>
      <text:p text:style-name="P29" loext:marker-style-name="T4"/>
      <text:p text:style-name="P30" loext:marker-style-name="T4"><text:span text:style-name="T4">The file you download will have a filename something like this:</text:span><text:span text:style-name="T4"/></text:p>
      <text:p text:style-name="P31" loext:marker-style-name="T15"><text:span text:style-name="T15">zulu17.44.15-ca-jdk17.0.8-win_x64.msi</text:span><text:span text:style-name="T15"/></text:p>
      <text:p text:style-name="List_20_Paragraph" loext:marker-style-name="T4"><text:span text:style-name="T4"><text:line-break/></text:span><text:span text:style-name="T4"/></text:p>
      <text:list text:continue-numbering="true" text:style-name="WWNum41">
        <text:list-item>
          <text:p text:style-name="P27" loext:marker-style-name="T4"><text:span text:style-name="T15">Double-click the msi file</text:span><text:span text:style-name="T4"> and follow the instructions in the installation wizard to install it. By default, the .msi installer will install the JDK to the following folder:</text:span></text:p>
        </text:list-item>
      </text:list>
      <text:p text:style-name="P32" loext:marker-style-name="T20"><text:span text:style-name="T20">C:\Program Files\Zulu\zulu-17\</text:span><text:span text:style-name="T20"/></text:p>
      <text:p text:style-name="P33" loext:marker-style-name="T20"/>
      <text:p text:style-name="P33" loext:marker-style-name="T20"/>
      <text:p text:style-name="P34" loext:marker-style-name="T4"><text:span text:style-name="T21">Important</text:span><text:span text:style-name="T4">: If you change the JDK install folder to something other than the default folder, you will need to remember the location of the folder so you can tell Keyboard App Builder where to find the JDK.</text:span></text:p>
      <text:p text:style-name="P4" loext:marker-style-name="T4"/>
      <text:p text:style-name="P4" loext:marker-style-name="T4"/>
      <text:h text:style-name="P35" text:outline-level="2" loext:marker-style-name="T4"><text:bookmark-start text:name="_Toc207703078"/><text:span text:style-name="T4">Installing Android Software Development Kit (SDK)</text:span><text:bookmark-end text:name="_Toc207703078"/><text:span text:style-name="T4"/></text:h>
      <text:p text:style-name="P16" loext:marker-style-name="T4"><text:span text:style-name="T4">The third component needed for Android app development is the Android Software Development Kit (SDK). There are two ways of installing the Android SDK:</text:span><text:span text:style-name="T4"/></text:p>
      <text:list text:style-name="WWNum43">
        <text:list-item>
          <text:p text:style-name="P36" loext:marker-style-name="T4"><text:span text:style-name="T22">Online</text:span><text:span text:style-name="T16">: Download the Android SDK packages from the internet: </text:span><text:span text:style-name="T4"><text:line-break/>Use the Android SDK Installation wizard to download and install the command line tools and three additional packages. This method will require an internet connection. </text:span></text:p>
        </text:list-item>
      </text:list>
      <text:p text:style-name="P37" loext:marker-style-name="T4"><text:span text:style-name="T4">See 2.3.1 for more details.<text:line-break/></text:span><text:span text:style-name="T4"/></text:p>
      <text:list text:continue-numbering="true" text:style-name="WWNum43">
        <text:list-item>
          <text:p text:style-name="P36" loext:marker-style-name="T4"><text:span text:style-name="T22">Offline</text:span><text:span text:style-name="T16">: Copy the Android SDK files from someone else:</text:span><text:span text:style-name="T4"><text:line-break/>If you know someone who has already downloaded and installed the Android SDK, you can copy all the files from them. </text:span></text:p>
        </text:list-item>
      </text:list>
      <text:p text:style-name="P37" loext:marker-style-name="T4"><text:span text:style-name="T4">This method is especially useful in a training workshop where several people need to install the SDK but have limited internet bandwidth. </text:span><text:span text:style-name="T4"/></text:p>
      <text:p text:style-name="P37" loext:marker-style-name="T4"><text:span text:style-name="T4">See 2.3.2 for more details.</text:span><text:span text:style-name="T4"/></text:p>
      <text:p text:style-name="P4" loext:marker-style-name="T4"/>
      <text:p text:style-name="P4" loext:marker-style-name="T4"/>
      <text:h text:style-name="Heading_20_3" text:outline-level="3" loext:marker-style-name="T4"><text:bookmark-start text:name="_Toc77851809"/><text:bookmark-start text:name="_Toc207703079"/><text:bookmark-start text:name="_Toc77854175"/><text:span text:style-name="T4">Downloading the Android SDK packages from the internet</text:span><text:bookmark-end text:name="_Toc77851809"/><text:bookmark-end text:name="_Toc207703079"/><text:bookmark-end text:name="_Toc77854175"/><text:span text:style-name="T4"/></text:h>
      <text:p text:style-name="Standard" loext:marker-style-name="T4"><text:span text:style-name="T4">To install the Android SDK from the internet: </text:span><text:span text:style-name="T4"/></text:p>
      <text:p text:style-name="P4" loext:marker-style-name="T4"/>
      <text:list text:style-name="WWNum28">
        <text:list-item>
          <text:p text:style-name="P38" loext:marker-style-name="T4"><text:span text:style-name="T4">Launch </text:span><text:span text:style-name="T16">Keyboard App Builder</text:span><text:span text:style-name="T4">. </text:span></text:p>
        </text:list-item>
      </text:list>
      <text:p text:style-name="P39" loext:marker-style-name="T4"/>
      <text:list text:continue-numbering="true" text:style-name="WWNum28">
        <text:list-item>
          <text:p text:style-name="P38" loext:marker-style-name="T4"><text:span text:style-name="T4">Click the </text:span><text:span text:style-name="T15">Install Android SDK</text:span><text:span text:style-name="T4"> button on the welcome page (or select </text:span><text:span text:style-name="T16">Tools</text:span><text:span text:style-name="T4"> </text:span><text:span text:style-name="T17"></text:span><text:span text:style-name="T4"> </text:span><text:span text:style-name="T16">Install Android SDK</text:span><text:span text:style-name="T4"> from the main menu).</text:span></text:p>
        </text:list-item>
      </text:list>
      <text:p text:style-name="P29" loext:marker-style-name="T4"/>
      <text:list text:continue-numbering="true" text:style-name="WWNum28">
        <text:list-item>
          <text:p text:style-name="P40" loext:marker-style-name="T4"><text:span text:style-name="T4">Follow the instructions on each page of the </text:span><text:span text:style-name="T15">Install Android SDK</text:span><text:span text:style-name="T4"> wizard to download each of the Android SDK packages and install them.</text:span></text:p>
        </text:list-item>
      </text:list>
      <text:p text:style-name="P41" loext:marker-style-name="T4"/>
      <text:p text:style-name="P42" loext:marker-style-name="T4"><text:span text:style-name="T4">When you are asked to specify a target folder, a good place is </text:span><text:span text:style-name="T15">C:\sdk</text:span><text:span text:style-name="T4">.</text:span></text:p>
      <text:p text:style-name="P43" loext:marker-style-name="T4"/>
      <text:p text:style-name="P44" loext:marker-style-name="T4"><text:span text:style-name="T4">Four packages will be downloaded and installed:</text:span><text:span text:style-name="T4"/></text:p>
      <text:list text:style-name="WWNum44">
        <text:list-item>
          <text:p text:style-name="P45" loext:marker-style-name="T4"><text:span text:style-name="T4">Command line tools, </text:span><text:span text:style-name="T4"/></text:p>
        </text:list-item>
        <text:list-item>
          <text:p text:style-name="P45" loext:marker-style-name="T4"><text:span text:style-name="T4">Build Tools, </text:span><text:span text:style-name="T4"/></text:p>
        </text:list-item>
        <text:list-item>
          <text:p text:style-name="P45" loext:marker-style-name="T4"><text:span text:style-name="T4">Platform Tools, and </text:span><text:span text:style-name="T4"/></text:p>
        </text:list-item>
        <text:list-item>
          <text:p text:style-name="P45" loext:marker-style-name="T4"><text:span text:style-name="T4">Platform API.</text:span><text:span text:style-name="T4"/></text:p>
        </text:list-item>
      </text:list>
      <text:p text:style-name="P41" loext:marker-style-name="T4"/>
      <text:p text:style-name="P46" loext:marker-style-name="T4"><text:span text:style-name="T4">If the installation was successful, you will see the version numbers displayed in green.</text:span><text:span text:style-name="T4"/></text:p>
      <text:p text:style-name="P47" loext:marker-style-name="T16"/>
      <text:p text:style-name="P2" loext:marker-style-name="T23"><draw:frame draw:style-name="fr2" draw:name="Picture 2" text:anchor-type="as-char" svg:width="5.9862in" svg:height="3.8543in"><draw:image xlink:href="Pictures/1000000100000CB00000082D4252AE4D.png" xlink:type="simple" xlink:show="embed" xlink:actuate="onLoad" draw:mime-type="image/png"/></draw:frame></text:p>
      <text:p text:style-name="P4" loext:marker-style-name="T4"/>
      <text:p text:style-name="Standard" loext:marker-style-name="T4"><text:span text:style-name="T4"><text:line-break/>If any of the Build Tools, Platform Tools or Platform API is listed as “Not Found” (displayed in red), go to </text:span><text:span text:style-name="T15">Tools</text:span><text:span text:style-name="T4"> </text:span><text:span text:style-name="T17"></text:span><text:span text:style-name="T4"> </text:span><text:span text:style-name="T15">Settings</text:span><text:span text:style-name="T4">, select the </text:span><text:span text:style-name="T15">Android SDK</text:span><text:span text:style-name="T4"> tab, and click the </text:span><text:span text:style-name="T15">Install Packages</text:span><text:span text:style-name="T4"> button to install them.</text:span></text:p>
      <text:p text:style-name="P4" loext:marker-style-name="T4"/>
      <text:p text:style-name="Standard" loext:marker-style-name="T4"><text:span text:style-name="T4">Click the </text:span><text:span text:style-name="T15">Check Installation</text:span><text:span text:style-name="T4"> button to confirm that all the packages have been installed correctly.</text:span></text:p>
      <text:p text:style-name="P4" loext:marker-style-name="T4"/>
      <text:p text:style-name="Standard" loext:marker-style-name="T4"><text:span text:style-name="T4">You can skip section 2.3.2 and go straight to section 2.4.</text:span><text:span text:style-name="T4"/></text:p>
      <text:p text:style-name="P48" loext:marker-style-name="T4"/>
      <text:h text:style-name="Heading_20_3" text:outline-level="3" loext:marker-style-name="T4"><text:bookmark-start text:name="_Toc77851810"/><text:bookmark-start text:name="_Toc207703080"/><text:bookmark-start text:name="_Toc77854176"/><text:span text:style-name="T4">Copying the Android SDK files from someone else</text:span><text:bookmark-end text:name="_Toc77851810"/><text:bookmark-end text:name="_Toc207703080"/><text:bookmark-end text:name="_Toc77854176"/><text:span text:style-name="T4"/></text:h>
      <text:p text:style-name="Standard" loext:marker-style-name="T4"><text:span text:style-name="T4">If you know someone who has already downloaded and installed the Android SDK and is successfully building apps with it, you can copy all of their Android SDK files to a folder on your computer.</text:span><text:span text:style-name="T4"/></text:p>
      <text:p text:style-name="P49" loext:marker-style-name="T4"><text:span text:style-name="T4">You need to look for the top-level Android SDK folder, such as </text:span><text:span text:style-name="T16">c:\sdk</text:span><text:span text:style-name="T4">, and copy the whole folder and its contents to your computer. A location such as c:\sdk is good. If it makes it easier, you can zip the folders and then unzip them onto your computer.</text:span></text:p>
      <text:p text:style-name="P49" loext:marker-style-name="T4"><text:span text:style-name="T4">Note that there is </text:span><text:span text:style-name="T24">no setup program to run</text:span><text:span text:style-name="T4">. Copying the files from one computer to another is sufficient.</text:span></text:p>
      <text:p text:style-name="P4" loext:marker-style-name="T4"/>
      <text:p text:style-name="P49" loext:marker-style-name="T4"><text:span text:style-name="T16">Tip</text:span><text:span text:style-name="T4">: A typical Android SDK folder can be quite large (over 1 GB, depending on which additional packages have been installed). To build an app, you do not actually need all of the Android SDK files. If you want to cut down the number of files, here is a list of the essential and optional folders:</text:span></text:p>
      <text:p text:style-name="P4" loext:marker-style-name="T4"/>
      <table:table table:name="Table1" table:style-name="Table1">
        <table:table-column table:style-name="Table1.A"/>
        <table:table-column table:style-name="Table1.B"/>
        <table:table-header-rows>
          <table:table-row table:style-name="Table1.1">
            <table:table-cell table:style-name="Table1.A1" office:value-type="string">
              <text:p text:style-name="P50" loext:marker-style-name="T25"><text:span text:style-name="T25">Android SDK Folder</text:span><text:span text:style-name="T25"/></text:p>
            </table:table-cell>
            <table:table-cell table:style-name="Table1.A1" office:value-type="string">
              <text:p text:style-name="P50" loext:marker-style-name="T25"><text:span text:style-name="T25">Required for building apps?</text:span><text:span text:style-name="T25"/></text:p>
            </table:table-cell>
          </table:table-row>
        </table:table-header-rows>
        <table:table-row table:style-name="Table1.1">
          <table:table-cell table:style-name="Table1.A2" office:value-type="string">
            <text:p text:style-name="P50" loext:marker-style-name="T26"><text:span text:style-name="T26">cmdline-tools (or tools)</text:span><text:span text:style-name="T26"/></text:p>
          </table:table-cell>
          <table:table-cell table:style-name="Table1.B2" office:value-type="string">
            <text:p text:style-name="P50" loext:marker-style-name="T26"><text:span text:style-name="T26">Yes</text:span><text:span text:style-name="T26"/></text:p>
          </table:table-cell>
        </table:table-row>
        <table:table-row table:style-name="Table1.1">
          <table:table-cell table:style-name="Table1.A3" office:value-type="string">
            <text:p text:style-name="P50" loext:marker-style-name="T26"><text:span text:style-name="T26">build-tools</text:span><text:span text:style-name="T26"/></text:p>
          </table:table-cell>
          <table:table-cell table:style-name="Table1.B3" office:value-type="string">
            <text:p text:style-name="P50" loext:marker-style-name="T26"><text:span text:style-name="T26">Yes <text:s/>(you only need the sub-folder for the latest version)</text:span><text:span text:style-name="T26"/></text:p>
          </table:table-cell>
        </table:table-row>
        <table:table-row table:style-name="Table1.1">
          <table:table-cell table:style-name="Table1.A4" office:value-type="string">
            <text:p text:style-name="P50" loext:marker-style-name="T26"><text:span text:style-name="T26">platforms</text:span><text:span text:style-name="T26"/></text:p>
          </table:table-cell>
          <table:table-cell table:style-name="Table1.B4" office:value-type="string">
            <text:p text:style-name="P50" loext:marker-style-name="T26"><text:span text:style-name="T26">Yes <text:s/>(you only need android-35)</text:span><text:span text:style-name="T26"/></text:p>
          </table:table-cell>
        </table:table-row>
        <table:table-row table:style-name="Table1.1">
          <table:table-cell table:style-name="Table1.A5" office:value-type="string">
            <text:p text:style-name="P50" loext:marker-style-name="T26"><text:span text:style-name="T26">platform-tools</text:span><text:span text:style-name="T26"/></text:p>
          </table:table-cell>
          <table:table-cell table:style-name="Table1.B5" office:value-type="string">
            <text:p text:style-name="P50" loext:marker-style-name="T26"><text:span text:style-name="T26">Yes</text:span><text:span text:style-name="T26"/></text:p>
          </table:table-cell>
        </table:table-row>
        <table:table-row table:style-name="Table1.1">
          <table:table-cell table:style-name="Table1.A6" office:value-type="string">
            <text:p text:style-name="P50" loext:marker-style-name="T26"><text:span text:style-name="T26">add-ons</text:span><text:span text:style-name="T26"/></text:p>
          </table:table-cell>
          <table:table-cell table:style-name="Table1.B6" office:value-type="string">
            <text:p text:style-name="P50" loext:marker-style-name="T26"><text:span text:style-name="T26">No</text:span><text:span text:style-name="T26"/></text:p>
          </table:table-cell>
        </table:table-row>
        <table:table-row table:style-name="Table1.1">
          <table:table-cell table:style-name="Table1.A7" office:value-type="string">
            <text:p text:style-name="P50" loext:marker-style-name="T26"><text:span text:style-name="T26">docs</text:span><text:span text:style-name="T26"/></text:p>
          </table:table-cell>
          <table:table-cell table:style-name="Table1.B7" office:value-type="string">
            <text:p text:style-name="P50" loext:marker-style-name="T26"><text:span text:style-name="T26">No</text:span><text:span text:style-name="T26"/></text:p>
          </table:table-cell>
        </table:table-row>
        <table:table-row table:style-name="Table1.1">
          <table:table-cell table:style-name="Table1.A8" office:value-type="string">
            <text:p text:style-name="P50" loext:marker-style-name="T26"><text:span text:style-name="T26">emulator</text:span><text:span text:style-name="T26"/></text:p>
          </table:table-cell>
          <table:table-cell table:style-name="Table1.B8" office:value-type="string">
            <text:p text:style-name="P50" loext:marker-style-name="T26"><text:span text:style-name="T26">No, unless you want to use an emulator</text:span><text:span text:style-name="T26"/></text:p>
          </table:table-cell>
        </table:table-row>
        <table:table-row table:style-name="Table1.1">
          <table:table-cell table:style-name="Table1.A9" office:value-type="string">
            <text:p text:style-name="P50" loext:marker-style-name="T26"><text:span text:style-name="T26">extras</text:span><text:span text:style-name="T26"/></text:p>
          </table:table-cell>
          <table:table-cell table:style-name="Table1.B9" office:value-type="string">
            <text:p text:style-name="P50" loext:marker-style-name="T26"><text:span text:style-name="T26">No</text:span><text:span text:style-name="T26"/></text:p>
          </table:table-cell>
        </table:table-row>
        <table:table-row table:style-name="Table1.1">
          <table:table-cell table:style-name="Table1.A10" office:value-type="string">
            <text:p text:style-name="P50" loext:marker-style-name="T26"><text:span text:style-name="T26">licenses</text:span><text:span text:style-name="T26"/></text:p>
          </table:table-cell>
          <table:table-cell table:style-name="Table1.B10" office:value-type="string">
            <text:p text:style-name="P50" loext:marker-style-name="T26"><text:span text:style-name="T26">Yes</text:span><text:span text:style-name="T26"/></text:p>
          </table:table-cell>
        </table:table-row>
        <table:table-row table:style-name="Table1.1">
          <table:table-cell table:style-name="Table1.A11" office:value-type="string">
            <text:p text:style-name="P50" loext:marker-style-name="T26"><text:span text:style-name="T26">sources</text:span><text:span text:style-name="T26"/></text:p>
          </table:table-cell>
          <table:table-cell table:style-name="Table1.B11" office:value-type="string">
            <text:p text:style-name="P50" loext:marker-style-name="T26"><text:span text:style-name="T26">No</text:span><text:span text:style-name="T26"/></text:p>
          </table:table-cell>
        </table:table-row>
        <table:table-row table:style-name="Table1.1">
          <table:table-cell table:style-name="Table1.A12" office:value-type="string">
            <text:p text:style-name="P50" loext:marker-style-name="T26"><text:span text:style-name="T26">system-images</text:span><text:span text:style-name="T26"/></text:p>
          </table:table-cell>
          <table:table-cell table:style-name="Table1.B12" office:value-type="string">
            <text:p text:style-name="P50" loext:marker-style-name="T26"><text:span text:style-name="T26">No, unless you want to use an emulator</text:span><text:span text:style-name="T26"/></text:p>
          </table:table-cell>
        </table:table-row>
        <table:table-row table:style-name="Table1.1">
          <table:table-cell table:style-name="Table1.A13" office:value-type="string">
            <text:p text:style-name="P50" loext:marker-style-name="T26"><text:span text:style-name="T26">temp</text:span><text:span text:style-name="T26"/></text:p>
          </table:table-cell>
          <table:table-cell table:style-name="Table1.B13" office:value-type="string">
            <text:p text:style-name="P50" loext:marker-style-name="T26"><text:span text:style-name="T26">No</text:span><text:span text:style-name="T26"/></text:p>
          </table:table-cell>
        </table:table-row>
      </table:table>
      <text:p text:style-name="P4" loext:marker-style-name="T4"/>
      <text:p text:style-name="P4" loext:marker-style-name="T4"/>
      <text:p text:style-name="P4" loext:marker-style-name="T4"/>
      <text:h text:style-name="P9" text:outline-level="1" loext:marker-style-name="T4"><text:bookmark-start text:name="_Toc103154863"/><text:bookmark-start text:name="OLE_LINK2"/><text:bookmark-start text:name="OLE_LINK1"/><text:bookmark-start text:name="_Toc207703081"/><text:span text:style-name="T4">Linux Installation</text:span><text:bookmark-end text:name="_Toc103154863"/><text:bookmark-end text:name="_Toc207703081"/><text:span text:style-name="T4"/></text:h>
      <text:p text:style-name="P14" loext:marker-style-name="T4"><text:span text:style-name="T4">To run Keyboard App Builder on Linux, you need to have 3 components installed on your computer:</text:span><text:span text:style-name="T4"/></text:p>
      <text:list text:style-name="WWNum33">
        <text:list-item>
          <text:p text:style-name="P51" loext:marker-style-name="T4"><text:span text:style-name="T4">Keyboard App Builder</text:span><text:span text:style-name="T4"/></text:p>
        </text:list-item>
        <text:list-item>
          <text:p text:style-name="P52" loext:marker-style-name="T4"><text:span text:style-name="T4">OpenJDK Java Development Kit (JDK)</text:span><text:span text:style-name="T4"/></text:p>
        </text:list-item>
        <text:list-item>
          <text:p text:style-name="P52" loext:marker-style-name="T4"><text:span text:style-name="T4">Android Software Development Kit (SDK)</text:span><text:span text:style-name="T4"/></text:p>
        </text:list-item>
      </text:list>
      <text:p text:style-name="P4" loext:marker-style-name="T4"/>
      <text:p text:style-name="Standard" loext:marker-style-name="T4"><text:span text:style-name="T4">There are two ways to install Keyboard App Builder for Linux:</text:span><text:span text:style-name="T4"/></text:p>
      <text:list text:style-name="WWNum47">
        <text:list-item>
          <text:p text:style-name="P53" loext:marker-style-name="T4"><text:a xlink:type="simple" xlink:href="https://flathub.org/" text:style-name="Internet_20_link" text:visited-style-name="Visited_20_Internet_20_Link"><text:span text:style-name="Internet_20_link"><text:span text:style-name="T4">Flathub</text:span></text:span></text:a><text:span text:style-name="T4">: The Linux App Store – available for many distributions of Linux</text:span></text:p>
        </text:list-item>
        <text:list-item>
          <text:p text:style-name="P53" loext:marker-style-name="T4"><text:a xlink:type="simple" xlink:href="https://packages.sil.org/" text:style-name="Internet_20_link" text:visited-style-name="Visited_20_Internet_20_Link"><text:span text:style-name="Internet_20_link"><text:span text:style-name="T4">SIL repository for Ubuntu</text:span></text:span></text:a> <text:span text:style-name="T4">– available for some versions of Ubuntu-based distributions (including </text:span><text:a xlink:type="simple" xlink:href="https://www.wastalinux.org/" text:style-name="Internet_20_link" text:visited-style-name="Visited_20_Internet_20_Link"><text:span text:style-name="Internet_20_link"><text:span text:style-name="T4">Wasta-Linux</text:span></text:span></text:a><text:span text:style-name="T4">) </text:span></text:p>
        </text:list-item>
      </text:list>
      <text:h text:style-name="P54" text:outline-level="2"><text:bookmark-start text:name="_Toc207700814"/><text:bookmark-start text:name="_Toc207703082"/>Flathub<text:bookmark-end text:name="_Toc207700814"/><text:bookmark-end text:name="_Toc207703082"/></text:h>
      <text:p text:style-name="Standard" loext:marker-style-name="T4"><text:span text:style-name="T4">Flathub is required for Ubuntu 24.04 (Noble) and newer or other non-Ubuntu distributions. To install using Flathub, follow the installation instructions at </text:span><text:a xlink:type="simple" xlink:href="https://flathub.org/setup" text:style-name="Internet_20_link" text:visited-style-name="Visited_20_Internet_20_Link"><text:span text:style-name="Internet_20_link"><text:span text:style-name="T4">https://flathub.org/setup</text:span></text:span></text:a><text:span text:style-name="T4"> for your specific distribution. Search for Keyboard App Builder in the distribution-specific store. You will need to install the JDK and Android SDK separately. </text:span></text:p>
      <text:p text:style-name="P4" loext:marker-style-name="T4"/>
      <text:list text:style-name="WWNum48">
        <text:list-item>
          <text:p text:style-name="P55" loext:marker-style-name="T4"><text:span text:style-name="T4">To install the JDK, see section 2.2.1 Installing the JDK using the Install wizard.</text:span><text:span text:style-name="T4"/></text:p>
        </text:list-item>
        <text:list-item>
          <text:p text:style-name="P55" loext:marker-style-name="T4"><text:span text:style-name="T4">To install the Android SDK, see section 2.3.1 Downloading the Android SDK packages from the internet.</text:span><text:span text:style-name="T4"/></text:p>
        </text:list-item>
      </text:list>
      <text:h text:style-name="P54" text:outline-level="2" loext:marker-style-name="T4"><text:bookmark-start text:name="_Toc207700815"/><text:bookmark-start text:name="_Toc207703083"/>SIL repository for Ubuntu<text:bookmark-end text:name="_Toc207700815"/><text:bookmark-end text:name="_Toc207703083"/><text:span text:style-name="T4"/></text:h>
      <text:p text:style-name="Standard" loext:marker-style-name="T4"><text:span text:style-name="T4">The Ubuntu-based package for Keyboard App Builder already includes the dependencies on the package for OpenJDK and a package that will download the Android SDK from the internet and install it. <text:s/></text:span><text:span text:style-name="T4"/></text:p>
      <text:p text:style-name="P4" loext:marker-style-name="T4"/>
      <text:p text:style-name="Standard" loext:marker-style-name="T4"><text:bookmark-start text:name="_Hlk534311954"/><text:span text:style-name="T4">You have the following installation options for how the Android SDK is installed:</text:span><text:span text:style-name="T4"/></text:p>
      <text:list text:style-name="WWNum40">
        <text:list-item>
          <text:p text:style-name="P56" loext:marker-style-name="T4"><text:span text:style-name="T4">Follow the instructions in section 3.2.2 to download everything directly from the Internet.</text:span><text:span text:style-name="T4"/></text:p>
        </text:list-item>
        <text:list-item>
          <text:p text:style-name="P56" loext:marker-style-name="T4"><text:span text:style-name="T4">Follow the instructions in sections 3.2.3 through 3.2.5 to download the Android SDK files before installing the packages.</text:span><text:span text:style-name="T4"/></text:p>
        </text:list-item>
        <text:list-item>
          <text:p text:style-name="P56" loext:marker-style-name="T4"><text:span text:style-name="T4">Follow the instructions in section 3.2.6 if you already have the Android SDK installed and you do not want another copy installed.</text:span><text:bookmark-end text:name="_Hlk534311954"/><text:span text:style-name="T4"/></text:p>
        </text:list-item>
      </text:list>
      <text:h text:style-name="Heading_20_3" text:outline-level="3"><text:bookmark-start text:name="_Toc103154864"/><text:bookmark-start text:name="_Toc207703084"/>Add SIL repository for Ubuntu<text:bookmark-end text:name="_Toc103154864"/><text:bookmark-end text:name="_Toc207703084"/></text:h>
      <text:p text:style-name="Standard" loext:marker-style-name="T4"><text:span text:style-name="T4">To install packages from the SIL repository for Ubuntu, the repository must be added to the APT sources. </text:span><text:span text:style-name="T4"/></text:p>
      <text:p text:style-name="P4" loext:marker-style-name="T4"/>
      <text:p text:style-name="Standard" loext:marker-style-name="T4"><text:span text:style-name="T27">Note: </text:span><text:span text:style-name="T15">Wasta-Linux</text:span><text:span text:style-name="T4"> already includes configuration for the SIL repository for Ubuntu and so you can skip this section.</text:span></text:p>
      <text:p text:style-name="P4" loext:marker-style-name="T4"/>
      <text:p text:style-name="Standard" loext:marker-style-name="T4"><text:span text:style-name="T4">If you are using another </text:span><text:span text:style-name="T15">Ubuntu-based distribution</text:span><text:span text:style-name="T4">, please follow the instructions below (from the section “Enable access to SIL software and fonts in Ubuntu” on </text:span><text:a xlink:type="simple" xlink:href="https://packages.sil.org/" text:style-name="Internet_20_link" text:visited-style-name="Visited_20_Internet_20_Link"><text:span text:style-name="Internet_20_link"><text:span text:style-name="T4">https://packages.sil.org</text:span></text:span></text:a><text:span text:style-name="T4">).</text:span></text:p>
      <text:p text:style-name="P4" loext:marker-style-name="T4"/>
      <text:list text:style-name="WWNum37">
        <text:list-item>
          <text:p text:style-name="P57" loext:marker-style-name="T4"><text:span text:style-name="T4">Open a Terminal window.</text:span><text:span text:style-name="T4"/></text:p>
        </text:list-item>
      </text:list>
      <text:p text:style-name="P29" loext:marker-style-name="T4"/>
      <text:list text:continue-numbering="true" text:style-name="WWNum37">
        <text:list-item>
          <text:p text:style-name="P57" loext:marker-style-name="T4"><text:span text:style-name="T4">Add the repository security key:</text:span><text:span text:style-name="T4"/></text:p>
        </text:list-item>
      </text:list>
      <text:p text:style-name="P58">(wget -O- https://packages.sil.org/keys/pso-keyring-2016.gpg | sudo tee /etc/apt/trusted.gpg.d/pso-keyring-2016.gpg)&amp;&gt;/dev/null</text:p>
      <text:p text:style-name="P29" loext:marker-style-name="T4"/>
      <text:list text:continue-numbering="true" text:style-name="WWNum37">
        <text:list-item>
          <text:p text:style-name="P57" loext:marker-style-name="T4"><text:span text:style-name="T4">Add source:</text:span><text:span text:style-name="T4"/></text:p>
        </text:list-item>
      </text:list>
      <text:p text:style-name="Command_20_Line" loext:marker-style-name="T28"><text:span text:style-name="T28">(. /etc/os-release &amp;&amp; sudo tee /etc/apt/sources.list.d/packages-sil-org.list&gt;/dev/null &lt;&lt;&lt; "deb http://packages.sil.org/$ID $VERSION_CODENAME main")</text:span><text:span text:style-name="T28"/></text:p>
      <text:h text:style-name="Heading_20_3" text:outline-level="3"><text:bookmark-start text:name="_Toc103154865"/><text:bookmark-start text:name="_Toc207703085"/>Installing all packages from the Internet<text:bookmark-end text:name="_Toc103154865"/><text:bookmark-end text:name="_Toc207703085"/><text:bookmark text:name="OLE_LINK10"/><text:bookmark text:name="OLE_LINK9"/></text:h>
      <text:p text:style-name="P59" loext:marker-style-name="T4"><text:span text:style-name="T4">To install all the required software from the command line, type:</text:span><text:span text:style-name="T4"/></text:p>
      <text:p text:style-name="P60">sudo apt-get update</text:p>
      <text:p text:style-name="Command_20_Line">sudo apt-get install -y keyboard-app-builder</text:p>
      <text:p text:style-name="P4" loext:marker-style-name="T4"/>
      <text:p text:style-name="Standard" loext:marker-style-name="T4"><text:span text:style-name="T4">Note: </text:span><text:span text:style-name="T16">Wasta-Linux</text:span><text:span text:style-name="T4"> does not automatically install recommended packages. <text:s/>To get everything installed, also install android-sdk-installer.</text:span></text:p>
      <text:p text:style-name="Command_20_Line"><text:bookmark-start text:name="OLE_LINK3"/><text:bookmark-start text:name="OLE_LINK4"/>sudo apt-get install -y keyboard-app-builder android-sdk-installer\</text:p>
      <text:h text:style-name="Heading_20_3" text:outline-level="3"><text:bookmark-end text:name="OLE_LINK3"/><text:bookmark-end text:name="OLE_LINK4"/><text:bookmark-start text:name="_Toc207703086"/><text:bookmark-start text:name="_Toc103154866"/>Downloading the Android SDK files prior to package installation<text:bookmark-end text:name="_Toc207703086"/><text:bookmark-end text:name="_Toc103154866"/></text:h>
      <text:p text:style-name="Standard" loext:marker-style-name="T4"><text:span text:style-name="T4">The </text:span><text:span text:style-name="T16">android-sdk-installer</text:span><text:span text:style-name="T4">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p>
      <text:h text:style-name="Heading_20_3" text:outline-level="3" loext:marker-style-name="T4"><text:bookmark-start text:name="_Toc103154867"/><text:bookmark-start text:name="_Toc207703087"/>Downloading<text:span text:style-name="T4"> the Android SDK files</text:span><text:bookmark-end text:name="_Toc103154867"/><text:bookmark-end text:name="_Toc207703087"/><text:span text:style-name="T4"/></text:h>
      <text:p text:style-name="Standard" loext:marker-style-name="T4"><text:span text:style-name="T4">On a computer connected to the internet, use the following command line instructions to create a new folder and download 4 zip files (approximately 400MB). <text:s/></text:span><text:span text:style-name="T4"/></text:p>
      <text:p text:style-name="Command_20_Line">mkdir -p ~/Downloads/android-sdk-zips</text:p>
      <text:p text:style-name="Command_20_Line">cd ~/Downloads/android-sdk-zips</text:p>
      <text:p text:style-name="Command_20_Line">wget -ci http://bit.ly/android-sdk-urls</text:p>
      <text:p text:style-name="P61" loext:marker-style-name="T29"/>
      <text:p text:style-name="Standard" loext:marker-style-name="T4"><text:span text:style-name="T4">Note: the -c option will allow the downloads to be resumed if it fails part way through the download.</text:span><text:span text:style-name="T4"/></text:p>
      <text:p text:style-name="P61" loext:marker-style-name="T29"/>
      <text:h text:style-name="Heading_20_3" text:outline-level="3" loext:marker-style-name="T4"><text:bookmark-start text:name="_Toc103154868"/><text:bookmark-start text:name="_Toc207703088"/><text:span text:style-name="T4">Provide zip files during the package install</text:span><text:bookmark-end text:name="_Toc103154868"/><text:bookmark-end text:name="_Toc207703088"/><text:span text:style-name="T4"/></text:h>
      <text:p text:style-name="P62" loext:marker-style-name="T4"><text:span text:style-name="T4">Use </text:span><text:span text:style-name="T16">debconf</text:span><text:span text:style-name="T4"> to pre-seed the package with the location of the files and install the package.</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h text:style-name="Heading_20_3" text:outline-level="3"><text:bookmark-start text:name="_Toc103154869"/><text:bookmark-start text:name="_Toc207703089"/>Installing without Android SDK<text:bookmark-end text:name="_Toc103154869"/><text:bookmark-end text:name="_Toc207703089"/></text:h>
      <text:p text:style-name="Standard" loext:marker-style-name="T4"><text:span text:style-name="T4">The </text:span><text:span text:style-name="T16">android-sdk-installer</text:span><text:span text:style-name="T4"> package is a recommended package for the </text:span><text:span text:style-name="T16">keyboard-app-builder</text:span><text:span text:style-name="T4"> package. If the Android SDK is already installed, Keyboard App Builder can use the current installation.</text:span></text:p>
      <text:p text:style-name="Command_20_Line">sudo apt-get update</text:p>
      <text:p text:style-name="Command_20_Line">sudo apt-get install keyboard-app-builder --no-install-recommends</text:p>
      <text:p text:style-name="P63" loext:marker-style-name="T4"><text:span text:style-name="T4"><text:tab/></text:span><text:span text:style-name="T4"/></text:p>
      <text:p text:style-name="Standard" loext:marker-style-name="T4"><text:span text:style-name="T4">Set the ANDROID_HOME environment variable to the path of the Android SDK installation to allow Keyboard App Builder to find it automatically. Otherwise you can use the </text:span><text:span text:style-name="T16">Tools</text:span><text:span text:style-name="T4"> </text:span><text:span text:style-name="T17"></text:span><text:span text:style-name="T4"> </text:span><text:span text:style-name="T16">Settings</text:span><text:span text:style-name="T4"> dialog in Keyboard App Builder to specify the path.</text:span></text:p>
      <text:h text:style-name="Heading_20_3" text:outline-level="3"><text:bookmark-start text:name="_Toc103154870"/><text:bookmark-start text:name="_Toc207703090"/>Automating Android SDK installation<text:bookmark-end text:name="_Toc103154870"/><text:bookmark-end text:name="_Toc207703090"/></text:h>
      <text:p text:style-name="Standard" loext:marker-style-name="T4"><text:span text:style-name="T4">The </text:span><text:span text:style-name="T16">android-sdk-installer</text:span><text:span text:style-name="T4"> will prompt you to accept the license for the Android SDK. To automate the installation (e.g. in an Ansible playbook), pre-seed the answer to this question.</text:span></text:p>
      <text:p text:style-name="P64">echo android-sdk-installer android-sdk-installer/accepted-android-sdk-eula boolean true | sudo debconf-set-selections</text:p>
      <text:p text:style-name="Command_20_Line">sudo apt-get install android-sdk-installer</text:p>
      <text:p text:style-name="P4" loext:marker-style-name="T4"><text:bookmark-end text:name="OLE_LINK1"/><text:bookmark-end text:name="OLE_LINK2"/></text:p>
      <text:p text:style-name="P4" loext:marker-style-name="T4"/>
      <text:h text:style-name="P65" text:outline-level="1" loext:marker-style-name="T4"><text:bookmark-start text:name="_Toc207703091"/><text:span text:style-name="T4">How to build your first app</text:span><text:bookmark-end text:name="_Toc207703091"/><text:span text:style-name="T4"/></text:h>
      <text:p text:style-name="Standard" loext:marker-style-name="T4"><text:span text:style-name="T4">To build your first app with Keyboard App Builder, follow the instructions in the first chapter of the document </text:span><text:span text:style-name="T3">‘</text:span><text:span text:style-name="T4">Keyboard </text:span><text:span text:style-name="T3">App Builder – 2 Building Apps’</text:span><text:span text:style-name="T4">.</text:span></text:p>
      <text:p text:style-name="P4" loext:marker-style-name="T4"/>
      <text:p text:style-name="P66" loext:marker-style-name="T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3154in"/>
        </style:tab-stops>
      </style:paragraph-propertie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2">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665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fo:font-size="11pt" fo:language="en" fo:country="GB" fo:font-weight="bold" style:font-size-asian="11pt" style:font-weight-asian="bold" style:font-name-complex="Courier New1"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language="en" fo:country="GB" style:language-asian="en" style:country-asian="GB" style:language-complex="he" style:country-complex="IL"/>
    </style:style>
    <style:style style:name="Balloon_20_Text" style:display-name="Balloon Text" style:family="paragraph" style:parent-style-name="Standard" loext:linked-style-name="Balloon_20_Text_20_Char">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name-asian="Times New Roman1" style:font-family-asian="'Times New Roman'" style:font-family-generic-asian="system" style:font-pitch-asian="variable" style:font-size-asian="16pt" style:language-asian="fr" style:country-asian="FR"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language="fr" fo:country="FR" fo:font-style="italic" fo:font-weight="bold" style:font-name-asian="Times New Roman1" style:font-family-asian="'Times New Roman'" style:font-family-generic-asian="system" style:font-pitch-asian="variable" style:font-size-asian="14pt" style:language-asian="fr" style:country-asian="FR"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mbria" fo:font-family="Cambria" style:font-family-generic="roman" style:font-pitch="variable" fo:font-size="13pt" fo:language="fr" fo:country="FR" fo:font-weight="bold" style:font-name-asian="Times New Roman1" style:font-family-asian="'Times New Roman'" style:font-family-generic-asian="system" style:font-pitch-asian="variable" style:font-size-asian="13pt" style:language-asian="fr" style:country-asian="FR"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808080" loext:opacity="100%" fo:background-color="#e6e6e6"/>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fo:language="fr" fo:country="FR" style:font-size-asian="9pt" style:language-asian="fr" style:country-asian="FR"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text-properties style:font-name-complex="Times New Roman1" style:font-family-complex="'Times New Roman'" style:font-family-generic-complex="system" style:font-pitch-complex="variable"/>
    </style:style>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Times New Roman1" style:font-family-complex="'Times New Roman'"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language="en" fo:country="GB"/>
    </style:style>
    <style:style style:name="ListLabel_20_434" style:display-name="ListLabel 434" style:family="text">
      <style:text-properties fo:font-size="11pt" fo:language="en" fo:country="GB" style:font-size-asian="11pt" style:font-size-complex="11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9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92"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93"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94"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95"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96"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97"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98"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99"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5752in" fo:text-indent="-0.25in" fo:margin-left="1.5752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2.0752in" fo:text-indent="-0.1252in" fo:margin-left="2.0752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5752in" fo:text-indent="-0.25in" fo:margin-left="2.575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3.0752in" fo:text-indent="-0.25in" fo:margin-left="3.0752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5752in" fo:text-indent="-0.1252in" fo:margin-left="3.5752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4.0752in" fo:text-indent="-0.25in" fo:margin-left="4.0752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5752in" fo:text-indent="-0.25in" fo:margin-left="4.5752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5.0752in" fo:text-indent="-0.1252in" fo:margin-left="5.0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style:list-level-label-alignment text:label-followed-by="listtab" text:list-tab-stop-position="0.9665in" fo:text-indent="-0.25in" fo:margin-left="0.966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2.0417in" fo:text-indent="-0.1252in" fo:margin-left="2.0417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5417in" fo:text-indent="-0.1252in" fo:margin-left="3.5417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5417in" fo:text-indent="-0.25in" fo:margin-left="4.5417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5.0417in" fo:text-indent="-0.1252in" fo:margin-left="5.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9917in" fo:text-indent="-0.25in" fo:margin-left="0.9917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4917in" fo:text-indent="-0.25in" fo:margin-left="1.4917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9917in" fo:text-indent="-0.25in" fo:margin-left="1.9917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4917in" fo:text-indent="-0.25in" fo:margin-left="2.4917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text:list-tab-stop-position="2.9917in" fo:text-indent="-0.25in" fo:margin-left="2.9917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4917in" fo:text-indent="-0.25in" fo:margin-left="3.4917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9917in" fo:text-indent="-0.25in" fo:margin-left="3.9917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text:list-tab-stop-position="4.4917in" fo:text-indent="-0.25in" fo:margin-left="4.4917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9917in"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Symbol" style:font-charset="x-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8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28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99"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00"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01"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02"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03"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04"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05"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06"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5"><draw:text-box fo:min-height="0in" fo:min-width="0.0161in"><text:p text:style-name="MP1" loext:marker-style-name="Page Number"><text:span text:style-name="Page_20_Number"><text:page-number text:select-page="current">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Keyboard App Builder - Installation Instructions</dc:title>
    <meta:initial-creator>Richard Margetts</meta:initial-creator>
    <dc:creator>Chris Hubbard</dc:creator>
    <meta:editing-cycles>21</meta:editing-cycles>
    <meta:print-date>2019-01-04T10:20:00</meta:print-date>
    <meta:creation-date>2022-05-11T13:57:00</meta:creation-date>
    <dc:date>2025-09-02T14:57:00</dc:date>
    <meta:editing-duration>PT4M</meta:editing-duration>
    <meta:generator>LibreOffice/26.2.3.2$Linux_X86_64 LibreOffice_project/620$Build-2</meta:generator>
    <meta:document-statistic meta:table-count="1" meta:image-count="5" meta:object-count="0" meta:page-count="6" meta:paragraph-count="186" meta:word-count="2028" meta:character-count="12989" meta:non-whitespace-character-count="11170"/>
    <meta:user-defined meta:name="AppVersion">16.0000</meta:user-defined>
    <meta:template xlink:type="simple" xlink:actuate="onRequest" xlink:title="Normal.dotm" xlink:href=""/>
  </office:meta>
</office:document-meta>
</file>