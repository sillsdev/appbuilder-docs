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780E2D43E62.png" manifest:media-type="image/png"/>
  <manifest:file-entry manifest:full-path="Pictures/100000000000043800000780DE9F472F.png" manifest:media-type="image/png"/>
  <manifest:file-entry manifest:full-path="Pictures/10000001000008BA00000270EA09DAFB.png" manifest:media-type="image/png"/>
  <manifest:file-entry manifest:full-path="Pictures/1000000100000438000008DE5204CAA0.png" manifest:media-type="image/png"/>
  <manifest:file-entry manifest:full-path="Pictures/100000010000006200000036B65513BC.png" manifest:media-type="image/png"/>
  <manifest:file-entry manifest:full-path="Pictures/10000000000002D000000500A2F1A810.png" manifest:media-type="image/png"/>
  <manifest:file-entry manifest:full-path="Pictures/10000000000002D0000005002848B2DD.png" manifest:media-type="image/png"/>
  <manifest:file-entry manifest:full-path="Pictures/1000000100000438000008DE99E4F002.png" manifest:media-type="image/png"/>
  <manifest:file-entry manifest:full-path="Pictures/10000000000002D00000050009D20BA5.png" manifest:media-type="image/png"/>
  <manifest:file-entry manifest:full-path="Pictures/10000000000002D000000500C6B6F629.png" manifest:media-type="image/png"/>
  <manifest:file-entry manifest:full-path="Pictures/10000000000002D000000500929119A0.png" manifest:media-type="image/png"/>
  <manifest:file-entry manifest:full-path="Pictures/1000000100000438000008DEBDD55097.png" manifest:media-type="image/png"/>
  <manifest:file-entry manifest:full-path="Pictures/1000000100000438000008DEF2FCC2B1.png" manifest:media-type="image/png"/>
  <manifest:file-entry manifest:full-path="Pictures/1000000100000438000008DEEFA2A554.png" manifest:media-type="image/png"/>
  <manifest:file-entry manifest:full-path="Pictures/1000000100000438000008DE9D7FD6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5.0201in" fo:margin-left="0.4924in" fo:margin-top="0in" fo:margin-bottom="0in" table:align="left" style:writing-mode="page"/>
    </style:style>
    <style:style style:name="Table1.A" style:family="table-column">
      <style:table-column-properties style:column-width="2.5in"/>
    </style:style>
    <style:style style:name="Table1.B" style:family="table-column">
      <style:table-column-properties style:column-width="2.5201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paragraph-properties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11" style:family="paragraph" style:parent-style-name="Heading_20_1">
      <style:paragraph-properties fo:margin-left="0.248in" fo:text-indent="-0.248in" style:auto-text-indent="false" fo:break-before="page"/>
    </style:style>
    <style:style style:name="P12" style:family="paragraph" style:parent-style-name="Standard">
      <style:paragraph-properties fo:margin-top="0in" fo:margin-bottom="0.0835in" style:contextual-spacing="false"/>
    </style:style>
    <style:style style:name="P13" style:family="paragraph" style:parent-style-name="Standard" style:list-style-name="WWNum25">
      <style:paragraph-properties fo:margin-left="0.4957in" fo:margin-top="0.1665in" fo:margin-bottom="0.25in" style:contextual-spacing="false" fo:text-indent="-0.248in" style:auto-text-indent="false"/>
    </style:style>
    <style:style style:name="P14" style:family="paragraph" style:parent-style-name="Standard" style:list-style-name="WWNum25">
      <style:paragraph-properties fo:margin-top="0in" fo:margin-bottom="0.25in" style:contextual-spacing="false"/>
    </style:style>
    <style:style style:name="P15" style:family="paragraph" style:parent-style-name="Standard">
      <style:paragraph-properties fo:margin-top="0in" fo:margin-bottom="0.25in" style:contextual-spacing="false"/>
    </style:style>
    <style:style style:name="P16" style:family="paragraph" style:parent-style-name="Standard">
      <style:paragraph-properties fo:margin-top="0in" fo:margin-bottom="0.25in" style:contextual-spacing="false"/>
      <style:text-properties fo:language="en" fo:country="US"/>
    </style:style>
    <style:style style:name="P17" style:family="paragraph" style:parent-style-name="Heading_20_1">
      <style:paragraph-properties fo:margin-left="0.248in" fo:text-indent="-0.248in" style:auto-text-indent="false"/>
    </style:style>
    <style:style style:name="P18" style:family="paragraph" style:parent-style-name="Standard" style:list-style-name="WWNum4"/>
    <style:style style:name="P19" style:family="paragraph" style:parent-style-name="Standard">
      <style:paragraph-properties fo:margin-left="0.25in"/>
      <style:text-properties fo:language="en" fo:country="US"/>
    </style:style>
    <style:style style:name="P20" style:family="paragraph" style:parent-style-name="Standard">
      <style:paragraph-properties fo:margin-left="0.5in" fo:margin-top="0.0835in" fo:margin-bottom="0in" style:contextual-spacing="false"/>
    </style:style>
    <style:style style:name="P21" style:family="paragraph" style:parent-style-name="Standard">
      <style:paragraph-properties fo:margin-left="0.5in"/>
    </style:style>
    <style:style style:name="P22" style:family="paragraph" style:parent-style-name="Standard">
      <style:paragraph-properties fo:margin-left="0.4882in" fo:margin-top="0.0835in" fo:margin-bottom="0in" style:contextual-spacing="false"/>
    </style:style>
    <style:style style:name="P23" style:family="paragraph" style:parent-style-name="Standard">
      <style:paragraph-properties fo:margin-left="0.5in"/>
      <style:text-properties fo:language="en" fo:country="US"/>
    </style:style>
    <style:style style:name="P24" style:family="paragraph" style:parent-style-name="Standard">
      <style:paragraph-properties fo:margin-left="0.5in"/>
      <style:text-properties fo:language="en" fo:country="GB"/>
    </style:style>
    <style:style style:name="P25" style:family="paragraph" style:parent-style-name="Standard" style:list-style-name="WWNum5">
      <style:paragraph-properties fo:margin-left="0.9957in" fo:margin-top="0.0835in" fo:margin-bottom="0in" style:contextual-spacing="false" fo:text-indent="-0.248in" style:auto-text-indent="false"/>
    </style:style>
    <style:style style:name="P26" style:family="paragraph" style:parent-style-name="Standard">
      <style:paragraph-properties fo:margin-left="0.75in"/>
      <style:text-properties style:font-name-complex="Calibri1"/>
    </style:style>
    <style:style style:name="P27" style:family="paragraph" style:parent-style-name="Standard" style:list-style-name="WWNum5"/>
    <style:style style:name="P28" style:family="paragraph" style:parent-style-name="Standard">
      <style:text-properties style:font-name-complex="Calibri1"/>
    </style:style>
    <style:style style:name="P29" style:family="paragraph" style:parent-style-name="List_20_Paragraph">
      <style:text-properties style:font-name-complex="Calibri1"/>
    </style:style>
    <style:style style:name="P30" style:family="paragraph" style:parent-style-name="Standard">
      <style:paragraph-properties fo:margin-left="0.4917in"/>
    </style:style>
    <style:style style:name="P31" style:family="paragraph" style:parent-style-name="Standard">
      <style:paragraph-properties fo:margin-left="0.4917in" fo:keep-with-next="always"/>
      <style:text-properties style:font-name-complex="Calibri1"/>
    </style:style>
    <style:style style:name="P32" style:family="paragraph" style:parent-style-name="Standard">
      <style:paragraph-properties fo:keep-with-next="always"/>
    </style:style>
    <style:style style:name="P33" style:family="paragraph" style:parent-style-name="List_20_Paragraph" style:list-style-name="WWNum26"/>
    <style:style style:name="P34" style:family="paragraph" style:parent-style-name="List_20_Paragraph">
      <style:paragraph-properties fo:margin-top="0.0835in" fo:margin-bottom="0in" style:contextual-spacing="false"/>
      <style:text-properties style:font-name-complex="Calibri1"/>
    </style:style>
    <style:style style:name="P35" style:family="paragraph" style:parent-style-name="List_20_Paragraph" style:list-style-name="WWNum26">
      <style:paragraph-properties fo:margin-left="0.9957in" fo:margin-top="0.0835in" fo:margin-bottom="0in" style:contextual-spacing="false" fo:text-indent="-0.248in" style:auto-text-indent="false"/>
    </style:style>
    <style:style style:name="P36" style:family="paragraph" style:parent-style-name="Standard">
      <style:paragraph-properties fo:margin-top="0.0835in" fo:margin-bottom="0in" style:contextual-spacing="false" fo:text-align="center" style:justify-single-word="false"/>
    </style:style>
    <style:style style:name="P37" style:family="paragraph">
      <loext:graphic-properties draw:fill="solid" draw:fill-color="#ffffff"/>
    </style:style>
    <style:style style:name="P38" style:family="paragraph" style:parent-style-name="Standard">
      <style:paragraph-properties fo:margin-top="0.0835in" fo:margin-bottom="0in" style:contextual-spacing="false"/>
      <style:text-properties style:font-name-complex="Calibri1"/>
    </style:style>
    <style:style style:name="P39" style:family="paragraph" style:parent-style-name="List_20_Paragraph">
      <style:paragraph-properties fo:margin-left="0.4917in" fo:margin-top="0.0835in" fo:margin-bottom="0in" style:contextual-spacing="false" fo:text-align="center" style:justify-single-word="false"/>
    </style:style>
    <style:style style:name="P40" style:family="paragraph" style:parent-style-name="List_20_Paragraph">
      <style:paragraph-properties fo:margin-left="0.9957in" fo:margin-top="0.0835in" fo:margin-bottom="0in" style:contextual-spacing="false"/>
      <style:text-properties style:font-name-complex="Calibri1"/>
    </style:style>
    <style:style style:name="P41" style:family="paragraph" style:parent-style-name="List_20_Paragraph">
      <style:paragraph-properties fo:margin-left="0.9965in" fo:margin-top="0.0835in" fo:margin-bottom="0.1665in" style:contextual-spacing="false"/>
    </style:style>
    <style:style style:name="P42" style:family="paragraph" style:parent-style-name="Standard">
      <style:paragraph-properties fo:margin-left="0.4917in" fo:margin-top="0.0835in" fo:margin-bottom="0in" style:contextual-spacing="false"/>
      <style:text-properties style:font-name-complex="Calibri1"/>
    </style:style>
    <style:style style:name="P43" style:family="paragraph" style:parent-style-name="Standard">
      <style:paragraph-properties fo:margin-left="0.4925in" fo:margin-top="0.0835in" fo:margin-bottom="0.1665in" style:contextual-spacing="false" fo:keep-with-next="always"/>
    </style:style>
    <style:style style:name="P44" style:family="paragraph" style:parent-style-name="Heading_20_2">
      <style:paragraph-properties fo:margin-left="0.3543in" fo:text-indent="-0.3543in" style:auto-text-indent="false"/>
    </style:style>
    <style:style style:name="P45" style:family="paragraph" style:parent-style-name="Standard">
      <style:paragraph-properties fo:margin-top="0.1665in" fo:margin-bottom="0in" style:contextual-spacing="false" fo:text-indent="0.4925in" style:auto-text-indent="false"/>
    </style:style>
    <style:style style:name="P46" style:family="paragraph" style:parent-style-name="Standard">
      <style:paragraph-properties fo:text-indent="0.3543in" style:auto-text-indent="false"/>
      <style:text-properties fo:language="en" fo:country="US"/>
    </style:style>
    <style:style style:name="P47" style:family="paragraph" style:parent-style-name="Standard">
      <style:paragraph-properties fo:text-indent="0.4917in" style:auto-text-indent="false"/>
    </style:style>
    <style:style style:name="P48" style:family="paragraph" style:parent-style-name="Standard">
      <style:paragraph-properties fo:margin-top="0.0835in" fo:margin-bottom="0in" style:contextual-spacing="false"/>
      <style:text-properties fo:language="en" fo:country="US"/>
    </style:style>
    <style:style style:name="P49" style:family="paragraph" style:parent-style-name="Standard">
      <style:paragraph-properties fo:margin-top="0.1665in" fo:margin-bottom="0in" style:contextual-spacing="false" fo:keep-with-next="always">
        <style:tab-stops>
          <style:tab-stop style:position="0.5909in"/>
        </style:tab-stops>
      </style:paragraph-properties>
    </style:style>
    <style:style style:name="P50" style:family="paragraph" style:parent-style-name="Standard" style:list-style-name="WWNum25">
      <style:paragraph-properties fo:margin-left="0.4957in" fo:margin-top="0.0835in" fo:margin-bottom="0in" style:contextual-spacing="false" fo:text-indent="-0.248in" style:auto-text-indent="false" fo:keep-with-next="always"/>
    </style:style>
    <style:style style:name="P51" style:family="paragraph" style:parent-style-name="Standard" style:list-style-name="WWNum25">
      <style:paragraph-properties fo:keep-with-next="always"/>
    </style:style>
    <style:style style:name="P52" style:family="paragraph" style:parent-style-name="Standard">
      <style:paragraph-properties fo:keep-with-next="always"/>
      <style:text-properties fo:language="en" fo:country="US"/>
    </style:style>
    <style:style style:name="P53" style:family="paragraph" style:parent-style-name="Heading_20_2">
      <style:paragraph-properties fo:margin-left="0.3543in" fo:text-indent="-0.3543in" style:auto-text-indent="false" fo:keep-with-next="auto"/>
    </style:style>
    <style:style style:name="P54" style:family="paragraph" style:parent-style-name="Standard">
      <style:paragraph-properties fo:keep-with-next="always"/>
      <style:text-properties fo:language="en" fo:country="GB"/>
    </style:style>
    <style:style style:name="P55" style:family="paragraph" style:parent-style-name="Standard">
      <style:paragraph-properties fo:text-align="center" style:justify-single-word="false" fo:keep-with-next="always"/>
    </style:style>
    <style:style style:name="P56" style:family="paragraph">
      <loext:graphic-properties draw:fill="solid" draw:fill-color="#e36c0a"/>
    </style:style>
    <style:style style:name="P57" style:family="paragraph" style:parent-style-name="Standard">
      <style:paragraph-properties fo:text-align="center" style:justify-single-word="false" fo:keep-with-next="always"/>
      <style:text-properties fo:language="en" fo:country="GB"/>
    </style:style>
    <style:style style:name="P58" style:family="paragraph" style:parent-style-name="Standard">
      <style:paragraph-properties fo:keep-together="always" fo:keep-with-next="always"/>
    </style:style>
    <style:style style:name="P59" style:family="paragraph" style:parent-style-name="Standard">
      <style:paragraph-properties fo:keep-together="always" fo:keep-with-next="always"/>
      <style:text-properties fo:language="en" fo:country="GB"/>
    </style:style>
    <style:style style:name="P60" style:family="paragraph" style:parent-style-name="Standard">
      <style:paragraph-properties fo:keep-together="always" fo:keep-with-next="always"/>
      <style:text-properties fo:language="en" fo:country="US"/>
    </style:style>
    <style:style style:name="P61" style:family="paragraph" style:parent-style-name="Standard">
      <style:paragraph-properties fo:text-align="center" style:justify-single-word="false"/>
      <style:text-properties fo:language="en" fo:country="US"/>
    </style:style>
    <style:style style:name="P62" style:family="paragraph" style:parent-style-name="Standard">
      <style:paragraph-properties fo:keep-with-next="always"/>
      <style:text-properties fo:font-size="10pt" fo:language="en" fo:country="GB" style:font-size-asian="10pt" style:language-asian="en" style:country-asian="GB"/>
    </style:style>
    <style:style style:name="P63" style:family="paragraph" style:parent-style-name="Standard">
      <style:paragraph-properties fo:keep-with-next="always"/>
      <style:text-properties fo:language="en" fo:country="GB" style:language-asian="en" style:country-asian="GB"/>
    </style:style>
    <style:style style:name="P64"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language="en" fo:country="US"/>
    </style:style>
    <style:style style:name="T8" style:family="text">
      <style:text-properties fo:font-size="20pt" fo:language="en" fo:country="US" fo:font-weight="bold" style:font-size-asian="20pt" style:font-weight-asian="bold" style:font-size-complex="20pt"/>
    </style:style>
    <style:style style:name="T9" style:family="text">
      <style:text-properties fo:font-size="16pt" fo:language="en" fo:country="US" fo:font-weight="bold" style:font-size-asian="16pt" style:font-weight-asian="bold" style:font-size-complex="16pt"/>
    </style:style>
    <style:style style:name="T10" style:family="text">
      <style:text-properties fo:font-size="11pt" fo:language="en" fo:country="GB" fo:font-weight="normal" style:font-family-asian="PMingLiU" style:font-family-generic-asian="system" style:font-pitch-asian="variable" style:font-size-asian="11pt" style:language-asian="en" style:country-asian="GB" style:font-weight-asian="normal" style:font-name-complex="Arial1" style:font-size-complex="11pt"/>
    </style:style>
    <style:style style:name="T11" style:family="text">
      <style:text-properties text:display="true"/>
    </style:style>
    <style:style style:name="T12" style:family="text">
      <style:text-properties fo:font-size="11pt" fo:language="en" fo:country="GB" style:font-family-asian="PMingLiU" style:font-family-generic-asian="system" style:font-pitch-asian="variable" style:font-size-asian="11pt" style:language-asian="en" style:country-asian="GB" style:font-name-complex="Arial1" style:font-size-complex="11pt"/>
    </style:style>
    <style:style style:name="T13" style:family="text">
      <style:text-properties fo:language="en" fo:country="US" fo:font-weight="bold" style:font-weight-asian="bold" style:font-weight-complex="bold"/>
    </style:style>
    <style:style style:name="T14" style:family="text">
      <style:text-properties fo:language="en" fo:country="US" fo:font-weight="bold" style:font-weight-asian="bold"/>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style:font-style-asian="italic"/>
    </style:style>
    <style:style style:name="T17" style:family="text">
      <style:text-properties style:font-name-complex="Calibri1"/>
    </style:style>
    <style:style style:name="T18" style:family="text">
      <style:text-properties fo:font-weight="bold" style:font-weight-asian="bold" style:font-name-complex="Calibri1"/>
    </style:style>
    <style:style style:name="T19" style:family="text">
      <style:text-properties fo:font-weight="bold" style:font-weight-asian="bold" style:font-name-complex="Calibri1" style:font-weight-complex="bold"/>
    </style:style>
    <style:style style:name="T20" style:family="text">
      <style:text-properties style:font-name-complex="Calibri1" style:font-weight-complex="bold"/>
    </style:style>
    <style:style style:name="T21" style:family="text">
      <style:text-properties fo:font-family="Wingdings" style:font-family-generic="swiss" style:font-pitch="variable" style:font-charset="x-symbol" fo:language="en" fo:country="GB" style:font-name-asian="Wingdings" style:font-name-complex="Wingdings"/>
    </style:style>
    <style:style style:name="T22" style:family="text">
      <style:text-properties fo:language="en" fo:country="GB" style:font-name-complex="Calibri1"/>
    </style:style>
    <style:style style:name="T23" style:family="text">
      <style:text-properties fo:language="en" fo:country="GB" fo:font-weight="bold" style:font-weight-asian="bold" style:font-name-complex="Calibri1" style:font-weight-complex="bold"/>
    </style:style>
    <style:style style:name="T24" style:family="text">
      <style:text-properties fo:font-style="italic" style:text-underline-style="solid" style:text-underline-width="auto" style:text-underline-color="font-color" style:font-style-asian="italic" style:font-name-complex="Calibri1" style:font-style-complex="italic"/>
    </style:style>
    <style:style style:name="T25" style:family="text">
      <style:text-properties fo:color="#0070c0" loext:opacity="100%" fo:language="en" fo:country="US"/>
    </style:style>
    <style:style style:name="T26" style:family="text">
      <style:text-properties fo:language="en" fo:country="GB" fo:font-weight="bold" style:font-weight-asian="bold" style:font-weight-complex="bold"/>
    </style:style>
    <style:style style:name="T27" style:family="text">
      <style:text-properties fo:language="en" fo:country="GB" fo:font-style="italic" fo:font-weight="bold" style:font-style-asian="italic" style:font-weight-asian="bold" style:font-style-complex="italic" style:font-weight-complex="bold"/>
    </style:style>
    <style:style style:name="T28" style:family="text">
      <style:text-properties fo:font-size="10pt" fo:language="en" fo:country="GB" style:font-size-asian="10pt" style:language-asian="en" style:country-asian="GB"/>
    </style:style>
    <style:style style:name="T29" style:family="text">
      <style:text-properties fo:language="en" fo:country="GB" style:language-asian="en" style:country-asian="GB"/>
    </style:style>
    <style:style style:name="T30" style:family="text">
      <style:text-properties fo:language="en" fo:country="GB" fo:font-weight="bold" style:language-asian="en" style:country-asian="GB" style:font-weight-asian="bold"/>
    </style:style>
    <style:style style:name="T31" style:family="text">
      <style:text-properties fo:language="en" fo:country="GB" fo:font-weight="bold" style:font-weight-asian="bol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1.4846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in" svg:stroke-color="#000000" draw:stroke-linejoin="miter" svg:stroke-linecap="butt" draw:fill="solid" draw:fill-color="#ffffff" draw:textarea-vertical-align="top" draw:auto-grow-height="false" fo:min-height="0.302in" fo:min-width="0.5953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000000" draw:stroke-linejoin="miter" svg:stroke-linecap="butt" draw:fill="solid" draw:fill-color="#e36c0a" draw:textarea-vertical-align="top" draw:auto-grow-height="false" fo:min-height="0.3335in" fo:min-width="0.5937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text:anchor-type="as-char" draw:z-index="12" draw:name="Picture 30" draw:style-name="gr1" draw:text-style-name="P3" svg:width="5.3961in" svg:height="1.6776in"><draw:image xlink:href="Pictures/10000001000008BA00000270EA09DAFB.png" xlink:type="simple" xlink:show="embed" xlink:actuate="onLoad" draw:mime-type="image/png"><text:p/></draw:image></draw:frame></text:p>
      <text:p text:style-name="P1" loext:marker-style-name="T1"/>
      <text:p text:style-name="P1" loext:marker-style-name="T1"/>
      <text:p text:style-name="P1" loext:marker-style-name="T1"/>
      <text:p text:style-name="P2" loext:marker-style-name="T2"><text:span text:style-name="T2">Building Apps</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2" loext:marker-style-name="T3"><text:bookmark-start text:name="_Hlk129967805"/><draw:frame text:anchor-type="as-char" draw:z-index="13" draw:style-name="gr2" draw:text-style-name="P3" svg:width="1.2189in" svg:height="0.6669in"><draw:image xlink:href="Pictures/100000010000006200000036B65513BC.png" xlink:type="simple" xlink:show="embed" xlink:actuate="onLoad" draw:mime-type="image/png"><text:p/></draw:image></draw:frame><text:bookmark-end text:name="_Hlk129967805"/></text:p>
      <text:p text:style-name="P4" loext:marker-style-name="T3"/>
      <text:p text:style-name="P4" loext:marker-style-name="T3"/>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Keyboard App Builder: Building Apps</text:span><text:span text:style-name="T5"/></text:p>
      <text:p text:style-name="P7" loext:marker-style-name="T4"/>
      <text:p text:style-name="P2" loext:marker-style-name="T4"><text:span text:style-name="T4">© 2023, SIL International</text:span><text:span text:style-name="T4"/></text:p>
      <text:p text:style-name="P7" loext:marker-style-name="T4"/>
      <text:p text:style-name="P2" loext:marker-style-name="T6"><text:span text:style-name="T6">Last updated: 19 July 2023</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 loext:marker-style-name="T4"><text:a xlink:type="simple" xlink:href="http://software.sil.org/keyboardappbuilder/resources/" text:style-name="Internet_20_link" text:visited-style-name="Visited_20_Internet_20_Link"><text:span text:style-name="Internet_20_link"><text:span text:style-name="T4">http://software.sil.org/keyboardappbuilder/resources/</text:span></text:span></text:a><text:span text:style-name="T4"> <text:s text:c="2"/></text:span></text:p>
      <text:p text:style-name="P7" loext:marker-style-name="T4"/>
      <text:p text:style-name="P2" loext:marker-style-name="T4"><text:span text:style-name="T4">and on the Help menu of Keyboard App Builder.</text:span><text:span text:style-name="T4"/></text:p>
      <text:p text:style-name="P8" loext:marker-style-name="T7"/>
      <text:p text:style-name="P4" loext:marker-style-name="T3"/>
      <text:p text:style-name="P1" loext:marker-style-name="T1"/>
      <text:p text:style-name="P8" loext:marker-style-name="T7"/>
      <text:p text:style-name="P9" loext:marker-style-name="T8"><text:span text:style-name="T8">Contents</text:span><text:span text:style-name="T8"/></text:p>
      <text:p text:style-name="P10" loext:marker-style-name="T9"/>
      <text:p text:style-name="P10" loext:marker-style-name="T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129968039" text:style-name="Index_20_Link" text:visited-style-name="Index_20_Link"><text:span text:style-name="T7">1.</text:span><text:span text:style-name="T10"><text:tab/></text:span><text:span text:style-name="T7">Preparing content for your app</text:span><text:span text:style-name="T11"><text:tab/>4</text:span></text:a></text:p>
          <text:p text:style-name="Contents_20_1" loext:marker-style-name="T10"><text:a xlink:type="simple" xlink:href="#_Toc129968040" text:style-name="Index_20_Link" text:visited-style-name="Index_20_Link"><text:span text:style-name="T7">2.</text:span><text:span text:style-name="T10"><text:tab/></text:span><text:span text:style-name="T7">How to build your first app</text:span><text:span text:style-name="T11"><text:tab/>4</text:span></text:a></text:p>
          <text:p text:style-name="Contents_20_1" loext:marker-style-name="T10"><text:a xlink:type="simple" xlink:href="#_Toc129968041" text:style-name="Index_20_Link" text:visited-style-name="Index_20_Link">3.<text:span text:style-name="T10"><text:tab/></text:span>Installing the app on your phone<text:span text:style-name="T11"><text:tab/>6</text:span></text:a></text:p>
          <text:p text:style-name="Contents_20_1" loext:marker-style-name="T10"><text:a xlink:type="simple" xlink:href="#_Toc129968042" text:style-name="Index_20_Link" text:visited-style-name="Index_20_Link"><text:span text:style-name="T7">4.</text:span><text:span text:style-name="T10"><text:tab/></text:span><text:span text:style-name="T7">App Creation Basics</text:span><text:span text:style-name="T11"><text:tab/>10</text:span></text:a></text:p>
          <text:p text:style-name="Contents_20_2" loext:marker-style-name="T12"><text:a xlink:type="simple" xlink:href="#_Toc129968043" text:style-name="Index_20_Link" text:visited-style-name="Index_20_Link">4.1.<text:span text:style-name="T12"><text:tab/></text:span>How should I choose the app package name?<text:span text:style-name="T11"><text:tab/>10</text:span></text:a></text:p>
          <text:p text:style-name="Contents_20_2" loext:marker-style-name="T12"><text:a xlink:type="simple" xlink:href="#_Toc129968044" text:style-name="Index_20_Link" text:visited-style-name="Index_20_Link">4.2.<text:span text:style-name="T12"><text:tab/></text:span>Do I have to create a new keystore for each app, or can I reuse the same keystore for several of my apps?<text:span text:style-name="T11"><text:tab/>11</text:span></text:a></text:p>
          <text:p text:style-name="Contents_20_2" loext:marker-style-name="T12"><text:a xlink:type="simple" xlink:href="#_Toc129968045" text:style-name="Index_20_Link" text:visited-style-name="Index_20_Link">4.3.<text:span text:style-name="T12"><text:tab/></text:span>Can I build apps when I do not have internet access?<text:span text:style-name="T11"><text:tab/>11</text:span></text:a></text:p>
          <text:p text:style-name="Contents_20_1" loext:marker-style-name="T10"><text:a xlink:type="simple" xlink:href="#_Toc129968046" text:style-name="Index_20_Link" text:visited-style-name="Index_20_Link"><text:span text:style-name="T7">5.</text:span><text:span text:style-name="T10"><text:tab/></text:span><text:span text:style-name="T7">Home and Setup Screens</text:span><text:span text:style-name="T11"><text:tab/>11</text:span></text:a></text:p>
          <text:p text:style-name="Contents_20_2" loext:marker-style-name="T12"><text:a xlink:type="simple" xlink:href="#_Toc129968047" text:style-name="Index_20_Link" text:visited-style-name="Index_20_Link">5.1.<text:span text:style-name="T12"><text:tab/></text:span>Home Screen<text:span text:style-name="T11"><text:tab/>11</text:span></text:a></text:p>
          <text:p text:style-name="Contents_20_2" loext:marker-style-name="T12"><text:a xlink:type="simple" xlink:href="#_Toc129968048" text:style-name="Index_20_Link" text:visited-style-name="Index_20_Link">5.2.<text:span text:style-name="T12"><text:tab/></text:span>Setup Screen<text:span text:style-name="T11"><text:tab/>12</text:span></text:a></text:p>
          <text:p text:style-name="Contents_20_1" loext:marker-style-name="T10"><text:a xlink:type="simple" xlink:href="#_Toc129968049" text:style-name="Index_20_Link" text:visited-style-name="Index_20_Link"><text:span text:style-name="T7">6.</text:span><text:span text:style-name="T10"><text:tab/></text:span><text:span text:style-name="T7">Navigation Drawer</text:span><text:span text:style-name="T11"><text:tab/>17</text:span></text:a></text:p>
          <text:p text:style-name="Contents_20_1" loext:marker-style-name="T10"><text:a xlink:type="simple" xlink:href="#_Toc129968050" text:style-name="Index_20_Link" text:visited-style-name="Index_20_Link"><text:span text:style-name="T7">7.</text:span><text:span text:style-name="T10"><text:tab/></text:span><text:span text:style-name="T7">Distribution</text:span><text:span text:style-name="T11"><text:tab/>17</text:span></text:a></text:p>
        </text:index-body>
      </text:table-of-content>
      <text:p text:style-name="P8" loext:marker-style-name="T7"/>
      <text:h text:style-name="P11" text:outline-level="1" loext:marker-style-name="T7"><text:bookmark-start text:name="_Toc452459025"/><text:bookmark-start text:name="_Toc129968039"/><text:bookmark-start text:name="_Toc468106959"/><text:span text:style-name="T7">Preparing content for your app</text:span><text:bookmark-end text:name="_Toc452459025"/><text:bookmark-end text:name="_Toc129968039"/><text:bookmark-end text:name="_Toc468106959"/><text:span text:style-name="T7"/></text:h>
      <text:p text:style-name="P12" loext:marker-style-name="T7"><text:span text:style-name="T7">Before you build an app with Keyboard App Builder (KAB), you need:</text:span><text:span text:style-name="T7"/></text:p>
      <text:list text:style-name="WWNum25">
        <text:list-item>
          <text:p text:style-name="P13" loext:marker-style-name="T7"><text:span text:style-name="T7">a </text:span><text:span text:style-name="T13">Keyman keyboard layout file</text:span><text:span text:style-name="T7"> (.kmp).</text:span></text:p>
        </text:list-item>
      </text:list>
      <text:p text:style-name="P12" loext:marker-style-name="T7"><text:span text:style-name="T7">and optionally:</text:span><text:span text:style-name="T7"/></text:p>
      <text:list xml:id="list131349642017952" text:continue-numbering="true" text:style-name="WWNum25">
        <text:list-item>
          <text:p text:style-name="P14" loext:marker-style-name="T7"><text:span text:style-name="T7">a </text:span><text:span text:style-name="T13">Keyman lexical model file</text:span><text:span text:style-name="T7"> (.model.kmp), for predictive text and autocorrect.</text:span></text:p>
        </text:list-item>
      </text:list>
      <text:p text:style-name="P15"><text:span text:style-name="T7">These files are created using </text:span><text:span text:style-name="T13">Keyman Developer</text:span><text:span text:style-name="T7"> (</text:span><text:a xlink:type="simple" xlink:href="https://keyman.com/developer/" text:style-name="Internet_20_link" text:visited-style-name="Visited_20_Internet_20_Link"><text:span text:style-name="Internet_20_link">https://keyman.com/developer/</text:span></text:a>).</text:p>
      <text:p text:style-name="P15" loext:marker-style-name="T7">It is possible to include more than one keyboard layout in a single app.<text:span text:style-name="T7"/></text:p>
      <text:p text:style-name="P16" loext:marker-style-name="T7"/>
      <text:h text:style-name="P17" text:outline-level="1" loext:marker-style-name="T7"><text:bookmark-start text:name="_Toc129968040"/><text:span text:style-name="T7">How to build your first app</text:span><text:bookmark-end text:name="_Toc129968040"/><text:span text:style-name="T7"/></text:h>
      <text:p text:style-name="Standard" loext:marker-style-name="T7"><text:span text:style-name="T7">To build your first app with Keyboard App Builder:</text:span><text:span text:style-name="T7"/></text:p>
      <text:p text:style-name="P8" loext:marker-style-name="T7"/>
      <text:list text:style-name="WWNum4">
        <text:list-item>
          <text:p text:style-name="P18" loext:marker-style-name="T7"><text:span text:style-name="T7">Launch </text:span><text:span text:style-name="T14">Keyboard App Builder</text:span><text:span text:style-name="T7"> from its icon on the desktop.</text:span></text:p>
        </text:list-item>
      </text:list>
      <text:p text:style-name="P19" loext:marker-style-name="T7"/>
      <text:list text:continue-numbering="true" text:style-name="WWNum4">
        <text:list-item>
          <text:p text:style-name="P18" loext:marker-style-name="T7"><text:span text:style-name="T7">Click </text:span><text:span text:style-name="T14">New App</text:span><text:span text:style-name="T7"> on the toolbar. The New App wizard will appear.</text:span></text:p>
        </text:list-item>
      </text:list>
      <text:p text:style-name="P8" loext:marker-style-name="T7"/>
      <text:list text:continue-numbering="true" text:style-name="WWNum4">
        <text:list-item>
          <text:p text:style-name="P18" loext:marker-style-name="T7"><text:span text:style-name="T7">On the first page of the wizard titled </text:span><text:span text:style-name="T14">App Name</text:span><text:span text:style-name="T7">, specify the </text:span><text:span text:style-name="T14">App Name</text:span><text:span text:style-name="T7">, such as “Dogon Keyboard”, “Mamara Keyboard”, etc. </text:span></text:p>
        </text:list-item>
      </text:list>
      <text:p text:style-name="P20" loext:marker-style-name="T7"><text:span text:style-name="T7">This is the main title of your app and will be seen by the user. Do not include underscores or hard to understand abbreviations.</text:span><text:span text:style-name="T7"/></text:p>
      <text:p text:style-name="P8" loext:marker-style-name="T7"/>
      <text:p text:style-name="P21"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18" loext:marker-style-name="T7"><text:span text:style-name="T7">On the page of the wizard titled </text:span><text:span text:style-name="T14">Package</text:span><text:span text:style-name="T7">, specify the </text:span><text:span text:style-name="T14">Package Name</text:span><text:span text:style-name="T7">, a dot-separated string which uniquely identifies your app. </text:span></text:p>
        </text:list-item>
      </text:list>
      <text:p text:style-name="P22" loext:marker-style-name="T7"><text:span text:style-name="T7">More details about choosing a good package name can be found in section </text:span><text:span text:style-name="T15">4</text:span><text:span text:style-name="T16">.1. How should I choose the app package name?</text:span></text:p>
      <text:p text:style-name="P8" loext:marker-style-name="T7"/>
      <text:p text:style-name="P21" loext:marker-style-name="T7"><text:span text:style-name="T7">Click </text:span><text:span text:style-name="T14">Next</text:span><text:span text:style-name="T7"> to move to the next page.</text:span></text:p>
      <text:p text:style-name="P23" loext:marker-style-name="T7"/>
      <text:list text:continue-numbering="true" text:style-name="WWNum4">
        <text:list-item>
          <text:p text:style-name="P18" loext:marker-style-name="T7"><text:span text:style-name="T7">On the next page of the wizard titled </text:span><text:span text:style-name="T14">Keyboard</text:span><text:span text:style-name="T7">, click </text:span><text:span text:style-name="T14">Browse… </text:span><text:span text:style-name="T7">and select the Keyman keyboard layout file you want to use in the app. </text:span></text:p>
        </text:list-item>
      </text:list>
      <text:p text:style-name="P8" loext:marker-style-name="T7"/>
      <text:p text:style-name="P21" loext:marker-style-name="T7"><text:span text:style-name="T7">Click </text:span><text:span text:style-name="T14">Next</text:span><text:span text:style-name="T7"> to move to the next page.</text:span></text:p>
      <text:p text:style-name="P23" loext:marker-style-name="T7"/>
      <text:list text:continue-numbering="true" text:style-name="WWNum4">
        <text:list-item>
          <text:p text:style-name="P18" loext:marker-style-name="T7"><text:span text:style-name="T7">On the next page of the wizard titled </text:span><text:span text:style-name="T14">Lexical Model</text:span><text:span text:style-name="T7">, click </text:span><text:span text:style-name="T14">Browse… </text:span><text:span text:style-name="T7">and select the Keyman lexical model file you want to use in the app. This is optional; you do not need to specify a lexical model.</text:span></text:p>
        </text:list-item>
      </text:list>
      <text:p text:style-name="P23" loext:marker-style-name="T7"/>
      <text:p text:style-name="P21" loext:marker-style-name="T4"><text:span text:style-name="T7">Click </text:span><text:span text:style-name="T14">Next</text:span><text:span text:style-name="T7"> to move to the next page.</text:span></text:p>
      <text:p text:style-name="P23" loext:marker-style-name="T7"/>
      <text:list text:continue-numbering="true" text:style-name="WWNum4">
        <text:list-item>
          <text:p text:style-name="P18" loext:marker-style-name="T4"><text:span text:style-name="T7">On the page of the wizard titled </text:span><text:span text:style-name="T14">Color Scheme</text:span><text:span text:style-name="T7">, choose the app color scheme.</text:span></text:p>
        </text:list-item>
      </text:list>
      <text:p text:style-name="P24" loext:marker-style-name="T4"/>
      <text:p text:style-name="P21"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18" loext:marker-style-name="T7"><text:span text:style-name="T7">On the page of the wizard titled </text:span><text:span text:style-name="T14">Default Interface Language</text:span><text:span text:style-name="T7">, choose the language you want users to see when they first enter the app. This can be the current system language.</text:span></text:p>
        </text:list-item>
      </text:list>
      <text:p text:style-name="P8" loext:marker-style-name="T7"/>
      <text:p text:style-name="P21" loext:marker-style-name="T7"><text:span text:style-name="T7">Click </text:span><text:span text:style-name="T14">Next</text:span><text:span text:style-name="T7"> to move to the next page.</text:span></text:p>
      <text:p text:style-name="P23" loext:marker-style-name="T7"/>
      <text:list text:continue-numbering="true" text:style-name="WWNum4">
        <text:list-item>
          <text:p text:style-name="P18" loext:marker-style-name="T7"><text:span text:style-name="T7">On the page of the wizard titled </text:span><text:span text:style-name="T14">Interface Languages</text:span><text:span text:style-name="T7">, choose the app interface languages that the user can choose between.</text:span></text:p>
        </text:list-item>
      </text:list>
      <text:p text:style-name="P8" loext:marker-style-name="T7"/>
      <text:p text:style-name="P21" loext:marker-style-name="T7"><text:span text:style-name="T7">Click </text:span><text:span text:style-name="T14">Next</text:span><text:span text:style-name="T7"> to move to the next page.</text:span></text:p>
      <text:p text:style-name="P8" loext:marker-style-name="T7"/>
      <text:list text:continue-numbering="true" text:style-name="WWNum4">
        <text:list-item>
          <text:p text:style-name="P18" loext:marker-style-name="T7"><text:span text:style-name="T7">On the page of the wizard titled </text:span><text:span text:style-name="T14">Icon</text:span><text:span text:style-name="T7">, choose the application launcher icon. You can select one of the images in the table or if you have your own PNG image files for the icon, click </text:span><text:span text:style-name="T14">Browse</text:span><text:span text:style-name="T7"> and select them.</text:span></text:p>
        </text:list-item>
      </text:list>
      <text:p text:style-name="P8" loext:marker-style-name="T7"/>
      <text:p text:style-name="P21" loext:marker-style-name="T7"><text:span text:style-name="T7">Click </text:span><text:span text:style-name="T14">Next</text:span><text:span text:style-name="T7"> to move to the next page.</text:span></text:p>
      <text:p text:style-name="P8" loext:marker-style-name="T7"/>
      <text:list xml:id="list131348309013674" text:continue-numbering="true" text:style-name="WWNum4">
        <text:list-item>
          <text:p text:style-name="P18" loext:marker-style-name="T7"><text:span text:style-name="T7">On the page of the wizard titled </text:span><text:span text:style-name="T14">Signing</text:span><text:span text:style-name="T7">, you need to specify the keystore and alias to use to sign the app. An app must be signed in this way so that it can installed on an Android device.</text:span></text:p>
        </text:list-item>
      </text:list>
      <text:p text:style-name="P8" loext:marker-style-name="T7"/>
      <text:p text:style-name="P21" loext:marker-style-name="T17"><text:span text:style-name="T17">If you do not already have a keystore file (which you are unlikely to have if this is your first time using the program):</text:span><text:span text:style-name="T17"/></text:p>
      <text:list text:style-name="WWNum5">
        <text:list-item>
          <text:p text:style-name="P25" loext:marker-style-name="T17"><text:span text:style-name="T17">Click </text:span><text:span text:style-name="T18">Create KeyStore</text:span><text:span text:style-name="T17">.</text:span></text:p>
        </text:list-item>
      </text:list>
      <text:p text:style-name="P26" loext:marker-style-name="T17"/>
      <text:list text:continue-numbering="true" text:style-name="WWNum5">
        <text:list-item>
          <text:p text:style-name="P27" loext:marker-style-name="T17"><text:span text:style-name="T17">Enter a new filename for the keystore, such as “keystore1” or something like that. Specify a password. Click </text:span><text:span text:style-name="T18">Next</text:span><text:span text:style-name="T17"> to continue.</text:span></text:p>
        </text:list-item>
      </text:list>
      <text:p text:style-name="P28" loext:marker-style-name="T17"/>
      <text:list text:continue-numbering="true" text:style-name="WWNum5">
        <text:list-item>
          <text:p text:style-name="P27" loext:marker-style-name="T17"><text:span text:style-name="T17">Enter an alias name for a key to create within your new keystore, such as “key”. Specify a password, which can be the same as the password you entered on the previous page. Click </text:span><text:span text:style-name="T18">Next</text:span><text:span text:style-name="T17"> to continue.</text:span></text:p>
        </text:list-item>
      </text:list>
      <text:p text:style-name="P29" loext:marker-style-name="T17"/>
      <text:list text:continue-numbering="true" text:style-name="WWNum5">
        <text:list-item>
          <text:p text:style-name="P27" loext:marker-style-name="T17"><text:span text:style-name="T17">On the </text:span><text:span text:style-name="T19">Certificate Issuer</text:span><text:span text:style-name="T17"> page, provide details of your organisation in at least one of the fields. Click </text:span><text:span text:style-name="T18">Next</text:span><text:span text:style-name="T17"> to continue.</text:span></text:p>
        </text:list-item>
      </text:list>
      <text:p text:style-name="P28" loext:marker-style-name="T17"/>
      <text:list text:continue-numbering="true" text:style-name="WWNum5">
        <text:list-item>
          <text:p text:style-name="P27" loext:marker-style-name="T17"><text:span text:style-name="T17">A new keystore will be created for you. Click </text:span><text:span text:style-name="T18">Close</text:span><text:span text:style-name="T17">.</text:span></text:p>
        </text:list-item>
      </text:list>
      <text:p text:style-name="P8" loext:marker-style-name="T7"/>
      <text:list text:continue-list="list131348309013674" text:style-name="WWNum4">
        <text:list-item>
          <text:p text:style-name="P18" loext:marker-style-name="T7"><text:span text:style-name="T7">Back on the </text:span><text:span text:style-name="T14">Signing</text:span><text:span text:style-name="T7"> page of the New App wizard, you need to specify the keystore password, select the alias and enter the alias password (just as you entered them in the step above).</text:span></text:p>
        </text:list-item>
      </text:list>
      <text:p text:style-name="P19" loext:marker-style-name="T7"/>
      <text:p text:style-name="P21" loext:marker-style-name="T7"><text:span text:style-name="T7">Click </text:span><text:span text:style-name="T14">Next</text:span><text:span text:style-name="T7"> to continue.</text:span></text:p>
      <text:p text:style-name="P8" loext:marker-style-name="T7"/>
      <text:list text:continue-numbering="true" text:style-name="WWNum4">
        <text:list-item>
          <text:p text:style-name="P18" loext:marker-style-name="T7"><text:span text:style-name="T7">On the page of the wizard titled </text:span><text:span text:style-name="T14">Project</text:span><text:span text:style-name="T7">, you can enter modify the project name and add an optional description of the app project. Neither of these will be visible to the user of your app. They are just for your own use and might help you distinguish between multiple app projects.</text:span></text:p>
        </text:list-item>
      </text:list>
      <text:p text:style-name="P8" loext:marker-style-name="T7"/>
      <text:p text:style-name="P21" loext:marker-style-name="T7"><text:span text:style-name="T7">Click </text:span><text:span text:style-name="T14">Next</text:span><text:span text:style-name="T7"> to continue. The New App wizard will close, and the app definition will be added to the tree view on the left of the screen.</text:span></text:p>
      <text:p text:style-name="P8" loext:marker-style-name="T7"/>
      <text:list text:continue-numbering="true" text:style-name="WWNum4">
        <text:list-item>
          <text:p text:style-name="P18" loext:marker-style-name="T7"><text:span text:style-name="T7">Take a look at each of the app configuration pages by selecting them in the tree view on the left. Look in each of the tabs on each page to verify that you have the settings you want. You can always go back to them later to change them if you find you need to make modifications to fonts, colors, styles, etc.</text:span><text:span text:style-name="T7"/></text:p>
        </text:list-item>
      </text:list>
      <text:p text:style-name="P8" loext:marker-style-name="T7"/>
      <text:list text:continue-numbering="true" text:style-name="WWNum4">
        <text:list-item>
          <text:p text:style-name="P18" loext:marker-style-name="T7"><text:span text:style-name="T7">When you have finished configuring the app, </text:span><text:span text:style-name="T17">click the </text:span><text:span text:style-name="T18">Build Android App </text:span><text:span text:style-name="T20">button on the toolbar at the top of the screen</text:span><text:span text:style-name="T17">.</text:span></text:p>
        </text:list-item>
      </text:list>
      <text:p text:style-name="P8" loext:marker-style-name="T7"/>
      <text:p text:style-name="P21" loext:marker-style-name="T7"><text:span text:style-name="T7">If something is not configured correctly for the build to work, you will be notified of this. </text:span><text:span text:style-name="T7"/></text:p>
      <text:p text:style-name="P8" loext:marker-style-name="T7"/>
      <text:list text:continue-numbering="true" text:style-name="WWNum4">
        <text:list-item>
          <text:p text:style-name="P18" loext:marker-style-name="T7"><text:span text:style-name="T7">A black command box will appear. Wait about a minute while the app is compiled.</text:span><text:span text:style-name="T7"/></text:p>
        </text:list-item>
      </text:list>
      <text:p text:style-name="P8" loext:marker-style-name="T7"/>
      <text:p text:style-name="P30" loext:marker-style-name="T7"><text:span text:style-name="T7">The first time the build process is run, the compiler needs to connect to the internet to download some files. After this, subsequent app builds will not require internet access. See </text:span><text:span text:style-name="T14">Tools</text:span><text:span text:style-name="T7"> </text:span><text:span text:style-name="T21"></text:span><text:span text:style-name="T4"> </text:span><text:span text:style-name="T14">Settings…</text:span><text:span text:style-name="T7"> </text:span><text:span text:style-name="T21"></text:span><text:span text:style-name="T7"> </text:span><text:span text:style-name="T14">Build Settings</text:span><text:span text:style-name="T7"> to turn on offline mode after the first app build.</text:span></text:p>
      <text:p text:style-name="P19" loext:marker-style-name="T7"/>
      <text:list text:continue-numbering="true" text:style-name="WWNum4">
        <text:list-item>
          <text:p text:style-name="P18" loext:marker-style-name="T17"><text:span text:style-name="T17">If the build succeeds, you will have a new APK file – the installation file for an Android app.</text:span><text:span text:style-name="T17"/></text:p>
        </text:list-item>
      </text:list>
      <text:p text:style-name="P28" loext:marker-style-name="T17"/>
      <text:p text:style-name="Standard" loext:marker-style-name="T17"><text:span text:style-name="T17">The next section describes how to copy this APK file to your phone and launch the app.</text:span><text:span text:style-name="T17"/></text:p>
      <text:p text:style-name="P28" loext:marker-style-name="T17"/>
      <text:p text:style-name="P28" loext:marker-style-name="T17"/>
      <text:h text:style-name="Heading_20_1" text:outline-level="1"><text:bookmark-start text:name="_Toc66108082"/><text:bookmark-start text:name="_Toc129968041"/><text:bookmark-start text:name="_Toc66431885"/>Installing the app on your phone<text:bookmark-end text:name="_Toc66108082"/><text:bookmark-end text:name="_Toc129968041"/><text:bookmark-end text:name="_Toc66431885"/></text:h>
      <text:p text:style-name="P31" loext:marker-style-name="T17"/>
      <text:p text:style-name="P32" loext:marker-style-name="T17"><text:span text:style-name="T17">In the above section, you have seen how to compile an Android app. The result is an APK file, the installation file for an Android app. You now need to copy this APK file to your phone, install it and launch the app.</text:span><text:span text:style-name="T17"/></text:p>
      <text:p text:style-name="P28" loext:marker-style-name="T17"/>
      <text:p text:style-name="Standard" loext:marker-style-name="T17"><text:span text:style-name="T17">Here is how to do this:</text:span><text:span text:style-name="T17"/></text:p>
      <text:p text:style-name="P28" loext:marker-style-name="T17"/>
      <text:list text:style-name="WWNum26">
        <text:list-item>
          <text:p text:style-name="P33" loext:marker-style-name="T17"><text:span text:style-name="T17">Connect your Android phone to your computer using a </text:span><text:span text:style-name="T19">USB data cable</text:span><text:span text:style-name="T17">. </text:span></text:p>
        </text:list-item>
      </text:list>
      <text:p text:style-name="P29" loext:marker-style-name="T17"/>
      <text:p text:style-name="List_20_Paragraph" loext:marker-style-name="T17"><text:span text:style-name="T17">(Sometimes you get cheap USB cables that can only charge a phone but cannot transfer data, so make sure you have the right kind of cable.)</text:span><text:span text:style-name="T17"/></text:p>
      <text:p text:style-name="P34" loext:marker-style-name="T17"/>
      <text:list text:continue-numbering="true" text:style-name="WWNum26">
        <text:list-item>
          <text:p text:style-name="P33" loext:marker-style-name="T17"><text:span text:style-name="T17">Ensure that </text:span><text:span text:style-name="T19">Developer Options </text:span><text:span text:style-name="T21"></text:span><text:span text:style-name="T22"> </text:span><text:span text:style-name="T23">USB Debugging</text:span><text:span text:style-name="T17"> is enabled on your phone. By default, on new phones, Developer Options is turned off. This is how you can enable it:</text:span></text:p>
          <text:list>
            <text:list-item>
              <text:p text:style-name="P35" loext:marker-style-name="T17"><text:span text:style-name="T17">Open the </text:span><text:span text:style-name="T19">Settings </text:span><text:span text:style-name="T17">menu of your phone.</text:span></text:p>
            </text:list-item>
            <text:list-item>
              <text:p text:style-name="P35" loext:marker-style-name="T17"><text:span text:style-name="T17">Scroll down to the bottom of the menu and tap on </text:span><text:span text:style-name="T19">About Phone</text:span><text:span text:style-name="T17">.</text:span></text:p>
            </text:list-item>
            <text:list-item>
              <text:p text:style-name="P35" loext:marker-style-name="T17"><text:span text:style-name="T17">Find the </text:span><text:span text:style-name="T19">Build Number</text:span><text:span text:style-name="T17">. This could be on the About Phone page, or under a sub-menu such as ‘Software Information’.</text:span></text:p>
            </text:list-item>
            <text:list-item>
              <text:p text:style-name="P35" loext:marker-style-name="T17"><text:span text:style-name="T17">Tap on the Build Number </text:span><text:span text:style-name="T19">seven times</text:span><text:span text:style-name="T17">. As you do this, you will see a series of messages appearing: “You are now 3 steps away from being a developer”, “You are now 2 steps away from being a developer”, “You are now 1 step away from being a developer”, “You are now a developer!”.</text:span></text:p>
            </text:list-item>
          </text:list>
        </text:list-item>
      </text:list>
      <text:p text:style-name="P36" loext:marker-style-name="T17"><draw:custom-shape text:anchor-type="char" draw:z-index="11" draw:style-name="gr3" draw:text-style-name="P37" svg:width="0.5953in" svg:height="0.3024in" draw:transform="rotate (-2.68571265296887) translate (4.54742454068241in 3.238757655293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4" draw:name="Picture 9" draw:style-name="gr2" draw:text-style-name="P3" svg:width="2.0732in" svg:height="3.6776in"><draw:image xlink:href="Pictures/10000000000002D000000500A2F1A810.png" xlink:type="simple" xlink:show="embed" xlink:actuate="onLoad" draw:mime-type="image/png"><text:p/></draw:image></draw:frame></text:p>
      <text:p text:style-name="P38" loext:marker-style-name="T17"/>
      <text:list text:continue-numbering="true" text:style-name="WWNum26">
        <text:list-item>
          <text:list>
            <text:list-item>
              <text:p text:style-name="P35" loext:marker-style-name="T17"><text:span text:style-name="T17">Now return to the Configuration menu of your phone. Look for the Developer Options menu item. You might see </text:span><text:span text:style-name="T19">Developer Options</text:span><text:span text:style-name="T17"> above the </text:span><text:span text:style-name="T19">About Phone</text:span><text:span text:style-name="T17"> menu item. If you do not see it here, it could be in </text:span><text:span text:style-name="T19">System</text:span><text:span text:style-name="T17"> settings, under </text:span><text:span text:style-name="T19">Advanced</text:span><text:span text:style-name="T17">. Different phones place Developer Options in different places, so look around your Configuration menu until you find it.</text:span></text:p>
            </text:list-item>
          </text:list>
        </text:list-item>
      </text:list>
      <text:p text:style-name="P36" loext:marker-style-name="T17"><draw:custom-shape text:anchor-type="char" draw:z-index="10" draw:style-name="gr3" draw:text-style-name="P37" svg:width="0.5953in" svg:height="0.3024in" draw:transform="rotate (-2.68571265296887) translate (4.45119750656168in 2.8852854330708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5" draw:name="Picture 10" draw:style-name="gr2" draw:text-style-name="P3" svg:width="2.1043in" svg:height="3.7295in"><draw:image xlink:href="Pictures/10000000000002D0000005002848B2DD.png" xlink:type="simple" xlink:show="embed" xlink:actuate="onLoad" draw:mime-type="image/png"><text:p/></draw:image></draw:frame></text:p>
      <text:p text:style-name="P38" loext:marker-style-name="T17"/>
      <text:list text:continue-numbering="true" text:style-name="WWNum26">
        <text:list-item>
          <text:list>
            <text:list-item>
              <text:p text:style-name="P35" loext:marker-style-name="T17"><text:span text:style-name="T17">Tap on </text:span><text:span text:style-name="T19">Developer Options</text:span><text:span text:style-name="T17"> and ensure that it is turned on.</text:span></text:p>
            </text:list-item>
            <text:list-item>
              <text:p text:style-name="P35" loext:marker-style-name="T17"><text:span text:style-name="T17">Scroll down the Developer Options page and find </text:span><text:span text:style-name="T19">USB Debugging</text:span><text:span text:style-name="T17">. Enable this setting. </text:span></text:p>
            </text:list-item>
          </text:list>
        </text:list-item>
      </text:list>
      <text:p text:style-name="P39" loext:marker-style-name="T17"><draw:custom-shape text:anchor-type="char" draw:z-index="7" draw:name="AutoShape 160" draw:style-name="gr3" draw:text-style-name="P37" svg:width="0.5953in" svg:height="0.3024in" draw:transform="rotate (-2.68571265296887) translate (4.80089676290464in 1.2943132108486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6" draw:name="Picture 12" draw:style-name="gr2" draw:text-style-name="P3" svg:width="2.0213in" svg:height="3.6043in"><draw:image xlink:href="Pictures/10000000000002D00000050009D20BA5.png" xlink:type="simple" xlink:show="embed" xlink:actuate="onLoad" draw:mime-type="image/png"><text:p/></draw:image></draw:frame></text:p>
      <text:p text:style-name="P40" loext:marker-style-name="T17"/>
      <text:p text:style-name="P41" loext:marker-style-name="T17"><text:span text:style-name="T17">When you do this, you will probably get a message “Allow USB Debugging?”. Tap </text:span><text:span text:style-name="T19">OK</text:span><text:span text:style-name="T17">.</text:span></text:p>
      <text:p text:style-name="P39" loext:marker-style-name="T17"><draw:custom-shape text:anchor-type="char" draw:z-index="8" draw:style-name="gr3" draw:text-style-name="P37" svg:width="0.5953in" svg:height="0.3024in" draw:transform="rotate (-2.68571265296887) translate (4.6484197287839in 2.2759569116360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7" draw:name="Picture 13" draw:style-name="gr2" draw:text-style-name="P3" svg:width="2.063in" svg:height="3.6669in"><draw:image xlink:href="Pictures/10000000000002D000000500C6B6F629.png" xlink:type="simple" xlink:show="embed" xlink:actuate="onLoad" draw:mime-type="image/png"><text:p/></draw:image></draw:frame></text:p>
      <text:p text:style-name="P42" loext:marker-style-name="T17"/>
      <text:p text:style-name="P43" loext:marker-style-name="T17"><text:span text:style-name="T17">If you see a message box like this, tap </text:span><text:span text:style-name="T19">OK</text:span><text:span text:style-name="T17">:</text:span></text:p>
      <text:p text:style-name="P36" loext:marker-style-name="T17"><draw:custom-shape text:anchor-type="char" draw:z-index="9" draw:style-name="gr3" draw:text-style-name="P37" svg:width="0.5953in" svg:height="0.3024in" draw:transform="rotate (-2.68571265296887) translate (4.42728565179353in 2.308202099737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18" draw:name="Picture 14" draw:style-name="gr2" draw:text-style-name="P3" svg:width="2.063in" svg:height="3.6669in"><draw:image xlink:href="Pictures/10000000000002D000000500929119A0.png" xlink:type="simple" xlink:show="embed" xlink:actuate="onLoad" draw:mime-type="image/png"><text:p/></draw:image></draw:frame></text:p>
      <text:p text:style-name="P38" loext:marker-style-name="T17"/>
      <text:p text:style-name="P38" loext:marker-style-name="T17"/>
      <text:list text:continue-numbering="true" text:style-name="WWNum26">
        <text:list-item>
          <text:p text:style-name="P33" loext:marker-style-name="T17"><text:span text:style-name="T17">In Keyboard App Builder, click the </text:span><text:span text:style-name="T19">Install APK</text:span><text:span text:style-name="T17"> button on the toolbar at the top right of the screen.</text:span></text:p>
        </text:list-item>
      </text:list>
      <text:p text:style-name="P29" loext:marker-style-name="T17"/>
      <text:p text:style-name="List_20_Paragraph" loext:marker-style-name="T17"><text:span text:style-name="T17">A command window will open and the APK file will be copied to your phone, installed and the app will be launched. </text:span><text:span text:style-name="T17"/></text:p>
      <text:p text:style-name="P29" loext:marker-style-name="T17"/>
      <text:p text:style-name="List_20_Paragraph" loext:marker-style-name="T17"><text:span text:style-name="T17">If this does not work, look at the command window to see if there is an error message. If you see a message such as “No devices/emulators found”, it means that your phone and computer are not connected correctly or that you have not enabled USB debugging on your phone.</text:span><text:span text:style-name="T17"/></text:p>
      <text:p text:style-name="P28" loext:marker-style-name="T17"/>
      <text:p text:style-name="P28" loext:marker-style-name="T17"/>
      <text:p text:style-name="Standard" loext:marker-style-name="T24"><text:span text:style-name="T24">Note:</text:span><text:span text:style-name="T24"/></text:p>
      <text:p text:style-name="Standard" loext:marker-style-name="T17"><text:span text:style-name="T17">Described above is a two-step process: </text:span><text:span text:style-name="T19">Build App</text:span><text:span text:style-name="T17"> and then </text:span><text:span text:style-name="T19">Install APK</text:span><text:span text:style-name="T17">. If you prefer, you can tell Keyboard App Builder to do this in one step, i.e. for the APK to be installed and launched automatically after building an app. See </text:span><text:span text:style-name="T18">Tools</text:span><text:span text:style-name="T17"> </text:span><text:span text:style-name="T21"></text:span><text:span text:style-name="T22"> </text:span><text:span text:style-name="T18">Settings…</text:span><text:span text:style-name="T17"> </text:span><text:span text:style-name="T21"></text:span><text:span text:style-name="T17"> </text:span><text:span text:style-name="T18">After Build</text:span><text:span text:style-name="T17"> to enable this feature.</text:span></text:p>
      <text:p text:style-name="P28" loext:marker-style-name="T17"/>
      <text:p text:style-name="P8" loext:marker-style-name="T7"/>
      <text:p text:style-name="P8" loext:marker-style-name="T7"/>
      <text:h text:style-name="P17" text:outline-level="1" loext:marker-style-name="T7"><text:bookmark-start text:name="_Toc129968042"/><text:span text:style-name="T7">App Creation Basics</text:span><text:bookmark-end text:name="_Toc129968042"/><text:span text:style-name="T7"/></text:h>
      <text:h text:style-name="P44" text:outline-level="2" loext:marker-style-name="T7"><text:bookmark-start text:name="_Toc129968043"/><text:span text:style-name="T7">How should I choose the app package name?</text:span><text:bookmark-end text:name="_Toc129968043"/><text:span text:style-name="T7"/></text:h>
      <text:p text:style-name="P32" loext:marker-style-name="T7"><text:span text:style-name="T7">The standard for an app package name is to begin with the reversed web address of the publishing organisation, e.g. if it is SIL, the package name could begin with: </text:span><text:span text:style-name="T7"/></text:p>
      <text:p text:style-name="P45" loext:marker-style-name="T25"><text:span text:style-name="T25">org.sil</text:span><text:span text:style-name="T25"/></text:p>
      <text:p text:style-name="P46" loext:marker-style-name="T7"/>
      <text:p text:style-name="Standard" loext:marker-style-name="T7"><text:span text:style-name="T7">and will be followed by something identifying the language, country, and type of publication, e.g.</text:span><text:span text:style-name="T7"/></text:p>
      <text:p text:style-name="P8" loext:marker-style-name="T7"/>
      <text:p text:style-name="P47" loext:marker-style-name="T25"><text:span text:style-name="T25">org.sil.niger.keyboard</text:span><text:span text:style-name="T25"/></text:p>
      <text:p text:style-name="P8" loext:marker-style-name="T7"/>
      <text:p text:style-name="Standard" loext:marker-style-name="T7"><text:span text:style-name="T7">If you work for a university or linguistics organisation, you might have standards to follow for package names, so please contact your digital publications coordinator for advice on this.</text:span><text:span text:style-name="T7"/></text:p>
      <text:p text:style-name="P8" loext:marker-style-name="T7"/>
      <text:p text:style-name="Standard" loext:marker-style-name="T7"><text:span text:style-name="T7">Once you publish your app on an app store, you cannot change its package name later if you want users to continue to receive updates. The package name uniquely identifies the app in the Android world. Those who install the app will be able to find its package name on their device. It will also appear in the web address for your app if you make it available on Google Play.</text:span><text:span text:style-name="T7"/></text:p>
      <text:p text:style-name="P8" loext:marker-style-name="T7"/>
      <text:p text:style-name="Standard" loext:marker-style-name="T7"><text:span text:style-name="T7">If you are building apps for </text:span><text:span text:style-name="T14">test purposes </text:span><text:span text:style-name="T7">on your devices, you can use a package name beginning with com.example, e.g.</text:span></text:p>
      <text:p text:style-name="P8" loext:marker-style-name="T7"/>
      <text:p text:style-name="Standard" loext:marker-style-name="T25"><text:span text:style-name="T25"><text:tab/>com.example.test.app123</text:span><text:span text:style-name="T25"/></text:p>
      <text:p text:style-name="P8" loext:marker-style-name="T7"/>
      <text:p text:style-name="Standard" loext:marker-style-name="T7"><text:span text:style-name="T7">But remember to change it before you publish the app.</text:span><text:span text:style-name="T7"/></text:p>
      <text:p text:style-name="P8" loext:marker-style-name="T7"/>
      <text:h text:style-name="P44" text:outline-level="2" loext:marker-style-name="T7"><text:bookmark-start text:name="_Toc129968044"/><text:span text:style-name="T7">Do I have to create a new keystore for each app, or can I reuse the same keystore for several of my apps?</text:span><text:bookmark-end text:name="_Toc129968044"/><text:span text:style-name="T7"/></text:h>
      <text:p text:style-name="Standard" loext:marker-style-name="T7"><text:span text:style-name="T7">You can use the same keystore and key alias for all or several of your apps.</text:span><text:span text:style-name="T7"/></text:p>
      <text:p text:style-name="P8" loext:marker-style-name="T7"/>
      <text:p text:style-name="P12" loext:marker-style-name="T7"><text:span text:style-name="T7">See here for more details: </text:span><text:span text:style-name="T7"/></text:p>
      <text:p text:style-name="P47" loext:marker-style-name="T7"><text:a xlink:type="simple" xlink:href="http://developer.android.com/tools/publishing/app-signing.html" text:style-name="Internet_20_link" text:visited-style-name="Visited_20_Internet_20_Link"><text:span text:style-name="Internet_20_link"><text:span text:style-name="T7">http://developer.android.com/tools/publishing/app-signing.html</text:span></text:span></text:a><text:span text:style-name="T7"> </text:span></text:p>
      <text:p text:style-name="P48" loext:marker-style-name="T7"/>
      <text:h text:style-name="P44" text:outline-level="2" loext:marker-style-name="T7"><text:bookmark-start text:name="_Toc129968045"/><text:span text:style-name="T7">Can I build apps when I do not have internet access?</text:span><text:bookmark-end text:name="_Toc129968045"/><text:span text:style-name="T7"/></text:h>
      <text:p text:style-name="Standard" loext:marker-style-name="T7"><text:span text:style-name="T7">The first time you build an app, you will need to be connected to the internet otherwise the compiler will fail. After that you can set the 'offline' version in </text:span><text:span text:style-name="T14">Settings</text:span><text:span text:style-name="T7"> so you can work offline.</text:span></text:p>
      <text:p text:style-name="P8" loext:marker-style-name="T7"/>
      <text:h text:style-name="Heading_20_1" text:outline-level="1" loext:marker-style-name="T7"><text:bookmark-start text:name="_Toc129968046"/><text:bookmark-start text:name="_Toc500152989"/><text:bookmark-start text:name="_Toc498952700"/><text:span text:style-name="T7">Home and Setup Screens</text:span><text:bookmark-end text:name="_Toc129968046"/><text:span text:style-name="T7"/></text:h>
      <text:p text:style-name="P49" loext:marker-style-name="T7"><text:span text:style-name="T7">There are two main screens in an app built with Keyboard App Builder: </text:span><text:span text:style-name="T7"/></text:p>
      <text:list text:continue-list="list131349642017952" text:style-name="WWNum25">
        <text:list-item>
          <text:p text:style-name="P50" loext:marker-style-name="T7"><text:span text:style-name="T7">the Home screen, and</text:span><text:span text:style-name="T7"/></text:p>
        </text:list-item>
        <text:list-item>
          <text:p text:style-name="P51" loext:marker-style-name="T7"><text:span text:style-name="T7">the Setup screen.</text:span><text:span text:style-name="T7"/></text:p>
        </text:list-item>
      </text:list>
      <text:p text:style-name="P52" loext:marker-style-name="T7"/>
      <text:h text:style-name="P44" text:outline-level="2" loext:marker-style-name="T7"><text:bookmark-start text:name="_Toc129968047"/><text:span text:style-name="T7">Home Screen</text:span><text:bookmark-end text:name="_Toc129968047"/><text:span text:style-name="T7"/></text:h>
      <text:p text:style-name="Standard" loext:marker-style-name="T7"><text:span text:style-name="T7">The Home screen is shown when the user launches the app. It contains an optional picture at the top, followed by a heading and some introductory text. Below this is the </text:span><text:span text:style-name="T13">Set Up Keyboard</text:span><text:span text:style-name="T7"> button, and then some more text.</text:span></text:p>
      <text:p text:style-name="P8" loext:marker-style-name="T7"/>
      <text:p text:style-name="P2" loext:marker-style-name="T7"><draw:frame text:anchor-type="as-char" draw:z-index="19" draw:style-name="gr2" draw:text-style-name="P3" svg:width="2.2606in" svg:height="4.7295in"><draw:image xlink:href="Pictures/1000000100000438000008DEEFA2A554.png" xlink:type="simple" xlink:show="embed" xlink:actuate="onLoad" draw:mime-type="image/png"><text:p/></draw:image></draw:frame></text:p>
      <text:p text:style-name="P8" loext:marker-style-name="T7"/>
      <text:p text:style-name="Standard" loext:marker-style-name="T4"><text:span text:style-name="T7">To configure the image and text on the Home screen, select </text:span><text:span text:style-name="T13">Screens</text:span><text:span text:style-name="T7"> from the tree view on the left of the KAB program window and select the </text:span><text:span text:style-name="T26">Home Screen</text:span><text:span text:style-name="T4"> tab. Follow the instructions on the screen.</text:span></text:p>
      <text:p text:style-name="P8" loext:marker-style-name="T7"/>
      <text:h text:style-name="P53" text:outline-level="2" loext:marker-style-name="T7"><text:bookmark-start text:name="_Toc129968048"/><text:span text:style-name="T7">Setup Screen</text:span><text:bookmark-end text:name="_Toc129968048"/><text:span text:style-name="T7"/></text:h>
      <text:p text:style-name="Standard" loext:marker-style-name="T7"><text:span text:style-name="T7">The Setup screen is shown after the user taps the </text:span><text:span text:style-name="T13">Set Up Keyboard</text:span><text:span text:style-name="T7"> button on the Home screen. It contains some introductory text and then two or three steps. </text:span></text:p>
      <text:p text:style-name="P8" loext:marker-style-name="T7"/>
      <text:p text:style-name="P2" loext:marker-style-name="T7"><draw:frame text:anchor-type="as-char" draw:z-index="20" draw:style-name="gr2" draw:text-style-name="P3" svg:width="2.2295in" svg:height="4.7295in"><draw:image xlink:href="Pictures/1000000100000438000008DEBDD55097.png" xlink:type="simple" xlink:show="embed" xlink:actuate="onLoad" draw:mime-type="image/png"><text:p/></draw:image></draw:frame><text:span text:style-name="T7"><text:s text:c="10"/></text:span><draw:frame text:anchor-type="as-char" draw:z-index="21" draw:style-name="gr2" draw:text-style-name="P3" svg:width="2.2295in" svg:height="4.7295in"><draw:image xlink:href="Pictures/1000000100000438000008DEF2FCC2B1.png" xlink:type="simple" xlink:show="embed" xlink:actuate="onLoad" draw:mime-type="image/png"><text:p/></draw:image></draw:frame></text:p>
      <text:p text:style-name="P8" loext:marker-style-name="T7"/>
      <text:p text:style-name="P8" loext:marker-style-name="T7"/>
      <text:p text:style-name="Standard" loext:marker-style-name="T7"><text:span text:style-name="T7">Whether you see two or three steps will depend on how many keyboards you have added to the app:</text:span><text:span text:style-name="T7"/></text:p>
      <text:p text:style-name="P8" loext:marker-style-name="T7"/>
      <table:table table:name="Table1" table:style-name="Table1">
        <table:table-column table:style-name="Table1.A"/>
        <table:table-column table:style-name="Table1.B"/>
        <table:table-row table:style-name="Table1.1">
          <table:table-cell table:style-name="Table1.A1" office:value-type="string">
            <text:p text:style-name="Standard" loext:marker-style-name="T13"><text:span text:style-name="T13">Only one keyboard layout</text:span><text:span text:style-name="T13"/></text:p>
          </table:table-cell>
          <table:table-cell table:style-name="Table1.A1" office:value-type="string">
            <text:p text:style-name="Standard" loext:marker-style-name="T13"><text:span text:style-name="T13">More than one keyboard layout</text:span><text:span text:style-name="T13"/></text:p>
          </table:table-cell>
        </table:table-row>
        <table:table-row table:style-name="Table1.1">
          <table:table-cell table:style-name="Table1.A1" office:value-type="string">
            <text:p text:style-name="P8" loext:marker-style-name="T7"/>
            <text:p text:style-name="Standard" loext:marker-style-name="T7"><text:span text:style-name="T13">Step 1:</text:span><text:span text:style-name="T7"> Enable keyboard</text:span></text:p>
            <text:p text:style-name="P8" loext:marker-style-name="T7"/>
            <text:p text:style-name="Standard" loext:marker-style-name="T7"><text:span text:style-name="T13">Step 2:</text:span><text:span text:style-name="T7"> Change keyboard</text:span></text:p>
            <text:p text:style-name="P8" loext:marker-style-name="T7"/>
          </table:table-cell>
          <table:table-cell table:style-name="Table1.A1" office:value-type="string">
            <text:p text:style-name="P8" loext:marker-style-name="T7"/>
            <text:p text:style-name="Standard" loext:marker-style-name="T7"><text:span text:style-name="T13">Step 1:</text:span><text:span text:style-name="T7"> Choose keyboard</text:span></text:p>
            <text:p text:style-name="P8" loext:marker-style-name="T7"/>
            <text:p text:style-name="Standard" loext:marker-style-name="T7"><text:span text:style-name="T13">Step 2:</text:span><text:span text:style-name="T7"> Enable keyboard</text:span></text:p>
            <text:p text:style-name="P8" loext:marker-style-name="T7"/>
            <text:p text:style-name="Standard" loext:marker-style-name="T7"><text:span text:style-name="T13">Step 3:</text:span><text:span text:style-name="T7"> Change keyboard</text:span></text:p>
            <text:p text:style-name="P8" loext:marker-style-name="T7"/>
          </table:table-cell>
        </table:table-row>
      </table:table>
      <text:p text:style-name="P8" loext:marker-style-name="T7"/>
      <text:p text:style-name="P8" loext:marker-style-name="T7"/>
      <text:p text:style-name="Standard" loext:marker-style-name="T4"><text:span text:style-name="T7">To configure the image and text on the Setup screen, select </text:span><text:span text:style-name="T13">Screens</text:span><text:span text:style-name="T7"> from the tree view on the left of the KAB program window and select the </text:span><text:span text:style-name="T26">Setup Screen</text:span><text:span text:style-name="T4"> tab. Follow the instructions on the screen.</text:span></text:p>
      <text:p text:style-name="P54" loext:marker-style-name="T4"/>
      <text:p text:style-name="P32" loext:marker-style-name="T27"><text:span text:style-name="T27">Choose Keyboard</text:span><text:span text:style-name="T27"/></text:p>
      <text:p text:style-name="P32" loext:marker-style-name="T4"><text:span text:style-name="T4">When the user taps the </text:span><text:span text:style-name="T26">Choose Keyboards</text:span><text:span text:style-name="T4"> button, the Choose Keyboards screen will appear. One or more keyboards should be chosen.</text:span></text:p>
      <text:p text:style-name="P54" loext:marker-style-name="T4"/>
      <text:p text:style-name="P32" loext:marker-style-name="T4"><text:span text:style-name="T4">For example, in the image below, the app allows the user to choose between a QWERTY and an AZERTY keyboard layout.</text:span><text:span text:style-name="T4"/></text:p>
      <text:p text:style-name="P54" loext:marker-style-name="T4"/>
      <text:p text:style-name="P55" loext:marker-style-name="T4"><draw:custom-shape text:anchor-type="char" draw:z-index="5" draw:style-name="gr4" draw:text-style-name="P56" svg:width="0.5941in" svg:height="0.3335in" draw:transform="rotate (-3.14159265358979) translate (5.97300962379703in 1.44791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1" draw:style-name="gr4" draw:text-style-name="P56" svg:width="0.5941in" svg:height="0.3335in" svg:x="0.2228in" svg:y="1.47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 text:style-name="T7"><text:s/></text:span><draw:frame text:anchor-type="as-char" draw:z-index="22" draw:style-name="gr2" draw:text-style-name="P3" svg:width="2.2295in" svg:height="4.7295in"><draw:image xlink:href="Pictures/1000000100000438000008DEF2FCC2B1.png" xlink:type="simple" xlink:show="embed" xlink:actuate="onLoad" draw:mime-type="image/png"><text:p/></draw:image></draw:frame><text:span text:style-name="T7"><text:s text:c="11"/></text:span><draw:frame text:anchor-type="as-char" draw:z-index="23" draw:style-name="gr2" draw:text-style-name="P3" svg:width="2.2295in" svg:height="4.7295in"><draw:image xlink:href="Pictures/1000000100000438000008DE9D7FD64E.png" xlink:type="simple" xlink:show="embed" xlink:actuate="onLoad" draw:mime-type="image/png"><text:p/></draw:image></draw:frame></text:p>
      <text:p text:style-name="P57" loext:marker-style-name="T4"/>
      <text:p text:style-name="P6" loext:marker-style-name="T4"/>
      <text:p text:style-name="P32" loext:marker-style-name="T27"><text:span text:style-name="T27">Enable Keyboard</text:span><text:span text:style-name="T27"/></text:p>
      <text:p text:style-name="P32" loext:marker-style-name="T4"><text:span text:style-name="T4">When the user taps the </text:span><text:span text:style-name="T26">Enable Keyboard</text:span><text:span text:style-name="T4"> button, the phone’s </text:span><text:span text:style-name="T26">Manage keyboards</text:span><text:span text:style-name="T4"> screen will appear. They need to tap on the new keyboard to enable it.</text:span></text:p>
      <text:p text:style-name="P54" loext:marker-style-name="T4"/>
      <text:p text:style-name="P32" loext:marker-style-name="T4"><text:span text:style-name="T4">When they do this, Android will warn them that this input method could be dangerous. They should not worry: a Keyman keyboard does not collect any personal data.</text:span><text:span text:style-name="T4"/></text:p>
      <text:p text:style-name="P52" loext:marker-style-name="T7"/>
      <text:p text:style-name="P52" loext:marker-style-name="T7"/>
      <text:p text:style-name="P55" loext:marker-style-name="T7"><draw:custom-shape text:anchor-type="char" draw:z-index="6" draw:style-name="gr4" draw:text-style-name="P56" svg:width="0.5941in" svg:height="0.3335in" draw:transform="rotate (-3.14159265358979) translate (5.98550962379703in 1.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2" draw:style-name="gr4" draw:text-style-name="P56" svg:width="0.5941in" svg:height="0.3335in" svg:x="0.2646in" svg:y="2.2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24" draw:style-name="gr2" draw:text-style-name="P3" svg:width="2.2295in" svg:height="4.7295in"><draw:image xlink:href="Pictures/1000000100000438000008DEF2FCC2B1.png" xlink:type="simple" xlink:show="embed" xlink:actuate="onLoad" draw:mime-type="image/png"><text:p/></draw:image></draw:frame><text:span text:style-name="T7"><text:s text:c="11"/></text:span><draw:frame text:anchor-type="as-char" draw:z-index="25" draw:style-name="gr2" draw:text-style-name="P3" svg:width="2.2606in" svg:height="4.7295in"><draw:image xlink:href="Pictures/1000000100000438000008DE99E4F002.png" xlink:type="simple" xlink:show="embed" xlink:actuate="onLoad" draw:mime-type="image/png"><text:p/></draw:image></draw:frame></text:p>
      <text:p text:style-name="P52" loext:marker-style-name="T7"/>
      <text:p text:style-name="P52" loext:marker-style-name="T7"/>
      <text:p text:style-name="P6" loext:marker-style-name="T4"/>
      <text:p text:style-name="P58" loext:marker-style-name="T27"><text:span text:style-name="T27">Change Keyboard</text:span><text:span text:style-name="T27"/></text:p>
      <text:p text:style-name="P58" loext:marker-style-name="T4"><text:span text:style-name="T4">When the user taps the </text:span><text:span text:style-name="T26">Change Keyboard</text:span><text:span text:style-name="T4"> button, the phone’s </text:span><text:span text:style-name="T26">Change Keyboard</text:span><text:span text:style-name="T4"> dialog box will appear. They need to tap on the new keyboard to make it the current one.</text:span></text:p>
      <text:p text:style-name="P59" loext:marker-style-name="T4"/>
      <text:p text:style-name="P60" loext:marker-style-name="T7"/>
      <text:p text:style-name="P2" loext:marker-style-name="T7"><draw:custom-shape text:anchor-type="char" draw:z-index="4" draw:style-name="gr4" draw:text-style-name="P56" svg:width="0.5941in" svg:height="0.3335in" draw:transform="rotate (-3.14159265358979) translate (5.67092629046369in 2.7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3" draw:style-name="gr4" draw:text-style-name="P56" svg:width="0.5941in" svg:height="0.3335in" svg:x="0.3165in" svg:y="3.804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26" draw:style-name="gr2" draw:text-style-name="P3" svg:width="2.2295in" svg:height="4.7295in"><draw:image xlink:href="Pictures/1000000100000438000008DEF2FCC2B1.png" xlink:type="simple" xlink:show="embed" xlink:actuate="onLoad" draw:mime-type="image/png"><text:p/></draw:image></draw:frame><text:span text:style-name="T7"><text:s text:c="11"/></text:span><draw:frame text:anchor-type="as-char" draw:z-index="27" draw:style-name="gr2" draw:text-style-name="P3" svg:width="2.2295in" svg:height="4.7295in"><draw:image xlink:href="Pictures/1000000100000438000008DE5204CAA0.png" xlink:type="simple" xlink:show="embed" xlink:actuate="onLoad" draw:mime-type="image/png"><text:p/></draw:image></draw:frame></text:p>
      <text:p text:style-name="P61" loext:marker-style-name="T7"/>
      <text:p text:style-name="P61" loext:marker-style-name="T7"/>
      <text:p text:style-name="Standard" loext:marker-style-name="T7"><text:span text:style-name="T7">After completing each of the two or three steps, the keyboard is ready to be used in other apps such as WhatsApp, Gmail and Facebook.</text:span><text:span text:style-name="T7"/></text:p>
      <text:h text:style-name="Heading_20_1" text:outline-level="1" loext:marker-style-name="T7"><text:bookmark-start text:name="_Toc129968049"/><text:span text:style-name="T7">Navigation Drawer</text:span><text:bookmark-end text:name="_Toc129968049"/><text:bookmark-end text:name="_Toc500152989"/><text:bookmark-end text:name="_Toc498952700"/><text:span text:style-name="T7"/></text:h>
      <text:p text:style-name="P62" loext:marker-style-name="T28"/>
      <text:p text:style-name="P32" loext:marker-style-name="T29"><text:span text:style-name="T29">You can customise the image that appears at the top of the navigation drawer. It can be a photo, your organisation’s logo or any relevant graphic design.</text:span><text:span text:style-name="T29"/></text:p>
      <text:p text:style-name="P63" loext:marker-style-name="T29"/>
      <text:p text:style-name="P63" loext:marker-style-name="T29"/>
      <text:p text:style-name="P55" loext:marker-style-name="T29"><draw:custom-shape text:anchor-type="char" draw:z-index="0" draw:style-name="gr3" draw:text-style-name="P37" svg:width="0.5953in" svg:height="0.3024in" draw:transform="rotate (0.678409480250196) translate (0.0755686789151356in 1.663959973753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28" draw:style-name="gr2" draw:text-style-name="P3" svg:width="2.2087in" svg:height="3.9378in"><draw:image xlink:href="Pictures/100000000000043800000780DE9F472F.png" xlink:type="simple" xlink:show="embed" xlink:actuate="onLoad" draw:mime-type="image/png"><text:p/></draw:image></draw:frame><text:span text:style-name="T29"><text:s text:c="13"/></text:span><draw:frame text:anchor-type="as-char" draw:z-index="29" draw:style-name="gr2" draw:text-style-name="P3" svg:width="2.2087in" svg:height="3.9378in"><draw:image xlink:href="Pictures/100000000000043800000780E2D43E62.png" xlink:type="simple" xlink:show="embed" xlink:actuate="onLoad" draw:mime-type="image/png"><text:p/></draw:image></draw:frame></text:p>
      <text:p text:style-name="P63" loext:marker-style-name="T29"/>
      <text:p text:style-name="P63" loext:marker-style-name="T29"/>
      <text:p text:style-name="P32" loext:marker-style-name="T29"><text:span text:style-name="T29">Specify a landscape image file on the </text:span><text:span text:style-name="T30">Appearance</text:span><text:span text:style-name="T29"> </text:span><text:span text:style-name="T21"></text:span><text:span text:style-name="T4"> </text:span><text:span text:style-name="T30">Graphics</text:span><text:span text:style-name="T29"> </text:span><text:span text:style-name="T21"></text:span><text:span text:style-name="T4"> </text:span><text:span text:style-name="T31">Navigation Drawer</text:span><text:span text:style-name="T4"> page.</text:span></text:p>
      <text:p text:style-name="P8" loext:marker-style-name="T7"/>
      <text:p text:style-name="Standard"/>
      <text:p text:style-name="Standard"/>
      <text:h text:style-name="Heading_20_1" text:outline-level="1" loext:marker-style-name="T7"><text:bookmark-start text:name="_Toc129968050"/><text:span text:style-name="T7">Distribution</text:span><text:bookmark-end text:name="_Toc129968050"/><text:span text:style-name="T7"/></text:h>
      <text:p text:style-name="Standard" loext:marker-style-name="T7"><text:span text:style-name="T7">Android apps built with Keyboard App Builder can be published on the Google Play store, distributed on memory cards, shared by Bluetooth or Wi-Fi transfer, uploaded to websites, or sent out by email.</text:span><text:span text:style-name="T7"/></text:p>
      <text:p text:style-name="P8" loext:marker-style-name="T7"/>
      <text:p text:style-name="Standard" loext:marker-style-name="T7"><text:span text:style-name="T7">For more information, please see the user manual: </text:span><text:span text:style-name="T16">Distributing Apps</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543in" fo:margin-top="0.1665in" fo:margin-bottom="0.0417in" style:contextual-spacing="false" fo:text-indent="-0.3543in" style:auto-text-indent="false" fo:keep-with-next="always">
        <style:tab-stops>
          <style:tab-stop style:position="0.3154in"/>
        </style:tab-stops>
      </style:paragraph-properties>
      <style:text-properties fo:font-weight="bold"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6252in" fo:margin-top="0.0835in" fo:margin-bottom="0in" style:contextual-spacing="false" fo:text-indent="-0.4598in" style:auto-text-indent="false">
        <style:tab-stops>
          <style:tab-stop style:position="0.5736in"/>
          <style:tab-stop style:position="5.978in" style:type="right" style:leader-style="dotted" style:leader-text="."/>
        </style:tab-stops>
      </style:paragraph-properties>
      <style:text-properties fo:language="en" fo:country="US"/>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List_20_Paragraph" style:display-name="List Paragraph" style:family="paragraph" style:parent-style-name="Standard">
      <style:paragraph-properties fo:margin-left="0.5i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name-complex="Times New Roman2" style:font-family-complex="'Times New Roman'" style:font-family-generic-complex="system" style:font-pitch-complex="variable" style:font-size-complex="12pt"/>
    </style:style>
    <style:style style:name="Page_20_Number" style:display-name="Page Number" style:family="text">
      <style:text-properties style:font-name-complex="Times New Roman2"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name-complex="Times New Roman2" style:font-family-complex="'Times New Roman'" style:font-family-generic-complex="system" style:font-pitch-complex="variable"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2" style:font-family-complex="'Times New Roman'" style:font-family-generic-complex="system" style:font-pitch-complex="variable"/>
    </style:style>
    <style:style style:name="markerplain" style:family="text"/>
    <style:style style:name="Unresolved_20_Mention1" style:display-name="Unresolved Mention1" style:family="text">
      <style:text-properties fo:color="#808080" loext:opacity="100%" fo:background-color="#e6e6e6"/>
    </style:style>
    <style:style style:name="Strong_20_Emphasis" style:display-name="Strong Emphasis" style:family="text">
      <style:text-properties fo:font-weight="bold" style:font-weight-asian="bold" style:font-weight-complex="bold"/>
    </style:style>
    <style:style style:name="Unresolved_20_Mention" style:display-name="Unresolved Mention" style:family="text">
      <style:text-properties fo:color="#605e5c" loext:opacity="100%" fo:background-color="#e1dfdd"/>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weight="bold"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weight="normal" style:font-weight-asian="normal"/>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weight="normal" style:font-weight-asian="normal"/>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09" style:display-name="ListLabel 209" style:family="text">
      <style:text-properties style:font-name-complex="Times New Roman2" style:font-family-complex="'Times New Roman'" style:font-family-generic-complex="system" style:font-pitch-complex="variable"/>
    </style:style>
    <style:style style:name="ListLabel_20_210" style:display-name="ListLabel 210" style:family="text">
      <style:text-properties style:font-name-complex="Times New Roman2" style:font-family-complex="'Times New Roman'" style:font-family-generic-complex="system" style:font-pitch-complex="variable"/>
    </style:style>
    <style:style style:name="ListLabel_20_211" style:display-name="ListLabel 211" style:family="text">
      <style:text-properties style:font-name-complex="Times New Roman2" style:font-family-complex="'Times New Roman'" style:font-family-generic-complex="system" style:font-pitch-complex="variable"/>
    </style:style>
    <style:style style:name="ListLabel_20_212" style:display-name="ListLabel 212" style:family="text">
      <style:text-properties style:font-name-complex="Times New Roman2" style:font-family-complex="'Times New Roman'" style:font-family-generic-complex="system" style:font-pitch-complex="variable"/>
    </style:style>
    <style:style style:name="ListLabel_20_213" style:display-name="ListLabel 213" style:family="text">
      <style:text-properties style:font-name-complex="Times New Roman2" style:font-family-complex="'Times New Roman'" style:font-family-generic-complex="system" style:font-pitch-complex="variable"/>
    </style:style>
    <style:style style:name="ListLabel_20_214" style:display-name="ListLabel 214" style:family="text">
      <style:text-properties style:font-name-complex="Times New Roman2" style:font-family-complex="'Times New Roman'" style:font-family-generic-complex="system" style:font-pitch-complex="variable"/>
    </style:style>
    <style:style style:name="ListLabel_20_215" style:display-name="ListLabel 215" style:family="text">
      <style:text-properties style:font-name-complex="Times New Roman2" style:font-family-complex="'Times New Roman'" style:font-family-generic-complex="system" style:font-pitch-complex="variable"/>
    </style:style>
    <style:style style:name="ListLabel_20_216" style:display-name="ListLabel 216" style:family="text">
      <style:text-properties style:font-name-complex="Times New Roman2"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Wingdings" style:font-family-complex="Wingdings"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Wingdings" style:font-family-complex="Wingdings"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Times New Roman2" style:font-family-complex="'Times New Roman'" style:font-family-generic-complex="system" style:font-pitch-complex="variable"/>
    </style:style>
    <style:style style:name="ListLabel_20_227" style:display-name="ListLabel 227" style:family="text">
      <style:text-properties style:font-name-complex="Times New Roman2" style:font-family-complex="'Times New Roman'" style:font-family-generic-complex="system" style:font-pitch-complex="variable"/>
    </style:style>
    <style:style style:name="ListLabel_20_228" style:display-name="ListLabel 228" style:family="text">
      <style:text-properties style:font-name-complex="Times New Roman2" style:font-family-complex="'Times New Roman'" style:font-family-generic-complex="system" style:font-pitch-complex="variable"/>
    </style:style>
    <style:style style:name="ListLabel_20_229" style:display-name="ListLabel 229" style:family="text">
      <style:text-properties style:font-name-complex="Times New Roman2" style:font-family-complex="'Times New Roman'" style:font-family-generic-complex="system" style:font-pitch-complex="variable"/>
    </style:style>
    <style:style style:name="ListLabel_20_230" style:display-name="ListLabel 230" style:family="text">
      <style:text-properties style:font-name-complex="Times New Roman2" style:font-family-complex="'Times New Roman'" style:font-family-generic-complex="system" style:font-pitch-complex="variable"/>
    </style:style>
    <style:style style:name="ListLabel_20_231" style:display-name="ListLabel 231" style:family="text">
      <style:text-properties style:font-name-complex="Times New Roman2" style:font-family-complex="'Times New Roman'" style:font-family-generic-complex="system" style:font-pitch-complex="variable"/>
    </style:style>
    <style:style style:name="ListLabel_20_232" style:display-name="ListLabel 232" style:family="text">
      <style:text-properties style:font-name-complex="Times New Roman2" style:font-family-complex="'Times New Roman'" style:font-family-generic-complex="system" style:font-pitch-complex="variable"/>
    </style:style>
    <style:style style:name="ListLabel_20_233" style:display-name="ListLabel 233" style:family="text">
      <style:text-properties style:font-name-complex="Times New Roman2" style:font-family-complex="'Times New Roman'" style:font-family-generic-complex="system" style:font-pitch-complex="variable"/>
    </style:style>
    <style:style style:name="ListLabel_20_234" style:display-name="ListLabel 234" style:family="text">
      <style:text-properties style:font-name-complex="Times New Roman2" style:font-family-complex="'Times New Roman'" style:font-family-generic-complex="system" style:font-pitch-complex="variable"/>
    </style:style>
    <style:style style:name="ListLabel_20_235" style:display-name="ListLabel 235" style:family="text">
      <style:text-properties fo:language="en" fo:country="GB"/>
    </style:style>
    <style:style style:name="ListLabel_20_236" style:display-name="ListLabel 236" style:family="text"/>
    <style:style style:name="ListLabel_20_237" style:display-name="ListLabel 237" style:family="text">
      <style:text-properties fo:language="en" fo:country="U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20"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21"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22"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23"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24"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25"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26"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27"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Calibri"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32"><draw:text-box fo:min-height="0in" fo:min-width="0.0161in"><text:p text:style-name="MP1" loext:marker-style-name="Page Number"><text:span text:style-name="Page_20_Number"><text:page-number text:select-page="current">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Keyboard App Builder: Building Apps</dc:title>
    <meta:initial-creator>Richard Margetts</meta:initial-creator>
    <dc:creator>Richard Margetts</dc:creator>
    <meta:editing-cycles>278</meta:editing-cycles>
    <meta:print-date>2019-01-04T10:21:00</meta:print-date>
    <meta:creation-date>2015-05-15T16:24:00</meta:creation-date>
    <dc:date>2023-07-19T08:42:00</dc:date>
    <meta:editing-duration>P0D</meta:editing-duration>
    <meta:generator>LibreOffice/26.2.3.2$Linux_X86_64 LibreOffice_project/620$Build-2</meta:generator>
    <meta:document-statistic meta:table-count="1" meta:image-count="0" meta:object-count="0" meta:page-count="4" meta:paragraph-count="153" meta:word-count="2290" meta:character-count="12469" meta:non-whitespace-character-count="10293"/>
    <meta:user-defined meta:name="AppVersion">16.0000</meta:user-defined>
    <meta:template xlink:type="simple" xlink:actuate="onRequest" xlink:title="Normal.dotm" xlink:href=""/>
  </office:meta>
</office:document-meta>
</file>