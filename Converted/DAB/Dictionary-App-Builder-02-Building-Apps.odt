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8DEF31E1809.png" manifest:media-type="image/png"/>
  <manifest:file-entry manifest:full-path="Pictures/1000000100000438000008DEAA9A0F4B.png" manifest:media-type="image/png"/>
  <manifest:file-entry manifest:full-path="Pictures/10000000000002D000000500929119A0.png" manifest:media-type="image/png"/>
  <manifest:file-entry manifest:full-path="Pictures/1000000100000438000008DE8103BC3A.png" manifest:media-type="image/png"/>
  <manifest:file-entry manifest:full-path="Pictures/10000000000002D000000500C6B6F629.png" manifest:media-type="image/png"/>
  <manifest:file-entry manifest:full-path="Pictures/1000000100000355000000BA9623E5B2.png" manifest:media-type="image/png"/>
  <manifest:file-entry manifest:full-path="Pictures/10000000000002D00000050009D20BA5.png" manifest:media-type="image/png"/>
  <manifest:file-entry manifest:full-path="Pictures/100000000000043800000780E2D43E62.png" manifest:media-type="image/png"/>
  <manifest:file-entry manifest:full-path="Pictures/10000000000002D0000005002848B2DD.png" manifest:media-type="image/png"/>
  <manifest:file-entry manifest:full-path="Pictures/10000000000002D000000500A2F1A810.png" manifest:media-type="image/png"/>
  <manifest:file-entry manifest:full-path="Pictures/100000010000006200000036B65513BC.png" manifest:media-type="image/png"/>
  <manifest:file-entry manifest:full-path="Pictures/100000000000043800000780DE9F472F.png" manifest:media-type="image/png"/>
  <manifest:file-entry manifest:full-path="Pictures/10000001000008BA00000270E87240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nsolas" svg:font-family="Consolas" style:font-family-generic="swiss" style:font-pitch="variable"/>
    <style:font-face style:name="Consolas1" svg:font-family="Consolas"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Table1" style:family="table">
      <style:table-properties style:width="6in" fo:margin-left="0.125in" fo:margin-top="0in" fo:margin-bottom="0in" table:align="left" style:writing-mode="page"/>
    </style:style>
    <style:style style:name="Table1.A" style:family="table-column">
      <style:table-column-properties style:column-width="1.6243in"/>
    </style:style>
    <style:style style:name="Table1.B" style:family="table-column">
      <style:table-column-properties style:column-width="4.375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1.14" style:family="table-row">
      <style:table-row-properties fo:keep-together="always"/>
    </style:style>
    <style:style style:name="Table2" style:family="table">
      <style:table-properties style:width="5.3153in" fo:margin-left="0.2958in" fo:margin-top="0in" fo:margin-bottom="0in" table:align="left" style:writing-mode="page"/>
    </style:style>
    <style:style style:name="Table2.A" style:family="table-column">
      <style:table-column-properties style:column-width="1.9688in"/>
    </style:style>
    <style:style style:name="Table2.B" style:family="table-column">
      <style:table-column-properties style:column-width="3.3465in"/>
    </style:style>
    <style:style style:name="Table2.1" style:family="table-row">
      <style:table-row-properties fo:keep-together="auto"/>
    </style:style>
    <style:style style:name="Table2.A1" style:family="table-cell">
      <style:table-cell-properties fo:background-color="transparent" fo:padding-left="0.075in" fo:padding-right="0.075in" fo:padding-top="0.0396in" fo:padding-bottom="0.0396in" fo:border="0.5pt solid #000000">
        <style:background-image/>
      </style:table-cell-properties>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loext:graphic-properties draw:fill="none"/>
      <style:paragraph-properties fo:text-align="center"/>
    </style:style>
    <style:style style:name="P4" style:family="paragraph" style:parent-style-name="Standard">
      <style:paragraph-properties fo:text-align="center" style:justify-single-word="false"/>
      <style:text-properties fo:language="en" fo:country="GB" fo:font-style="italic" style:font-style-asian="italic"/>
    </style:style>
    <style:style style:name="P5" style:family="paragraph" style:parent-style-name="Standard">
      <style:paragraph-properties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fo:break-before="page"/>
    </style:style>
    <style:style style:name="P10" style:family="paragraph" style:parent-style-name="Standard">
      <style:paragraph-properties fo:text-align="center" style:justify-single-word="false"/>
      <style:text-properties fo:font-size="16pt" fo:language="en" fo:country="US" fo:font-weight="bold" style:font-size-asian="16pt" style:font-weight-asian="bold" style:font-size-complex="16pt"/>
    </style:style>
    <style:style style:name="P11" style:family="paragraph" style:parent-style-name="Heading_20_1">
      <style:paragraph-properties fo:margin-left="0.248in" fo:text-indent="-0.248in" style:auto-text-indent="false" fo:break-before="page"/>
    </style:style>
    <style:style style:name="P12" style:family="paragraph" style:parent-style-name="Standard">
      <style:paragraph-properties fo:margin-top="0in" fo:margin-bottom="0.25in" style:contextual-spacing="false"/>
    </style:style>
    <style:style style:name="P13" style:family="paragraph" style:parent-style-name="Heading_20_2">
      <style:paragraph-properties fo:margin-left="0.05in" fo:text-indent="-0.05in" style:auto-text-indent="false"/>
    </style:style>
    <style:style style:name="P14" style:family="paragraph" style:parent-style-name="Standard" style:list-style-name="WWNum9"/>
    <style:style style:name="P15" style:family="paragraph" style:parent-style-name="Standard">
      <style:paragraph-properties fo:margin-left="0.4917in"/>
    </style:style>
    <style:style style:name="P16" style:family="paragraph" style:parent-style-name="Standard">
      <style:paragraph-properties fo:margin-top="0.0835in" fo:margin-bottom="0in" style:contextual-spacing="false" fo:text-indent="0.4925in" style:auto-text-indent="false"/>
    </style:style>
    <style:style style:name="P17" style:family="paragraph" style:parent-style-name="Standard">
      <style:paragraph-properties fo:margin-top="0.0835in" fo:margin-bottom="0in" style:contextual-spacing="false"/>
      <style:text-properties fo:language="en" fo:country="US"/>
    </style:style>
    <style:style style:name="P18" style:family="paragraph" style:parent-style-name="Standard">
      <style:paragraph-properties fo:margin-left="0.4917in" fo:margin-top="0.0835in" fo:margin-bottom="0in" style:contextual-spacing="false" fo:text-indent="0.0008in" style:auto-text-indent="false"/>
    </style:style>
    <style:style style:name="P19" style:family="paragraph" style:parent-style-name="Standard">
      <style:paragraph-properties fo:margin-top="0in" fo:margin-bottom="0.0835in" style:contextual-spacing="false"/>
    </style:style>
    <style:style style:name="P20" style:family="paragraph" style:parent-style-name="Standard">
      <style:paragraph-properties fo:text-indent="0.4917in" style:auto-text-indent="false"/>
    </style:style>
    <style:style style:name="P21" style:family="paragraph" style:parent-style-name="Standard">
      <style:paragraph-properties fo:margin-top="0.0417in" fo:margin-bottom="0in" style:contextual-spacing="false" fo:text-indent="0.4917in" style:auto-text-indent="false"/>
    </style:style>
    <style:style style:name="P22" style:family="paragraph" style:parent-style-name="Standard">
      <style:paragraph-properties fo:margin-top="0.0835in" fo:margin-bottom="0in" style:contextual-spacing="false"/>
    </style:style>
    <style:style style:name="P23" style:family="paragraph" style:parent-style-name="Standard">
      <style:text-properties fo:language="en" fo:country="US" fo:font-weight="bold" style:font-weight-asian="bold"/>
    </style:style>
    <style:style style:name="P24" style:family="paragraph" style:parent-style-name="Standard">
      <style:paragraph-properties fo:keep-with-next="always"/>
    </style:style>
    <style:style style:name="P25" style:family="paragraph" style:parent-style-name="Standard" style:list-style-name="WWNum4"/>
    <style:style style:name="P26" style:family="paragraph" style:parent-style-name="Standard">
      <style:paragraph-properties fo:margin-left="0.25in"/>
      <style:text-properties fo:language="en" fo:country="US"/>
    </style:style>
    <style:style style:name="P27" style:family="paragraph" style:parent-style-name="Standard">
      <style:paragraph-properties fo:margin-left="0.5in"/>
    </style:style>
    <style:style style:name="P28" style:family="paragraph" style:parent-style-name="Standard">
      <style:paragraph-properties fo:margin-left="0.5in"/>
      <style:text-properties fo:language="en" fo:country="US"/>
    </style:style>
    <style:style style:name="P29" style:family="paragraph" style:parent-style-name="Standard">
      <style:paragraph-properties fo:margin-left="0.5in" fo:margin-top="0.0835in" fo:margin-bottom="0in" style:contextual-spacing="false"/>
    </style:style>
    <style:style style:name="P30" style:family="paragraph" style:parent-style-name="Standard">
      <style:paragraph-properties fo:margin-left="0.4925in" fo:margin-top="0.0835in" fo:margin-bottom="0in" style:contextual-spacing="false"/>
    </style:style>
    <style:style style:name="P31" style:family="paragraph" style:parent-style-name="Standard">
      <style:text-properties fo:language="en" fo:country="GB" style:font-name-complex="Calibri1"/>
    </style:style>
    <style:style style:name="P32" style:family="paragraph" style:parent-style-name="Standard" style:list-style-name="WWNum5">
      <style:paragraph-properties fo:margin-left="0.9957in" fo:margin-top="0.0835in" fo:margin-bottom="0in" style:contextual-spacing="false" fo:text-indent="-0.248in" style:auto-text-indent="false"/>
    </style:style>
    <style:style style:name="P33" style:family="paragraph" style:parent-style-name="Standard">
      <style:paragraph-properties fo:margin-left="0.75in"/>
      <style:text-properties style:font-name-complex="Calibri1"/>
    </style:style>
    <style:style style:name="P34" style:family="paragraph" style:parent-style-name="Standard" style:list-style-name="WWNum5"/>
    <style:style style:name="P35" style:family="paragraph" style:parent-style-name="Standard">
      <style:text-properties style:font-name-complex="Calibri1"/>
    </style:style>
    <style:style style:name="P36" style:family="paragraph" style:parent-style-name="List_20_Paragraph">
      <style:text-properties style:font-name-complex="Calibri1"/>
    </style:style>
    <style:style style:name="P37" style:family="paragraph" style:parent-style-name="List_20_Paragraph">
      <style:text-properties fo:language="en" fo:country="US"/>
    </style:style>
    <style:style style:name="P38" style:family="paragraph" style:parent-style-name="Heading_20_1" style:list-style-name="">
      <style:paragraph-properties fo:margin-left="0in" fo:text-indent="0in" style:auto-text-indent="false"/>
      <style:text-properties fo:language="en" fo:country="US"/>
    </style:style>
    <style:style style:name="P39" style:family="paragraph" style:parent-style-name="Standard">
      <style:paragraph-properties fo:margin-left="0.4917in"/>
      <style:text-properties style:font-name-complex="Calibri1"/>
    </style:style>
    <style:style style:name="P40" style:family="paragraph" style:parent-style-name="List_20_Paragraph" style:list-style-name="WWNum24"/>
    <style:style style:name="P41" style:family="paragraph" style:parent-style-name="List_20_Paragraph">
      <style:paragraph-properties fo:margin-top="0.0835in" fo:margin-bottom="0in" style:contextual-spacing="false"/>
      <style:text-properties style:font-name-complex="Calibri1"/>
    </style:style>
    <style:style style:name="P42" style:family="paragraph" style:parent-style-name="List_20_Paragraph" style:list-style-name="WWNum24">
      <style:paragraph-properties fo:margin-left="0.9957in" fo:margin-top="0.0835in" fo:margin-bottom="0in" style:contextual-spacing="false" fo:text-indent="-0.248in" style:auto-text-indent="false"/>
    </style:style>
    <style:style style:name="P43" style:family="paragraph" style:parent-style-name="Standard">
      <style:paragraph-properties fo:margin-top="0.0835in" fo:margin-bottom="0in" style:contextual-spacing="false" fo:text-align="center" style:justify-single-word="false"/>
    </style:style>
    <style:style style:name="P44" style:family="paragraph">
      <loext:graphic-properties draw:fill="solid" draw:fill-color="#ffffff"/>
    </style:style>
    <style:style style:name="P45" style:family="paragraph" style:parent-style-name="Standard">
      <style:paragraph-properties fo:margin-top="0.0835in" fo:margin-bottom="0in" style:contextual-spacing="false"/>
      <style:text-properties style:font-name-complex="Calibri1"/>
    </style:style>
    <style:style style:name="P46" style:family="paragraph" style:parent-style-name="List_20_Paragraph">
      <style:paragraph-properties fo:margin-left="0.4917in" fo:margin-top="0.0835in" fo:margin-bottom="0in" style:contextual-spacing="false" fo:text-align="center" style:justify-single-word="false"/>
    </style:style>
    <style:style style:name="P47" style:family="paragraph" style:parent-style-name="List_20_Paragraph">
      <style:paragraph-properties fo:margin-left="0.9957in" fo:margin-top="0.0835in" fo:margin-bottom="0in" style:contextual-spacing="false"/>
      <style:text-properties style:font-name-complex="Calibri1"/>
    </style:style>
    <style:style style:name="P48" style:family="paragraph" style:parent-style-name="List_20_Paragraph">
      <style:paragraph-properties fo:margin-left="0.9965in" fo:margin-top="0.0835in" fo:margin-bottom="0.1665in" style:contextual-spacing="false"/>
    </style:style>
    <style:style style:name="P49" style:family="paragraph" style:parent-style-name="Standard">
      <style:paragraph-properties fo:margin-left="0.4917in" fo:margin-top="0.0835in" fo:margin-bottom="0in" style:contextual-spacing="false"/>
      <style:text-properties style:font-name-complex="Calibri1"/>
    </style:style>
    <style:style style:name="P50" style:family="paragraph" style:parent-style-name="Standard">
      <style:paragraph-properties fo:margin-left="0.4925in" fo:margin-top="0.0835in" fo:margin-bottom="0.1665in" style:contextual-spacing="false" fo:keep-with-next="always"/>
    </style:style>
    <style:style style:name="P51" style:family="paragraph" style:parent-style-name="Heading_20_1">
      <style:paragraph-properties fo:margin-left="0.248in" fo:text-indent="-0.248in" style:auto-text-indent="false"/>
    </style:style>
    <style:style style:name="P52" style:family="paragraph" style:parent-style-name="Heading_20_2">
      <style:paragraph-properties fo:margin-left="0.3543in" fo:text-indent="-0.3543in" style:auto-text-indent="false"/>
    </style:style>
    <style:style style:name="P53" style:family="paragraph" style:parent-style-name="Standard">
      <style:paragraph-properties fo:margin-top="0.1665in" fo:margin-bottom="0in" style:contextual-spacing="false" fo:text-indent="0.4925in" style:auto-text-indent="false"/>
    </style:style>
    <style:style style:name="P54" style:family="paragraph" style:parent-style-name="Standard">
      <style:paragraph-properties fo:text-indent="0.3543in" style:auto-text-indent="false"/>
      <style:text-properties fo:language="en" fo:country="US"/>
    </style:style>
    <style:style style:name="P55" style:family="paragraph" style:parent-style-name="Standard">
      <style:paragraph-properties fo:margin-top="0.0835in" fo:margin-bottom="0in" style:contextual-spacing="false"/>
      <style:text-properties fo:language="en" fo:country="GB"/>
    </style:style>
    <style:style style:name="P56" style:family="paragraph" style:parent-style-name="Standard">
      <style:paragraph-properties fo:margin-top="0.0835in" fo:margin-bottom="0in" style:contextual-spacing="false"/>
      <style:text-properties fo:font-size="6pt" fo:language="en" fo:country="US" style:font-size-asian="6pt" style:font-size-complex="6pt"/>
    </style:style>
    <style:style style:name="P57" style:family="paragraph" style:parent-style-name="Standard">
      <style:paragraph-properties fo:margin-top="0.0835in" fo:margin-bottom="0in" style:contextual-spacing="false"/>
      <style:text-properties style:font-name="Courier New" fo:font-size="9pt" fo:language="en" fo:country="US" style:font-size-asian="9pt" style:font-name-complex="Courier New1" style:font-size-complex="9pt"/>
    </style:style>
    <style:style style:name="P58" style:family="paragraph" style:parent-style-name="Standard">
      <style:paragraph-properties fo:margin-top="0.0835in" fo:margin-bottom="0in" style:contextual-spacing="false"/>
      <style:text-properties fo:font-size="10pt" fo:language="en" fo:country="US" style:font-size-asian="10pt" style:font-size-complex="10pt"/>
    </style:style>
    <style:style style:name="P59" style:family="paragraph" style:parent-style-name="Standard">
      <style:paragraph-properties fo:margin-top="0.0835in" fo:margin-bottom="0in" style:contextual-spacing="false"/>
      <style:text-properties fo:color="#2a00ff" loext:opacity="100%" style:font-name="Consolas" fo:font-size="10pt" fo:language="en" fo:country="US" style:font-size-asian="10pt" style:font-name-complex="Consolas1" style:font-size-complex="10pt"/>
    </style:style>
    <style:style style:name="P60" style:family="paragraph" style:parent-style-name="Standard">
      <style:paragraph-properties fo:margin-top="0.1665in" fo:margin-bottom="0in" style:contextual-spacing="false" fo:keep-with-next="always"/>
    </style:style>
    <style:style style:name="P61" style:family="paragraph" style:parent-style-name="Standard">
      <style:paragraph-properties fo:margin-top="0.1665in" fo:margin-bottom="0in" style:contextual-spacing="false"/>
    </style:style>
    <style:style style:name="P62" style:family="paragraph" style:parent-style-name="List_20_Paragraph" style:list-style-name="WWNum25">
      <style:paragraph-properties fo:margin-left="0.4957in" fo:margin-top="0.0835in" fo:margin-bottom="0in" style:contextual-spacing="false" fo:text-indent="-0.248in" style:auto-text-indent="false"/>
    </style:style>
    <style:style style:name="P63" style:family="paragraph" style:parent-style-name="Standard" style:list-style-name="WWNum8">
      <style:paragraph-properties fo:margin-top="0.1665in" fo:margin-bottom="0in" style:contextual-spacing="false"/>
    </style:style>
    <style:style style:name="P64" style:family="paragraph" style:parent-style-name="Standard">
      <style:paragraph-properties fo:margin-left="0.5in" fo:margin-top="0.1665in" fo:margin-bottom="0in" style:contextual-spacing="false"/>
    </style:style>
    <style:style style:name="P65" style:family="paragraph" style:parent-style-name="Standard">
      <style:paragraph-properties fo:margin-top="0.0835in" fo:margin-bottom="0in" style:contextual-spacing="false"/>
      <style:text-properties fo:language="en" fo:country="GB" style:font-name-complex="Tahoma"/>
    </style:style>
    <style:style style:name="P66" style:family="paragraph" style:parent-style-name="Standard">
      <style:paragraph-properties fo:margin-top="0.0835in" fo:margin-bottom="0in" style:contextual-spacing="false" fo:keep-together="always" fo:keep-with-next="always"/>
    </style:style>
    <style:style style:name="P67" style:family="paragraph" style:parent-style-name="Standard">
      <style:text-properties fo:language="en" fo:country="GB" style:font-name-complex="Tahoma"/>
    </style:style>
    <style:style style:name="P68" style:family="paragraph" style:parent-style-name="Standard" style:list-style-name="WWNum6">
      <style:paragraph-properties fo:margin-left="0.4957in" fo:margin-top="0.0835in" fo:margin-bottom="0in" style:contextual-spacing="false" fo:text-indent="-0.248in" style:auto-text-indent="false"/>
    </style:style>
    <style:style style:name="P69" style:family="paragraph" style:parent-style-name="Standard">
      <style:paragraph-properties fo:margin-left="0.4917in" fo:margin-top="0.0835in" fo:margin-bottom="0in" style:contextual-spacing="false"/>
    </style:style>
    <style:style style:name="P70" style:family="paragraph" style:parent-style-name="Standard" style:list-style-name="WWNum6">
      <style:paragraph-properties fo:margin-left="0.4957in" fo:margin-top="0.25in" fo:margin-bottom="0in" style:contextual-spacing="false" fo:text-indent="-0.248in" style:auto-text-indent="false"/>
    </style:style>
    <style:style style:name="P71" style:family="paragraph" style:parent-style-name="Standard">
      <style:paragraph-properties fo:keep-with-next="always"/>
      <style:text-properties fo:font-size="10pt" fo:language="en" fo:country="GB" style:font-size-asian="10pt" style:language-asian="en" style:country-asian="GB"/>
    </style:style>
    <style:style style:name="P72" style:family="paragraph" style:parent-style-name="Standard">
      <style:paragraph-properties fo:keep-with-next="always"/>
      <style:text-properties fo:language="en" fo:country="GB" style:language-asian="en" style:country-asian="GB"/>
    </style:style>
    <style:style style:name="P73" style:family="paragraph" style:parent-style-name="Standard">
      <style:paragraph-properties fo:text-align="center" style:justify-single-word="false" fo:keep-with-next="always"/>
    </style:style>
    <style:style style:name="P74" style:family="paragraph" style:parent-style-name="Standard">
      <style:paragraph-properties fo:keep-with-next="always"/>
      <style:text-properties fo:language="en" fo:country="US"/>
    </style:style>
    <style:style style:name="P75" style:family="paragraph" style:parent-style-name="Standard" style:list-style-name="WWNum11">
      <style:paragraph-properties fo:margin-left="0.4957in" fo:margin-top="0.0835in" fo:margin-bottom="0in" style:contextual-spacing="false" fo:text-indent="-0.248in" style:auto-text-indent="false"/>
    </style:style>
    <style:style style:name="P76" style:family="paragraph" style:parent-style-name="Standard" style:list-style-name="WWNum11">
      <style:paragraph-properties fo:margin-top="0.0835in" fo:margin-bottom="0in" style:contextual-spacing="false"/>
    </style:style>
    <style:style style:name="P77" style:family="paragraph" style:parent-style-name="Standard" style:list-style-name="WWNum23">
      <style:paragraph-properties fo:margin-top="0.0835in" fo:margin-bottom="0in" style:contextual-spacing="false"/>
    </style:style>
    <style:style style:name="P78" style:family="paragraph" style:parent-style-name="Standard">
      <style:paragraph-properties fo:margin-top="0.1665in" fo:margin-bottom="0in" style:contextual-spacing="false" fo:text-align="center" style:justify-single-word="false"/>
    </style:style>
    <style:style style:name="P79" style:family="paragraph" style:parent-style-name="Standard">
      <style:text-properties fo:font-weight="bold" style:font-weight-asian="bold" style:font-name-complex="Calibri1"/>
    </style:style>
    <style:style style:name="P80" style:family="paragraph" style:parent-style-name="Standard">
      <style:paragraph-properties fo:margin-left="0.248in" fo:margin-top="0.0835in" fo:margin-bottom="0in" style:contextual-spacing="false"/>
    </style:style>
    <style:style style:name="P81" style:family="paragraph" style:parent-style-name="Standard" style:list-style-name="WWNum13">
      <style:paragraph-properties fo:margin-left="0.4957in" fo:margin-top="0.0835in" fo:margin-bottom="0in" style:contextual-spacing="false" fo:text-indent="-0.248in" style:auto-text-indent="false"/>
    </style:style>
    <style:style style:name="P82" style:family="paragraph" style:parent-style-name="Standard">
      <style:paragraph-properties fo:margin-left="0.248in" fo:margin-top="0.0835in" fo:margin-bottom="0in" style:contextual-spacing="false"/>
      <style:text-properties fo:font-weight="bold" style:font-weight-asian="bold" style:font-name-complex="Calibri1"/>
    </style:style>
    <style:style style:name="P83" style:family="paragraph" style:parent-style-name="Standard" style:list-style-name="WWNum15">
      <style:paragraph-properties fo:margin-left="0.5in" fo:margin-top="0.0835in" fo:margin-bottom="0in" style:contextual-spacing="false" fo:text-indent="-0.248in" style:auto-text-indent="false"/>
    </style:style>
    <style:style style:name="P84" style:family="paragraph" style:parent-style-name="Standard" style:list-style-name="WWNum15">
      <style:paragraph-properties fo:margin-left="1in" fo:margin-top="0.0835in" fo:margin-bottom="0in" style:contextual-spacing="false" fo:text-indent="-0.248in" style:auto-text-indent="false"/>
    </style:style>
    <style:style style:name="P85" style:family="paragraph" style:parent-style-name="Standard" style:list-style-name="WWNum15">
      <style:paragraph-properties fo:margin-left="0.5in" fo:margin-top="0.1665in" fo:margin-bottom="0in" style:contextual-spacing="false" fo:text-indent="-0.248in" style:auto-text-indent="false"/>
    </style:style>
    <style:style style:name="P86" style:family="paragraph" style:parent-style-name="Standard">
      <style:paragraph-properties fo:margin-left="1in" fo:margin-top="0.0835in" fo:margin-bottom="0in" style:contextual-spacing="false"/>
    </style:style>
    <style:style style:name="P87" style:family="paragraph" style:parent-style-name="Standard">
      <style:paragraph-properties fo:margin-top="0in" fo:margin-bottom="0.1665in" style:contextual-spacing="false"/>
    </style:style>
    <style:style style:name="P88" style:family="paragraph" style:parent-style-name="Standard">
      <style:paragraph-properties fo:margin-left="0.3937in" fo:margin-right="-0.0201in"/>
    </style:style>
    <style:style style:name="P89" style:family="paragraph" style:parent-style-name="Standard">
      <style:paragraph-properties fo:margin-left="0.3937in" fo:margin-right="-0.0201in"/>
      <style:text-properties style:font-name="Courier New" fo:font-size="9pt" style:font-size-asian="9pt" style:font-name-complex="Courier New1" style:font-size-complex="9pt"/>
    </style:style>
    <style:style style:name="P90" style:family="paragraph" style:parent-style-name="Standard" style:list-style-name="WWNum16">
      <style:paragraph-properties fo:margin-left="0.4957in" fo:margin-top="0.0835in" fo:margin-bottom="0in" style:contextual-spacing="false" fo:text-indent="-0.248in" style:auto-text-indent="false"/>
    </style:style>
    <style:style style:name="P91" style:family="paragraph" style:parent-style-name="Heading_20_1">
      <style:paragraph-properties fo:margin-left="0.4472in" fo:text-indent="-0.4472in" style:auto-text-indent="false">
        <style:tab-stops>
          <style:tab-stop style:position="0.4472in"/>
        </style:tab-stops>
      </style:paragraph-properties>
    </style:style>
    <style:style style:name="P92" style:family="paragraph" style:parent-style-name="Standard" style:list-style-name="WWNum19">
      <style:paragraph-properties fo:margin-left="0.4957in" fo:margin-top="0.0835in" fo:margin-bottom="0in" style:contextual-spacing="false" fo:text-indent="-0.248in" style:auto-text-indent="false"/>
    </style:style>
    <style:style style:name="P93" style:family="paragraph" style:parent-style-name="Standard" style:list-style-name="WWNum19"/>
    <style:style style:name="P94" style:family="paragraph" style:parent-style-name="Standard" style:list-style-name="WWNum20">
      <style:paragraph-properties fo:margin-left="0.4957in" fo:margin-top="0.0835in" fo:margin-bottom="0in" style:contextual-spacing="false" fo:text-indent="-0.248in" style:auto-text-indent="false"/>
    </style:style>
    <style:style style:name="P95" style:family="paragraph" style:parent-style-name="Standard" style:list-style-name="WWNum20">
      <style:paragraph-properties fo:margin-left="0.8862in" fo:margin-top="0.0835in" fo:margin-bottom="0in" style:contextual-spacing="false" fo:text-indent="-0.1965in" style:auto-text-indent="false"/>
    </style:style>
    <style:style style:name="P96" style:family="paragraph" style:parent-style-name="Standard">
      <style:paragraph-properties fo:margin-top="0.1665in" fo:margin-bottom="0.0835in" style:contextual-spacing="false"/>
    </style:style>
    <style:style style:name="P97" style:family="paragraph" style:parent-style-name="Standard" style:list-style-name="WWNum22">
      <style:paragraph-properties fo:margin-top="0.0835in" fo:margin-bottom="0in" style:contextual-spacing="false"/>
    </style:style>
    <style:style style:name="P98" style:family="paragraph" style:parent-style-name="Standard" style:list-style-name="WWNum21">
      <style:paragraph-properties fo:margin-top="0.0835in" fo:margin-bottom="0in" style:contextual-spacing="false"/>
    </style:style>
    <style:style style:name="P99" style:family="paragraph" style:parent-style-name="Standard">
      <style:paragraph-properties fo:margin-top="0in" fo:margin-bottom="0.0835in" style:contextual-spacing="false" fo:keep-with-next="always"/>
    </style:style>
    <style:style style:name="P100" style:family="paragraph" style:parent-style-name="Standard">
      <style:paragraph-properties fo:padding="0in" fo:border="none" style:shadow="none" style:join-border="false"/>
    </style:style>
    <style:style style:name="P101" style:family="paragraph" style:parent-style-name="Standard">
      <style:paragraph-properties fo:padding="0in" fo:border="none" style:shadow="none" style:join-border="false"/>
      <style:text-properties fo:language="en" fo:country="GB"/>
    </style:style>
    <style:style style:name="P102" style:family="paragraph" style:parent-style-name="Standard" style:list-style-name="WWNum18">
      <style:paragraph-properties fo:line-height="115%" fo:padding="0in" fo:border="none" style:shadow="none" style:join-border="false"/>
    </style:style>
    <style:style style:name="P103" style:family="paragraph" style:parent-style-name="Standard">
      <style:text-properties fo:font-size="14pt" fo:language="en" fo:country="GB" fo:font-weight="bold" style:font-size-asian="14pt" style:font-weight-asian="bold" style:font-size-complex="14pt"/>
    </style:style>
    <style:style style:name="P104" style:family="paragraph" style:parent-style-name="Standard" style:list-style-name="WWNum26">
      <style:paragraph-properties fo:margin-top="0.0835in" fo:margin-bottom="0in" style:contextual-spacing="false"/>
    </style:style>
    <style:style style:name="P105" style:family="paragraph" style:parent-style-name="Standard">
      <loext:graphic-properties draw:fill="solid" draw:fill-color="#dbe5f1"/>
      <style:paragraph-properties fo:margin-left="0.4925in" fo:keep-together="always" fo:background-color="#dbe5f1" fo:keep-with-next="always"/>
    </style:style>
    <style:style style:name="P106" style:family="paragraph" style:parent-style-name="Standard">
      <style:paragraph-properties fo:margin-left="0.5in" fo:margin-top="0.0835in" fo:margin-bottom="0in" style:contextual-spacing="false" fo:keep-with-next="always"/>
    </style:style>
    <style:style style:name="P107" style:family="paragraph" style:parent-style-name="Standard">
      <loext:graphic-properties draw:fill="solid" draw:fill-color="#dbe5f1"/>
      <style:paragraph-properties fo:margin-left="0.4917in" fo:background-color="#dbe5f1" fo:keep-with-next="always"/>
    </style:style>
    <style:style style:name="P108" style:family="paragraph" style:parent-style-name="Standard">
      <loext:graphic-properties draw:fill="solid" draw:fill-color="#f2f2f2"/>
      <style:paragraph-properties fo:margin-left="0.5in" fo:background-color="#f2f2f2" fo:padding="0.0835in" fo:border="0.51pt solid #ffffff" style:shadow="none"/>
    </style:style>
    <style:style style:name="P109" style:family="paragraph" style:parent-style-name="Standard">
      <style:text-properties fo:font-size="10pt" style:font-size-asian="10pt" style:font-name-complex="Calibri1" style:font-size-complex="10pt"/>
    </style:style>
    <style:style style:name="P110" style:family="paragraph" style:parent-style-name="Standard">
      <style:paragraph-properties fo:margin-top="0.0835in" fo:margin-bottom="0.0835in" style:contextual-spacing="false" fo:keep-with-next="always"/>
    </style:style>
    <style:style style:name="P111" style:family="paragraph" style:parent-style-name="Standard">
      <loext:graphic-properties draw:fill="solid" draw:fill-color="#dbe5f1"/>
      <style:paragraph-properties fo:margin-left="0.4917in" fo:background-color="#dbe5f1"/>
    </style:style>
    <style:style style:name="P112" style:family="paragraph" style:parent-style-name="Standard">
      <style:paragraph-properties fo:text-indent="0.4472in" style:auto-text-indent="false"/>
    </style:style>
    <style:style style:name="P113" style:family="paragraph" style:parent-style-name="Standard">
      <style:text-properties style:font-name="Courier New" fo:font-size="10pt" fo:language="en" fo:country="US" style:font-size-asian="10pt" style:font-name-complex="Courier New1" style:font-size-complex="10pt"/>
    </style:style>
    <style:style style:name="P114"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language="en" fo:country="US"/>
    </style:style>
    <style:style style:name="T8" style:family="text">
      <style:text-properties fo:font-size="20pt" fo:language="en" fo:country="US" fo:font-weight="bold" style:font-size-asian="20pt" style:font-weight-asian="bold" style:font-size-complex="20pt"/>
    </style:style>
    <style:style style:name="T9" style:family="text">
      <style:text-properties fo:font-size="16pt" fo:language="en" fo:country="US" fo:font-weight="bold" style:font-size-asian="16pt" style:font-weight-asian="bold" style:font-size-complex="16pt"/>
    </style:style>
    <style:style style:name="T10" style:family="text">
      <style:text-properties fo:language="en" fo:country="GB" fo:font-weight="normal" style:letter-kerning="true" style:font-family-asian="PMingLiU" style:font-family-generic-asian="system" style:font-pitch-asian="variable" style:language-asian="en" style:country-asian="GB" style:font-weight-asian="normal" style:font-name-complex="Arial1"/>
    </style:style>
    <style:style style:name="T11" style:family="text">
      <style:text-properties text:display="true"/>
    </style:style>
    <style:style style:name="T12" style:family="text">
      <style:text-properties fo:language="en" fo:country="GB" style:letter-kerning="true" style:font-family-asian="PMingLiU" style:font-family-generic-asian="system" style:font-pitch-asian="variable" style:language-asian="en" style:country-asian="GB" style:font-name-complex="Arial1"/>
    </style:style>
    <style:style style:name="T13" style:family="text">
      <style:text-properties style:font-name-complex="Calibri1"/>
    </style:style>
    <style:style style:name="T14" style:family="text">
      <style:text-properties fo:language="en" fo:country="US" fo:font-weight="bold" style:font-weight-asian="bold"/>
    </style:style>
    <style:style style:name="T15"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16" style:family="text">
      <style:text-properties fo:language="en" fo:country="US" fo:font-style="italic" style:font-style-asian="italic"/>
    </style:style>
    <style:style style:name="T17" style:family="text">
      <style:text-properties fo:font-weight="bold" style:font-weight-asian="bold" style:font-name-complex="Calibri1"/>
    </style:style>
    <style:style style:name="T18" style:family="text">
      <style:text-properties fo:font-weight="bold" style:font-weight-asian="bold" style:font-name-complex="Calibri1" style:font-weight-complex="bold"/>
    </style:style>
    <style:style style:name="T19" style:family="text">
      <style:text-properties fo:language="en" fo:country="GB" style:font-name-complex="Calibri1"/>
    </style:style>
    <style:style style:name="T20" style:family="text">
      <style:text-properties style:font-name-complex="Calibri1" style:font-weight-complex="bold"/>
    </style:style>
    <style:style style:name="T21" style:family="text">
      <style:text-properties fo:language="en" fo:country="GB" fo:font-weight="bold" style:font-weight-asian="bold" style:font-name-complex="Calibri1" style:font-weight-complex="bold"/>
    </style:style>
    <style:style style:name="T22" style:family="text">
      <style:text-properties fo:font-style="italic" style:text-underline-style="solid" style:text-underline-width="auto" style:text-underline-color="font-color" style:font-style-asian="italic" style:font-name-complex="Calibri1" style:font-style-complex="italic"/>
    </style:style>
    <style:style style:name="T23" style:family="text">
      <style:text-properties fo:color="#0070c0" loext:opacity="100%" fo:language="en" fo:country="US"/>
    </style:style>
    <style:style style:name="T24" style:family="text">
      <style:text-properties fo:font-size="6pt" fo:language="en" fo:country="US" style:font-size-asian="6pt" style:font-size-complex="6pt"/>
    </style:style>
    <style:style style:name="T25" style:family="text">
      <style:text-properties style:font-name="Courier New" fo:font-size="9pt" fo:language="en" fo:country="US" style:font-size-asian="9pt" style:font-name-complex="Courier New1" style:font-size-complex="9pt"/>
    </style:style>
    <style:style style:name="T26" style:family="text">
      <style:text-properties fo:font-size="10pt" fo:language="en" fo:country="US" style:font-size-asian="10pt" style:font-size-complex="10pt"/>
    </style:style>
    <style:style style:name="T27" style:family="text">
      <style:text-properties fo:color="#2a00ff" loext:opacity="100%" style:font-name="Consolas" fo:font-size="10pt" fo:language="en" fo:country="US" style:font-size-asian="10pt" style:font-name-complex="Consolas1" style:font-size-complex="10pt"/>
    </style:style>
    <style:style style:name="T28" style:family="text">
      <style:text-properties fo:font-weight="bold" style:font-weight-asian="bold"/>
    </style:style>
    <style:style style:name="T29" style:family="text">
      <style:text-properties fo:language="en" fo:country="GB" style:font-name-complex="Tahoma"/>
    </style:style>
    <style:style style:name="T30" style:family="text">
      <style:text-properties fo:language="en" fo:country="GB" fo:font-weight="bold" style:font-weight-asian="bold" style:font-name-complex="Tahoma"/>
    </style:style>
    <style:style style:name="T31" style:family="text">
      <style:text-properties fo:language="en" fo:country="GB" fo:font-weight="bold" style:font-weight-asian="bold" style:font-name-complex="Tahoma" style:font-weight-complex="bold"/>
    </style:style>
    <style:style style:name="T32" style:family="text">
      <style:text-properties fo:language="en" fo:country="GB" fo:font-style="italic" style:font-style-asian="italic" style:font-name-complex="Tahoma"/>
    </style:style>
    <style:style style:name="T33" style:family="text">
      <style:text-properties fo:language="en" fo:country="GB" fo:font-style="italic" fo:font-weight="bold" style:font-style-asian="italic" style:font-weight-asian="bold" style:font-name-complex="Tahoma"/>
    </style:style>
    <style:style style:name="T34" style:family="text">
      <style:text-properties fo:language="en" fo:country="GB" style:text-underline-style="solid" style:text-underline-width="auto" style:text-underline-color="font-color" style:font-name-complex="Tahoma"/>
    </style:style>
    <style:style style:name="T35" style:family="text">
      <style:text-properties fo:font-weight="bold" style:font-weight-asian="bold" style:font-name-complex="Tahoma"/>
    </style:style>
    <style:style style:name="T36" style:family="text">
      <style:text-properties fo:font-size="10pt" fo:language="en" fo:country="GB" style:font-size-asian="10pt" style:language-asian="en" style:country-asian="GB"/>
    </style:style>
    <style:style style:name="T37" style:family="text">
      <style:text-properties fo:language="en" fo:country="GB" style:language-asian="en" style:country-asian="GB"/>
    </style:style>
    <style:style style:name="T38" style:family="text">
      <style:text-properties fo:language="en" fo:country="GB" fo:font-weight="bold" style:language-asian="en" style:country-asian="GB" style:font-weight-asian="bold"/>
    </style:style>
    <style:style style:name="T39" style:family="text">
      <style:text-properties fo:language="en" fo:country="GB" fo:font-weight="bold" style:font-weight-asian="bold" style:font-weight-complex="bold"/>
    </style:style>
    <style:style style:name="T40" style:family="text">
      <style:text-properties fo:language="en" fo:country="GB" fo:font-weight="bold" style:font-weight-asian="bold"/>
    </style:style>
    <style:style style:name="T41" style:family="text">
      <style:text-properties fo:font-style="italic" style:font-style-asian="italic" style:font-name-complex="Calibri1"/>
    </style:style>
    <style:style style:name="T42" style:family="text">
      <style:text-properties style:font-weight-complex="bold"/>
    </style:style>
    <style:style style:name="T43" style:family="text">
      <style:text-properties fo:font-weight="bold" style:font-weight-asian="bold" style:font-weight-complex="bold"/>
    </style:style>
    <style:style style:name="T44" style:family="text">
      <style:text-properties style:font-name="Courier New" fo:font-size="9pt" style:font-size-asian="9pt" style:font-name-complex="Courier New1" style:font-size-complex="9pt"/>
    </style:style>
    <style:style style:name="T45" style:family="text">
      <style:text-properties fo:language="en" fo:country="GB" fo:font-style="italic" fo:font-weight="bold" style:font-style-asian="italic" style:font-weight-asian="bold" style:font-style-complex="italic" style:font-weight-complex="bold"/>
    </style:style>
    <style:style style:name="T46" style:family="text">
      <style:text-properties fo:font-size="14pt" fo:language="en" fo:country="GB" fo:font-weight="bold" style:font-size-asian="14pt" style:font-weight-asian="bold" style:font-size-complex="14pt"/>
    </style:style>
    <style:style style:name="T47" style:family="text">
      <style:text-properties style:font-name="Courier New" fo:font-size="11pt" style:font-name-asian="Courier New1" style:font-size-asian="11pt" style:font-name-complex="Courier New1" style:font-size-complex="11pt"/>
    </style:style>
    <style:style style:name="T48" style:family="text">
      <style:text-properties fo:language="en" fo:country="GB" style:text-underline-style="solid" style:text-underline-width="auto" style:text-underline-color="font-color" fo:font-weight="bold" style:font-weight-asian="bold" style:font-weight-complex="bold"/>
    </style:style>
    <style:style style:name="T49" style:family="text">
      <style:text-properties fo:font-size="10pt" style:font-size-asian="10pt" style:font-name-complex="Calibri1" style:font-size-complex="10pt"/>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style:font-name="Courier New" fo:font-size="10pt" fo:language="en" fo:country="US" style:font-size-asian="10pt" style:font-name-complex="Courier New1" style:font-size-complex="10pt"/>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000000" draw:stroke-linejoin="miter" svg:stroke-linecap="butt" draw:fill="solid" draw:fill-color="#ffffff" draw:textarea-vertical-align="top" draw:auto-grow-height="false" fo:min-height="0.302in" fo:min-width="0.5953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text:anchor-type="as-char" draw:z-index="6" draw:name="Picture 30" draw:style-name="gr1" draw:text-style-name="P3" svg:width="6.0004in" svg:height="1.7157in"><draw:image xlink:href="Pictures/10000001000008BA00000270E8724093.png" xlink:type="simple" xlink:show="embed" xlink:actuate="onLoad" draw:mime-type="image/png"><text:p/></draw:image></draw:frame></text:p>
      <text:p text:style-name="P1" loext:marker-style-name="T1"/>
      <text:p text:style-name="P1" loext:marker-style-name="T1"/>
      <text:p text:style-name="P1" loext:marker-style-name="T1"/>
      <text:p text:style-name="P2" loext:marker-style-name="T2"><text:span text:style-name="T2">Building Apps</text:span><text:span text:style-name="T2"/></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2" loext:marker-style-name="T3"><text:bookmark-start text:name="_Hlk129967805"/><draw:frame text:anchor-type="as-char" draw:z-index="7" draw:style-name="gr1" draw:text-style-name="P3" svg:width="1.2224in" svg:height="0.6669in"><draw:image xlink:href="Pictures/100000010000006200000036B65513BC.png" xlink:type="simple" xlink:show="embed" xlink:actuate="onLoad" draw:mime-type="image/png"><text:p/></draw:image></draw:frame><text:bookmark-end text:name="_Hlk129967805"/></text:p>
      <text:p text:style-name="P4" loext:marker-style-name="T3"/>
      <text:p text:style-name="P4" loext:marker-style-name="T3"/>
      <text:p text:style-name="P5"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7" loext:marker-style-name="T4"/>
      <text:p text:style-name="P2" loext:marker-style-name="T5"><text:span text:style-name="T5">Dictionary App Builder: Building Apps</text:span><text:span text:style-name="T5"/></text:p>
      <text:p text:style-name="P7" loext:marker-style-name="T4"/>
      <text:p text:style-name="P2" loext:marker-style-name="T4"><text:span text:style-name="T4">© 2024, SIL International</text:span><text:span text:style-name="T4"/></text:p>
      <text:p text:style-name="P7" loext:marker-style-name="T4"/>
      <text:p text:style-name="P2" loext:marker-style-name="T6"><text:span text:style-name="T6">Last updated: 17 July 2024</text:span><text:span text:style-name="T6"/></text:p>
      <text:p text:style-name="P7" loext:marker-style-name="T4"/>
      <text:p text:style-name="P7" loext:marker-style-name="T4"/>
      <text:p text:style-name="P7" loext:marker-style-name="T4"/>
      <text:p text:style-name="P7" loext:marker-style-name="T4"/>
      <text:p text:style-name="P7" loext:marker-style-name="T4"/>
      <text:p text:style-name="P2">You are free to print this manual for personal use and for training workshops.</text:p>
      <text:p text:style-name="P2"/>
      <text:p text:style-name="P2">The latest version is available at</text:p>
      <text:p text:style-name="P2"><text:a xlink:type="simple" xlink:href="http://software.sil.org/dictionaryappbuilder/resources/" text:style-name="Internet_20_link" text:visited-style-name="Visited_20_Internet_20_Link"><text:span text:style-name="Internet_20_link">http://software.sil.org/dictionaryappbuilder/resources/</text:span></text:a> <text:s text:c="2"/></text:p>
      <text:p text:style-name="P2"/>
      <text:p text:style-name="P2" loext:marker-style-name="T4"><text:span text:style-name="T4">and on the Help menu of Dictionary App Builder.</text:span><text:span text:style-name="T4"/></text:p>
      <text:p text:style-name="P8" loext:marker-style-name="T7"/>
      <text:p text:style-name="P4" loext:marker-style-name="T3"/>
      <text:p text:style-name="P1" loext:marker-style-name="T1"/>
      <text:p text:style-name="P8" loext:marker-style-name="T7"/>
      <text:p text:style-name="P9" loext:marker-style-name="T8"><text:span text:style-name="T8">Contents</text:span><text:span text:style-name="T8"/></text:p>
      <text:p text:style-name="P10" loext:marker-style-name="T9"/>
      <text:p text:style-name="P10" loext:marker-style-name="T9"/>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0"><text:a xlink:type="simple" xlink:href="#_Toc172123629" text:style-name="Index_20_Link" text:visited-style-name="Index_20_Link"><text:span text:style-name="T7">1.</text:span><text:span text:style-name="T10"><text:tab/></text:span><text:span text:style-name="T7">Preparing content for your app</text:span><text:span text:style-name="T11"><text:tab/>4</text:span></text:a></text:p>
          <text:p text:style-name="Contents_20_2" loext:marker-style-name="T12"><text:a xlink:type="simple" xlink:href="#_Toc172123630" text:style-name="Index_20_Link" text:visited-style-name="Index_20_Link">1.1.<text:span text:style-name="T12"><text:tab/></text:span>Preparing your lexicon file<text:span text:style-name="T11"><text:tab/>4</text:span></text:a></text:p>
          <text:p text:style-name="Contents_20_2" loext:marker-style-name="T12"><text:a xlink:type="simple" xlink:href="#_Toc172123631" text:style-name="Index_20_Link" text:visited-style-name="Index_20_Link">1.2.<text:span text:style-name="T12"><text:tab/></text:span>Preparing images<text:span text:style-name="T11"><text:tab/>4</text:span></text:a></text:p>
          <text:p text:style-name="Contents_20_2" loext:marker-style-name="T12"><text:a xlink:type="simple" xlink:href="#_Toc172123632" text:style-name="Index_20_Link" text:visited-style-name="Index_20_Link">1.3.<text:span text:style-name="T12"><text:tab/></text:span>Preparing audio<text:span text:style-name="T11"><text:tab/>4</text:span></text:a></text:p>
          <text:p text:style-name="Contents_20_1" loext:marker-style-name="T10"><text:a xlink:type="simple" xlink:href="#_Toc172123633" text:style-name="Index_20_Link" text:visited-style-name="Index_20_Link"><text:span text:style-name="T7">2.</text:span><text:span text:style-name="T10"><text:tab/></text:span><text:span text:style-name="T7">How to build your first app</text:span><text:span text:style-name="T11"><text:tab/>5</text:span></text:a></text:p>
          <text:p text:style-name="Contents_20_1" loext:marker-style-name="T10"><text:a xlink:type="simple" xlink:href="#_Toc172123634" text:style-name="Index_20_Link" text:visited-style-name="Index_20_Link">3.<text:span text:style-name="T10"><text:tab/></text:span>Installing the app on your phone<text:span text:style-name="T11"><text:tab/>7</text:span></text:a></text:p>
          <text:p text:style-name="Contents_20_1" loext:marker-style-name="T10"><text:a xlink:type="simple" xlink:href="#_Toc172123635" text:style-name="Index_20_Link" text:visited-style-name="Index_20_Link"><text:span text:style-name="T7">4.</text:span><text:span text:style-name="T10"><text:tab/></text:span><text:span text:style-name="T7">App Creation Basics</text:span><text:span text:style-name="T11"><text:tab/>11</text:span></text:a></text:p>
          <text:p text:style-name="Contents_20_2" loext:marker-style-name="T12"><text:a xlink:type="simple" xlink:href="#_Toc172123636" text:style-name="Index_20_Link" text:visited-style-name="Index_20_Link">4.1.<text:span text:style-name="T12"><text:tab/></text:span>How should I choose the app package name?<text:span text:style-name="T11"><text:tab/>11</text:span></text:a></text:p>
          <text:p text:style-name="Contents_20_2" loext:marker-style-name="T12"><text:a xlink:type="simple" xlink:href="#_Toc172123637" text:style-name="Index_20_Link" text:visited-style-name="Index_20_Link">4.2.<text:span text:style-name="T12"><text:tab/></text:span>Do I have to create a new keystore for each app, or can I reuse the same keystore for several of my apps?<text:span text:style-name="T11"><text:tab/>12</text:span></text:a></text:p>
          <text:p text:style-name="Contents_20_2" loext:marker-style-name="T12"><text:a xlink:type="simple" xlink:href="#_Toc172123638" text:style-name="Index_20_Link" text:visited-style-name="Index_20_Link">4.3.<text:span text:style-name="T12"><text:tab/></text:span>Can I build apps when I do not have internet access?<text:span text:style-name="T11"><text:tab/>12</text:span></text:a></text:p>
          <text:p text:style-name="Contents_20_2" loext:marker-style-name="T12"><text:a xlink:type="simple" xlink:href="#_Toc172123639" text:style-name="Index_20_Link" text:visited-style-name="Index_20_Link">4.4.<text:span text:style-name="T12"><text:tab/></text:span>Can I build an app from the command line?<text:span text:style-name="T11"><text:tab/>12</text:span></text:a></text:p>
          <text:p text:style-name="Contents_20_1" loext:marker-style-name="T10"><text:a xlink:type="simple" xlink:href="#_Toc172123640" text:style-name="Index_20_Link" text:visited-style-name="Index_20_Link"><text:span text:style-name="T7">5.</text:span><text:span text:style-name="T10"><text:tab/></text:span><text:span text:style-name="T7">Fonts</text:span><text:span text:style-name="T11"><text:tab/>14</text:span></text:a></text:p>
          <text:p text:style-name="Contents_20_1" loext:marker-style-name="T10"><text:a xlink:type="simple" xlink:href="#_Toc172123641" text:style-name="Index_20_Link" text:visited-style-name="Index_20_Link"><text:span text:style-name="T7">6.</text:span><text:span text:style-name="T10"><text:tab/></text:span><text:span text:style-name="T7">Audio</text:span><text:span text:style-name="T11"><text:tab/>14</text:span></text:a></text:p>
          <text:p text:style-name="Contents_20_2" loext:marker-style-name="T12"><text:a xlink:type="simple" xlink:href="#_Toc172123642" text:style-name="Index_20_Link" text:visited-style-name="Index_20_Link">6.1.<text:span text:style-name="T12"><text:tab/></text:span>How do I distribute the audio MP3 files with the app?<text:span text:style-name="T11"><text:tab/>14</text:span></text:a></text:p>
          <text:p text:style-name="Contents_20_1" loext:marker-style-name="T10"><text:a xlink:type="simple" xlink:href="#_Toc172123643" text:style-name="Index_20_Link" text:visited-style-name="Index_20_Link"><text:span text:style-name="T7">7.</text:span><text:span text:style-name="T10"><text:tab/></text:span><text:span text:style-name="T7">Navigation Drawer</text:span><text:span text:style-name="T11"><text:tab/>17</text:span></text:a></text:p>
          <text:p text:style-name="Contents_20_1" loext:marker-style-name="T10"><text:a xlink:type="simple" xlink:href="#_Toc172123644" text:style-name="Index_20_Link" text:visited-style-name="Index_20_Link"><text:span text:style-name="T7">8.</text:span><text:span text:style-name="T10"><text:tab/></text:span><text:span text:style-name="T7">Analytics</text:span><text:span text:style-name="T11"><text:tab/>17</text:span></text:a></text:p>
          <text:p text:style-name="Contents_20_2" loext:marker-style-name="T12"><text:a xlink:type="simple" xlink:href="#_Toc172123645" text:style-name="Index_20_Link" text:visited-style-name="Index_20_Link">8.1.<text:span text:style-name="T12"><text:tab/></text:span><text:span text:style-name="T13">Firebase Analytics</text:span><text:span text:style-name="T11"><text:tab/>18</text:span></text:a></text:p>
          <text:p text:style-name="Contents_20_2" loext:marker-style-name="T12"><text:a xlink:type="simple" xlink:href="#_Toc172123646" text:style-name="Index_20_Link" text:visited-style-name="Index_20_Link">8.2.<text:span text:style-name="T12"><text:tab/></text:span><text:span text:style-name="T13">Amplitude Analytics</text:span><text:span text:style-name="T11"><text:tab/>19</text:span></text:a></text:p>
          <text:p text:style-name="Contents_20_2" loext:marker-style-name="T12"><text:a xlink:type="simple" xlink:href="#_Toc172123647" text:style-name="Index_20_Link" text:visited-style-name="Index_20_Link">8.3.<text:span text:style-name="T12"><text:tab/></text:span><text:span text:style-name="T13">S3 Digest Analytics</text:span><text:span text:style-name="T11"><text:tab/>19</text:span></text:a></text:p>
          <text:p text:style-name="Contents_20_2" loext:marker-style-name="T12"><text:a xlink:type="simple" xlink:href="#_Toc172123648" text:style-name="Index_20_Link" text:visited-style-name="Index_20_Link">8.4.<text:span text:style-name="T12"><text:tab/></text:span>Details on S3 Digest Analytics<text:span text:style-name="T11"><text:tab/>20</text:span></text:a></text:p>
          <text:p text:style-name="Contents_20_1" loext:marker-style-name="T10"><text:a xlink:type="simple" xlink:href="#_Toc172123649" text:style-name="Index_20_Link" text:visited-style-name="Index_20_Link">9.<text:span text:style-name="T10"><text:tab/></text:span>Registration Screen<text:span text:style-name="T11"><text:tab/>22</text:span></text:a></text:p>
          <text:p text:style-name="Contents_20_2" loext:marker-style-name="T12"><text:a xlink:type="simple" xlink:href="#_Toc172123650" text:style-name="Index_20_Link" text:visited-style-name="Index_20_Link"><text:span text:style-name="T4">9.1.</text:span><text:span text:style-name="T12"><text:tab/></text:span><text:span text:style-name="T4">Setting up the Registration Screen in Dictionary App Builder</text:span><text:span text:style-name="T11"><text:tab/>22</text:span></text:a></text:p>
          <text:p text:style-name="Contents_20_2" loext:marker-style-name="T12"><text:a xlink:type="simple" xlink:href="#_Toc172123651" text:style-name="Index_20_Link" text:visited-style-name="Index_20_Link"><text:span text:style-name="T4">9.2.</text:span><text:span text:style-name="T12"><text:tab/></text:span><text:span text:style-name="T4">Setting up the database in the Google Firebase console</text:span><text:span text:style-name="T11"><text:tab/>23</text:span></text:a></text:p>
          <text:p text:style-name="Contents_20_1" loext:marker-style-name="T10"><text:a xlink:type="simple" xlink:href="#_Toc172123652" text:style-name="Index_20_Link" text:visited-style-name="Index_20_Link"><text:span text:style-name="T7">10.</text:span><text:span text:style-name="T10"><text:tab/></text:span><text:span text:style-name="T7">Distribution</text:span><text:span text:style-name="T11"><text:tab/>26</text:span></text:a></text:p>
        </text:index-body>
      </text:table-of-content>
      <text:p text:style-name="P8" loext:marker-style-name="T7"/>
      <text:h text:style-name="P11" text:outline-level="1" loext:marker-style-name="T7"><text:bookmark-start text:name="_Toc452459025"/><text:bookmark-start text:name="_Toc172123629"/><text:bookmark-start text:name="_Toc468106959"/><text:span text:style-name="T7">Preparing content for your app</text:span><text:bookmark-end text:name="_Toc452459025"/><text:bookmark-end text:name="_Toc172123629"/><text:bookmark-end text:name="_Toc468106959"/><text:span text:style-name="T7"/></text:h>
      <text:p text:style-name="P12" loext:marker-style-name="T7"><text:span text:style-name="T7">Before you build an app with Dictionary App Builder (DAB), you need to get your content (lexicon file, images and audio) into formats that DAB can handle.</text:span><text:span text:style-name="T7"/></text:p>
      <text:h text:style-name="P13" text:outline-level="2"><text:bookmark-start text:name="_Toc468106960"/><text:bookmark-start text:name="_Toc172123630"/>Preparing <text:bookmark-end text:name="_Toc468106960"/>your lexicon file<text:bookmark-end text:name="_Toc172123630"/></text:h>
      <text:p text:style-name="Standard" loext:marker-style-name="T7"><text:span text:style-name="T7">DAB can read two types of lexicon database file: LIFT and XHTML.</text:span><text:span text:style-name="T7"/></text:p>
      <text:p text:style-name="P8" loext:marker-style-name="T7"/>
      <text:list text:style-name="WWNum9">
        <text:list-item>
          <text:p text:style-name="P14" loext:marker-style-name="T7"><text:span text:style-name="T14">Lexical Interchange FormaT (LIFT)</text:span><text:span text:style-name="T14"/></text:p>
        </text:list-item>
      </text:list>
      <text:p text:style-name="P15" loext:marker-style-name="T14"><text:span text:style-name="T7">LIFT files can be exported from any of the following SIL dictionary programs: FieldWorks Language Explorer (FLEx), WeSay or Lexique Pro.</text:span><text:span text:style-name="T14"/></text:p>
      <text:p text:style-name="P16" loext:marker-style-name="T7"><text:span text:style-name="T7">In FLEx, select </text:span><text:span text:style-name="T14">File</text:span><text:span text:style-name="T7"> </text:span><text:span text:style-name="T15"></text:span><text:span text:style-name="T7"> </text:span><text:span text:style-name="T14">Export</text:span><text:span text:style-name="T7">, then choose 'Full Lexicon (LIFT)'.</text:span></text:p>
      <text:p text:style-name="P17" loext:marker-style-name="T7"/>
      <text:list text:continue-numbering="true" text:style-name="WWNum9">
        <text:list-item>
          <text:p text:style-name="P14" loext:marker-style-name="T7"><text:span text:style-name="T14">XHTML</text:span><text:span text:style-name="T14"/></text:p>
        </text:list-item>
      </text:list>
      <text:p text:style-name="P15" loext:marker-style-name="T7"><text:span text:style-name="T7">DAB supports XHTML files which have been exported from FieldWorks Language Explorer (FLEx). XHTML files generated from other sources are not supported.</text:span><text:span text:style-name="T7"/></text:p>
      <text:p text:style-name="P16" loext:marker-style-name="T7"><text:span text:style-name="T7">In FLEx, select </text:span><text:span text:style-name="T14">File</text:span><text:span text:style-name="T7"> </text:span><text:span text:style-name="T15"></text:span><text:span text:style-name="T7"> </text:span><text:span text:style-name="T14">Export</text:span><text:span text:style-name="T7">, then choose 'Configured Dictionary (XHTML)'.</text:span></text:p>
      <text:p text:style-name="P18" loext:marker-style-name="T7"><text:span text:style-name="T7">You will also need to export a Reversal XHTML file for each index language. To do this, select </text:span><text:span text:style-name="T14">File</text:span><text:span text:style-name="T7"> </text:span><text:span text:style-name="T15"></text:span><text:span text:style-name="T7"> </text:span><text:span text:style-name="T14">Export</text:span><text:span text:style-name="T7">, then choose 'Reversal Index (XHTML)'.</text:span></text:p>
      <text:p text:style-name="P17" loext:marker-style-name="T7"/>
      <text:p text:style-name="P19" loext:marker-style-name="T7"><text:span text:style-name="T7">For more information about SIL dictionary software, please refer to the following websites:</text:span><text:span text:style-name="T7"/></text:p>
      <text:p text:style-name="P20" loext:marker-style-name="T7"><text:span text:style-name="T7">LIFT<text:tab/><text:tab/></text:span><text:a xlink:type="simple" xlink:href="https://code.google.com/p/lift-standard/" text:style-name="Internet_20_link" text:visited-style-name="Visited_20_Internet_20_Link"><text:span text:style-name="Internet_20_link"><text:span text:style-name="T7">https://code.google.com/p/lift-standard/</text:span></text:span></text:a></text:p>
      <text:p text:style-name="P21" loext:marker-style-name="T7"><text:span text:style-name="T7">FLEx<text:tab/><text:tab/></text:span><text:a xlink:type="simple" xlink:href="http://fieldworks.sil.org/flex/" text:style-name="Internet_20_link" text:visited-style-name="Visited_20_Internet_20_Link"><text:span text:style-name="Internet_20_link"><text:span text:style-name="T7">http://fieldworks.sil.org/flex/</text:span></text:span></text:a></text:p>
      <text:p text:style-name="P21" loext:marker-style-name="T7"><text:span text:style-name="T7">WeSay<text:tab/><text:tab/></text:span><text:a xlink:type="simple" xlink:href="http://wesay.palaso.org/" text:style-name="Internet_20_link" text:visited-style-name="Visited_20_Internet_20_Link"><text:span text:style-name="Internet_20_link"><text:span text:style-name="T7">http://wesay.palaso.org/</text:span></text:span></text:a></text:p>
      <text:p text:style-name="P21" loext:marker-style-name="T7"><text:span text:style-name="T7">Lexique Pro<text:tab/></text:span><text:a xlink:type="simple" xlink:href="http://lexiquepro.com/" text:style-name="Internet_20_link" text:visited-style-name="Visited_20_Internet_20_Link"><text:span text:style-name="Internet_20_link"><text:span text:style-name="T7">http://lexiquepro.com/</text:span></text:span></text:a><text:span text:style-name="T7"> </text:span></text:p>
      <text:p text:style-name="P17" loext:marker-style-name="T7"/>
      <text:h text:style-name="P13" text:outline-level="2"><text:bookmark-start text:name="_Toc468106961"/><text:bookmark-start text:name="_Toc172123631"/>Preparing images<text:bookmark-end text:name="_Toc468106961"/><text:bookmark-end text:name="_Toc172123631"/></text:h>
      <text:p text:style-name="Standard" loext:marker-style-name="T7"><text:span text:style-name="T7">Images should be in JPEG or PNG format.</text:span><text:span text:style-name="T7"/></text:p>
      <text:p text:style-name="P22" loext:marker-style-name="T7"><text:span text:style-name="T7">Keep the image size small enough so that they display well on a small screen and will not make the app size too large. DAB will allow you to resize the images after you have added them to the app project.</text:span><text:span text:style-name="T7"/></text:p>
      <text:p text:style-name="P23" loext:marker-style-name="T14"/>
      <text:h text:style-name="P13" text:outline-level="2"><text:bookmark-start text:name="_Toc468106962"/><text:bookmark-start text:name="_Toc172123632"/>Preparing audio<text:bookmark-end text:name="_Toc468106962"/><text:bookmark-end text:name="_Toc172123632"/></text:h>
      <text:p text:style-name="P24" loext:marker-style-name="T7"><text:span text:style-name="T7">If you want to include audio files in your app, these need to be in MP3, WAV or 3GP audio format. </text:span><text:span text:style-name="T7"/></text:p>
      <text:p text:style-name="P22" loext:marker-style-name="T7"><text:span text:style-name="T7">Keep the audio files at a size where the quality is good enough for a phone and where the file size is not too large.</text:span><text:span text:style-name="T7"/></text:p>
      <text:p text:style-name="P8" loext:marker-style-name="T7"/>
      <text:h text:style-name="P11" text:outline-level="1" loext:marker-style-name="T7"><text:bookmark-start text:name="_Toc172123633"/><text:span text:style-name="T7">How to build your first app</text:span><text:bookmark-end text:name="_Toc172123633"/><text:span text:style-name="T7"/></text:h>
      <text:p text:style-name="Standard" loext:marker-style-name="T7"><text:span text:style-name="T7">To build your first app with Dictionary App Builder:</text:span><text:span text:style-name="T7"/></text:p>
      <text:p text:style-name="P8" loext:marker-style-name="T7"/>
      <text:list text:style-name="WWNum4">
        <text:list-item>
          <text:p text:style-name="P25" loext:marker-style-name="T7"><text:span text:style-name="T7">Launch </text:span><text:span text:style-name="T14">Dictionary App Builder</text:span><text:span text:style-name="T7"> from its icon on the desktop.</text:span></text:p>
        </text:list-item>
      </text:list>
      <text:p text:style-name="P26" loext:marker-style-name="T7"/>
      <text:list text:continue-numbering="true" text:style-name="WWNum4">
        <text:list-item>
          <text:p text:style-name="P25" loext:marker-style-name="T7"><text:span text:style-name="T7">Click </text:span><text:span text:style-name="T14">New App</text:span><text:span text:style-name="T7"> on the toolbar. The New App wizard will appear.</text:span></text:p>
        </text:list-item>
      </text:list>
      <text:p text:style-name="P8" loext:marker-style-name="T7"/>
      <text:list text:continue-numbering="true" text:style-name="WWNum4">
        <text:list-item>
          <text:p text:style-name="P25" loext:marker-style-name="T7"><text:span text:style-name="T7">On the first page of the wizard titled </text:span><text:span text:style-name="T14">Lexicon Database</text:span><text:span text:style-name="T7">, click </text:span><text:span text:style-name="T14">Browse… </text:span><text:span text:style-name="T7">and select the lexicon data file you want to display in the app. </text:span></text:p>
        </text:list-item>
      </text:list>
      <text:p text:style-name="P8" loext:marker-style-name="T7"/>
      <text:p text:style-name="P27" loext:marker-style-name="T7"><text:span text:style-name="T7">Click </text:span><text:span text:style-name="T14">Next</text:span><text:span text:style-name="T7"> to move to the next page.</text:span></text:p>
      <text:p text:style-name="P28" loext:marker-style-name="T7"/>
      <text:list text:continue-numbering="true" text:style-name="WWNum4">
        <text:list-item>
          <text:p text:style-name="P25" loext:marker-style-name="T7"><text:span text:style-name="T7">On the next page of the wizard titled </text:span><text:span text:style-name="T14">Lexicon Details</text:span><text:span text:style-name="T7">, you will see the number of entries and the languages found in the lexicon.</text:span></text:p>
        </text:list-item>
      </text:list>
      <text:p text:style-name="P6" loext:marker-style-name="T4"/>
      <text:p text:style-name="P27" loext:marker-style-name="T7"><text:span text:style-name="T7">Click </text:span><text:span text:style-name="T14">Next</text:span><text:span text:style-name="T7"> to move to the next page.</text:span></text:p>
      <text:p text:style-name="P28" loext:marker-style-name="T7"/>
      <text:list text:continue-numbering="true" text:style-name="WWNum4">
        <text:list-item>
          <text:p text:style-name="P25" loext:marker-style-name="T7"><text:span text:style-name="T7">If your lexical database is an XHTML file, the next page of the wizard will be titled </text:span><text:span text:style-name="T14">Reversal Indexes</text:span><text:span text:style-name="T7">. Click </text:span><text:span text:style-name="T14">Add Reversal Index File… </text:span><text:span text:style-name="T7">and select one or more reversal index files that you have exported from FLEx. </text:span></text:p>
        </text:list-item>
      </text:list>
      <text:p text:style-name="P6" loext:marker-style-name="T4"/>
      <text:p text:style-name="P27" loext:marker-style-name="T7"><text:span text:style-name="T7">Click </text:span><text:span text:style-name="T14">Next</text:span><text:span text:style-name="T7"> to move to the next page.</text:span></text:p>
      <text:p text:style-name="P28" loext:marker-style-name="T7"/>
      <text:list text:continue-numbering="true" text:style-name="WWNum4">
        <text:list-item>
          <text:p text:style-name="P25" loext:marker-style-name="T7"><text:span text:style-name="T7">On the page of the wizard titled </text:span><text:span text:style-name="T14">App Name</text:span><text:span text:style-name="T7">, specify the </text:span><text:span text:style-name="T14">App Name</text:span><text:span text:style-name="T7">, such as “Dogon Dictionary”, “Mamara Lexicon”, etc. </text:span></text:p>
        </text:list-item>
      </text:list>
      <text:p text:style-name="P29" loext:marker-style-name="T7"><text:span text:style-name="T7">This is the main title of your app and will be seen by the user. Do not include underscores or hard to understand abbreviations.</text:span><text:span text:style-name="T7"/></text:p>
      <text:p text:style-name="P8" loext:marker-style-name="T7"/>
      <text:p text:style-name="P27" loext:marker-style-name="T7"><text:span text:style-name="T7">Click </text:span><text:span text:style-name="T14">Next</text:span><text:span text:style-name="T7"> to move to the next page.</text:span></text:p>
      <text:p text:style-name="P8" loext:marker-style-name="T7"/>
      <text:list text:continue-numbering="true" text:style-name="WWNum4">
        <text:list-item>
          <text:p text:style-name="P25" loext:marker-style-name="T7"><text:span text:style-name="T7">On the page of the wizard titled </text:span><text:span text:style-name="T14">Package</text:span><text:span text:style-name="T7">, specify the </text:span><text:span text:style-name="T14">Package Name</text:span><text:span text:style-name="T7">, a dot-separated string which uniquely identifies your app. </text:span></text:p>
        </text:list-item>
      </text:list>
      <text:p text:style-name="P30" loext:marker-style-name="T7"><text:span text:style-name="T7">More details about choosing a good package name can be found in section </text:span><text:span text:style-name="T16">4.1. How should I choose the app package name?</text:span></text:p>
      <text:p text:style-name="P8" loext:marker-style-name="T7"/>
      <text:p text:style-name="P27" loext:marker-style-name="T7"><text:span text:style-name="T7">Click </text:span><text:span text:style-name="T14">Next</text:span><text:span text:style-name="T7"> to move to the next page.</text:span></text:p>
      <text:p text:style-name="P28" loext:marker-style-name="T7"/>
      <text:list text:continue-numbering="true" text:style-name="WWNum4">
        <text:list-item>
          <text:p text:style-name="P25" loext:marker-style-name="T7"><text:span text:style-name="T7">On the page of the wizard titled </text:span><text:span text:style-name="T14">Indexes</text:span><text:span text:style-name="T7">, select the languages for which you would like to see an index tab in the app.</text:span></text:p>
        </text:list-item>
      </text:list>
      <text:p text:style-name="P6" loext:marker-style-name="T4"/>
      <text:p text:style-name="P27" loext:marker-style-name="T7"><text:span text:style-name="T7">Click </text:span><text:span text:style-name="T14">Next</text:span><text:span text:style-name="T7"> to move to the next page.</text:span></text:p>
      <text:p text:style-name="P8" loext:marker-style-name="T7"/>
      <text:list text:continue-numbering="true" text:style-name="WWNum4">
        <text:list-item>
          <text:p text:style-name="P25" loext:marker-style-name="T13"><text:span text:style-name="T13">On the page of the wizard titled </text:span><text:span text:style-name="T17">Font Handling</text:span><text:span text:style-name="T13">, you can select GeckoView if you know that the standard Android components will have trouble displaying the text correctly (e.g. if it is a complex script). More information on GeckoView can be found in the </text:span><text:span text:style-name="T18">Fonts</text:span><text:span text:style-name="T13"> section of this document.</text:span></text:p>
        </text:list-item>
      </text:list>
      <text:p text:style-name="P31" loext:marker-style-name="T19"/>
      <text:p text:style-name="P27" loext:marker-style-name="T13"><text:span text:style-name="T13">Click </text:span><text:span text:style-name="T17">Next</text:span><text:span text:style-name="T13"> to move to the next page.</text:span></text:p>
      <text:p text:style-name="P8" loext:marker-style-name="T7"/>
      <text:list text:continue-numbering="true" text:style-name="WWNum4">
        <text:list-item>
          <text:p text:style-name="P25" loext:marker-style-name="T7"><text:span text:style-name="T7">On the page of the wizard titled </text:span><text:span text:style-name="T14">Fonts</text:span><text:span text:style-name="T7">, choose the font for each language. You can either select from the given list of fonts or click </text:span><text:span text:style-name="T14">Other</text:span><text:span text:style-name="T7"> to specify a different TrueType font file.</text:span></text:p>
        </text:list-item>
      </text:list>
      <text:p text:style-name="P6" loext:marker-style-name="T4"/>
      <text:p text:style-name="P27" loext:marker-style-name="T7"><text:span text:style-name="T7">Click </text:span><text:span text:style-name="T14">Next</text:span><text:span text:style-name="T7"> to move to the next page.</text:span></text:p>
      <text:p text:style-name="P8" loext:marker-style-name="T7"/>
      <text:list text:continue-numbering="true" text:style-name="WWNum4">
        <text:list-item>
          <text:p text:style-name="P25" loext:marker-style-name="T7"><text:span text:style-name="T7">On the page of the wizard titled </text:span><text:span text:style-name="T14">Color Scheme</text:span><text:span text:style-name="T7">, choose the color scheme for the app. The color you choose is the one that will be used for the main app bar. Individual colors for text, titles, links, backgrounds, etc. can be customised later.</text:span></text:p>
        </text:list-item>
      </text:list>
      <text:p text:style-name="P8" loext:marker-style-name="T7"/>
      <text:p text:style-name="P27" loext:marker-style-name="T7"><text:span text:style-name="T7">Click </text:span><text:span text:style-name="T14">Next</text:span><text:span text:style-name="T7"> to move to the next page.</text:span></text:p>
      <text:p text:style-name="P8" loext:marker-style-name="T7"/>
      <text:list text:continue-numbering="true" text:style-name="WWNum4">
        <text:list-item>
          <text:p text:style-name="P25" loext:marker-style-name="T7"><text:span text:style-name="T7">On the page of the wizard titled </text:span><text:span text:style-name="T14">Icon</text:span><text:span text:style-name="T7">, choose the application launcher icon. You can select one of the images in the table or if you have your own PNG image files for the icon, click </text:span><text:span text:style-name="T14">Browse</text:span><text:span text:style-name="T7"> and select them.</text:span></text:p>
        </text:list-item>
      </text:list>
      <text:p text:style-name="P8" loext:marker-style-name="T7"/>
      <text:p text:style-name="P27" loext:marker-style-name="T7"><text:span text:style-name="T7">Click </text:span><text:span text:style-name="T14">Next</text:span><text:span text:style-name="T7"> to move to the next page.</text:span></text:p>
      <text:p text:style-name="P8" loext:marker-style-name="T7"/>
      <text:list xml:id="list131438100681858" text:continue-numbering="true" text:style-name="WWNum4">
        <text:list-item>
          <text:p text:style-name="P25" loext:marker-style-name="T7"><text:span text:style-name="T7">On the page of the wizard titled </text:span><text:span text:style-name="T14">Signing</text:span><text:span text:style-name="T7">, you need to specify the keystore and alias to use to sign the app. An app must be signed in this way so that it can installed on an Android device.</text:span></text:p>
        </text:list-item>
      </text:list>
      <text:p text:style-name="P8" loext:marker-style-name="T7"/>
      <text:p text:style-name="P27" loext:marker-style-name="T13"><text:bookmark-start text:name="_Hlk66432541"/><text:span text:style-name="T13">If you do not already have a keystore file (which you are unlikely to have if this is your first time using the program):</text:span><text:span text:style-name="T13"/></text:p>
      <text:list text:style-name="WWNum5">
        <text:list-item>
          <text:p text:style-name="P32" loext:marker-style-name="T13"><text:span text:style-name="T13">Click </text:span><text:span text:style-name="T17">Create KeyStore</text:span><text:span text:style-name="T13">.</text:span></text:p>
        </text:list-item>
      </text:list>
      <text:p text:style-name="P33" loext:marker-style-name="T13"/>
      <text:list text:continue-numbering="true" text:style-name="WWNum5">
        <text:list-item>
          <text:p text:style-name="P34" loext:marker-style-name="T13"><text:span text:style-name="T13">Enter a new filename for the keystore, such as “keystore1” or something like that. Specify a password. Click </text:span><text:span text:style-name="T17">Next</text:span><text:span text:style-name="T13"> to continue.</text:span></text:p>
        </text:list-item>
      </text:list>
      <text:p text:style-name="P35" loext:marker-style-name="T13"/>
      <text:list text:continue-numbering="true" text:style-name="WWNum5">
        <text:list-item>
          <text:p text:style-name="P34" loext:marker-style-name="T13"><text:span text:style-name="T13">Enter an alias name for a key to create within your new keystore, such as “key”. Specify a password, which can be the same as the password you entered on the previous page. Click </text:span><text:span text:style-name="T17">Next</text:span><text:span text:style-name="T13"> to continue.</text:span></text:p>
        </text:list-item>
      </text:list>
      <text:p text:style-name="P36" loext:marker-style-name="T13"/>
      <text:list text:continue-numbering="true" text:style-name="WWNum5">
        <text:list-item>
          <text:p text:style-name="P34" loext:marker-style-name="T13"><text:span text:style-name="T13">On the </text:span><text:span text:style-name="T18">Certificate Issuer</text:span><text:span text:style-name="T13"> page, provide details of your organisation in at least one of the fields. Click </text:span><text:span text:style-name="T17">Next</text:span><text:span text:style-name="T13"> to continue.</text:span></text:p>
        </text:list-item>
      </text:list>
      <text:p text:style-name="P35" loext:marker-style-name="T13"/>
      <text:list text:continue-numbering="true" text:style-name="WWNum5">
        <text:list-item>
          <text:p text:style-name="P34" loext:marker-style-name="T13"><text:span text:style-name="T13">A new keystore will be created for you. Click </text:span><text:span text:style-name="T17">Close</text:span><text:span text:style-name="T13">.</text:span><text:bookmark-end text:name="_Hlk66432541"/></text:p>
        </text:list-item>
      </text:list>
      <text:p text:style-name="P8" loext:marker-style-name="T7"/>
      <text:list text:continue-list="list131438100681858" text:style-name="WWNum4">
        <text:list-item>
          <text:p text:style-name="P25" loext:marker-style-name="T7"><text:span text:style-name="T7">Back on the </text:span><text:span text:style-name="T14">Signing</text:span><text:span text:style-name="T7"> page of the New App wizard, you need to specify the keystore password, select the alias and enter the alias password (just as you entered them in the step above).</text:span></text:p>
        </text:list-item>
      </text:list>
      <text:p text:style-name="P26" loext:marker-style-name="T7"/>
      <text:p text:style-name="P27" loext:marker-style-name="T7"><text:span text:style-name="T7">Click </text:span><text:span text:style-name="T14">Next</text:span><text:span text:style-name="T7"> to continue.</text:span></text:p>
      <text:p text:style-name="P8" loext:marker-style-name="T7"/>
      <text:list text:continue-numbering="true" text:style-name="WWNum4">
        <text:list-item>
          <text:p text:style-name="P25" loext:marker-style-name="T7"><text:span text:style-name="T7">On the page of the wizard titled </text:span><text:span text:style-name="T14">Project</text:span><text:span text:style-name="T7">, you can enter modify the project name and add an optional description of the app project. Neither of these will be visible to the user of your app. They are just for your own use and might help you distinguish between multiple app projects.</text:span></text:p>
        </text:list-item>
      </text:list>
      <text:p text:style-name="P8" loext:marker-style-name="T7"/>
      <text:p text:style-name="P27" loext:marker-style-name="T7"><text:span text:style-name="T7">Click </text:span><text:span text:style-name="T14">Next</text:span><text:span text:style-name="T7"> to continue. The New App wizard will close and the app definition will be added to the tree view on the left of the screen.</text:span></text:p>
      <text:p text:style-name="P8" loext:marker-style-name="T7"/>
      <text:list text:continue-numbering="true" text:style-name="WWNum4">
        <text:list-item>
          <text:p text:style-name="P25" loext:marker-style-name="T7"><text:span text:style-name="T7">Take a look at each of the app configuration pages by selecting them in the tree view on the left. Look in each of the tabs on each page to verify that you have the settings you want. You can always go back to them later to change them if you find you need to make modifications to fonts, colors, styles, etc.</text:span><text:span text:style-name="T7"/></text:p>
        </text:list-item>
      </text:list>
      <text:p text:style-name="P8" loext:marker-style-name="T7"/>
      <text:list text:continue-numbering="true" text:style-name="WWNum4">
        <text:list-item>
          <text:p text:style-name="P25" loext:marker-style-name="T7"><text:bookmark-start text:name="_Hlk66432419"/><text:span text:style-name="T7">When you have finished configuring the app, </text:span><text:span text:style-name="T13">click the </text:span><text:span text:style-name="T17">Build Android App </text:span><text:span text:style-name="T20">button on the toolbar at the top of the screen</text:span><text:span text:style-name="T13">.</text:span><text:bookmark-end text:name="_Hlk66432419"/></text:p>
        </text:list-item>
      </text:list>
      <text:p text:style-name="P37" loext:marker-style-name="T7"/>
      <text:p text:style-name="P27" loext:marker-style-name="T7"><text:span text:style-name="T7">If something is not configured correctly for the build to work, you will be notified of this. </text:span><text:span text:style-name="T7"/></text:p>
      <text:p text:style-name="P8" loext:marker-style-name="T7"/>
      <text:list text:continue-numbering="true" text:style-name="WWNum4">
        <text:list-item>
          <text:p text:style-name="P25" loext:marker-style-name="T7"><text:span text:style-name="T7">A black command box will appear. Wait about a minute while the app is compiled.</text:span><text:span text:style-name="T7"/></text:p>
        </text:list-item>
      </text:list>
      <text:p text:style-name="P8" loext:marker-style-name="T7"/>
      <text:p text:style-name="P15" loext:marker-style-name="T7"><text:span text:style-name="T7">The first time the build process is run, the compiler needs to connect to the internet to download some files. After this, subsequent app builds will not require internet access. See </text:span><text:span text:style-name="T14">Tools</text:span><text:span text:style-name="T7"> </text:span><text:span text:style-name="T15"></text:span><text:span text:style-name="T4"> </text:span><text:span text:style-name="T14">Settings…</text:span><text:span text:style-name="T7"> </text:span><text:span text:style-name="T15"></text:span><text:span text:style-name="T7"> </text:span><text:span text:style-name="T14">Build Settings</text:span><text:span text:style-name="T7"> to turn on offline mode after the first app build.</text:span></text:p>
      <text:p text:style-name="P26" loext:marker-style-name="T7"/>
      <text:list text:continue-numbering="true" text:style-name="WWNum4">
        <text:list-item>
          <text:p text:style-name="P25" loext:marker-style-name="T13"><text:bookmark-start text:name="_Hlk66432439"/><text:span text:style-name="T13">If the build succeeds, you will have a new APK file – the installation file for an Android app.</text:span><text:span text:style-name="T13"/></text:p>
        </text:list-item>
      </text:list>
      <text:p text:style-name="P35" loext:marker-style-name="T13"/>
      <text:p text:style-name="Standard" loext:marker-style-name="T13"><text:span text:style-name="T13">The next section describes how to copy this APK file to your phone and launch the app.</text:span><text:span text:style-name="T13"/></text:p>
      <text:h text:style-name="P38" text:outline-level="1" loext:marker-style-name="T7"><text:bookmark-end text:name="_Hlk66432439"/><text:bookmark-start text:name="_Hlk66432451"/></text:h>
      <text:h text:style-name="Heading_20_1" text:outline-level="1"><text:bookmark-start text:name="_Toc66108082"/><text:bookmark-start text:name="_Toc172123634"/>Installing the app on your phone<text:bookmark-end text:name="_Toc66108082"/><text:bookmark-end text:name="_Toc172123634"/></text:h>
      <text:p text:style-name="P39" loext:marker-style-name="T13"/>
      <text:p text:style-name="Standard" loext:marker-style-name="T13"><text:span text:style-name="T13">In the above section, you have seen how to compile an Android app. The result is an APK file, the installation file for an Android app. You now need to copy this APK file to your phone, install it and launch the app.</text:span><text:span text:style-name="T13"/></text:p>
      <text:p text:style-name="P35" loext:marker-style-name="T13"/>
      <text:p text:style-name="Standard" loext:marker-style-name="T13"><text:span text:style-name="T13">Here is how to do this:</text:span><text:span text:style-name="T13"/></text:p>
      <text:p text:style-name="P35" loext:marker-style-name="T13"/>
      <text:list text:style-name="WWNum24">
        <text:list-item>
          <text:p text:style-name="P40" loext:marker-style-name="T13"><text:span text:style-name="T13">Connect your Android phone to your computer using a </text:span><text:span text:style-name="T18">USB data cable</text:span><text:span text:style-name="T13">. </text:span></text:p>
        </text:list-item>
      </text:list>
      <text:p text:style-name="P36" loext:marker-style-name="T13"/>
      <text:p text:style-name="List_20_Paragraph" loext:marker-style-name="T13"><text:span text:style-name="T13">(Sometimes you get cheap USB cables that can only charge a phone but cannot transfer data, so make sure you have the right kind of cable.)</text:span><text:span text:style-name="T13"/></text:p>
      <text:p text:style-name="P41" loext:marker-style-name="T13"/>
      <text:list text:continue-numbering="true" text:style-name="WWNum24">
        <text:list-item>
          <text:p text:style-name="P40" loext:marker-style-name="T13"><text:span text:style-name="T13">Ensure that </text:span><text:span text:style-name="T18">Developer Options </text:span><text:span text:style-name="T15"></text:span><text:span text:style-name="T19"> </text:span><text:span text:style-name="T21">USB Debugging</text:span><text:span text:style-name="T13"> is enabled on your phone. By default, on new phones, Developer Options is turned off. This is how you can enable it:</text:span></text:p>
          <text:list>
            <text:list-item>
              <text:p text:style-name="P42" loext:marker-style-name="T13"><text:span text:style-name="T13">Open the </text:span><text:span text:style-name="T18">Settings </text:span><text:span text:style-name="T13">menu of your phone.</text:span></text:p>
            </text:list-item>
            <text:list-item>
              <text:p text:style-name="P42" loext:marker-style-name="T13"><text:span text:style-name="T13">Scroll down to the bottom of the menu and tap on </text:span><text:span text:style-name="T18">About Phone</text:span><text:span text:style-name="T13">.</text:span></text:p>
            </text:list-item>
            <text:list-item>
              <text:p text:style-name="P42" loext:marker-style-name="T13"><text:span text:style-name="T13">Find the </text:span><text:span text:style-name="T18">Build Number</text:span><text:span text:style-name="T13">. This could be on the About Phone page, or under a sub-menu such as ‘Software Information’.</text:span></text:p>
            </text:list-item>
            <text:list-item>
              <text:p text:style-name="P42" loext:marker-style-name="T13"><text:span text:style-name="T13">Tap on the Build Number </text:span><text:span text:style-name="T18">seven times</text:span><text:span text:style-name="T13">. As you do this, you will see a series of messages appearing: “You are now 3 steps away from being a developer”, “You are now 2 steps away from being a developer”, “You are now 1 step away from being a developer”, “You are now a developer!”.</text:span></text:p>
            </text:list-item>
          </text:list>
        </text:list-item>
      </text:list>
      <text:p text:style-name="P43" loext:marker-style-name="T13"><draw:custom-shape text:anchor-type="char" draw:z-index="5" draw:style-name="gr2" draw:text-style-name="P44" svg:width="0.5953in" svg:height="0.3024in" draw:transform="rotate (-2.68571265296887) translate (4.54742454068241in 3.238757655293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8" draw:name="Picture 9" draw:style-name="gr1" draw:text-style-name="P3" svg:width="2.0906in" svg:height="3.6394in"><draw:image xlink:href="Pictures/10000000000002D000000500A2F1A810.png" xlink:type="simple" xlink:show="embed" xlink:actuate="onLoad" draw:mime-type="image/png"><text:p/></draw:image></draw:frame></text:p>
      <text:p text:style-name="P45" loext:marker-style-name="T13"/>
      <text:list text:continue-numbering="true" text:style-name="WWNum24">
        <text:list-item>
          <text:list>
            <text:list-item>
              <text:p text:style-name="P42" loext:marker-style-name="T13"><text:span text:style-name="T13">Now return to the Configuration menu of your phone. Look for the Developer Options menu item. You might see </text:span><text:span text:style-name="T18">Developer Options</text:span><text:span text:style-name="T13"> above the </text:span><text:span text:style-name="T18">About Phone</text:span><text:span text:style-name="T13"> menu item. If you do not see it here, it could be in </text:span><text:span text:style-name="T18">System</text:span><text:span text:style-name="T13"> settings, under </text:span><text:span text:style-name="T18">Advanced</text:span><text:span text:style-name="T13">. Different phones place Developer Options in different places, so look around your Configuration menu until you find it.</text:span></text:p>
            </text:list-item>
          </text:list>
        </text:list-item>
      </text:list>
      <text:p text:style-name="P43" loext:marker-style-name="T13"><draw:custom-shape text:anchor-type="char" draw:z-index="4" draw:style-name="gr2" draw:text-style-name="P44" svg:width="0.5953in" svg:height="0.3024in" draw:transform="rotate (-2.68571265296887) translate (4.45119750656168in 2.8852854330708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9" draw:name="Picture 10" draw:style-name="gr1" draw:text-style-name="P3" svg:width="2.0906in" svg:height="3.7224in"><draw:image xlink:href="Pictures/10000000000002D0000005002848B2DD.png" xlink:type="simple" xlink:show="embed" xlink:actuate="onLoad" draw:mime-type="image/png"><text:p/></draw:image></draw:frame></text:p>
      <text:p text:style-name="P45" loext:marker-style-name="T13"/>
      <text:list text:continue-numbering="true" text:style-name="WWNum24">
        <text:list-item>
          <text:list>
            <text:list-item>
              <text:p text:style-name="P42" loext:marker-style-name="T13"><text:span text:style-name="T13">Tap on </text:span><text:span text:style-name="T18">Developer Options</text:span><text:span text:style-name="T13"> and ensure that it is turned on.</text:span></text:p>
            </text:list-item>
            <text:list-item>
              <text:p text:style-name="P42" loext:marker-style-name="T13"><text:span text:style-name="T13">Scroll down the Developer Options page and find </text:span><text:span text:style-name="T18">USB Debugging</text:span><text:span text:style-name="T13">. Enable this setting. </text:span></text:p>
            </text:list-item>
          </text:list>
        </text:list-item>
      </text:list>
      <text:p text:style-name="P46" loext:marker-style-name="T13"><draw:custom-shape text:anchor-type="char" draw:z-index="1" draw:name="AutoShape 160" draw:style-name="gr2" draw:text-style-name="P44" svg:width="0.5953in" svg:height="0.3024in" draw:transform="rotate (-2.68571265296887) translate (4.80089676290464in 1.2943132108486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10" draw:name="Picture 12" draw:style-name="gr1" draw:text-style-name="P3" svg:width="2.0004in" svg:height="3.6394in"><draw:image xlink:href="Pictures/10000000000002D00000050009D20BA5.png" xlink:type="simple" xlink:show="embed" xlink:actuate="onLoad" draw:mime-type="image/png"><text:p/></draw:image></draw:frame></text:p>
      <text:p text:style-name="P47" loext:marker-style-name="T13"/>
      <text:p text:style-name="P48" loext:marker-style-name="T13"><text:span text:style-name="T13">When you do this, you will probably get a message “Allow USB Debugging?”. Tap </text:span><text:span text:style-name="T18">OK</text:span><text:span text:style-name="T13">.</text:span></text:p>
      <text:p text:style-name="P46" loext:marker-style-name="T13"><draw:custom-shape text:anchor-type="char" draw:z-index="2" draw:style-name="gr2" draw:text-style-name="P44" svg:width="0.5953in" svg:height="0.3024in" draw:transform="rotate (-2.68571265296887) translate (4.6484197287839in 2.2759569116360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11" draw:name="Picture 13" draw:style-name="gr1" draw:text-style-name="P3" svg:width="2.0906in" svg:height="3.6394in"><draw:image xlink:href="Pictures/10000000000002D000000500C6B6F629.png" xlink:type="simple" xlink:show="embed" xlink:actuate="onLoad" draw:mime-type="image/png"><text:p/></draw:image></draw:frame></text:p>
      <text:p text:style-name="P49" loext:marker-style-name="T13"/>
      <text:p text:style-name="P50" loext:marker-style-name="T13"><text:span text:style-name="T13">If you see a message box like this, tap </text:span><text:span text:style-name="T18">OK</text:span><text:span text:style-name="T13">:</text:span></text:p>
      <text:p text:style-name="P43" loext:marker-style-name="T13"><draw:custom-shape text:anchor-type="char" draw:z-index="3" draw:style-name="gr2" draw:text-style-name="P44" svg:width="0.5953in" svg:height="0.3024in" draw:transform="rotate (-2.68571265296887) translate (4.42728565179353in 2.308202099737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12" draw:name="Picture 14" draw:style-name="gr1" draw:text-style-name="P3" svg:width="2.0906in" svg:height="3.6394in"><draw:image xlink:href="Pictures/10000000000002D000000500929119A0.png" xlink:type="simple" xlink:show="embed" xlink:actuate="onLoad" draw:mime-type="image/png"><text:p/></draw:image></draw:frame></text:p>
      <text:p text:style-name="P45" loext:marker-style-name="T13"/>
      <text:p text:style-name="P45" loext:marker-style-name="T13"/>
      <text:list text:continue-numbering="true" text:style-name="WWNum24">
        <text:list-item>
          <text:p text:style-name="P40" loext:marker-style-name="T13"><text:span text:style-name="T13">In Dictionary App Builder, click the </text:span><text:span text:style-name="T18">Install APK</text:span><text:span text:style-name="T13"> button on the toolbar at the top right of the screen.</text:span></text:p>
        </text:list-item>
      </text:list>
      <text:p text:style-name="P36" loext:marker-style-name="T13"/>
      <text:p text:style-name="List_20_Paragraph" loext:marker-style-name="T13"><text:span text:style-name="T13">A command window will open and the APK file will be copied to your phone, installed and the app will be launched. </text:span><text:span text:style-name="T13"/></text:p>
      <text:p text:style-name="P36" loext:marker-style-name="T13"/>
      <text:p text:style-name="List_20_Paragraph" loext:marker-style-name="T13"><text:span text:style-name="T13">If this does not work, look at the command window to see if there is an error message. If you see a message such as “No devices/emulators found”, it means that your phone and computer are not connected correctly or that you have not enabled USB debugging on your phone.</text:span><text:span text:style-name="T13"/></text:p>
      <text:p text:style-name="P35" loext:marker-style-name="T13"/>
      <text:p text:style-name="P35" loext:marker-style-name="T13"/>
      <text:p text:style-name="Standard" loext:marker-style-name="T22"><text:span text:style-name="T22">Note:</text:span><text:span text:style-name="T22"/></text:p>
      <text:p text:style-name="Standard" loext:marker-style-name="T13"><text:span text:style-name="T13">Described above is a two-step process: </text:span><text:span text:style-name="T18">Build App</text:span><text:span text:style-name="T13"> and then </text:span><text:span text:style-name="T18">Install APK</text:span><text:span text:style-name="T13">. If you prefer, you can tell Dictionary App Builder to do this in one step, i.e. for the APK to be installed and launched automatically after building an app. See </text:span><text:span text:style-name="T17">Tools</text:span><text:span text:style-name="T13"> </text:span><text:span text:style-name="T15"></text:span><text:span text:style-name="T19"> </text:span><text:span text:style-name="T17">Settings…</text:span><text:span text:style-name="T13"> </text:span><text:span text:style-name="T15"></text:span><text:span text:style-name="T13"> </text:span><text:span text:style-name="T17">After Build</text:span><text:span text:style-name="T13"> to enable this feature.</text:span></text:p>
      <text:p text:style-name="P35" loext:marker-style-name="T13"><text:bookmark-end text:name="_Hlk66432451"/></text:p>
      <text:p text:style-name="P35" loext:marker-style-name="T13"/>
      <text:h text:style-name="P51" text:outline-level="1" loext:marker-style-name="T7"><text:bookmark-start text:name="_Toc172123635"/><text:span text:style-name="T7">App Creation Basics</text:span><text:bookmark-end text:name="_Toc172123635"/><text:span text:style-name="T7"/></text:h>
      <text:h text:style-name="P52" text:outline-level="2" loext:marker-style-name="T7"><text:bookmark-start text:name="_Toc172123636"/><text:span text:style-name="T7">How should I choose the app package name?</text:span><text:bookmark-end text:name="_Toc172123636"/><text:span text:style-name="T7"/></text:h>
      <text:p text:style-name="P24" loext:marker-style-name="T7"><text:span text:style-name="T7">The standard for an app package name is to begin with the reversed web address of the publishing organisation, e.g. if it is SIL, the package name could begin with: </text:span><text:span text:style-name="T7"/></text:p>
      <text:p text:style-name="P53" loext:marker-style-name="T23"><text:span text:style-name="T23">org.sil</text:span><text:span text:style-name="T23"/></text:p>
      <text:p text:style-name="P54" loext:marker-style-name="T7"/>
      <text:p text:style-name="Standard" loext:marker-style-name="T7"><text:span text:style-name="T7">and will be followed by something identifying the language and type of publication, e.g.</text:span><text:span text:style-name="T7"/></text:p>
      <text:p text:style-name="P8" loext:marker-style-name="T7"/>
      <text:p text:style-name="P20" loext:marker-style-name="T23"><text:span text:style-name="T23">org.sil.cccc.nnnn.lexicon</text:span><text:span text:style-name="T23"/></text:p>
      <text:p text:style-name="P8" loext:marker-style-name="T7"/>
      <text:p text:style-name="Standard" loext:marker-style-name="T7"><text:span text:style-name="T7">where ‘cccc’ is the country name and ‘nnnn’ is the language name.</text:span><text:span text:style-name="T7"/></text:p>
      <text:p text:style-name="P8" loext:marker-style-name="T7"/>
      <text:p text:style-name="Standard" loext:marker-style-name="T7"><text:span text:style-name="T7">If you work for a university or linguistics organisation, you might have standards to follow for package names, so please contact your digital publications coordinator for advice on this.</text:span><text:span text:style-name="T7"/></text:p>
      <text:p text:style-name="P8" loext:marker-style-name="T7"/>
      <text:p text:style-name="Standard" loext:marker-style-name="T7"><text:span text:style-name="T7">Once you publish your app on an app store, you cannot change its package name later if you want users to continue to receive updates. The package name uniquely identifies the app in the Android world. Those who install the app will be able to find its package name on their device. It will also appear in the web address for your app if you make it available on Google Play.</text:span><text:span text:style-name="T7"/></text:p>
      <text:p text:style-name="P8" loext:marker-style-name="T7"/>
      <text:p text:style-name="Standard" loext:marker-style-name="T7"><text:span text:style-name="T7">If you are building apps for </text:span><text:span text:style-name="T14">test purposes </text:span><text:span text:style-name="T7">on your devices, you can use a package name beginning with com.example, e.g.</text:span></text:p>
      <text:p text:style-name="P8" loext:marker-style-name="T7"/>
      <text:p text:style-name="Standard" loext:marker-style-name="T23"><text:span text:style-name="T23"><text:tab/>com.example.test.app123</text:span><text:span text:style-name="T23"/></text:p>
      <text:p text:style-name="P8" loext:marker-style-name="T7"/>
      <text:p text:style-name="Standard" loext:marker-style-name="T7"><text:span text:style-name="T7">But remember to change it before you publish the app.</text:span><text:span text:style-name="T7"/></text:p>
      <text:p text:style-name="P8" loext:marker-style-name="T7"/>
      <text:h text:style-name="P52" text:outline-level="2" loext:marker-style-name="T7"><text:bookmark-start text:name="_Toc172123637"/><text:span text:style-name="T7">Do I have to create a new keystore for each app, or can I reuse the same keystore for several of my apps?</text:span><text:bookmark-end text:name="_Toc172123637"/><text:span text:style-name="T7"/></text:h>
      <text:p text:style-name="Standard" loext:marker-style-name="T7"><text:span text:style-name="T7">You can use the same keystore and key alias for all or several of your apps.</text:span><text:span text:style-name="T7"/></text:p>
      <text:p text:style-name="P8" loext:marker-style-name="T7"/>
      <text:p text:style-name="P19" loext:marker-style-name="T7"><text:span text:style-name="T7">See here for more details: </text:span><text:span text:style-name="T7"/></text:p>
      <text:p text:style-name="P20" loext:marker-style-name="T7"><text:a xlink:type="simple" xlink:href="http://developer.android.com/tools/publishing/app-signing.html" text:style-name="Internet_20_link" text:visited-style-name="Visited_20_Internet_20_Link"><text:span text:style-name="Internet_20_link"><text:span text:style-name="T7">http://developer.android.com/tools/publishing/app-signing.html</text:span></text:span></text:a><text:span text:style-name="T7"> </text:span></text:p>
      <text:p text:style-name="P8" loext:marker-style-name="T7"/>
      <text:p text:style-name="P17" loext:marker-style-name="T7"/>
      <text:h text:style-name="P52" text:outline-level="2" loext:marker-style-name="T7"><text:bookmark-start text:name="_Toc172123638"/><text:span text:style-name="T7">Can I build apps when I do not have internet access?</text:span><text:bookmark-end text:name="_Toc172123638"/><text:span text:style-name="T7"/></text:h>
      <text:p text:style-name="Standard" loext:marker-style-name="T7"><text:span text:style-name="T7">The first time you build an app, you will need to be connected to the internet otherwise the compiler will fail. After that you can set the 'offline' version in </text:span><text:span text:style-name="T14">Settings</text:span><text:span text:style-name="T7"> so you can work offline.</text:span></text:p>
      <text:p text:style-name="P55" loext:marker-style-name="T4"/>
      <text:h text:style-name="P52" text:outline-level="2" loext:marker-style-name="T7"><text:bookmark-start text:name="_Toc172123639"/><text:span text:style-name="T7">Can I build an app from the command line?</text:span><text:bookmark-end text:name="_Toc172123639"/><text:span text:style-name="T7"/></text:h>
      <text:p text:style-name="P22" loext:marker-style-name="T7"><text:span text:style-name="T7">Yes, Dictionary App Builder has a command line interface which allows you to create a new app and build it, or load an existing app and build it.</text:span><text:span text:style-name="T7"/></text:p>
      <text:p text:style-name="P22" loext:marker-style-name="T7"><text:span text:style-name="T7">The command line tool is named </text:span><text:span text:style-name="T14">dab</text:span><text:span text:style-name="T7"> and can be found in the Program Files folder, usually c:\Program Files (x86)\SIL\Dictionary App Builder.</text:span></text:p>
      <text:p text:style-name="P17" loext:marker-style-name="T7"/>
      <text:p text:style-name="P22" loext:marker-style-name="T7"><text:span text:style-name="T14">dab</text:span><text:span text:style-name="T7"> takes the following parameters:</text:span></text:p>
      <text:p text:style-name="P56" loext:marker-style-name="T24"/>
      <table:table table:name="Table1" table:style-name="Table1">
        <table:table-column table:style-name="Table1.A"/>
        <table:table-column table:style-name="Table1.B"/>
        <table:table-row table:style-name="Table1.1">
          <table:table-cell table:style-name="Table1.A1" office:value-type="string">
            <text:p text:style-name="P43" loext:marker-style-name="T14"><text:span text:style-name="T14">Option</text:span><text:span text:style-name="T14"/></text:p>
          </table:table-cell>
          <table:table-cell table:style-name="Table1.A1" office:value-type="string">
            <text:p text:style-name="P43" loext:marker-style-name="T14"><text:span text:style-name="T14">Description</text:span><text:span text:style-name="T14"/></text:p>
          </table:table-cell>
        </table:table-row>
        <table:table-row table:style-name="Table1.1">
          <table:table-cell table:style-name="Table1.A1" office:value-type="string">
            <text:p text:style-name="P22" loext:marker-style-name="T25"><text:span text:style-name="T25">-new</text:span><text:span text:style-name="T25"/></text:p>
          </table:table-cell>
          <table:table-cell table:style-name="Table1.A1" office:value-type="string">
            <text:p text:style-name="P22" loext:marker-style-name="T26"><text:span text:style-name="T26">Create a new app project</text:span><text:span text:style-name="T26"/></text:p>
          </table:table-cell>
        </table:table-row>
        <table:table-row table:style-name="Table1.1">
          <table:table-cell table:style-name="Table1.A1" office:value-type="string">
            <text:p text:style-name="P22" loext:marker-style-name="T25"><text:span text:style-name="T25">-load &lt;project&gt;</text:span><text:span text:style-name="T25"/></text:p>
          </table:table-cell>
          <table:table-cell table:style-name="Table1.A1" office:value-type="string">
            <text:p text:style-name="P22" loext:marker-style-name="T26"><text:span text:style-name="T26">Load an existing app project</text:span><text:span text:style-name="T26"/></text:p>
          </table:table-cell>
        </table:table-row>
        <table:table-row table:style-name="Table1.1">
          <table:table-cell table:style-name="Table1.A1" office:value-type="string">
            <text:p text:style-name="P22" loext:marker-style-name="T25"><text:span text:style-name="T25">-build</text:span><text:span text:style-name="T25"/></text:p>
          </table:table-cell>
          <table:table-cell table:style-name="Table1.A1" office:value-type="string">
            <text:p text:style-name="P22" loext:marker-style-name="T26"><text:span text:style-name="T26">Build app project (use with either -new or -load)</text:span><text:span text:style-name="T26"/></text:p>
          </table:table-cell>
        </table:table-row>
        <table:table-row table:style-name="Table1.1">
          <table:table-cell table:style-name="Table1.A1" office:value-type="string">
            <text:p text:style-name="P22" loext:marker-style-name="T25"><text:span text:style-name="T25">-no-save</text:span></text:p>
          </table:table-cell>
          <table:table-cell table:style-name="Table1.A1" office:value-type="string">
            <text:p text:style-name="P22" loext:marker-style-name="T26"><text:span text:style-name="T26">Do not save changes to app (use with -load)</text:span><text:span text:style-name="T26"/></text:p>
          </table:table-cell>
        </table:table-row>
        <table:table-row table:style-name="Table1.1">
          <table:table-cell table:style-name="Table1.A1" office:value-type="string">
            <text:p text:style-name="P57" loext:marker-style-name="T25"/>
          </table:table-cell>
          <table:table-cell table:style-name="Table1.A1" office:value-type="string">
            <text:p text:style-name="P58" loext:marker-style-name="T26"/>
          </table:table-cell>
        </table:table-row>
        <table:table-row table:style-name="Table1.1">
          <table:table-cell table:style-name="Table1.A1" office:value-type="string">
            <text:p text:style-name="P22" loext:marker-style-name="T25"><text:span text:style-name="T25">-?</text:span><text:span text:style-name="T25"/></text:p>
          </table:table-cell>
          <table:table-cell table:style-name="Table1.A1" office:value-type="string">
            <text:p text:style-name="P22" loext:marker-style-name="T26"><text:span text:style-name="T26">Show command line help</text:span><text:span text:style-name="T26"/></text:p>
          </table:table-cell>
        </table:table-row>
        <table:table-row table:style-name="Table1.1">
          <table:table-cell table:style-name="Table1.A1" office:value-type="string">
            <text:p text:style-name="P57" loext:marker-style-name="T25"/>
          </table:table-cell>
          <table:table-cell table:style-name="Table1.A1" office:value-type="string">
            <text:p text:style-name="P58" loext:marker-style-name="T26"/>
          </table:table-cell>
        </table:table-row>
        <table:table-row table:style-name="Table1.1">
          <table:table-cell table:style-name="Table1.A1" office:value-type="string">
            <text:p text:style-name="P22" loext:marker-style-name="T25"><text:span text:style-name="T25">-n &lt;app-name&gt;</text:span></text:p>
          </table:table-cell>
          <table:table-cell table:style-name="Table1.A1" office:value-type="string">
            <text:p text:style-name="P22" loext:marker-style-name="T26"><text:span text:style-name="T26">Set app name.<text:line-break/>Enclose the name in "double quotes" if it contains spaces.</text:span><text:span text:style-name="T26"/></text:p>
          </table:table-cell>
        </table:table-row>
        <table:table-row table:style-name="Table1.1">
          <table:table-cell table:style-name="Table1.A1" office:value-type="string">
            <text:p text:style-name="P22" loext:marker-style-name="T25"><text:span text:style-name="T25">-p &lt;package-name&gt;</text:span></text:p>
          </table:table-cell>
          <table:table-cell table:style-name="Table1.A1" office:value-type="string">
            <text:p text:style-name="P22" loext:marker-style-name="T26"><text:span text:style-name="T26">Set package name, e.g. com.myorg.language.appname</text:span><text:span text:style-name="T26"/></text:p>
          </table:table-cell>
        </table:table-row>
        <table:table-row table:style-name="Table1.1">
          <table:table-cell table:style-name="Table1.A1" office:value-type="string">
            <text:p text:style-name="P22" loext:marker-style-name="T25"><text:span text:style-name="T25">-i &lt;filename&gt;</text:span></text:p>
          </table:table-cell>
          <table:table-cell table:style-name="Table1.A1" office:value-type="string">
            <text:p text:style-name="P22" loext:marker-style-name="T26"><text:span text:style-name="T26">Include additional parameters file.<text:line-break/>Use the full path of the file and enclose it in "double quotes" if there is a space in the path.</text:span><text:span text:style-name="T26"/></text:p>
          </table:table-cell>
        </table:table-row>
        <table:table-row table:style-name="Table1.1">
          <table:table-cell table:style-name="Table1.A1" office:value-type="string">
            <text:p text:style-name="P57" loext:marker-style-name="T25"/>
          </table:table-cell>
          <table:table-cell table:style-name="Table1.A1" office:value-type="string">
            <text:p text:style-name="P58" loext:marker-style-name="T26"/>
          </table:table-cell>
        </table:table-row>
        <table:table-row table:style-name="Table1.1">
          <table:table-cell table:style-name="Table1.A1" office:value-type="string">
            <text:p text:style-name="P22" loext:marker-style-name="T25"><text:span text:style-name="T25">-a &lt;filename&gt;</text:span></text:p>
          </table:table-cell>
          <table:table-cell table:style-name="Table1.A1" office:value-type="string">
            <text:p text:style-name="P22" loext:marker-style-name="T26"><text:span text:style-name="T26">Set about box text, contained in text file.<text:line-break/>Use the full path of the file and enclose it in "double quotes" if there is a space in the path.</text:span><text:span text:style-name="T26"/></text:p>
          </table:table-cell>
        </table:table-row>
        <table:table-row table:style-name="Table1.14">
          <table:table-cell table:style-name="Table1.A1" office:value-type="string">
            <text:p text:style-name="P22" loext:marker-style-name="T25"><text:span text:style-name="T25">-f &lt;fontname&gt;</text:span></text:p>
          </table:table-cell>
          <table:table-cell table:style-name="Table1.A1" office:value-type="string">
            <text:p text:style-name="P22" loext:marker-style-name="T26"><text:span text:style-name="T26">Set font name or filename, e.g. "Charis SIL Compact", "c:\fonts\myfont.ttf"<text:line-break/>The font name must be one of the items in the list of fonts in the New App wizard. For other fonts, specify the full path to the font filename.</text:span><text:span text:style-name="T26"/></text:p>
          </table:table-cell>
        </table:table-row>
        <table:table-row table:style-name="Table1.14">
          <table:table-cell table:style-name="Table1.A1" office:value-type="string">
            <text:p text:style-name="P22" loext:marker-style-name="T25"><text:span text:style-name="T25">-ic &lt;filename&gt;</text:span></text:p>
          </table:table-cell>
          <table:table-cell table:style-name="Table1.A1" office:value-type="string">
            <text:p text:style-name="P22" loext:marker-style-name="T26"><text:span text:style-name="T26">Add launcher icon (one or more .png files).<text:line-break/>Use the full path of the files and enclose them in "double quotes" if there is a space in the path.</text:span><text:span text:style-name="T26"/></text:p>
          </table:table-cell>
        </table:table-row>
        <table:table-row table:style-name="Table1.1">
          <table:table-cell table:style-name="Table1.A1" office:value-type="string">
            <text:p text:style-name="P22" loext:marker-style-name="T25"><text:span text:style-name="T25">-l &lt;lang-code&gt;</text:span></text:p>
          </table:table-cell>
          <table:table-cell table:style-name="Table1.A1" office:value-type="string">
            <text:p text:style-name="P22" loext:marker-style-name="T26"><text:span text:style-name="T26">Set language for menu items and settings, e.g. en, fr, es</text:span><text:span text:style-name="T26"/></text:p>
          </table:table-cell>
        </table:table-row>
        <table:table-row table:style-name="Table1.1">
          <table:table-cell table:style-name="Table1.A1" office:value-type="string">
            <text:p text:style-name="P22" loext:marker-style-name="T25"><text:span text:style-name="T25">-ft &lt;feature=value&gt;</text:span></text:p>
          </table:table-cell>
          <table:table-cell table:style-name="Table1.A1" office:value-type="string">
            <text:p text:style-name="P22" loext:marker-style-name="T26"><text:span text:style-name="T26">Set a feature.</text:span><text:span text:style-name="T26"/></text:p>
          </table:table-cell>
        </table:table-row>
        <table:table-row table:style-name="Table1.1">
          <table:table-cell table:style-name="Table1.A1" office:value-type="string">
            <text:p text:style-name="P57" loext:marker-style-name="T25"/>
          </table:table-cell>
          <table:table-cell table:style-name="Table1.A1" office:value-type="string">
            <text:p text:style-name="P58" loext:marker-style-name="T26"/>
          </table:table-cell>
        </table:table-row>
        <table:table-row table:style-name="Table1.1">
          <table:table-cell table:style-name="Table1.A1" office:value-type="string">
            <text:p text:style-name="P22" loext:marker-style-name="T25"><text:span text:style-name="T25">-vc &lt;integer&gt;</text:span></text:p>
          </table:table-cell>
          <table:table-cell table:style-name="Table1.A1" office:value-type="string">
            <text:p text:style-name="P22" loext:marker-style-name="T26"><text:span text:style-name="T26">Set version code, e.g. 1, 2, 3, or +1 to increment the current version code by 1.</text:span><text:span text:style-name="T26"/></text:p>
          </table:table-cell>
        </table:table-row>
        <table:table-row table:style-name="Table1.1">
          <table:table-cell table:style-name="Table1.A1" office:value-type="string">
            <text:p text:style-name="P22" loext:marker-style-name="T25"><text:span text:style-name="T25">-vn &lt;string&gt;</text:span></text:p>
          </table:table-cell>
          <table:table-cell table:style-name="Table1.A1" office:value-type="string">
            <text:p text:style-name="P22" loext:marker-style-name="T26"><text:span text:style-name="T26">Set version name, e.g. 1.0, 2.1.4, or use +1, +0.1, +0.0.1 to increment the current value.</text:span><text:span text:style-name="T26"/></text:p>
          </table:table-cell>
        </table:table-row>
        <table:table-row table:style-name="Table1.1">
          <table:table-cell table:style-name="Table1.A1" office:value-type="string">
            <text:p text:style-name="P57" loext:marker-style-name="T25"/>
          </table:table-cell>
          <table:table-cell table:style-name="Table1.A1" office:value-type="string">
            <text:p text:style-name="P58" loext:marker-style-name="T26"/>
          </table:table-cell>
        </table:table-row>
        <table:table-row table:style-name="Table1.1">
          <table:table-cell table:style-name="Table1.A1" office:value-type="string">
            <text:p text:style-name="P22" loext:marker-style-name="T25"><text:span text:style-name="T25">-ks &lt;filename&gt;</text:span></text:p>
          </table:table-cell>
          <table:table-cell table:style-name="Table1.A1" office:value-type="string">
            <text:p text:style-name="P22" loext:marker-style-name="T26"><text:span text:style-name="T26">Set keystore filename.<text:line-break/>Use the full path of the file and enclose it in "double quotes" if there is a space in the path.</text:span><text:span text:style-name="T26"/></text:p>
          </table:table-cell>
        </table:table-row>
        <table:table-row table:style-name="Table1.1">
          <table:table-cell table:style-name="Table1.A1" office:value-type="string">
            <text:p text:style-name="P22" loext:marker-style-name="T25"><text:span text:style-name="T25">-ksp &lt;password&gt;</text:span></text:p>
          </table:table-cell>
          <table:table-cell table:style-name="Table1.A1" office:value-type="string">
            <text:p text:style-name="P22" loext:marker-style-name="T26"><text:span text:style-name="T26">Set keystore password</text:span><text:span text:style-name="T26"/></text:p>
          </table:table-cell>
        </table:table-row>
        <table:table-row table:style-name="Table1.1">
          <table:table-cell table:style-name="Table1.A1" office:value-type="string">
            <text:p text:style-name="P22" loext:marker-style-name="T25"><text:span text:style-name="T25">-ka &lt;alias&gt;</text:span></text:p>
          </table:table-cell>
          <table:table-cell table:style-name="Table1.A1" office:value-type="string">
            <text:p text:style-name="P22" loext:marker-style-name="T26"><text:span text:style-name="T26">Set key alias</text:span><text:span text:style-name="T26"/></text:p>
          </table:table-cell>
        </table:table-row>
        <table:table-row table:style-name="Table1.1">
          <table:table-cell table:style-name="Table1.A1" office:value-type="string">
            <text:p text:style-name="P22" loext:marker-style-name="T25"><text:span text:style-name="T25">-kap &lt;password&gt;</text:span></text:p>
          </table:table-cell>
          <table:table-cell table:style-name="Table1.A1" office:value-type="string">
            <text:p text:style-name="P22" loext:marker-style-name="T26"><text:span text:style-name="T26">Set key alias password</text:span><text:span text:style-name="T26"/></text:p>
          </table:table-cell>
        </table:table-row>
        <table:table-row table:style-name="Table1.1">
          <table:table-cell table:style-name="Table1.A1" office:value-type="string">
            <text:p text:style-name="P57" loext:marker-style-name="T25"/>
          </table:table-cell>
          <table:table-cell table:style-name="Table1.A1" office:value-type="string">
            <text:p text:style-name="P58" loext:marker-style-name="T26"/>
          </table:table-cell>
        </table:table-row>
        <table:table-row table:style-name="Table1.1">
          <table:table-cell table:style-name="Table1.A1" office:value-type="string">
            <text:p text:style-name="P22" loext:marker-style-name="T25"><text:span text:style-name="T25">-fp &lt;folder=path&gt;</text:span></text:p>
          </table:table-cell>
          <table:table-cell table:style-name="Table1.A1" office:value-type="string">
            <text:p text:style-name="P22" loext:marker-style-name="T26"><text:span text:style-name="T26">Set a folder path, e.g. "app.builder=c:\Dictionary App Builder".</text:span><text:span text:style-name="T26"/></text:p>
          </table:table-cell>
        </table:table-row>
      </table:table>
      <text:p text:style-name="P59" loext:marker-style-name="T27"/>
      <text:p text:style-name="Standard" loext:marker-style-name="T14"><text:span text:style-name="T14">Examples:</text:span><text:span text:style-name="T14"/></text:p>
      <text:p text:style-name="P57" loext:marker-style-name="T25"/>
      <text:p text:style-name="Standard" loext:marker-style-name="T25"><text:span text:style-name="T25">dab -load \"My App\" -build</text:span><text:span text:style-name="T25"/></text:p>
      <text:h text:style-name="P11" text:outline-level="1" loext:marker-style-name="T7"><text:bookmark-start text:name="_Toc172123640"/><text:span text:style-name="T7">Fonts</text:span><text:bookmark-end text:name="_Toc172123640"/><text:span text:style-name="T7"/></text:h>
      <text:p text:style-name="P60"><text:bookmark-start text:name="_Hlk534358734"/><text:bookmark-start text:name="_Toc534358673"/>If you are using a non-Roman script or a Roman script with combining diacritics, it is possible that Android devices will not display your fonts correctly. To overcome these problems, try using the GeckoView library.</text:p>
      <text:p text:style-name="P61" loext:marker-style-name="T13"><text:span text:style-name="T13">GeckoView is a viewer component from Mozilla that replaces the standard Android viewer. It can render Graphite fonts correctly.</text:span><text:bookmark-end text:name="_Hlk534358734"/><text:span text:style-name="T13"/></text:p>
      <text:p text:style-name="P61">You can configure this on the <text:span text:style-name="T28">Appearance</text:span> <text:span text:style-name="T15"></text:span> <text:span text:style-name="T28">Fonts</text:span> <text:span text:style-name="T15"></text:span> <text:span text:style-name="T28">Font Handling</text:span> page.<text:bookmark-end text:name="_Toc534358673"/></text:p>
      <text:p text:style-name="P35" loext:marker-style-name="T13"/>
      <text:p text:style-name="Standard" loext:marker-style-name="T13"><text:span text:style-name="T13">The required GeckoView library files will add at least 55 MB to your app size, so do not enable GeckoView unless you know you need it to display your fonts correctly.</text:span><text:span text:style-name="T13"/></text:p>
      <text:p text:style-name="P35" loext:marker-style-name="T13"/>
      <text:p text:style-name="Standard" loext:marker-style-name="T13"><text:span text:style-name="T13">You will find that when you build an Android APK with GeckoView, the APK size will be at least 200 MB larger than without GeckoView. This is because it contains the GeckoView libraries for four different device architectures (32-bit ARM, 64-bit ARM, 32‑bit Intel and 64-bit Intel). In practice, your app users do not need to install such a large file.</text:span><text:span text:style-name="T13"/></text:p>
      <text:list text:style-name="WWNum25">
        <text:list-item>
          <text:p text:style-name="P62" loext:marker-style-name="T13"><text:span text:style-name="T13">For </text:span><text:span text:style-name="T18">online app distribution</text:span><text:span text:style-name="T13">, you need to upload an AAB file (app bundle) to Google Play rather than an APK. The AAB file contains all the GeckoView libraries for all four device architectures, but when a user installs an app from Google Play, Google will create a tailored APK for them, with just the libraries and components their phone needs. The AAB file might be over 300 MB, but the actual size of the app for any user will be much smaller.</text:span></text:p>
        </text:list-item>
        <text:list-item>
          <text:p text:style-name="P62" loext:marker-style-name="T7"><text:span text:style-name="T13">For </text:span><text:span text:style-name="T18">offline app distribution</text:span><text:span text:style-name="T13">, you can ask for Dictionary App Builder to create multiple APKs, one for each device architecture. Do this on the </text:span><text:span text:style-name="T18">App</text:span><text:span text:style-name="T13"> </text:span><text:span text:style-name="T15"></text:span><text:span text:style-name="T19"> </text:span><text:span text:style-name="T21">APK</text:span><text:span text:style-name="T19"> tab.</text:span><text:span text:style-name="T13"> Each of these APKs will be significantly smaller (around 55 MB extra for GeckoView). You just need to choose the right one(s) to distribute, according to the types of phones people have. Many of the phones today will use the 64-bit ARM APK. Otherwise, the 32-bit ARM APK is used for most older phones. Intel phones are less common, but it will depend on the phones being sold in your country.</text:span></text:p>
        </text:list-item>
      </text:list>
      <text:p text:style-name="P8" loext:marker-style-name="T7"/>
      <text:p text:style-name="P8" loext:marker-style-name="T7"/>
      <text:h text:style-name="Heading_20_1" text:outline-level="1" loext:marker-style-name="T7"><text:bookmark-start text:name="_Toc172123641"/><text:span text:style-name="T7">Audio</text:span><text:bookmark-end text:name="_Toc172123641"/><text:span text:style-name="T7"/></text:h>
      <text:h text:style-name="P52" text:outline-level="2" loext:marker-style-name="T7"><text:bookmark-start text:name="_Toc172123642"/><text:span text:style-name="T7">How do I distribute the audio MP3 files with the app?</text:span><text:bookmark-end text:name="_Toc172123642"/><text:span text:style-name="T7"/></text:h>
      <text:p text:style-name="P22" loext:marker-style-name="T29"><text:span text:style-name="T29">There are 3 ways of including audio files in your app: assets, external folder or internet download. You can use a single </text:span><text:span text:style-name="T30">audio source</text:span><text:span text:style-name="T29"> for all of the files in an app or you can combine two or more audio sources in an app.</text:span></text:p>
      <text:p text:style-name="P61" loext:marker-style-name="T29"><text:span text:style-name="T29">To specify the audio source(s) in Dictionary App Builder, you need to visit the following two tabs on the </text:span><text:span text:style-name="T30">Audio</text:span><text:span text:style-name="T29"> page. This page can be found in the apps tree view just under Analytics on the top level of app pages. </text:span></text:p>
      <text:list text:style-name="WWNum8">
        <text:list-item>
          <text:p text:style-name="P63" loext:marker-style-name="T29"><text:span text:style-name="T29">The </text:span><text:span text:style-name="T30">Audio Files</text:span><text:span text:style-name="T29"> tab, which lists the audio files with their corresponding audio source.</text:span></text:p>
        </text:list-item>
      </text:list>
      <text:p text:style-name="P29" loext:marker-style-name="T29"><text:span text:style-name="T29">To change the audio source for a file or files, select the rows you want to change and select </text:span><text:span text:style-name="T30">Change Audio Source</text:span><text:span text:style-name="T29">.</text:span></text:p>
      <text:list text:continue-numbering="true" text:style-name="WWNum8">
        <text:list-item>
          <text:p text:style-name="P63" loext:marker-style-name="T29"><text:span text:style-name="T29">The </text:span><text:span text:style-name="T30">Audio Source</text:span><text:span text:style-name="T29"> tab, which defines the available audio sources.</text:span></text:p>
        </text:list-item>
      </text:list>
      <text:p text:style-name="P64" loext:marker-style-name="T29"><text:span text:style-name="T29">You can modify, add and remove audio sources here.</text:span><text:span text:style-name="T29"/></text:p>
      <text:p text:style-name="P65" loext:marker-style-name="T29"/>
      <text:p text:style-name="P22" loext:marker-style-name="T29"><text:span text:style-name="T29">The follow sections describe the different audio source types.</text:span><text:span text:style-name="T29"/></text:p>
      <text:p text:style-name="P22" loext:marker-style-name="T29"><text:span text:style-name="T29"><text:line-break/></text:span><text:span text:style-name="T31">1. Assets</text:span><text:span text:style-name="T29"><text:line-break/>The mp3 files will be packaged inside the apk file for the app. This is the easiest method for a few files (e.g. one book) and requires no permissions. But be beware that the apk will get very large if you have several books of audio. The maximum size of an apk that can be uploaded to the Google Play store is 100 MB.</text:span></text:p>
      <text:p text:style-name="P66" loext:marker-style-name="T29"><text:span text:style-name="T29"><text:line-break/></text:span><text:span text:style-name="T31">2. External Folder<text:line-break/></text:span><text:span text:style-name="T29">No audio files are packaged within the app, so the apk is small. The app will look in a specified SD card folder to find the audio mp3 files it needs. If you are distributing the app via SD card, you include the folder of audio files on the SD card together with the apk. This method requires the 'Read external storage' permission but not internet access.<text:line-break/><text:line-break/>You can place the mp3 files inside sub-folders and sub-sub-folders in the specified SD card folder, using any folder names you choose. Alternatively, you can place all the audio files in a single folder without using any sub folders.</text:span></text:p>
      <text:p text:style-name="P67" loext:marker-style-name="T29"/>
      <text:p text:style-name="Standard" loext:marker-style-name="T29"><text:span text:style-name="T29">If the app does not find audio files in the specified folder or its sub-folders, it will also search the other folders on the device to see if it can find them there. For example, if the specified folder name is ‘Audio 123’ but the files are located in the ‘Audio 456’ folder instead, the app should find them. Once it has found a folder with a needed audio file, it will keep a note of it so it knows where to look next time.</text:span><text:span text:style-name="T29"/></text:p>
      <text:p text:style-name="P67" loext:marker-style-name="T29"/>
      <text:p text:style-name="P22" loext:marker-style-name="T32"><text:span text:style-name="T31">3. Internet Download<text:line-break/></text:span><text:span text:style-name="T29">Like method 2, no audio files are packaged within the app, so the apk is small. The app will look in a specified SD card folder to find the mp3 files it needs. If it doesn't find them there, it will look in all the other folders on the device. If it still cannot find them, the app can download the files one by one when it needs them from a website of your choice. This method requires the 'Read external storage', 'Write external storage', 'Connection state' and 'Internet' permissions.<text:line-break/></text:span></text:p>
      <text:p text:style-name="P22" loext:marker-style-name="T33"><text:span text:style-name="T33">Audio filenames</text:span><text:span text:style-name="T33"/></text:p>
      <text:p text:style-name="Standard" loext:marker-style-name="T29"><text:span text:style-name="T29">The internet download works best if your audio filenames do not include any spaces. A filename of the form “african-elephant.mp3” is better than “african elephant.mp3”.</text:span><text:span text:style-name="T29"/></text:p>
      <text:p text:style-name="P65" loext:marker-style-name="T29"/>
      <text:p text:style-name="P22" loext:marker-style-name="T33"><text:span text:style-name="T33">Http or https</text:span><text:span text:style-name="T33"/></text:p>
      <text:p text:style-name="Standard" loext:marker-style-name="T29"><text:span text:style-name="T29">The download manager in Android 2.3 (Gingerbread) cannot handle downloads from secure http</text:span><text:span text:style-name="T34">s</text:span><text:span text:style-name="T29"> addresses, so if you want to support these phones, use an http:// address instead of https://.</text:span></text:p>
      <text:p text:style-name="P65" loext:marker-style-name="T29"/>
      <text:p text:style-name="P22" loext:marker-style-name="T30"><text:span text:style-name="T33">Audio file hosting</text:span><text:span text:style-name="T33"/></text:p>
      <text:p text:style-name="Standard" loext:marker-style-name="T29"><text:span text:style-name="T29">Recommended storage locations for the files on the internet include:</text:span><text:span text:style-name="T29"/></text:p>
      <text:list text:style-name="WWNum6">
        <text:list-item>
          <text:p text:style-name="P68" loext:marker-style-name="T30"><text:span text:style-name="T35">A</text:span><text:span text:style-name="T30"> language-specific website</text:span></text:p>
        </text:list-item>
      </text:list>
      <text:p text:style-name="P69" loext:marker-style-name="T29"><text:span text:style-name="T29">If you have a language-specific website for making resources available for download, you could place the audio files in a folder on the website.</text:span><text:span text:style-name="T29"/></text:p>
      <text:p text:style-name="P69" loext:marker-style-name="T29"><text:span text:style-name="T29">For example, if your website is called ‘www.ourlanguage.org’, you could upload the audio files to a folder called ‘audio’. The http address for your audio files would then be: http://www.ourlanguage.org/audio </text:span><text:span text:style-name="T29"/></text:p>
      <text:p text:style-name="P69" loext:marker-style-name="T29"><text:span text:style-name="T29">Your website administrator should be able to help you do this.</text:span><text:span text:style-name="T29"/></text:p>
      <text:list text:continue-numbering="true" text:style-name="WWNum6">
        <text:list-item>
          <text:p text:style-name="P70" loext:marker-style-name="T30"><text:span text:style-name="T30">Cloud Storage Services</text:span><text:span text:style-name="T30"/></text:p>
        </text:list-item>
      </text:list>
      <text:p text:style-name="P29" loext:marker-style-name="T29"><text:span text:style-name="T29">Amazon S3 (Simple Storage Service): </text:span><text:a xlink:type="simple" xlink:href="http://aws.amazon.com/s3/" text:style-name="Internet_20_link" text:visited-style-name="Visited_20_Internet_20_Link"><text:span text:style-name="Internet_20_link"><text:span text:style-name="T29">http://aws.amazon.com/s3/</text:span></text:span></text:a></text:p>
      <text:p text:style-name="P27" loext:marker-style-name="T19"><text:span text:style-name="T19">Backblaze B2 Cloud Storage: </text:span><text:a xlink:type="simple" xlink:href="https://www.backblaze.com/b2/cloud-storage.html" text:style-name="Internet_20_link" text:visited-style-name="Visited_20_Internet_20_Link"><text:span text:style-name="Internet_20_link"><text:span text:style-name="T19">https://www.backblaze.com/b2/cloud-storage.html</text:span></text:span></text:a><text:span text:style-name="T19"> </text:span></text:p>
      <text:p text:style-name="P27" loext:marker-style-name="T4"><text:span text:style-name="T29">Google Cloud Storage: </text:span><text:a xlink:type="simple" xlink:href="https://cloud.google.com/storage/" text:style-name="Internet_20_link" text:visited-style-name="Visited_20_Internet_20_Link"><text:span text:style-name="Internet_20_link"><text:span text:style-name="T29">https://cloud.google.com/storage/</text:span></text:span></text:a></text:p>
      <text:p text:style-name="P30" loext:marker-style-name="T29"><text:span text:style-name="T29">These cloud storage services are designed for fast, reliable and secure online storage. Once you have created an account, you create a 'bucket' in which to place your mp3 files. When you add the files, you need to make them public and make a note of the web address link to use to access them, e.g. http://s3.amazonaws.com/yourbucketname</text:span><text:span text:style-name="T29"/></text:p>
      <text:p text:style-name="P30" loext:marker-style-name="T29"><text:span text:style-name="T29">You will get some months of free storage before there is a charge according to the bandwidth used, i.e. how many MB of audio users download. It might be easiest to organise this kind of cloud storage at an organisational level rather than creating a new account for each language.</text:span><text:span text:style-name="T29"/></text:p>
      <text:p text:style-name="P8" loext:marker-style-name="T7"/>
      <text:p text:style-name="P8" loext:marker-style-name="T7"/>
      <text:h text:style-name="Heading_20_1" text:outline-level="1" loext:marker-style-name="T7"><text:bookmark-start text:name="_Toc172123643"/><text:bookmark-start text:name="_Toc500152989"/><text:bookmark-start text:name="_Toc498952700"/><draw:custom-shape text:anchor-type="char" draw:z-index="0" draw:style-name="gr2" draw:text-style-name="P44" svg:width="0.5953in" svg:height="0.3024in" draw:transform="rotate (0.678409480250196) translate (0.0339020122484689in 2.6278488626421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text:span text:style-name="T7">Navigation Drawer</text:span><text:bookmark-end text:name="_Toc172123643"/><text:bookmark-end text:name="_Toc500152989"/><text:bookmark-end text:name="_Toc498952700"/><text:span text:style-name="T7"/></text:h>
      <text:p text:style-name="P71" loext:marker-style-name="T36"/>
      <text:p text:style-name="P24" loext:marker-style-name="T37"><text:span text:style-name="T37">You can customise the image that appears at the top of the navigation drawer. It can be a photo, your organisation’s logo or any relevant graphic design.</text:span><text:span text:style-name="T37"/></text:p>
      <text:p text:style-name="P72" loext:marker-style-name="T37"/>
      <text:p text:style-name="P72" loext:marker-style-name="T37"/>
      <text:p text:style-name="P73" loext:marker-style-name="T37"><draw:frame text:anchor-type="as-char" draw:z-index="13" draw:style-name="gr1" draw:text-style-name="P3" svg:width="2.2087in" svg:height="3.9031in"><draw:image xlink:href="Pictures/100000000000043800000780DE9F472F.png" xlink:type="simple" xlink:show="embed" xlink:actuate="onLoad" draw:mime-type="image/png"><text:p/></draw:image></draw:frame><text:span text:style-name="T37"><text:s text:c="13"/></text:span><draw:frame text:anchor-type="as-char" draw:z-index="14" draw:style-name="gr1" draw:text-style-name="P3" svg:width="2.2087in" svg:height="3.9031in"><draw:image xlink:href="Pictures/100000000000043800000780E2D43E62.png" xlink:type="simple" xlink:show="embed" xlink:actuate="onLoad" draw:mime-type="image/png"><text:p/></draw:image></draw:frame></text:p>
      <text:p text:style-name="P72" loext:marker-style-name="T37"/>
      <text:p text:style-name="P72" loext:marker-style-name="T37"/>
      <text:p text:style-name="P24" loext:marker-style-name="T37"><text:span text:style-name="T37">Specify a landscape image file on the </text:span><text:span text:style-name="T38">Appearance</text:span><text:span text:style-name="T37"> </text:span><text:span text:style-name="T15"></text:span><text:span text:style-name="T4"> </text:span><text:span text:style-name="T39">Graphics</text:span><text:span text:style-name="T37"> </text:span><text:span text:style-name="T15"></text:span><text:span text:style-name="T4"> </text:span><text:span text:style-name="T40">Navigation Drawer</text:span><text:span text:style-name="T4"> page.</text:span></text:p>
      <text:p text:style-name="P8" loext:marker-style-name="T7"/>
      <text:p text:style-name="P8" loext:marker-style-name="T7"/>
      <text:h text:style-name="Heading_20_1" text:outline-level="1" loext:marker-style-name="T7"><text:bookmark-start text:name="_Toc500152990"/><text:bookmark-start text:name="_Toc172123644"/><text:span text:style-name="T7">Analytics</text:span><text:bookmark-end text:name="_Toc500152990"/><text:bookmark-end text:name="_Toc172123644"/><text:span text:style-name="T7"/></text:h>
      <text:p text:style-name="P74" loext:marker-style-name="T7"/>
      <text:p text:style-name="P24" loext:marker-style-name="T7"><text:span text:style-name="T7">If you enable Analytics, the app will connect to the internet from time to time to send app usage information to one or more analytics accounts. This will give you an idea of the extent to which people are interacting with the app.</text:span><text:span text:style-name="T7"/></text:p>
      <text:p text:style-name="P8" loext:marker-style-name="T7"/>
      <text:p text:style-name="Standard" loext:marker-style-name="T7"><text:span text:style-name="T7">The information sent will include the model of the device (such as ‘Google Nexus 7’, ‘Samsung Galaxy S4’), the Android version (such as ‘4.2’), the mobile network provider and an approximate location (city/country). No personal information is included.</text:span><text:span text:style-name="T7"/></text:p>
      <text:p text:style-name="P8" loext:marker-style-name="T7"/>
      <text:p text:style-name="Standard" loext:marker-style-name="T7"><text:span text:style-name="T7">You can configure your app to send usage data to one or more of the following analytics engines:</text:span><text:span text:style-name="T7"/></text:p>
      <text:p text:style-name="P35" loext:marker-style-name="T13"/>
      <table:table table:name="Table2" table:style-name="Table2">
        <table:table-column table:style-name="Table2.A"/>
        <table:table-column table:style-name="Table2.B"/>
        <table:table-row table:style-name="Table2.1">
          <table:table-cell table:style-name="Table2.A1" office:value-type="string">
            <text:p text:style-name="Standard" loext:marker-style-name="T13"><text:span text:style-name="T17">Firebase Analytics</text:span><text:span text:style-name="T17"/></text:p>
          </table:table-cell>
          <table:table-cell table:style-name="Table2.A1" office:value-type="string">
            <text:p text:style-name="Standard" loext:marker-style-name="T13"><text:span text:style-name="T13">Sends data to a Google Firebase Analytics account of your choice.</text:span><text:span text:style-name="T13"/></text:p>
          </table:table-cell>
        </table:table-row>
        <table:table-row table:style-name="Table2.1">
          <table:table-cell table:style-name="Table2.A1" office:value-type="string">
            <text:p text:style-name="Standard" loext:marker-style-name="T13"><text:span text:style-name="T17">Amplitude Analytics</text:span><text:span text:style-name="T17"/></text:p>
          </table:table-cell>
          <table:table-cell table:style-name="Table2.A1" office:value-type="string">
            <text:p text:style-name="Standard" loext:marker-style-name="T13"><text:span text:style-name="T13">Sends data to an Amplitude account of your choice.</text:span><text:span text:style-name="T13"/></text:p>
          </table:table-cell>
        </table:table-row>
        <table:table-row table:style-name="Table2.1">
          <table:table-cell table:style-name="Table2.A1" office:value-type="string">
            <text:p text:style-name="Standard" loext:marker-style-name="T13"><text:span text:style-name="T17">S3 Digest Analytics</text:span><text:span text:style-name="T17"/></text:p>
          </table:table-cell>
          <table:table-cell table:style-name="Table2.A1" office:value-type="string">
            <text:p text:style-name="Standard" loext:marker-style-name="T13"><text:span text:style-name="T13">Sends a digest of analytics data to an Amazon S3 Bucket of your choice.</text:span><text:span text:style-name="T13"/></text:p>
          </table:table-cell>
        </table:table-row>
      </table:table>
      <text:p text:style-name="Standard" loext:marker-style-name="T7"><text:span text:style-name="T7"><text:line-break/></text:span><text:span text:style-name="T7"/></text:p>
      <text:p text:style-name="Standard" loext:marker-style-name="T7"><text:span text:style-name="T7">To set up analytics:</text:span><text:span text:style-name="T7"/></text:p>
      <text:list text:style-name="WWNum11">
        <text:list-item>
          <text:p text:style-name="P75" loext:marker-style-name="T7"><text:span text:style-name="T7">Go to the </text:span><text:span text:style-name="T14">Data &amp; Analytics</text:span><text:span text:style-name="T37"> </text:span><text:span text:style-name="T15"></text:span><text:span text:style-name="T4"> </text:span><text:span text:style-name="T14">Analytics</text:span><text:span text:style-name="T7"> page for the app.</text:span></text:p>
        </text:list-item>
        <text:list-item>
          <text:p text:style-name="P75" loext:marker-style-name="T7"><text:span text:style-name="T7">Select </text:span><text:span text:style-name="T14">Enable Analytics</text:span><text:span text:style-name="T7">.</text:span></text:p>
        </text:list-item>
        <text:list-item>
          <text:p text:style-name="P75" loext:marker-style-name="T7"><text:span text:style-name="T7">Click </text:span><text:span text:style-name="T14">Add Analytics Account…</text:span></text:p>
        </text:list-item>
        <text:list-item>
          <text:p text:style-name="P75" loext:marker-style-name="T7"><text:span text:style-name="T7">Choose an account type and enter your analytics account information. </text:span><text:span text:style-name="T7"/></text:p>
          <text:list>
            <text:list-item>
              <text:p text:style-name="P76">For Firebase Analytics, you will need a google-services.json configuration file for your account.</text:p>
            </text:list-item>
            <text:list-item>
              <text:p text:style-name="P76">For Amplitude Analytics, you will need an API Key</text:p>
            </text:list-item>
            <text:list-item>
              <text:p text:style-name="P76">For S3 Digest Analytics, you will need an S3 Bucket ID and an Identity Pool ID.</text:p>
            </text:list-item>
          </text:list>
        </text:list-item>
      </text:list>
      <text:h text:style-name="P13" text:outline-level="2" loext:marker-style-name="T13"><text:bookmark-start text:name="_Toc15985863"/><text:bookmark-start text:name="_Toc172123645"/><text:span text:style-name="T13">Firebase Analytics</text:span><text:bookmark-end text:name="_Toc15985863"/><text:bookmark-end text:name="_Toc172123645"/><text:span text:style-name="T13"/></text:h>
      <text:p text:style-name="Standard" loext:marker-style-name="T19"><text:span text:style-name="T19">To sign up for Firebase Analytics, ensure you have a Google account. </text:span><text:span text:style-name="T19"/></text:p>
      <text:p text:style-name="P31" loext:marker-style-name="T19"/>
      <text:p text:style-name="P19" loext:marker-style-name="T19"><text:span text:style-name="T19">You will need to:</text:span><text:span text:style-name="T19"/></text:p>
      <text:list text:style-name="WWNum23">
        <text:list-item>
          <text:p text:style-name="P77" loext:marker-style-name="T4"><text:span text:style-name="T4">Go to the Google Firebase website at </text:span><text:a xlink:type="simple" xlink:href="https://firebase.google.com/" text:style-name="Internet_20_link" text:visited-style-name="Visited_20_Internet_20_Link"><text:span text:style-name="Internet_20_link"><text:span text:style-name="T4">https://firebase.google.com/</text:span></text:span></text:a><text:span text:style-name="T4"> and ensure you are signed in with your Google account.</text:span></text:p>
        </text:list-item>
        <text:list-item>
          <text:p text:style-name="P77" loext:marker-style-name="T4"><text:span text:style-name="T4">Click </text:span><text:span text:style-name="T39">Add project</text:span><text:span text:style-name="T4"> to create a Firebase project for this app. </text:span></text:p>
        </text:list-item>
        <text:list-item>
          <text:p text:style-name="P77" loext:marker-style-name="T4"><text:span text:style-name="T4">In Step 1, you will need to give your new project a </text:span><text:span text:style-name="T39">Project name</text:span><text:span text:style-name="T4">.</text:span></text:p>
        </text:list-item>
        <text:list-item>
          <text:p text:style-name="P77" loext:marker-style-name="T4"><text:span text:style-name="T4">In Step 2, titled </text:span><text:span text:style-name="T39">Google Analytics for your Firebase project</text:span><text:span text:style-name="T4">, select </text:span><text:span text:style-name="T39">Set up Google Analytics for my project</text:span><text:span text:style-name="T4"> and press </text:span><text:span text:style-name="T39">Continue</text:span><text:span text:style-name="T4">.</text:span></text:p>
        </text:list-item>
        <text:list-item>
          <text:p text:style-name="P77" loext:marker-style-name="T4"><text:span text:style-name="T4">In Step 3, titled </text:span><text:span text:style-name="T39">Configure Google Analytics</text:span><text:span text:style-name="T4">, click on the drop-down box and choose </text:span><text:span text:style-name="T39">Create a new account</text:span><text:span text:style-name="T4">. Give it a name, which can be the same as your Firebase project name. </text:span></text:p>
        </text:list-item>
        <text:list-item>
          <text:p text:style-name="P77" loext:marker-style-name="T4"><text:span text:style-name="T4">Check the boxes to confirm that you accept the analytics and data protection terms. Click </text:span><text:span text:style-name="T39">Create project</text:span><text:span text:style-name="T4"> and wait a few seconds for the project to be created.</text:span></text:p>
        </text:list-item>
        <text:list-item>
          <text:p text:style-name="P77" loext:marker-style-name="T4"><text:span text:style-name="T4">Click the Settings button (a cog wheel icon near the top) and select </text:span><text:span text:style-name="T39">Project settings</text:span><text:span text:style-name="T4">.</text:span></text:p>
        </text:list-item>
      </text:list>
      <text:p text:style-name="P78" loext:marker-style-name="T4"><draw:frame text:anchor-type="as-char" draw:z-index="15" draw:style-name="gr1" draw:text-style-name="P3" svg:width="4.1043in" svg:height="0.8961in"><draw:image xlink:href="Pictures/1000000100000355000000BA9623E5B2.png" xlink:type="simple" xlink:show="embed" xlink:actuate="onLoad" draw:mime-type="image/png"><text:p/></draw:image></draw:frame></text:p>
      <text:p text:style-name="P55" loext:marker-style-name="T4"/>
      <text:list text:continue-numbering="true" text:style-name="WWNum23">
        <text:list-item>
          <text:p text:style-name="P77" loext:marker-style-name="T4"><text:span text:style-name="T4">On the </text:span><text:span text:style-name="T39">General</text:span><text:span text:style-name="T4"> tab of the Settings, scroll down to the </text:span><text:span text:style-name="T39">My apps</text:span><text:span text:style-name="T4"> section and click the Android app icon.</text:span></text:p>
        </text:list-item>
        <text:list-item>
          <text:p text:style-name="P77" loext:marker-style-name="T4"><text:span text:style-name="T4">On the </text:span><text:span text:style-name="T39">Add Firebase to your Android app</text:span><text:span text:style-name="T4"> page, enter your app package name and click </text:span><text:span text:style-name="T39">Register app</text:span><text:span text:style-name="T4">.</text:span></text:p>
        </text:list-item>
        <text:list-item>
          <text:p text:style-name="P77" loext:marker-style-name="T4"><text:span text:style-name="T4">Download the config file, </text:span><text:span text:style-name="T39">google-services.json</text:span><text:span text:style-name="T4">. That is all you need from the app registration. You can ignore the information on the rest of the screens and return to Settings. <text:s/></text:span></text:p>
        </text:list-item>
        <text:list-item>
          <text:p text:style-name="P77" loext:marker-style-name="T4"><text:span text:style-name="T4">Go to the </text:span><text:span text:style-name="T39">App</text:span><text:span text:style-name="T4"> </text:span><text:span text:style-name="T15"></text:span><text:span text:style-name="T19"> </text:span><text:span text:style-name="T21">Firebase</text:span><text:span text:style-name="T19"> page in </text:span><text:span text:style-name="T4">Dictionary App Builder.</text:span></text:p>
        </text:list-item>
        <text:list-item>
          <text:p text:style-name="P77" loext:marker-style-name="T4"><text:span text:style-name="T4">Select </text:span><text:span text:style-name="T39">Firebase Analytics</text:span><text:span text:style-name="T4"> as one of the features to use in the app.</text:span></text:p>
        </text:list-item>
        <text:list-item>
          <text:p text:style-name="P77" loext:marker-style-name="T4"><text:span text:style-name="T4">At the bottom of the page, click the </text:span><text:span text:style-name="T39">Browse</text:span><text:span text:style-name="T4"> button and find the </text:span><text:span text:style-name="T39">google-services.json</text:span><text:span text:style-name="T4"> config file that you have just downloaded from the Firebase console.</text:span></text:p>
        </text:list-item>
      </text:list>
      <text:p text:style-name="P79" loext:marker-style-name="T17"/>
      <text:h text:style-name="P13" text:outline-level="2" loext:marker-style-name="T13"><text:bookmark-start text:name="_Toc508699627"/><text:bookmark-start text:name="_Toc172123646"/><text:bookmark-start text:name="_Toc508700185"/><text:span text:style-name="T13">Amplitude Analytics</text:span><text:bookmark-end text:name="_Toc508699627"/><text:bookmark-end text:name="_Toc172123646"/><text:bookmark-end text:name="_Toc508700185"/><text:span text:style-name="T13"/></text:h>
      <text:p text:style-name="Standard" loext:marker-style-name="T13"><text:span text:style-name="T13">To use Amplitude analytics, you will need to create an account. Go to:</text:span><text:span text:style-name="T13"/></text:p>
      <text:p text:style-name="P80" loext:marker-style-name="T13"><text:a xlink:type="simple" xlink:href="https://amplitude.com" text:style-name="Internet_20_link" text:visited-style-name="Visited_20_Internet_20_Link"><text:span text:style-name="Internet_20_link"><text:span text:style-name="T13">https://amplitude.com</text:span></text:span></text:a><text:span text:style-name="T13"/></text:p>
      <text:p text:style-name="P35" loext:marker-style-name="T13"/>
      <text:p text:style-name="Standard" loext:marker-style-name="T13"><text:span text:style-name="T13">You will need to:</text:span><text:span text:style-name="T13"/></text:p>
      <text:list text:style-name="WWNum13">
        <text:list-item>
          <text:p text:style-name="P81" loext:marker-style-name="T13"><text:span text:style-name="T13">Click </text:span><text:span text:style-name="T17">Sign Up</text:span><text:span text:style-name="T13"> at the top right of the screen and create an account. You will receive an email to finish activating your account. Copy the link to your browser and go to the page and complete the activation process.</text:span></text:p>
        </text:list-item>
        <text:list-item>
          <text:p text:style-name="P81" loext:marker-style-name="T13"><text:span text:style-name="T13">You will be prompted to create a new organization. You can do that to invite team members to join your organization and access the data. You will also be prompted for some additional information.</text:span><text:span text:style-name="T13"/></text:p>
        </text:list-item>
        <text:list-item>
          <text:p text:style-name="P81" loext:marker-style-name="T17"><text:span text:style-name="T13">Click </text:span><text:span text:style-name="T17">Create Project</text:span><text:span text:style-name="T13">, enter the project name and click </text:span><text:span text:style-name="T17">Create</text:span><text:span text:style-name="T13">. There will be a project for each individual app.</text:span></text:p>
        </text:list-item>
        <text:list-item>
          <text:p text:style-name="P81" loext:marker-style-name="T17"><text:span text:style-name="T13">Click </text:span><text:span text:style-name="T17">Projects</text:span><text:span text:style-name="T13"> on the left of the screen. This will show the list of projects and the properties including a long string of hexadecimal characters under the label </text:span><text:span text:style-name="T17">API Key</text:span><text:span text:style-name="T13">. </text:span></text:p>
        </text:list-item>
        <text:list-item>
          <text:p text:style-name="P81" loext:marker-style-name="T17"><text:span text:style-name="T13">Highlight and copy this string into the API Key field in Dictionary App Builder.</text:span><text:span text:style-name="T17"/></text:p>
        </text:list-item>
      </text:list>
      <text:p text:style-name="P82" loext:marker-style-name="T17"/>
      <text:h text:style-name="P13" text:outline-level="2" loext:marker-style-name="T13"><text:bookmark-start text:name="_Toc508699629"/><text:bookmark-start text:name="_Toc172123647"/><text:bookmark-start text:name="_Toc508700188"/><text:span text:style-name="T13">S3 Digest Analytics</text:span><text:bookmark-end text:name="_Toc508699629"/><text:bookmark-end text:name="_Toc172123647"/><text:bookmark-end text:name="_Toc508700188"/><text:span text:style-name="T13"/></text:h>
      <text:p text:style-name="Standard" loext:marker-style-name="T13"><text:span text:style-name="T13">To use S3 Digest Analytics, ensure you have admin permissions to an Amazon AWS account, and go to:</text:span><text:span text:style-name="T13"/></text:p>
      <text:p text:style-name="P16" loext:marker-style-name="T13"><text:a xlink:type="simple" xlink:href="https://aws.amazon.com/console/" text:style-name="Internet_20_link" text:visited-style-name="Visited_20_Internet_20_Link"><text:span text:style-name="Internet_20_link"><text:span text:style-name="T13">https://aws.amazon.com/console/</text:span></text:span></text:a><text:span text:style-name="T13"/></text:p>
      <text:p text:style-name="P35" loext:marker-style-name="T13"/>
      <text:p text:style-name="Standard" loext:marker-style-name="T13"><text:span text:style-name="T13">You will need to:</text:span><text:span text:style-name="T13"/></text:p>
      <text:list text:style-name="WWNum15">
        <text:list-item>
          <text:p text:style-name="P83" loext:marker-style-name="T13"><text:span text:style-name="T13">Click </text:span><text:span text:style-name="T17">Sign In to the Console</text:span><text:span text:style-name="T13"> at the top right of the screen.</text:span></text:p>
        </text:list-item>
        <text:list-item>
          <text:p text:style-name="P83" loext:marker-style-name="T13"><text:span text:style-name="T13">Create an S3 Bucket.</text:span><text:span text:style-name="T13"/></text:p>
          <text:list>
            <text:list-item>
              <text:p text:style-name="P84" loext:marker-style-name="T13"><text:span text:style-name="T13">Go to the </text:span><text:span text:style-name="T17">S3</text:span><text:span text:style-name="T13"> Service and click </text:span><text:span text:style-name="T17">Create bucket</text:span><text:span text:style-name="T13">, enter a Bucket name, select a Region near where the app will be distributed, and click </text:span><text:span text:style-name="T17">Next</text:span><text:span text:style-name="T13">.</text:span></text:p>
            </text:list-item>
            <text:list-item>
              <text:p text:style-name="P84" loext:marker-style-name="T13"><text:span text:style-name="T13">On the </text:span><text:span text:style-name="T17">Set properties</text:span><text:span text:style-name="T13"> and </text:span><text:span text:style-name="T17">Set permissions</text:span><text:span text:style-name="T13"> steps, use the defaults and click </text:span><text:span text:style-name="T17">Next</text:span><text:span text:style-name="T13">.</text:span></text:p>
            </text:list-item>
            <text:list-item>
              <text:p text:style-name="P84" loext:marker-style-name="T13"><text:span text:style-name="T13">Review the configuration and click </text:span><text:span text:style-name="T17">Create bucket</text:span><text:span text:style-name="T13">.</text:span></text:p>
            </text:list-item>
            <text:list-item>
              <text:p text:style-name="P84" loext:marker-style-name="T13"><text:span text:style-name="T13">Copy the </text:span><text:span text:style-name="T17">Bucket name</text:span><text:span text:style-name="T13"> into the </text:span><text:span text:style-name="T17">S3 Bucket ID</text:span><text:span text:style-name="T13"> field in Dictionary App Builder.</text:span></text:p>
            </text:list-item>
          </text:list>
        </text:list-item>
        <text:list-item>
          <text:p text:style-name="P85" loext:marker-style-name="T13"><text:span text:style-name="T13">Create a Federated Identity.</text:span><text:span text:style-name="T13"/></text:p>
          <text:list>
            <text:list-item>
              <text:p text:style-name="P84" loext:marker-style-name="T13"><text:span text:style-name="T13">Go to the </text:span><text:span text:style-name="T17">Cognito</text:span><text:span text:style-name="T13"> Service and click </text:span><text:span text:style-name="T17">Manage Federated Identitites</text:span><text:span text:style-name="T13">. <text:s/>The first time you use this service it will start creating an identity pool for you. <text:s/>If the AWS account already has identity pools, then it will show a grid of existing one. If this is the case then click </text:span><text:span text:style-name="T17">Create new identity pool</text:span><text:span text:style-name="T13">.</text:span></text:p>
            </text:list-item>
            <text:list-item>
              <text:p text:style-name="P84" loext:marker-style-name="T13"><text:span text:style-name="T13">Enter an </text:span><text:span text:style-name="T17">Identity pool name</text:span><text:span text:style-name="T13">, click </text:span><text:span text:style-name="T17">Enable access to unauthenticated identities</text:span><text:span text:style-name="T13"> (which allows users of the app to submit analytics without logging into some service), and click </text:span><text:span text:style-name="T17">Create</text:span><text:span text:style-name="T13">.</text:span></text:p>
            </text:list-item>
            <text:list-item>
              <text:p text:style-name="P84" loext:marker-style-name="T13"><text:span text:style-name="T13">Click </text:span><text:span text:style-name="T17">Show Details</text:span><text:span text:style-name="T13"> to see the </text:span><text:span text:style-name="T17">Role Name</text:span><text:span text:style-name="T13"> for the unauthenticated identities (in the next step, we will give them permission to put objects in the bucket created in the previous step). Click </text:span><text:span text:style-name="T17">Allow</text:span><text:span text:style-name="T13">.</text:span></text:p>
            </text:list-item>
            <text:list-item>
              <text:p text:style-name="P84" loext:marker-style-name="T13"><text:span text:style-name="T13">Copy the </text:span><text:span text:style-name="T17">Identity pool ID</text:span><text:span text:style-name="T13"> value inside the quotes in the </text:span><text:span text:style-name="T17">Get AWS Credentials</text:span><text:span text:style-name="T13"> section of the </text:span><text:span text:style-name="T17">Sample code</text:span><text:span text:style-name="T13"> page shown after completion of the previous step. Copy this string into the </text:span><text:span text:style-name="T17">Identity Pool ID</text:span><text:span text:style-name="T13"> field in Dictionary App Builder.</text:span></text:p>
            </text:list-item>
          </text:list>
        </text:list-item>
        <text:list-item>
          <text:p text:style-name="P85" loext:marker-style-name="T13"><text:span text:style-name="T13">Give permission to put data into the S3 Bucket.</text:span><text:span text:style-name="T13"/></text:p>
          <text:list>
            <text:list-item>
              <text:p text:style-name="P84" loext:marker-style-name="T13"><text:span text:style-name="T13">Go to the </text:span><text:span text:style-name="T17">IAM</text:span><text:span text:style-name="T13"> Service and click </text:span><text:span text:style-name="T17">Roles</text:span><text:span text:style-name="T13"> category.</text:span></text:p>
            </text:list-item>
            <text:list-item>
              <text:p text:style-name="P84" loext:marker-style-name="T13"><text:span text:style-name="T13">Click on the Role created in step #3 (e.g. Cognito_&lt;IdentityPoolName&gt;Unauth_Role).</text:span><text:span text:style-name="T13"/></text:p>
            </text:list-item>
            <text:list-item>
              <text:p text:style-name="P84" loext:marker-style-name="T13"><text:span text:style-name="T13">Click </text:span><text:span text:style-name="T17">Add inline policy</text:span><text:span text:style-name="T13">, click </text:span><text:span text:style-name="T17">Service</text:span><text:span text:style-name="T13"> and choose </text:span><text:span text:style-name="T17">S3</text:span><text:span text:style-name="T13">.</text:span></text:p>
            </text:list-item>
            <text:list-item>
              <text:p text:style-name="P84" loext:marker-style-name="T13"><text:span text:style-name="T13">Click </text:span><text:span text:style-name="T17">Actions</text:span><text:span text:style-name="T13">, type in </text:span><text:span text:style-name="T41">PutObject</text:span><text:span text:style-name="T13"> to search for actions, and check </text:span><text:span text:style-name="T17">PutObject</text:span><text:span text:style-name="T13"> to select that action.</text:span></text:p>
            </text:list-item>
            <text:list-item>
              <text:p text:style-name="P84" loext:marker-style-name="T13"><text:span text:style-name="T13">Click </text:span><text:span text:style-name="T17">Resources</text:span><text:span text:style-name="T13">, use default Specific, click on </text:span><text:span text:style-name="T17">Add ARN</text:span><text:span text:style-name="T13"> link, enter the </text:span><text:span text:style-name="T17">Bucket name</text:span><text:span text:style-name="T13"> from step #1 into the </text:span><text:span text:style-name="T17">Bucket name</text:span><text:span text:style-name="T13"> field, click the </text:span><text:span text:style-name="T17">Any</text:span><text:span text:style-name="T13"> checkbox at the end of the </text:span><text:span text:style-name="T17">Object name</text:span><text:span text:style-name="T13"> field, and click </text:span><text:span text:style-name="T17">Add</text:span><text:span text:style-name="T13">.</text:span></text:p>
            </text:list-item>
            <text:list-item>
              <text:p text:style-name="P84" loext:marker-style-name="T13"><text:span text:style-name="T13">Click </text:span><text:span text:style-name="T17">Review policy</text:span><text:span text:style-name="T13">, enter a name in the </text:span><text:span text:style-name="T17">Name</text:span><text:span text:style-name="T13"> field, and click </text:span><text:span text:style-name="T17">Create policy</text:span><text:span text:style-name="T13">.</text:span></text:p>
            </text:list-item>
          </text:list>
        </text:list-item>
      </text:list>
      <text:p text:style-name="P86"/>
      <text:h text:style-name="P13" text:outline-level="2"><text:bookmark-start text:name="_Toc508644267"/><text:bookmark-start text:name="_Toc172123648"/><text:bookmark-start text:name="_Toc508651028"/>Details on S3 Digest Analytics<text:bookmark-end text:name="_Toc508644267"/><text:bookmark-end text:name="_Toc172123648"/><text:bookmark-end text:name="_Toc508651028"/></text:h>
      <text:p text:style-name="Standard"><text:bookmark-start text:name="_Toc508644268"/><text:bookmark-start text:name="_Toc508651029"/>S3 Digest Analytics will <text:span text:style-name="T42">send a small daily digest </text:span>(about 300 bytes for each day the app is used)<text:span text:style-name="T43"> </text:span><text:span text:style-name="T42">of compressed, completely anonymous data</text:span> (no personal, phone, or GPS location information) <text:span text:style-name="T42">via an encrypted transport</text:span> (https) <text:span text:style-name="T42">to an Amazon data center, when the device is connected to the Internet </text:span>(via cell or WIFI)<text:span text:style-name="T42"> while the app is running.</text:span> You are responsible for hosting the Amazon S3 Bucket and processing the received data. </text:p>
      <text:p text:style-name="Standard"/>
      <text:p text:style-name="Standard">Files are uploaded to the S3 Bucket and in a sub-folder based on the format (e.g. the current format is f1) and stored with a unique filename using a randomly generated <text:a xlink:type="simple" xlink:href="https://en.wikipedia.org/wiki/Universally_unique_identifier" text:style-name="Internet_20_link" text:visited-style-name="Visited_20_Internet_20_Link"><text:span text:style-name="Internet_20_link">GUID</text:span></text:a> as the basename. We are working to package a Splunk configuration so that you can deploy your own server to analyze the data.</text:p>
      <text:p text:style-name="Standard"/>
      <text:p text:style-name="P87">S3 Digest Analytics uses a JSON payload format. A complete sample data payload is below:<text:bookmark-end text:name="_Toc508651029"/><text:bookmark-end text:name="_Toc508644268"/></text:p>
      <text:p text:style-name="P88" loext:marker-style-name="T44"><text:span text:style-name="T44">{"startTime":"20180306T0835Z","period":1440,"id":"12db7e3f-93d9-4370-b12b-fe048804e4f5","package":"org.sil.dictionary.cuk","version_name":"1.0.1","sessions":1,"sessionMins":21,"shares":3}</text:span><text:span text:style-name="T44"/></text:p>
      <text:p text:style-name="P89" loext:marker-style-name="T44"/>
      <text:p text:style-name="P89" loext:marker-style-name="T44"/>
      <text:p text:style-name="Standard">This sample is comprised of the following fields:</text:p>
      <text:list text:style-name="WWNum16">
        <text:list-item>
          <text:p text:style-name="P90">One day of activity (1440 minutes), starting on 2018-03-06.</text:p>
        </text:list-item>
        <text:list-item>
          <text:p text:style-name="P90">The id is a <text:a xlink:type="simple" xlink:href="https://en.wikipedia.org/wiki/Universally_unique_identifier" text:style-name="Internet_20_link" text:visited-style-name="Visited_20_Internet_20_Link"><text:span text:style-name="Internet_20_link">GUID</text:span></text:a> which was randomly generated on the phone when the app was first launched, enabling determination of how many unique installations of the app are in use (<text:span text:style-name="T42">but no user-identifying information</text:span>).  </text:p>
        </text:list-item>
        <text:list-item>
          <text:p text:style-name="P90">Package and version indicate which app is in use.</text:p>
        </text:list-item>
        <text:list-item>
          <text:p text:style-name="P90">This report was for a single 21-minute session. This (and other) values would be incremented if the app had been used multiple times within the reporting period.</text:p>
        </text:list-item>
        <text:list-item>
          <text:p text:style-name="P90">The user pressed share in the app 3 times.</text:p>
        </text:list-item>
      </text:list>
      <text:p text:style-name="Standard"/>
      <text:p text:style-name="Standard"/>
      <text:h text:style-name="P91" text:outline-level="1"><text:bookmark-start text:name="_Toc15985870"/><text:bookmark-start text:name="_Toc172123649"/>Registration Screen<text:bookmark-end text:name="_Toc15985870"/><text:bookmark-end text:name="_Toc172123649"/></text:h>
      <text:p text:style-name="P24"/>
      <text:p text:style-name="P24" loext:marker-style-name="T4"><text:span text:style-name="T4">You can define a registration screen to be shown when a user launches the app for the first time. This allows you to collect contact information, for example to connect people with a WhatsApp group to discuss dictionary entries.</text:span><text:span text:style-name="T4"/></text:p>
      <text:p text:style-name="P24"/>
      <text:p text:style-name="P2"><draw:frame text:anchor-type="as-char" draw:z-index="16" draw:style-name="gr1" draw:text-style-name="P3" svg:width="1.8197in" svg:height="3.8197in"><draw:image xlink:href="Pictures/1000000100000438000008DEAA9A0F4B.png" xlink:type="simple" xlink:show="embed" xlink:actuate="onLoad" draw:mime-type="image/png"><text:p/></draw:image></draw:frame><text:s text:c="7"/><draw:frame text:anchor-type="as-char" draw:z-index="17" draw:style-name="gr1" draw:text-style-name="P3" svg:width="1.8197in" svg:height="3.8197in"><draw:image xlink:href="Pictures/1000000100000438000008DE8103BC3A.png" xlink:type="simple" xlink:show="embed" xlink:actuate="onLoad" draw:mime-type="image/png"><text:p/></draw:image></draw:frame><text:s text:c="6"/><draw:frame text:anchor-type="as-char" draw:z-index="18" draw:style-name="gr1" draw:text-style-name="P3" svg:width="1.8197in" svg:height="3.8197in"><draw:image xlink:href="Pictures/1000000100000438000008DEF31E1809.png" xlink:type="simple" xlink:show="embed" xlink:actuate="onLoad" draw:mime-type="image/png"><text:p/></draw:image></draw:frame></text:p>
      <text:p text:style-name="Standard"/>
      <text:p text:style-name="P61" loext:marker-style-name="T4"><text:span text:style-name="T4">To set up a registration screen, you need to do some configuration work in two places:</text:span><text:span text:style-name="T4"/></text:p>
      <text:list text:style-name="WWNum19">
        <text:list-item>
          <text:p text:style-name="P92" loext:marker-style-name="T4"><text:span text:style-name="T4">within Dictionary App Builder, and</text:span><text:span text:style-name="T4"/></text:p>
        </text:list-item>
        <text:list-item>
          <text:p text:style-name="P93" loext:marker-style-name="T4"><text:span text:style-name="T4">in the Google Firebase console.</text:span><text:span text:style-name="T4"/></text:p>
        </text:list-item>
      </text:list>
      <text:p text:style-name="P6" loext:marker-style-name="T4"/>
      <text:h text:style-name="P13" text:outline-level="2" loext:marker-style-name="T4"><text:bookmark-start text:name="_Toc15985871"/><text:bookmark-start text:name="_Toc172123650"/><text:span text:style-name="T4">Setting up the Registration Screen in Dictionary App Builder</text:span><text:bookmark-end text:name="_Toc15985871"/><text:bookmark-end text:name="_Toc172123650"/><text:span text:style-name="T4"/></text:h>
      <text:p text:style-name="P22">To set up the registration screen within the app builder:</text:p>
      <text:list text:style-name="WWNum20">
        <text:list-item>
          <text:p text:style-name="P94">Go to the <text:span text:style-name="T43">App</text:span> <text:span text:style-name="T15"></text:span><text:span text:style-name="T19"> </text:span><text:span text:style-name="T21">Security</text:span><text:span text:style-name="T19"> page.</text:span></text:p>
        </text:list-item>
        <text:list-item>
          <text:p text:style-name="P94">Select <text:span text:style-name="T43">Require each user to register with their details when they first use the app</text:span>.</text:p>
        </text:list-item>
        <text:list-item>
          <text:p text:style-name="P94">Click the <text:span text:style-name="T43">Configure Registration</text:span> button.</text:p>
        </text:list-item>
        <text:list-item>
          <text:p text:style-name="P94">Follow the instructions in each of the tabs in the Configure Registration dialog:</text:p>
          <text:list>
            <text:list-item>
              <text:list>
                <text:list-item>
                  <text:p text:style-name="P95"><text:span text:style-name="T43">Registration Screen:</text:span> specify the title and text to show on the registration screen.</text:p>
                </text:list-item>
                <text:list-item>
                  <text:p text:style-name="P95"><text:span text:style-name="T43">User Details:</text:span> specify the input fields (such as name, telephone number, email adress), that you will ask the user to provide. You can specify which of these are required and which are optional.</text:p>
                </text:list-item>
                <text:list-item>
                  <text:p text:style-name="P95"><text:span text:style-name="T43">Skip Registration:</text:span> choose whether you want the user to be able to skip the registration process. If they do press the Skip button, specify when you want the app to ask them again.</text:p>
                </text:list-item>
                <text:list-item>
                  <text:p text:style-name="P95"><text:span text:style-name="T43">Registration Completed:</text:span> specify the title and text to be displayed on the screen which is shown to the user after they have successfully registered.</text:p>
                </text:list-item>
                <text:list-item>
                  <text:p text:style-name="P95"><text:span text:style-name="T43">Image:</text:span> specify an image to be displayed at the top of the screen, such as your organisation’s logo or the app icon.</text:p>
                </text:list-item>
                <text:list-item>
                  <text:p text:style-name="P95"><text:span text:style-name="T43">Database:</text:span> choose whether the user data will be stored in an app-specific path in the database (which is useful if you use the same database for several apps), or at the top level of the database (which is fine if you have just one app). More information about configuring your database can be found in the following section.</text:p>
                </text:list-item>
                <text:list-item>
                  <text:p text:style-name="P95"><text:span text:style-name="T43">Styles:</text:span> you can adjust the styling of the screens by adjusting the style declarations.</text:p>
                </text:list-item>
              </text:list>
            </text:list-item>
          </text:list>
        </text:list-item>
      </text:list>
      <text:p text:style-name="P69"><text:line-break/>Use the <text:span text:style-name="T43">Test</text:span> buttons on the <text:span text:style-name="T43">Registration Screen</text:span> and <text:span text:style-name="T43">Registration Completed</text:span> tabs to preview the screens in a browser.<text:line-break/></text:p>
      <text:list text:continue-numbering="true" text:style-name="WWNum20">
        <text:list-item>
          <text:p text:style-name="P94">Click <text:span text:style-name="T43">OK</text:span> when you are finished in the dialog.</text:p>
        </text:list-item>
      </text:list>
      <text:p text:style-name="P6" loext:marker-style-name="T4"/>
      <text:h text:style-name="P13" text:outline-level="2" loext:marker-style-name="T4"><text:bookmark-start text:name="_Toc15985872"/><text:bookmark-start text:name="_Toc172123651"/><text:span text:style-name="T4">Setting up the database in the Google Firebase console</text:span><text:bookmark-end text:name="_Toc15985872"/><text:bookmark-end text:name="_Toc172123651"/><text:span text:style-name="T4"/></text:h>
      <text:p text:style-name="P22" loext:marker-style-name="T4"><text:span text:style-name="T4">To set up the database, which will contain the registered users’ information, you need to add Firebase to your app, create a database, set up authentication and configure rules.</text:span><text:span text:style-name="T4"/></text:p>
      <text:p text:style-name="P96" loext:marker-style-name="T45"><text:span text:style-name="T45">Add Firebase to your app</text:span><text:span text:style-name="T45"/></text:p>
      <text:p text:style-name="Standard" loext:marker-style-name="T4"><text:span text:style-name="T4">To add Firebase to your app:</text:span><text:span text:style-name="T4"/></text:p>
      <text:list text:style-name="WWNum22">
        <text:list-item>
          <text:p text:style-name="P97" loext:marker-style-name="T4"><text:span text:style-name="T4">Go to the Google Firebase website at </text:span><text:a xlink:type="simple" xlink:href="https://firebase.google.com/" text:style-name="Internet_20_link" text:visited-style-name="Visited_20_Internet_20_Link"><text:span text:style-name="Internet_20_link"><text:span text:style-name="T4">https://firebase.google.com/</text:span></text:span></text:a><text:span text:style-name="T4"> and ensure you are signed in with your Google account.</text:span></text:p>
        </text:list-item>
        <text:list-item>
          <text:p text:style-name="P97" loext:marker-style-name="T4"><text:span text:style-name="T4">Create a Firebase project if you do not already have one for this app.</text:span><text:span text:style-name="T4"/></text:p>
        </text:list-item>
        <text:list-item>
          <text:p text:style-name="P97" loext:marker-style-name="T4"><text:span text:style-name="T4">Click the Settings button (a cog wheel icon near the top) and select </text:span><text:span text:style-name="T39">Project settings</text:span><text:span text:style-name="T4">.</text:span></text:p>
        </text:list-item>
      </text:list>
      <text:p text:style-name="P78" loext:marker-style-name="T4"><draw:frame text:anchor-type="as-char" draw:z-index="19" draw:style-name="gr1" draw:text-style-name="P3" svg:width="4.1043in" svg:height="0.8961in"><draw:image xlink:href="Pictures/1000000100000355000000BA9623E5B2.png" xlink:type="simple" xlink:show="embed" xlink:actuate="onLoad" draw:mime-type="image/png"><text:p/></draw:image></draw:frame></text:p>
      <text:p text:style-name="P55" loext:marker-style-name="T4"/>
      <text:list text:continue-numbering="true" text:style-name="WWNum22">
        <text:list-item>
          <text:p text:style-name="P97" loext:marker-style-name="T4"><text:span text:style-name="T4">On the </text:span><text:span text:style-name="T39">General</text:span><text:span text:style-name="T4"> tab of the Settings, scroll down to the </text:span><text:span text:style-name="T39">My apps</text:span><text:span text:style-name="T4"> section and click the Android app icon.</text:span></text:p>
        </text:list-item>
        <text:list-item>
          <text:p text:style-name="P97" loext:marker-style-name="T4"><text:span text:style-name="T4">On the </text:span><text:span text:style-name="T39">Add Firebase to your Android app</text:span><text:span text:style-name="T4"> page, enter your app package name and click </text:span><text:span text:style-name="T39">Register app</text:span><text:span text:style-name="T4">.</text:span></text:p>
        </text:list-item>
        <text:list-item>
          <text:p text:style-name="P97" loext:marker-style-name="T4"><text:span text:style-name="T4">Download the config file, </text:span><text:span text:style-name="T39">google-services.json</text:span><text:span text:style-name="T4">. That is all you need from the app registration. You can ignore the information on the rest of the screens and return to Settings. <text:s/></text:span></text:p>
        </text:list-item>
        <text:list-item>
          <text:p text:style-name="P97" loext:marker-style-name="T4"><text:span text:style-name="T4">Go to the </text:span><text:span text:style-name="T39">Data &amp; Analytics</text:span><text:span text:style-name="T4"> </text:span><text:bookmark-start text:name="_Hlk16004140"/><text:span text:style-name="T15"></text:span><text:bookmark-end text:name="_Hlk16004140"/><text:span text:style-name="T19"> </text:span><text:span text:style-name="T21">Firebase</text:span><text:span text:style-name="T19"> page in </text:span><text:span text:style-name="T4">Dictionary App Builder.</text:span></text:p>
        </text:list-item>
        <text:list-item>
          <text:p text:style-name="P97" loext:marker-style-name="T4"><text:span text:style-name="T4">Select </text:span><text:span text:style-name="T39">Firebase Realtime Database</text:span><text:span text:style-name="T4"> as one of the features to use in the app.</text:span></text:p>
        </text:list-item>
        <text:list-item>
          <text:p text:style-name="P97" loext:marker-style-name="T4"><text:span text:style-name="T4">On the </text:span><text:span text:style-name="T39">Firebase Configuration</text:span><text:span text:style-name="T4"> </text:span><text:span text:style-name="T15"></text:span><text:span text:style-name="T19"> </text:span><text:span text:style-name="T21">Android</text:span><text:span text:style-name="T4"> tab, click the </text:span><text:span text:style-name="T39">Browse</text:span><text:span text:style-name="T4"> button and find the </text:span><text:span text:style-name="T39">google-services.json</text:span><text:span text:style-name="T4"> config file that you have just downloaded from the Firebase console.</text:span></text:p>
        </text:list-item>
      </text:list>
      <text:p text:style-name="P55" loext:marker-style-name="T4"/>
      <text:p text:style-name="P19" loext:marker-style-name="T45"><text:span text:style-name="T45">Create a Database</text:span><text:span text:style-name="T45"/></text:p>
      <text:p text:style-name="Standard" loext:marker-style-name="T4"><text:span text:style-name="T4">To create a </text:span><text:span text:style-name="T39">Realtime database</text:span><text:span text:style-name="T4">:</text:span></text:p>
      <text:list text:style-name="WWNum21">
        <text:list-item>
          <text:p text:style-name="P98" loext:marker-style-name="T4"><text:span text:style-name="T4">In your Firebase project console, select </text:span><text:span text:style-name="T39">Database</text:span><text:span text:style-name="T4"> from the menu on the left of the screen.</text:span></text:p>
        </text:list-item>
        <text:list-item>
          <text:p text:style-name="P98" loext:marker-style-name="T4"><text:span text:style-name="T4">Scroll down the screen for the section titled </text:span><text:span text:style-name="T39">Or choose Realtime Database</text:span><text:span text:style-name="T4"> and click the </text:span><text:span text:style-name="T39">Create database</text:span><text:span text:style-name="T4"> button.</text:span></text:p>
        </text:list-item>
        <text:list-item>
          <text:p text:style-name="P98" loext:marker-style-name="T4"><text:span text:style-name="T4">Choose </text:span><text:span text:style-name="T39">Start in locked mode</text:span><text:span text:style-name="T4"> as the Security rules and click </text:span><text:span text:style-name="T39">Enable</text:span><text:span text:style-name="T4">.</text:span></text:p>
        </text:list-item>
      </text:list>
      <text:p text:style-name="P6" loext:marker-style-name="T4"/>
      <text:p text:style-name="P6" loext:marker-style-name="T4"/>
      <text:p text:style-name="P99" loext:marker-style-name="T45"><text:span text:style-name="T45">Set up Authentication</text:span><text:span text:style-name="T45"/></text:p>
      <text:p text:style-name="P100" loext:marker-style-name="T4"><text:span text:style-name="T4">On the </text:span><text:span text:style-name="T40">Authentication</text:span><text:span text:style-name="T4"> page of the Firebase console, enable two authentication types on the </text:span><text:span text:style-name="T40">Sign-in method</text:span><text:span text:style-name="T4"> tab:</text:span></text:p>
      <text:p text:style-name="P101" loext:marker-style-name="T4"/>
      <text:list text:style-name="WWNum18">
        <text:list-item>
          <text:p text:style-name="P102" loext:marker-style-name="T4"><text:span text:style-name="T40">Email/Password</text:span><text:span text:style-name="T4"> (this is used when viewing registered users in a web browser)</text:span></text:p>
        </text:list-item>
        <text:list-item>
          <text:p text:style-name="P102" loext:marker-style-name="T4"><text:span text:style-name="T40">Anonymous </text:span><text:span text:style-name="T4">(this is used during user registration in the app)</text:span></text:p>
        </text:list-item>
      </text:list>
      <text:p text:style-name="P101" loext:marker-style-name="T4"/>
      <text:p text:style-name="P103" loext:marker-style-name="T46"/>
      <text:p text:style-name="P99" loext:marker-style-name="T45"><text:span text:style-name="T45">Configure Rules</text:span><text:span text:style-name="T45"/></text:p>
      <text:p text:style-name="Standard">Rules are required to tell Firebase who will have access rights to read and write to the database. To configure the database rules: </text:p>
      <text:list text:style-name="WWNum26">
        <text:list-item>
          <text:p text:style-name="P104">In your Firebase project console, select <text:span text:style-name="T43">Realtime Database</text:span> from the menu on the left of the screen.</text:p>
        </text:list-item>
        <text:list-item>
          <text:p text:style-name="P104">Select the <text:span text:style-name="T28">Rules</text:span> tab.</text:p>
        </text:list-item>
        <text:list-item>
          <text:p text:style-name="P104">The rules you specify will depend on the path you have chosen on the <text:span text:style-name="T43">Database</text:span> tab in the Registration configuration.</text:p>
        </text:list-item>
      </text:list>
      <text:p text:style-name="P29">If you have chosen to store the user information in an <text:span text:style-name="T43">app-specific location</text:span>, e.g. “/apps/your-app-package-name/users/”, the rules need to be as follows:</text:p>
      <text:p text:style-name="Standard"/>
      <text:p text:style-name="P105" loext:marker-style-name="T47"><text:span text:style-name="T47">{</text:span><text:span text:style-name="T47"/></text:p>
      <text:p text:style-name="P105" loext:marker-style-name="T47"><text:span text:style-name="T47"><text:s text:c="2"/>"rules": {</text:span><text:span text:style-name="T47"/></text:p>
      <text:p text:style-name="P105" loext:marker-style-name="T47"><text:span text:style-name="T47"><text:s text:c="4"/>"apps": {</text:span><text:span text:style-name="T47"/></text:p>
      <text:p text:style-name="P105" loext:marker-style-name="T47"><text:span text:style-name="T47"><text:s text:c="6"/>"$package": {</text:span><text:span text:style-name="T47"/></text:p>
      <text:p text:style-name="P105" loext:marker-style-name="T47"><text:span text:style-name="T47"><text:s text:c="8"/>"users": {</text:span><text:span text:style-name="T47"/></text:p>
      <text:p text:style-name="P105" loext:marker-style-name="T47"><text:span text:style-name="T47"><text:s text:c="10"/>"$uid": {</text:span><text:span text:style-name="T47"/></text:p>
      <text:p text:style-name="P105" loext:marker-style-name="T47"><text:span text:style-name="T47"><text:s text:c="12"/>".read": false,</text:span><text:span text:style-name="T47"/></text:p>
      <text:p text:style-name="P105" loext:marker-style-name="T47"><text:span text:style-name="T47"><text:s text:c="12"/>".write": "$uid === auth.uid"</text:span><text:span text:style-name="T47"/></text:p>
      <text:p text:style-name="P105" loext:marker-style-name="T47"><text:span text:style-name="T47"><text:s text:c="10"/>}</text:span><text:span text:style-name="T47"/></text:p>
      <text:p text:style-name="P105" loext:marker-style-name="T47"><text:span text:style-name="T47"><text:s text:c="8"/>}</text:span><text:span text:style-name="T47"/></text:p>
      <text:p text:style-name="P105" loext:marker-style-name="T47"><text:span text:style-name="T47"><text:s text:c="6"/>}</text:span><text:span text:style-name="T47"/></text:p>
      <text:p text:style-name="P105" loext:marker-style-name="T47"><text:span text:style-name="T47"><text:s text:c="4"/>}</text:span><text:span text:style-name="T47"/></text:p>
      <text:p text:style-name="P105" loext:marker-style-name="T47"><text:span text:style-name="T47"><text:s text:c="2"/>}</text:span><text:span text:style-name="T47"/></text:p>
      <text:p text:style-name="P105" loext:marker-style-name="T47"><text:span text:style-name="T47">}</text:span><text:span text:style-name="T47"/></text:p>
      <text:p text:style-name="Standard"/>
      <text:p text:style-name="P106">If you have chosen to store the user information at the <text:span text:style-name="T43">top level of the database</text:span>, e.g. “/users/”, the rules need to be as follows:</text:p>
      <text:p text:style-name="P24"/>
      <text:p text:style-name="P107" loext:marker-style-name="T47"><text:span text:style-name="T47">{</text:span><text:span text:style-name="T47"/></text:p>
      <text:p text:style-name="P107" loext:marker-style-name="T47"><text:span text:style-name="T47"><text:s text:c="2"/>"rules": {</text:span><text:span text:style-name="T47"/></text:p>
      <text:p text:style-name="P107" loext:marker-style-name="T47"><text:span text:style-name="T47"><text:s text:c="4"/>"users": {</text:span><text:span text:style-name="T47"/></text:p>
      <text:p text:style-name="P107" loext:marker-style-name="T47"><text:span text:style-name="T47"><text:s text:c="6"/>"$uid": {</text:span><text:span text:style-name="T47"/></text:p>
      <text:p text:style-name="P107" loext:marker-style-name="T47"><text:span text:style-name="T47"><text:s text:c="8"/>".read": false,</text:span><text:span text:style-name="T47"/></text:p>
      <text:p text:style-name="P107" loext:marker-style-name="T47"><text:span text:style-name="T47"><text:s text:c="8"/>".write": "$uid === auth.uid"</text:span><text:span text:style-name="T47"/></text:p>
      <text:p text:style-name="P107" loext:marker-style-name="T47"><text:span text:style-name="T47"><text:s text:c="6"/>}</text:span><text:span text:style-name="T47"/></text:p>
      <text:p text:style-name="P107" loext:marker-style-name="T47"><text:span text:style-name="T47"><text:s text:c="4"/>}</text:span><text:span text:style-name="T47"/></text:p>
      <text:p text:style-name="P107" loext:marker-style-name="T47"><text:span text:style-name="T47"><text:s text:c="2"/>}</text:span><text:span text:style-name="T47"/></text:p>
      <text:p text:style-name="P107" loext:marker-style-name="T47"><text:span text:style-name="T47">}</text:span><text:span text:style-name="T47"/></text:p>
      <text:p text:style-name="Standard"/>
      <text:p text:style-name="Standard"/>
      <text:p text:style-name="P15">These rules give write access only to the user who is making the registration. No one will have read access (except for you when you view the database from the Firebase console). </text:p>
      <text:p text:style-name="P15"/>
      <text:p text:style-name="P108" loext:marker-style-name="T4"><text:span text:style-name="T48">Tip</text:span><text:span text:style-name="T4">: Make sure you copy the rules exactly. An easy way to get the rules you need is to click the </text:span><text:span text:style-name="T39">Database Rules</text:span><text:span text:style-name="T4"> button on the Database tab. This will give you the rules you can copy.</text:span></text:p>
      <text:p text:style-name="P109" loext:marker-style-name="T49"/>
      <text:list text:continue-numbering="true" text:style-name="WWNum26">
        <text:list-item>
          <text:p text:style-name="P104" loext:marker-style-name="T42"><text:span text:style-name="T42">Click </text:span><text:span text:style-name="T28">Publish</text:span><text:span text:style-name="T42"> to </text:span>confirm<text:span text:style-name="T42"> your changes.</text:span></text:p>
        </text:list-item>
      </text:list>
      <text:p text:style-name="P109" loext:marker-style-name="T49"/>
      <text:p text:style-name="P109" loext:marker-style-name="T49"/>
      <text:p text:style-name="P99" loext:marker-style-name="T50"><text:span text:style-name="T50">Rules FAQ</text:span><text:span text:style-name="T50"/></text:p>
      <text:p text:style-name="P24" loext:marker-style-name="T50"><text:span text:style-name="T50">Q. If we want an administrator to have read access to the Registered users to display in a web browser, what rule do we use?</text:span><text:span text:style-name="T50"/></text:p>
      <text:p text:style-name="P110">If you want to give an administrator read access to the data, to be displayed in a web browser (See <text:span text:style-name="T28">Configure Registration</text:span> <text:span text:style-name="T15"></text:span> <text:span text:style-name="T28">User Details</text:span> <text:span text:style-name="T15"></text:span> <text:span text:style-name="T28">View Data</text:span>), here is the rule to use:</text:p>
      <text:p text:style-name="P107" loext:marker-style-name="T47"><text:span text:style-name="T47">{</text:span><text:span text:style-name="T47"/></text:p>
      <text:p text:style-name="P107" loext:marker-style-name="T47"><text:span text:style-name="T47"><text:s text:c="2"/>"rules": {</text:span><text:span text:style-name="T47"/></text:p>
      <text:p text:style-name="P107" loext:marker-style-name="T47"><text:span text:style-name="T47"><text:s text:c="4"/>"apps": {</text:span><text:span text:style-name="T47"/></text:p>
      <text:p text:style-name="P107" loext:marker-style-name="T47"><text:span text:style-name="T47"><text:s text:c="6"/>"$package": {</text:span><text:span text:style-name="T47"/></text:p>
      <text:p text:style-name="P107" loext:marker-style-name="T47"><text:span text:style-name="T47"><text:s text:c="8"/>"users": {</text:span><text:span text:style-name="T47"/></text:p>
      <text:p text:style-name="P107" loext:marker-style-name="T47"><text:span text:style-name="T47"><text:s text:c="10"/>"$uid": {</text:span><text:span text:style-name="T47"/></text:p>
      <text:p text:style-name="P107" loext:marker-style-name="T47"><text:span text:style-name="T47"><text:s text:c="12"/>".read": "(auth != null) &amp;&amp; (auth.token.email == 'me@abcd.com')",</text:span><text:span text:style-name="T47"/></text:p>
      <text:p text:style-name="P107" loext:marker-style-name="T47"><text:span text:style-name="T47"><text:s text:c="12"/>".write": "$uid === auth.uid"</text:span><text:span text:style-name="T47"/></text:p>
      <text:p text:style-name="P107" loext:marker-style-name="T47"><text:span text:style-name="T47"><text:s text:c="10"/>}</text:span><text:span text:style-name="T47"/></text:p>
      <text:p text:style-name="P107" loext:marker-style-name="T47"><text:span text:style-name="T47"><text:s text:c="8"/>}</text:span><text:span text:style-name="T47"/></text:p>
      <text:p text:style-name="P107" loext:marker-style-name="T47"><text:span text:style-name="T47"><text:s text:c="6"/>}</text:span><text:span text:style-name="T47"/></text:p>
      <text:p text:style-name="P107" loext:marker-style-name="T47"><text:span text:style-name="T47"><text:s text:c="4"/>}</text:span><text:span text:style-name="T47"/></text:p>
      <text:p text:style-name="P107" loext:marker-style-name="T47"><text:span text:style-name="T47"><text:s text:c="2"/>}</text:span><text:span text:style-name="T47"/></text:p>
      <text:p text:style-name="P111" loext:marker-style-name="T47"><text:span text:style-name="T47">}</text:span><text:span text:style-name="T47"/></text:p>
      <text:p text:style-name="Standard"/>
      <text:p text:style-name="P112">(where me@abcd.com is a user added on the <text:span text:style-name="T28">Authentication </text:span>page)</text:p>
      <text:p text:style-name="P112"/>
      <text:p text:style-name="Standard">The above rules assume that you want to store the user information in an app-specific location. If you have chosen the top-level location, you need to remove the “apps” and “$package” elements above.</text:p>
      <text:p text:style-name="Standard"/>
      <text:p text:style-name="Standard"/>
      <text:h text:style-name="Heading_20_1" text:outline-level="1" loext:marker-style-name="T7"><text:bookmark-start text:name="_Toc172123652"/><text:span text:style-name="T7">Distribution</text:span><text:bookmark-end text:name="_Toc172123652"/><text:span text:style-name="T7"/></text:h>
      <text:p text:style-name="Standard" loext:marker-style-name="T7"><text:span text:style-name="T7">Android apps built with Dictionary App Builder can be published on the Google Play store, distributed on memory cards, shared by Bluetooth or Wi-Fi transfer, uploaded to websites, or sent out by email.</text:span><text:span text:style-name="T7"/></text:p>
      <text:p text:style-name="P8" loext:marker-style-name="T7"/>
      <text:p text:style-name="Standard" loext:marker-style-name="T7"><text:span text:style-name="T7">For more information, please see the user manual: </text:span><text:span text:style-name="T16">Distributing Apps</text:span><text:span text:style-name="T7">.</text:span></text:p>
      <text:p text:style-name="P113" loext:marker-style-name="T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nsolas" svg:font-family="Consolas" style:font-family-generic="swiss" style:font-pitch="variable"/>
    <style:font-face style:name="Consolas1" svg:font-family="Consolas"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3543in" fo:margin-top="0.1665in" fo:margin-bottom="0.0417in" style:contextual-spacing="false" fo:text-indent="-0.3543in" style:auto-text-indent="false" fo:keep-with-next="always">
        <style:tab-stops>
          <style:tab-stop style:position="0.3154in"/>
        </style:tab-stops>
      </style:paragraph-properties>
      <style:text-properties fo:font-weight="bold"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6252in" fo:margin-top="0.0835in" fo:margin-bottom="0in" style:contextual-spacing="false" fo:text-indent="-0.4598in" style:auto-text-indent="false">
        <style:tab-stops>
          <style:tab-stop style:position="0.5736in"/>
          <style:tab-stop style:position="5.978in" style:type="right" style:leader-style="dotted" style:leader-text="."/>
        </style:tab-stops>
      </style:paragraph-properties>
      <style:text-properties fo:language="en" fo:country="US"/>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List_20_Paragraph" style:display-name="List Paragraph" style:family="paragraph" style:parent-style-name="Standard">
      <style:paragraph-properties fo:margin-left="0.5i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2"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name-complex="Times New Roman2" style:font-family-complex="'Times New Roman'" style:font-family-generic-complex="system" style:font-pitch-complex="variable" style:font-size-complex="12pt"/>
    </style:style>
    <style:style style:name="Page_20_Number" style:display-name="Page Number" style:family="text">
      <style:text-properties style:font-name-complex="Times New Roman2"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name-complex="Times New Roman2" style:font-family-complex="'Times New Roman'" style:font-family-generic-complex="system" style:font-pitch-complex="variable"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2" style:font-family-complex="'Times New Roman'" style:font-family-generic-complex="system" style:font-pitch-complex="variable"/>
    </style:style>
    <style:style style:name="markerplain" style:family="text"/>
    <style:style style:name="Unresolved_20_Mention1" style:display-name="Unresolved Mention1" style:family="text">
      <style:text-properties fo:color="#808080" loext:opacity="100%" fo:background-color="#e6e6e6"/>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weight="bold"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complex="Times New Roman2" style:font-family-complex="'Times New Roman'" style:font-family-generic-complex="system" style:font-pitch-complex="variable"/>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weight="normal" style:font-weight-asian="normal"/>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weight="normal" style:font-weight-asian="normal"/>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Times New Roman" fo:font-family="'Times New Roman'"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Times New Roman" fo:font-family="'Times New Roman'"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Times New Roman2" style:font-family-complex="'Times New Roman'" style:font-family-generic-complex="system" style:font-pitch-complex="variable"/>
    </style:style>
    <style:style style:name="ListLabel_20_209" style:display-name="ListLabel 209" style:family="text">
      <style:text-properties style:font-name-complex="Times New Roman2" style:font-family-complex="'Times New Roman'" style:font-family-generic-complex="system" style:font-pitch-complex="variable"/>
    </style:style>
    <style:style style:name="ListLabel_20_210" style:display-name="ListLabel 210" style:family="text">
      <style:text-properties style:font-name-complex="Times New Roman2" style:font-family-complex="'Times New Roman'" style:font-family-generic-complex="system" style:font-pitch-complex="variable"/>
    </style:style>
    <style:style style:name="ListLabel_20_211" style:display-name="ListLabel 211" style:family="text">
      <style:text-properties style:font-name-complex="Times New Roman2" style:font-family-complex="'Times New Roman'" style:font-family-generic-complex="system" style:font-pitch-complex="variable"/>
    </style:style>
    <style:style style:name="ListLabel_20_212" style:display-name="ListLabel 212" style:family="text">
      <style:text-properties style:font-name-complex="Times New Roman2" style:font-family-complex="'Times New Roman'" style:font-family-generic-complex="system" style:font-pitch-complex="variable"/>
    </style:style>
    <style:style style:name="ListLabel_20_213" style:display-name="ListLabel 213" style:family="text">
      <style:text-properties style:font-name-complex="Times New Roman2" style:font-family-complex="'Times New Roman'" style:font-family-generic-complex="system" style:font-pitch-complex="variable"/>
    </style:style>
    <style:style style:name="ListLabel_20_214" style:display-name="ListLabel 214" style:family="text">
      <style:text-properties style:font-name-complex="Times New Roman2" style:font-family-complex="'Times New Roman'" style:font-family-generic-complex="system" style:font-pitch-complex="variable"/>
    </style:style>
    <style:style style:name="ListLabel_20_215" style:display-name="ListLabel 215" style:family="text">
      <style:text-properties style:font-name-complex="Times New Roman2" style:font-family-complex="'Times New Roman'" style:font-family-generic-complex="system" style:font-pitch-complex="variable"/>
    </style:style>
    <style:style style:name="ListLabel_20_216" style:display-name="ListLabel 216" style:family="text">
      <style:text-properties style:font-name-complex="Times New Roman2"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fo:language="en" fo:country="US"/>
    </style:style>
    <style:style style:name="ListLabel_20_237" style:display-name="ListLabel 237" style:family="text">
      <style:text-properties fo:language="en" fo:country="GB" style:font-name-complex="Tahoma" style:font-family-complex="Tahoma" style:font-family-generic-complex="system" style:font-pitch-complex="variable"/>
    </style:style>
    <style:style style:name="ListLabel_20_238" style:display-name="ListLabel 238" style:family="text">
      <style:text-properties fo:language="en" fo:country="GB" style:font-name-complex="Calibri1" style:font-family-complex="Calibri" style:font-family-generic-complex="system" style:font-pitch-complex="variable"/>
    </style:style>
    <style:style style:name="ListLabel_20_239" style:display-name="ListLabel 239" style:family="text">
      <style:text-properties fo:language="en" fo:country="GB"/>
    </style:style>
    <style:style style:name="ListLabel_20_240" style:display-name="ListLabel 240" style:family="text">
      <style:text-properties style:font-name-complex="Calibri1" style:font-family-complex="Calibri"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9" loext:num-list-format="%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ListLabel_20_20"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21"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22"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23"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24"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25"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26"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27"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Calibri"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5752in" fo:text-indent="-0.25in" fo:margin-left="1.5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2.0752in" fo:text-indent="-0.1252in" fo:margin-left="2.0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5752in" fo:text-indent="-0.25in" fo:margin-left="2.5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0752in" fo:text-indent="-0.25in" fo:margin-left="3.0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5752in" fo:text-indent="-0.1252in" fo:margin-left="3.5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0752in" fo:text-indent="-0.25in" fo:margin-left="4.0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5752in" fo:text-indent="-0.25in" fo:margin-left="4.5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5.0752in" fo:text-indent="-0.1252in" fo:margin-left="5.0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24"><draw:text-box fo:min-height="0in" fo:min-width="0.0161in"><text:p text:style-name="MP1" loext:marker-style-name="Page Number"><text:span text:style-name="Page_20_Number"><text:page-number text:select-page="current">6</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Dictionary App Builder: Building Apps</dc:title>
    <meta:initial-creator>Richard Margetts</meta:initial-creator>
    <dc:creator>Richard Margetts</dc:creator>
    <meta:editing-cycles>262</meta:editing-cycles>
    <meta:print-date>2019-01-04T10:21:00</meta:print-date>
    <meta:creation-date>2015-05-15T16:24:00</meta:creation-date>
    <dc:date>2024-07-17T14:47:00</dc:date>
    <meta:editing-duration>P0D</meta:editing-duration>
    <meta:generator>LibreOffice/26.2.3.2$Linux_X86_64 LibreOffice_project/620$Build-2</meta:generator>
    <meta:document-statistic meta:table-count="2" meta:image-count="0" meta:object-count="0" meta:page-count="6" meta:paragraph-count="413" meta:word-count="6205" meta:character-count="34963" meta:non-whitespace-character-count="29024"/>
    <meta:user-defined meta:name="AppVersion">16.0000</meta:user-defined>
    <meta:template xlink:type="simple" xlink:actuate="onRequest" xlink:title="Normal.dotm" xlink:href=""/>
  </office:meta>
</office:document-meta>
</file>