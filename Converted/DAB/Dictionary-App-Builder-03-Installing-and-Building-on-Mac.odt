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70000009C808BEE25.png" manifest:media-type="image/png"/>
  <manifest:file-entry manifest:full-path="Pictures/10000001000003FC000003A53BB51DFC.png" manifest:media-type="image/png"/>
  <manifest:file-entry manifest:full-path="Pictures/10000001000002700000015437DAEF84.png" manifest:media-type="image/png"/>
  <manifest:file-entry manifest:full-path="Pictures/10000001000001FF0000012AB712E6CB.png" manifest:media-type="image/png"/>
  <manifest:file-entry manifest:full-path="Pictures/10000001000002AB000001634B4F0C2B.png" manifest:media-type="image/png"/>
  <manifest:file-entry manifest:full-path="Pictures/1000000100000228000001ACDD465328.png" manifest:media-type="image/png"/>
  <manifest:file-entry manifest:full-path="Pictures/10000001000001D5000001AA4146FACF.png" manifest:media-type="image/png"/>
  <manifest:file-entry manifest:full-path="Pictures/1000000100000234000000A4F72C7BA1.png" manifest:media-type="image/png"/>
  <manifest:file-entry manifest:full-path="Pictures/10000001000003630000016CDAB2D706.png" manifest:media-type="image/png"/>
  <manifest:file-entry manifest:full-path="Pictures/10000001000001E1000000F58AEA7280.png" manifest:media-type="image/png"/>
  <manifest:file-entry manifest:full-path="Pictures/100000010000023F000000A181A53279.png" manifest:media-type="image/png"/>
  <manifest:file-entry manifest:full-path="Pictures/1000000100000228000001DFCE146D18.png" manifest:media-type="image/png"/>
  <manifest:file-entry manifest:full-path="Pictures/1000000100000094000000A5C6F1C763.png" manifest:media-type="image/png"/>
  <manifest:file-entry manifest:full-path="Pictures/1000000100000561000003B6042725EA.png" manifest:media-type="image/png"/>
  <manifest:file-entry manifest:full-path="Pictures/10000001000002CF00000094317AA322.png" manifest:media-type="image/png"/>
  <manifest:file-entry manifest:full-path="Pictures/1000000100000224000001CEC2A72D79.png" manifest:media-type="image/png"/>
  <manifest:file-entry manifest:full-path="Pictures/10000001000002220000017A4CD95FB5.tif" manifest:media-type="image/tiff"/>
  <manifest:file-entry manifest:full-path="Pictures/1000000100000251000001F5E4EAB25B.png" manifest:media-type="image/png"/>
  <manifest:file-entry manifest:full-path="Pictures/10000001000002D8000001CCF0060A39.png" manifest:media-type="image/png"/>
  <manifest:file-entry manifest:full-path="Pictures/1000000100000188000000C6B75A4EA4.tif" manifest:media-type="image/tiff"/>
  <manifest:file-entry manifest:full-path="Pictures/10000001000001FD00000116E6E59501.png" manifest:media-type="image/png"/>
  <manifest:file-entry manifest:full-path="Pictures/10000001000006850000048DE77F53FD.png" manifest:media-type="image/png"/>
  <manifest:file-entry manifest:full-path="Pictures/10000001000002C20000009AB34A9DC8.png" manifest:media-type="image/png"/>
  <manifest:file-entry manifest:full-path="Pictures/10000001000001CE0000013C19B87C8F.tif" manifest:media-type="image/tiff"/>
  <manifest:file-entry manifest:full-path="Pictures/100000010000022600000182A1298296.png" manifest:media-type="image/png"/>
  <manifest:file-entry manifest:full-path="Pictures/100000010000001C0000002296E3C9AD.png" manifest:media-type="image/png"/>
  <manifest:file-entry manifest:full-path="Pictures/100000010000024B000001EADDEE00E3.png" manifest:media-type="image/png"/>
  <manifest:file-entry manifest:full-path="Pictures/100000010000023B000001124673708A.png" manifest:media-type="image/png"/>
  <manifest:file-entry manifest:full-path="Pictures/100000010000045C0000025234A546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3.9375in" fo:margin-top="0in" fo:margin-bottom="0in" table:align="center" style:writing-mode="lr-tb"/>
    </style:style>
    <style:style style:name="Table1.A" style:family="table-column">
      <style:table-column-properties style:column-width="1.575in"/>
    </style:style>
    <style:style style:name="Table1.B" style:family="table-column">
      <style:table-column-properties style:column-width="1.1813in"/>
    </style:style>
    <style:style style:name="Table1.1" style:family="table-row">
      <style:table-row-properties fo:keep-together="auto"/>
    </style:style>
    <style:style style:name="Table1.A1" style:family="table-cell">
      <style:table-cell-properties fo:padding-left="0.075in" fo:padding-right="0.075in" fo:padding-top="0.0396in" fo:padding-bottom="0.0396in" fo:border="0.5pt solid #000000" style:writing-mode="lr-tb"/>
    </style:style>
    <style:style style:name="Table2" style:family="table">
      <style:table-properties style:width="4.9222in" fo:margin-left="0.3153in" fo:margin-top="0in" fo:margin-bottom="0in" table:align="left" style:writing-mode="lr-tb"/>
    </style:style>
    <style:style style:name="Table2.A" style:family="table-column">
      <style:table-column-properties style:column-width="1.4771in"/>
    </style:style>
    <style:style style:name="Table2.B" style:family="table-column">
      <style:table-column-properties style:column-width="3.4451in"/>
    </style:style>
    <style:style style:name="Table2.1" style:family="table-row">
      <style:table-row-properties fo:keep-together="auto"/>
    </style:style>
    <style:style style:name="Table2.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2.A2" style:family="table-cell">
      <style:table-cell-properties fo:padding-left="0.075in" fo:padding-right="0.075in" fo:padding-top="0.0396in" fo:padding-bottom="0.0396in" fo:border="0.5pt solid #000000" style:writing-mode="lr-tb"/>
    </style:style>
    <style:style style:name="Table2.B2" style:family="table-cell">
      <style:table-cell-properties fo:padding-left="0.075in" fo:padding-right="0.075in" fo:padding-top="0.0396in" fo:padding-bottom="0.0396in" fo:border="0.5pt solid #000000" style:writing-mode="lr-tb"/>
    </style:style>
    <style:style style:name="Table2.A3" style:family="table-cell">
      <style:table-cell-properties fo:padding-left="0.075in" fo:padding-right="0.075in" fo:padding-top="0.0396in" fo:padding-bottom="0.0396in" fo:border="0.5pt solid #000000" style:writing-mode="lr-tb"/>
    </style:style>
    <style:style style:name="Table2.B3" style:family="table-cell">
      <style:table-cell-properties fo:padding-left="0.075in" fo:padding-right="0.075in" fo:padding-top="0.0396in" fo:padding-bottom="0.0396in" fo:border="0.5pt solid #000000" style:writing-mode="lr-tb"/>
    </style:style>
    <style:style style:name="Table2.A4" style:family="table-cell">
      <style:table-cell-properties fo:padding-left="0.075in" fo:padding-right="0.075in" fo:padding-top="0.0396in" fo:padding-bottom="0.0396in" fo:border="0.5pt solid #000000" style:writing-mode="lr-tb"/>
    </style:style>
    <style:style style:name="Table2.B4" style:family="table-cell">
      <style:table-cell-properties fo:padding-left="0.075in" fo:padding-right="0.075in" fo:padding-top="0.0396in" fo:padding-bottom="0.0396in" fo:border="0.5pt solid #000000" style:writing-mode="lr-tb"/>
    </style:style>
    <style:style style:name="Table2.A5" style:family="table-cell">
      <style:table-cell-properties fo:padding-left="0.075in" fo:padding-right="0.075in" fo:padding-top="0.0396in" fo:padding-bottom="0.0396in" fo:border="0.5pt solid #000000" style:writing-mode="lr-tb"/>
    </style:style>
    <style:style style:name="Table2.B5" style:family="table-cell">
      <style:table-cell-properties fo:padding-left="0.075in" fo:padding-right="0.075in" fo:padding-top="0.0396in" fo:padding-bottom="0.0396in" fo:border="0.5pt solid #000000" style:writing-mode="lr-tb"/>
    </style:style>
    <style:style style:name="Table2.A6" style:family="table-cell">
      <style:table-cell-properties fo:padding-left="0.075in" fo:padding-right="0.075in" fo:padding-top="0.0396in" fo:padding-bottom="0.0396in" fo:border="0.5pt solid #000000" style:writing-mode="lr-tb"/>
    </style:style>
    <style:style style:name="Table2.B6" style:family="table-cell">
      <style:table-cell-properties fo:padding-left="0.075in" fo:padding-right="0.075in" fo:padding-top="0.0396in" fo:padding-bottom="0.0396in" fo:border="0.5pt solid #000000" style:writing-mode="lr-tb"/>
    </style:style>
    <style:style style:name="Table2.A7" style:family="table-cell">
      <style:table-cell-properties fo:padding-left="0.075in" fo:padding-right="0.075in" fo:padding-top="0.0396in" fo:padding-bottom="0.0396in" fo:border="0.5pt solid #000000" style:writing-mode="lr-tb"/>
    </style:style>
    <style:style style:name="Table2.B7" style:family="table-cell">
      <style:table-cell-properties fo:padding-left="0.075in" fo:padding-right="0.075in" fo:padding-top="0.0396in" fo:padding-bottom="0.0396in" fo:border="0.5pt solid #000000" style:writing-mode="lr-tb"/>
    </style:style>
    <style:style style:name="Table2.A8" style:family="table-cell">
      <style:table-cell-properties fo:padding-left="0.075in" fo:padding-right="0.075in" fo:padding-top="0.0396in" fo:padding-bottom="0.0396in" fo:border="0.5pt solid #000000" style:writing-mode="lr-tb"/>
    </style:style>
    <style:style style:name="Table2.B8" style:family="table-cell">
      <style:table-cell-properties fo:padding-left="0.075in" fo:padding-right="0.075in" fo:padding-top="0.0396in" fo:padding-bottom="0.0396in" fo:border="0.5pt solid #000000" style:writing-mode="lr-tb"/>
    </style:style>
    <style:style style:name="Table2.A9" style:family="table-cell">
      <style:table-cell-properties fo:padding-left="0.075in" fo:padding-right="0.075in" fo:padding-top="0.0396in" fo:padding-bottom="0.0396in" fo:border="0.5pt solid #000000" style:writing-mode="lr-tb"/>
    </style:style>
    <style:style style:name="Table2.B9" style:family="table-cell">
      <style:table-cell-properties fo:padding-left="0.075in" fo:padding-right="0.075in" fo:padding-top="0.0396in" fo:padding-bottom="0.0396in" fo:border="0.5pt solid #000000" style:writing-mode="lr-tb"/>
    </style:style>
    <style:style style:name="Table2.A10" style:family="table-cell">
      <style:table-cell-properties fo:padding-left="0.075in" fo:padding-right="0.075in" fo:padding-top="0.0396in" fo:padding-bottom="0.0396in" fo:border="0.5pt solid #000000" style:writing-mode="lr-tb"/>
    </style:style>
    <style:style style:name="Table2.B10" style:family="table-cell">
      <style:table-cell-properties fo:padding-left="0.075in" fo:padding-right="0.075in" fo:padding-top="0.0396in" fo:padding-bottom="0.0396in" fo:border="0.5pt solid #000000" style:writing-mode="lr-tb"/>
    </style:style>
    <style:style style:name="Table2.A11" style:family="table-cell">
      <style:table-cell-properties fo:padding-left="0.075in" fo:padding-right="0.075in" fo:padding-top="0.0396in" fo:padding-bottom="0.0396in" fo:border="0.5pt solid #000000" style:writing-mode="lr-tb"/>
    </style:style>
    <style:style style:name="Table2.B11" style:family="table-cell">
      <style:table-cell-properties fo:padding-left="0.075in" fo:padding-right="0.075in" fo:padding-top="0.0396in" fo:padding-bottom="0.0396in" fo:border="0.5pt solid #000000" style:writing-mode="lr-tb"/>
    </style:style>
    <style:style style:name="Table2.A12" style:family="table-cell">
      <style:table-cell-properties fo:padding-left="0.075in" fo:padding-right="0.075in" fo:padding-top="0.0396in" fo:padding-bottom="0.0396in" fo:border="0.5pt solid #000000" style:writing-mode="lr-tb"/>
    </style:style>
    <style:style style:name="Table2.B12" style:family="table-cell">
      <style:table-cell-properties fo:padding-left="0.075in" fo:padding-right="0.075in" fo:padding-top="0.0396in" fo:padding-bottom="0.0396in" fo:border="0.5pt solid #000000" style:writing-mode="lr-tb"/>
    </style:style>
    <style:style style:name="Table2.A13" style:family="table-cell">
      <style:table-cell-properties fo:padding-left="0.075in" fo:padding-right="0.075in" fo:padding-top="0.0396in" fo:padding-bottom="0.0396in" fo:border="0.5pt solid #000000" style:writing-mode="lr-tb"/>
    </style:style>
    <style:style style:name="Table2.B13" style:family="table-cell">
      <style:table-cell-properties fo:padding-left="0.075in" fo:padding-right="0.075in" fo:padding-top="0.0396in" fo:padding-bottom="0.0396in" fo:border="0.5pt solid #000000" style:writing-mode="lr-tb"/>
    </style:style>
    <style:style style:name="Table3" style:family="table">
      <style:table-properties style:width="5.9896in" fo:margin-left="-0.0069in" fo:margin-top="0in" fo:margin-bottom="0in" table:align="left" style:writing-mode="page"/>
    </style:style>
    <style:style style:name="Table3.A" style:family="table-column">
      <style:table-column-properties style:column-width="1.75in"/>
    </style:style>
    <style:style style:name="Table3.B" style:family="table-column">
      <style:table-column-properties style:column-width="4.2396in"/>
    </style:style>
    <style:style style:name="Table3.1" style:family="table-row">
      <style:table-row-properties fo:keep-together="auto"/>
    </style:style>
    <style:style style:name="Table3.A1" style:family="table-cell">
      <style:table-cell-properties fo:padding-left="0.0694in" fo:padding-right="0.0694in" fo:padding-top="0.0694in" fo:padding-bottom="0.0417in" fo:border="1pt solid #000000"/>
    </style:style>
    <style:style style:name="Table3.B1" style:family="table-cell">
      <style:table-cell-properties fo:padding-left="0.0694in" fo:padding-right="0.0694in" fo:padding-top="0.0694in" fo:padding-bottom="0.0417in" fo:border-left="0.75pt solid #000000" fo:border-right="1pt solid #000000" fo:border-top="1pt solid #000000" fo:border-bottom="1pt solid #000000"/>
    </style:style>
    <style:style style:name="Table3.A2" style:family="table-cell">
      <style:table-cell-properties fo:padding-left="0.0694in" fo:padding-right="0.0694in" fo:padding-top="0.0694in" fo:padding-bottom="0.0417in" fo:border-left="1pt solid #000000" fo:border-right="1pt solid #000000" fo:border-top="0.75pt solid #000000" fo:border-bottom="1pt solid #000000"/>
    </style:style>
    <style:style style:name="Table3.B2" style:family="table-cell">
      <style:table-cell-properties fo:padding-left="0.0694in" fo:padding-right="0.0694in" fo:padding-top="0.0694in" fo:padding-bottom="0.0417in" fo:border-left="0.75pt solid #000000" fo:border-right="1pt solid #000000" fo:border-top="0.75pt solid #000000" fo:border-bottom="1pt solid #000000"/>
    </style:style>
    <style:style style:name="P1" style:family="paragraph" style:parent-style-name="Standard" style:master-page-name="Standard">
      <style:paragraph-properties fo:text-align="center" style:justify-single-word="false" style:page-number="1"/>
      <style:text-properties style:font-name="Calibri"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text-properties style:font-name="Calibri" fo:font-size="24pt" fo:language="en" fo:country="GB" fo:font-weight="bold" style:font-size-asian="24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alibri" fo:language="en" fo:country="GB" fo:font-style="italic" style:font-style-asian="italic" style:font-name-complex="Calibri1"/>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center" style:justify-single-word="false"/>
      <style:text-properties style:font-name="Calibri" fo:font-size="16pt" fo:font-weight="bold" style:font-size-asian="16pt" style:font-weight-asian="bold"/>
    </style:style>
    <style:style style:name="P7" style:family="paragraph">
      <loext:graphic-properties draw:fill="solid" draw:fill-color="#ffffff"/>
      <style:paragraph-properties fo:text-align="left"/>
      <style:text-properties fo:font-size="18pt"/>
    </style:style>
    <style:style style:name="P8" style:family="paragraph" style:parent-style-name="Standard">
      <style:text-properties style:font-name="Calibri" fo:language="en" fo:country="GB"/>
    </style:style>
    <style:style style:name="P9" style:family="paragraph" style:parent-style-name="Standard">
      <style:paragraph-properties fo:margin-top="0in" fo:margin-bottom="0in" style:contextual-spacing="false" fo:break-before="page"/>
      <style:text-properties style:font-name="Calibri" fo:language="en" fo:country="GB"/>
    </style:style>
    <style:style style:name="P10" style:family="paragraph" style:parent-style-name="Standard">
      <style:paragraph-properties fo:text-align="center" style:justify-single-word="false"/>
      <style:text-properties style:font-name="Calibri" fo:language="en" fo:country="GB"/>
    </style:style>
    <style:style style:name="P11" style:family="paragraph" style:parent-style-name="Standard">
      <style:paragraph-properties fo:text-align="center" style:justify-single-word="false"/>
      <style:text-properties fo:language="en" fo:country="GB"/>
    </style:style>
    <style:style style:name="P12" style:family="paragraph" style:parent-style-name="Standard">
      <style:text-properties style:font-name="Calibri" fo:font-size="16pt" fo:font-weight="bold" style:font-size-asian="16pt" style:font-weight-asian="bold"/>
    </style:style>
    <style:style style:name="P13" style:family="paragraph" style:parent-style-name="Standard">
      <style:paragraph-properties fo:margin-top="0in" fo:margin-bottom="0in" style:contextual-spacing="false" fo:text-align="center" style:justify-single-word="false" fo:break-before="page"/>
    </style:style>
    <style:style style:name="P14" style:family="paragraph" style:parent-style-name="Standard">
      <style:paragraph-properties fo:text-align="center" style:justify-single-word="false"/>
      <style:text-properties style:font-name="Calibri" style:font-name-complex="Calibri1"/>
    </style:style>
    <style:style style:name="P15" style:family="paragraph" style:parent-style-name="Contents_20_3">
      <style:paragraph-properties>
        <style:tab-stops>
          <style:tab-stop style:position="1in"/>
          <style:tab-stop style:position="6.261in" style:type="right" style:leader-style="dotted" style:leader-text="."/>
        </style:tab-stops>
      </style:paragraph-properties>
    </style:style>
    <style:style style:name="P16" style:family="paragraph" style:parent-style-name="Heading_20_1">
      <style:paragraph-properties fo:margin-left="0.248in" fo:text-indent="-0.248in" style:auto-text-indent="false" fo:break-before="page"/>
    </style:style>
    <style:style style:name="P17" style:family="paragraph" style:parent-style-name="Standard">
      <style:text-properties style:font-name-complex="Calibri1" style:font-size-complex="12pt"/>
    </style:style>
    <style:style style:name="P18" style:family="paragraph" style:parent-style-name="Standard">
      <style:paragraph-properties fo:margin-top="0in" fo:margin-bottom="0in" style:contextual-spacing="false" fo:line-height="100%" fo:text-align="left"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19" style:family="paragraph" style:parent-style-name="Standard">
      <style:paragraph-properties fo:margin-top="0in" fo:margin-bottom="0in" style:contextual-spacing="false" fo:line-height="100%" fo:text-align="center"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20" style:family="paragraph" style:parent-style-name="Standard">
      <style:paragraph-properties fo:margin-top="0.028in" fo:margin-bottom="0in" style:contextual-spacing="false" fo:line-height="100%" fo:text-align="center"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21" style:family="paragraph" style:parent-style-name="Standard">
      <style:paragraph-properties fo:margin-top="0.028in" fo:margin-bottom="0in" style:contextual-spacing="false" fo:line-height="100%" fo:text-align="center" style:justify-single-word="false" fo:orphans="2" fo:widows="2"/>
      <style:text-properties fo:color="#000000" loext:opacity="100%" fo:font-size="12pt" fo:language="en" fo:country="US" style:letter-kerning="false" style:font-name-asian="Arial1" style:font-size-asian="12pt" style:language-asian="en" style:country-asian="US" style:font-name-complex="Calibri1" style:font-size-complex="12pt" style:language-complex="ar" style:country-complex="SA"/>
    </style:style>
    <style:style style:name="P22" style:family="paragraph" style:parent-style-name="Standard">
      <style:paragraph-properties fo:margin-top="0.0835in" fo:margin-bottom="0in" style:contextual-spacing="false"/>
    </style:style>
    <style:style style:name="P23" style:family="paragraph" style:parent-style-name="No_20_Spacing">
      <style:paragraph-properties fo:keep-with-next="always"/>
    </style:style>
    <style:style style:name="P24" style:family="paragraph" style:parent-style-name="Standard" style:list-style-name="WWNum15">
      <style:paragraph-properties fo:margin-left="0.4957in" fo:margin-top="0.1665in" fo:margin-bottom="0in" style:contextual-spacing="false" fo:text-indent="-0.248in" style:auto-text-indent="false" fo:keep-with-next="always"/>
    </style:style>
    <style:style style:name="P25" style:family="paragraph" style:parent-style-name="Standard">
      <style:paragraph-properties fo:margin-left="1in" fo:margin-top="0.0417in" fo:margin-bottom="0in" style:contextual-spacing="false" fo:keep-with-next="always"/>
    </style:style>
    <style:style style:name="P26" style:family="paragraph" style:parent-style-name="Standard">
      <style:text-properties style:font-name="Calibri" fo:language="en" fo:country="GB" style:language-asian="fr" style:country-asian="FR"/>
    </style:style>
    <style:style style:name="P27" style:family="paragraph" style:parent-style-name="Standard">
      <style:paragraph-properties fo:margin-top="0in" fo:margin-bottom="0.0835in" style:contextual-spacing="false"/>
    </style:style>
    <style:style style:name="P28" style:family="paragraph" style:parent-style-name="No_20_Spacing" style:list-style-name="WWNum11"/>
    <style:style style:name="P29" style:family="paragraph" style:parent-style-name="Heading_20_2">
      <style:paragraph-properties fo:margin-left="0.3937in" fo:text-indent="-0.3937in" style:auto-text-indent="false"/>
    </style:style>
    <style:style style:name="P30" style:family="paragraph" style:parent-style-name="Standard">
      <style:paragraph-properties fo:margin-top="0.1665in" fo:margin-bottom="0in" style:contextual-spacing="false" fo:keep-with-next="always"/>
    </style:style>
    <style:style style:name="P31" style:family="paragraph" style:parent-style-name="List_20_Paragraph" style:list-style-name="WWNum43">
      <style:paragraph-properties fo:margin-top="0.1665in" fo:margin-bottom="0in" style:contextual-spacing="false" fo:line-height="100%"/>
    </style:style>
    <style:style style:name="P32" style:family="paragraph" style:parent-style-name="Standard">
      <style:paragraph-properties fo:keep-with-next="always"/>
      <style:text-properties fo:font-size="7pt" fo:language="en" fo:country="GB" style:font-size-asian="7pt"/>
    </style:style>
    <style:style style:name="P33" style:family="paragraph" style:parent-style-name="Standard">
      <style:paragraph-properties fo:margin-left="0.5in"/>
    </style:style>
    <style:style style:name="P34" style:family="paragraph" style:parent-style-name="Standard">
      <style:paragraph-properties fo:margin-left="0.4898in"/>
    </style:style>
    <style:style style:name="P35" style:family="paragraph" style:parent-style-name="List_20_Paragraph" style:list-style-name="WWNum43">
      <style:paragraph-properties fo:line-height="100%"/>
    </style:style>
    <style:style style:name="P36" style:family="paragraph" style:parent-style-name="List_20_Paragraph">
      <style:paragraph-properties fo:line-height="100%"/>
      <style:text-properties fo:language="en" fo:country="GB"/>
    </style:style>
    <style:style style:name="P37" style:family="paragraph" style:parent-style-name="Standard">
      <style:text-properties fo:language="en" fo:country="GB"/>
    </style:style>
    <style:style style:name="P38" style:family="paragraph" style:parent-style-name="List_20_Paragraph" style:list-style-name="WWNum44">
      <style:paragraph-properties fo:line-height="100%"/>
    </style:style>
    <style:style style:name="P39" style:family="paragraph" style:parent-style-name="List_20_Paragraph">
      <style:paragraph-properties fo:line-height="100%"/>
    </style:style>
    <style:style style:name="P40" style:family="paragraph" style:parent-style-name="List_20_Paragraph">
      <style:text-properties fo:language="en" fo:country="GB"/>
    </style:style>
    <style:style style:name="P41" style:family="paragraph" style:parent-style-name="List_20_Paragraph">
      <style:paragraph-properties fo:keep-with-next="always"/>
    </style:style>
    <style:style style:name="P42" style:family="paragraph" style:parent-style-name="List_20_Paragraph">
      <style:paragraph-properties fo:margin-left="1in"/>
    </style:style>
    <style:style style:name="P43" style:family="paragraph" style:parent-style-name="Standard">
      <style:paragraph-properties fo:margin-left="1in"/>
    </style:style>
    <style:style style:name="P44" style:family="paragraph" style:parent-style-name="Standard">
      <loext:graphic-properties draw:fill="solid" draw:fill-color="#f2f2f2"/>
      <style:paragraph-properties fo:margin-left="0.5in" fo:background-color="#f2f2f2" fo:padding="0.0835in" fo:border="0.51pt solid #ffffff" style:shadow="none"/>
    </style:style>
    <style:style style:name="P45" style:family="paragraph" style:parent-style-name="No_20_Spacing">
      <style:paragraph-properties fo:margin-left="0.5in"/>
      <style:text-properties style:font-name="Calibri" style:font-name-complex="Calibri1"/>
    </style:style>
    <style:style style:name="P46" style:family="paragraph" style:parent-style-name="Heading_20_2">
      <style:paragraph-properties fo:margin-left="0.3126in" fo:margin-top="0.1665in" fo:margin-bottom="0.0417in" style:contextual-spacing="false" fo:text-indent="-0.2992in" style:auto-text-indent="false">
        <style:tab-stops>
          <style:tab-stop style:position="0.3752in"/>
        </style:tab-stops>
      </style:paragraph-properties>
    </style:style>
    <style:style style:name="P47" style:family="paragraph" style:parent-style-name="List_20_Paragraph" style:list-style-name="WWNum41">
      <style:paragraph-properties fo:margin-top="0.1665in" fo:margin-bottom="0in" style:contextual-spacing="false" fo:line-height="100%"/>
    </style:style>
    <style:style style:name="P48" style:family="paragraph" style:parent-style-name="List_20_Paragraph">
      <style:paragraph-properties fo:margin-top="0.0835in" fo:margin-bottom="0in" style:contextual-spacing="false"/>
    </style:style>
    <style:style style:name="P49" style:family="paragraph" style:parent-style-name="Standard" style:list-style-name="WWNum28">
      <style:paragraph-properties fo:line-height="100%"/>
    </style:style>
    <style:style style:name="P50" style:family="paragraph" style:parent-style-name="Standard">
      <style:paragraph-properties fo:margin-left="0.25in"/>
      <style:text-properties fo:language="en" fo:country="GB"/>
    </style:style>
    <style:style style:name="P51" style:family="paragraph" style:parent-style-name="Standard" style:list-style-name="WWNum28">
      <style:paragraph-properties fo:margin-left="0.5in" fo:line-height="100%" fo:text-indent="-0.248in" style:auto-text-indent="false" fo:keep-with-next="always"/>
    </style:style>
    <style:style style:name="P52" style:family="paragraph" style:parent-style-name="Standard">
      <style:paragraph-properties fo:margin-left="0.252in"/>
    </style:style>
    <style:style style:name="P53" style:family="paragraph" style:parent-style-name="Standard">
      <style:paragraph-properties fo:margin-left="0.5in"/>
      <style:text-properties fo:language="en" fo:country="GB"/>
    </style:style>
    <style:style style:name="P54" style:family="paragraph" style:parent-style-name="Standard">
      <style:paragraph-properties fo:margin-left="0.5in" fo:keep-with-next="always"/>
      <style:text-properties fo:language="en" fo:country="GB"/>
    </style:style>
    <style:style style:name="P55" style:family="paragraph" style:parent-style-name="Standard">
      <style:paragraph-properties fo:margin-left="0.5in" fo:keep-with-next="always"/>
    </style:style>
    <style:style style:name="P56" style:family="paragraph" style:parent-style-name="Standard">
      <style:paragraph-properties fo:keep-with-next="always"/>
      <style:text-properties fo:language="en" fo:country="GB"/>
    </style:style>
    <style:style style:name="P57" style:family="paragraph" style:parent-style-name="Standard">
      <style:paragraph-properties fo:margin-left="0.4925in" fo:margin-top="0in" fo:margin-bottom="0.0835in" style:contextual-spacing="false" fo:keep-with-next="always"/>
    </style:style>
    <style:style style:name="P58" style:family="paragraph" style:parent-style-name="List_20_Paragraph" style:list-style-name="WWNum42">
      <style:paragraph-properties fo:line-height="100%" fo:keep-with-next="always"/>
    </style:style>
    <style:style style:name="P59" style:family="paragraph" style:parent-style-name="Standard">
      <style:text-properties style:language-asian="fr" style:country-asian="FR"/>
    </style:style>
    <style:style style:name="P60" style:family="paragraph" style:parent-style-name="Standard">
      <style:paragraph-properties fo:margin-top="0.0835in" fo:margin-bottom="0.0835in" style:contextual-spacing="false"/>
    </style:style>
    <style:style style:name="P61" style:family="paragraph" style:parent-style-name="List_20_Paragraph" style:list-style-name="WWNum12"/>
    <style:style style:name="P62" style:family="paragraph" style:parent-style-name="Command_20_Line">
      <style:paragraph-properties fo:margin-left="0.5in" fo:margin-top="0.0835in" fo:margin-bottom="0.0835in" style:contextual-spacing="false"/>
    </style:style>
    <style:style style:name="P63" style:family="paragraph" style:parent-style-name="Standard">
      <style:paragraph-properties fo:line-height="100%"/>
    </style:style>
    <style:style style:name="P64" style:family="paragraph" style:parent-style-name="Standard">
      <style:paragraph-properties fo:margin-top="0in" fo:margin-bottom="0.3335in" style:contextual-spacing="false"/>
    </style:style>
    <style:style style:name="P65" style:family="paragraph" style:parent-style-name="List_20_Paragraph" style:list-style-name="WWNum16">
      <style:paragraph-properties fo:margin-left="0.4925in" fo:margin-top="0.0835in" fo:margin-bottom="0in" style:contextual-spacing="false" fo:text-indent="-0.2445in" style:auto-text-indent="false"/>
    </style:style>
    <style:style style:name="P66" style:family="paragraph" style:parent-style-name="List_20_Paragraph" style:list-style-name="WWNum16">
      <style:paragraph-properties fo:margin-left="0.5in" fo:margin-top="0.0835in" fo:margin-bottom="0in" style:contextual-spacing="false" fo:text-indent="0.248in" style:auto-text-indent="false"/>
    </style:style>
    <style:style style:name="P67" style:family="paragraph" style:parent-style-name="Standard">
      <style:paragraph-properties fo:margin-top="0.0835in" fo:margin-bottom="0in" style:contextual-spacing="false" fo:text-align="center" style:justify-single-word="false"/>
    </style:style>
    <style:style style:name="P68" style:family="paragraph" style:parent-style-name="Standard">
      <style:text-properties style:font-name="Calibri" style:language-asian="fr" style:country-asian="FR"/>
    </style:style>
    <style:style style:name="P69" style:family="paragraph" style:parent-style-name="List_20_Paragraph" style:list-style-name="WWNum37">
      <style:paragraph-properties fo:margin-top="0.0835in" fo:margin-bottom="0in" style:contextual-spacing="false"/>
    </style:style>
    <style:style style:name="P70" style:family="paragraph" style:parent-style-name="List_20_Paragraph" style:list-style-name="WWNum37">
      <style:paragraph-properties fo:margin-left="0.5in" fo:margin-top="0.0835in" fo:margin-bottom="0in" style:contextual-spacing="false" fo:text-indent="0.248in" style:auto-text-indent="false"/>
    </style:style>
    <style:style style:name="P71" style:family="paragraph" style:parent-style-name="Standard">
      <style:paragraph-properties fo:margin-top="0in" fo:margin-bottom="0in" style:contextual-spacing="true"/>
      <style:text-properties style:font-name-complex="Calibri1" style:font-size-complex="12pt"/>
    </style:style>
    <style:style style:name="P72" style:family="paragraph" style:parent-style-name="Standard">
      <style:paragraph-properties fo:keep-together="always" fo:keep-with-next="always"/>
    </style:style>
    <style:style style:name="P73" style:family="paragraph" style:parent-style-name="Standard" style:list-style-name="WWNum13">
      <style:paragraph-properties fo:margin-left="0.4957in" fo:margin-top="0.0835in" fo:margin-bottom="0in" style:contextual-spacing="false" fo:text-indent="-0.248in" style:auto-text-indent="false"/>
    </style:style>
    <style:style style:name="P74" style:family="paragraph" style:parent-style-name="Standard">
      <style:paragraph-properties fo:margin-top="0.0835in" fo:margin-bottom="0in" style:contextual-spacing="false" fo:keep-together="always" fo:keep-with-next="always"/>
    </style:style>
    <style:style style:name="P75" style:family="paragraph" style:parent-style-name="Standard">
      <style:paragraph-properties fo:margin-top="0.1665in" fo:margin-bottom="0in" style:contextual-spacing="false"/>
    </style:style>
    <style:style style:name="P76" style:family="paragraph" style:parent-style-name="Standard" style:list-style-name="WWNum1">
      <style:paragraph-properties fo:margin-left="0.4957in" fo:margin-top="0.0835in" fo:margin-bottom="0in" style:contextual-spacing="false" fo:text-indent="-0.248in" style:auto-text-indent="false"/>
    </style:style>
    <style:style style:name="P77" style:family="paragraph" style:parent-style-name="Standard">
      <style:paragraph-properties fo:margin-left="0.4957in" fo:margin-top="0.0835in" fo:margin-bottom="0in" style:contextual-spacing="false"/>
    </style:style>
    <style:style style:name="P78" style:family="paragraph" style:parent-style-name="No_20_Spacing">
      <style:paragraph-properties fo:keep-together="always" fo:keep-with-next="always"/>
    </style:style>
    <style:style style:name="P79" style:family="paragraph" style:parent-style-name="No_20_Spacing" style:list-style-name="WWNum40">
      <style:paragraph-properties fo:keep-together="always" fo:keep-with-next="always"/>
    </style:style>
    <style:style style:name="P80" style:family="paragraph" style:parent-style-name="Standard">
      <style:paragraph-properties fo:margin-top="0.1665in" fo:margin-bottom="0in" style:contextual-spacing="false" fo:keep-together="always" fo:keep-with-next="always"/>
    </style:style>
    <style:style style:name="P81" style:family="paragraph" style:parent-style-name="Standard" style:list-style-name="WWNum14">
      <style:paragraph-properties fo:margin-top="0.0835in" fo:margin-bottom="0in" style:contextual-spacing="false"/>
    </style:style>
    <style:style style:name="P82" style:family="paragraph" style:parent-style-name="Standard">
      <style:paragraph-properties fo:keep-with-next="always"/>
    </style:style>
    <style:style style:name="P83" style:family="paragraph" style:parent-style-name="Standard" style:list-style-name="WWNum17">
      <style:paragraph-properties fo:margin-top="0.0835in" fo:margin-bottom="0in" style:contextual-spacing="false"/>
    </style:style>
    <style:style style:name="P84" style:family="paragraph" style:parent-style-name="Standard">
      <style:paragraph-properties fo:margin-left="0.5in" fo:margin-top="0.0835in" fo:margin-bottom="0in" style:contextual-spacing="false"/>
    </style:style>
    <style:style style:name="P85" style:family="paragraph" style:parent-style-name="Standard">
      <style:paragraph-properties fo:keep-with-next="always"/>
      <style:text-properties style:font-name-complex="Calibri1" style:font-size-complex="12pt"/>
    </style:style>
    <style:style style:name="P86" style:family="paragraph" style:parent-style-name="Standard" style:list-style-name="WWNum18">
      <style:paragraph-properties fo:margin-top="0.0835in" fo:margin-bottom="0in" style:contextual-spacing="false"/>
    </style:style>
    <style:style style:name="P87" style:family="paragraph" style:parent-style-name="Standard">
      <style:paragraph-properties fo:margin-top="0.3335in" fo:margin-bottom="0in" style:contextual-spacing="false"/>
    </style:style>
    <style:style style:name="P88" style:family="paragraph" style:parent-style-name="No_20_Spacing">
      <style:paragraph-properties fo:margin-top="0.0835in" fo:margin-bottom="0in" style:contextual-spacing="false"/>
    </style:style>
    <style:style style:name="P89" style:family="paragraph" style:parent-style-name="Standard" style:list-style-name="WWNum22">
      <style:paragraph-properties fo:margin-top="0.0835in" fo:margin-bottom="0in" style:contextual-spacing="false"/>
    </style:style>
    <style:style style:name="P90" style:family="paragraph" style:parent-style-name="Standard">
      <style:paragraph-properties fo:text-align="center" style:justify-single-word="false" fo:text-indent="0.5in" style:auto-text-indent="false"/>
    </style:style>
    <style:style style:name="P91" style:family="paragraph" style:parent-style-name="Standard" style:list-style-name="WWNum22">
      <style:paragraph-properties fo:margin-left="0.4957in" fo:margin-top="0.1665in" fo:margin-bottom="0in" style:contextual-spacing="false" fo:text-indent="-0.248in" style:auto-text-indent="false"/>
    </style:style>
    <style:style style:name="P92" style:family="paragraph" style:parent-style-name="Standard">
      <style:paragraph-properties fo:margin-left="0.5in"/>
      <style:text-properties style:font-name-complex="Calibri1" style:font-size-complex="12pt"/>
    </style:style>
    <style:style style:name="P93" style:family="paragraph" style:parent-style-name="Standard">
      <style:paragraph-properties fo:margin-left="0.4957in" fo:margin-top="0.1665in" fo:margin-bottom="0in" style:contextual-spacing="false"/>
    </style:style>
    <style:style style:name="P94" style:family="paragraph" style:parent-style-name="Standard">
      <style:paragraph-properties fo:margin-left="0.5in" fo:margin-top="0.1665in" fo:margin-bottom="0in" style:contextual-spacing="false" fo:keep-together="always" fo:keep-with-next="always"/>
    </style:style>
    <style:style style:name="P95" style:family="paragraph" style:parent-style-name="Standard">
      <style:paragraph-properties fo:margin-left="0.4957in" fo:margin-top="0.1665in" fo:margin-bottom="0in" style:contextual-spacing="false"/>
      <style:text-properties style:font-name-complex="Calibri1" style:font-size-complex="12pt"/>
    </style:style>
    <style:style style:name="P96" style:family="paragraph" style:parent-style-name="Standard" style:list-style-name="WWNum22">
      <style:paragraph-properties fo:margin-left="0.4957in" fo:margin-top="0.25in" fo:margin-bottom="0.0835in" style:contextual-spacing="false" fo:text-indent="-0.248in" style:auto-text-indent="false"/>
    </style:style>
    <style:style style:name="P97" style:family="paragraph" style:parent-style-name="Standard">
      <style:paragraph-properties fo:text-align="justify" style:justify-single-word="false" fo:text-indent="0.5in" style:auto-text-indent="false"/>
    </style:style>
    <style:style style:name="P98" style:family="paragraph" style:parent-style-name="Standard" style:list-style-name="WWNum22">
      <style:paragraph-properties fo:margin-left="0.4957in" fo:margin-top="0.1665in" fo:margin-bottom="0.1665in" style:contextual-spacing="false" fo:text-indent="-0.248in" style:auto-text-indent="false"/>
    </style:style>
    <style:style style:name="P99" style:family="paragraph" style:parent-style-name="Standard">
      <style:text-properties style:font-name="Calibri"/>
    </style:style>
    <style:style style:name="P100" style:family="paragraph" style:parent-style-name="No_20_Spacing" style:list-style-name="WWNum23"/>
    <style:style style:name="P101" style:family="paragraph" style:parent-style-name="No_20_Spacing">
      <style:paragraph-properties fo:margin-left="0.5in" fo:margin-top="0.0835in" fo:margin-bottom="0in" style:contextual-spacing="false"/>
    </style:style>
    <style:style style:name="P102" style:family="paragraph" style:parent-style-name="No_20_Spacing" style:list-style-name="WWNum23">
      <style:paragraph-properties fo:margin-left="0.4957in" fo:margin-top="0.25in" fo:margin-bottom="0in" style:contextual-spacing="false" fo:text-indent="-0.248in" style:auto-text-indent="false"/>
    </style:style>
    <style:style style:name="P103" style:family="paragraph" style:parent-style-name="No_20_Spacing" style:list-style-name="WWNum24">
      <style:paragraph-properties fo:margin-left="0.4957in" fo:margin-top="0.1665in" fo:margin-bottom="0in" style:contextual-spacing="false" fo:text-indent="-0.248in" style:auto-text-indent="false"/>
    </style:style>
    <style:style style:name="P104" style:family="paragraph" style:parent-style-name="No_20_Spacing" style:list-style-name="WWNum24">
      <style:paragraph-properties fo:margin-top="0.1665in" fo:margin-bottom="0in" style:contextual-spacing="false"/>
    </style:style>
    <style:style style:name="P105" style:family="paragraph" style:parent-style-name="No_20_Spacing" style:list-style-name="WWNum24">
      <style:paragraph-properties fo:margin-left="0.4957in" fo:margin-top="0.0835in" fo:margin-bottom="0in" style:contextual-spacing="false" fo:text-indent="-0.248in" style:auto-text-indent="false"/>
    </style:style>
    <style:style style:name="P106" style:family="paragraph" style:parent-style-name="Standard">
      <style:text-properties fo:language="en" fo:country="GB" style:language-asian="fr" style:country-asian="FR"/>
    </style:style>
    <style:style style:name="P107" style:family="paragraph" style:parent-style-name="List_20_Paragraph" style:list-style-name="WWNum9">
      <style:paragraph-properties fo:margin-left="0.5in" fo:margin-top="0.0835in" fo:margin-bottom="0in" style:contextual-spacing="false" fo:text-indent="0.248in" style:auto-text-indent="false"/>
    </style:style>
    <style:style style:name="P108" style:family="paragraph" style:parent-style-name="List_20_Paragraph" style:list-style-name="WWNum9"/>
    <style:style style:name="P109" style:family="paragraph" style:parent-style-name="List_20_Paragraph">
      <style:paragraph-properties fo:margin-left="0.25in"/>
      <style:text-properties style:font-name-complex="Calibri1" style:font-size-complex="12pt"/>
    </style:style>
    <style:style style:name="P110" style:family="paragraph" style:parent-style-name="Standard">
      <style:paragraph-properties fo:margin-top="0.25in" fo:margin-bottom="0.0835in" style:contextual-spacing="false"/>
    </style:style>
    <style:style style:name="P111" style:family="paragraph" style:parent-style-name="Standard">
      <style:paragraph-properties fo:margin-top="0.1665in" fo:margin-bottom="0.0835in" style:contextual-spacing="false"/>
    </style:style>
    <style:style style:name="P112" style:family="paragraph" style:parent-style-name="Standard">
      <style:paragraph-properties fo:margin-top="0.1665in" fo:margin-bottom="0.1665in" style:contextual-spacing="false"/>
    </style:style>
    <style:style style:name="P113" style:family="paragraph" style:parent-style-name="Standard">
      <style:paragraph-properties fo:margin-top="0in" fo:margin-bottom="0.0835in" style:contextual-spacing="false" fo:break-before="page"/>
    </style:style>
    <style:style style:name="P114" style:family="paragraph" style:parent-style-name="Standard">
      <style:paragraph-properties fo:margin-top="0.0835in" fo:margin-bottom="0in" style:contextual-spacing="false" fo:keep-with-next="always"/>
    </style:style>
    <style:style style:name="P115" style:family="paragraph" style:parent-style-name="Standard">
      <style:paragraph-properties fo:line-height="100%" fo:text-align="center" style:justify-single-word="false"/>
    </style:style>
    <style:style style:name="P116" style:family="paragraph" style:parent-style-name="Standard">
      <style:paragraph-properties fo:line-height="100%"/>
      <style:text-properties style:font-name="Calibri" style:font-name-complex="Calibri1"/>
    </style:style>
    <style:style style:name="T1" style:family="text">
      <style:text-properties style:font-name="Calibri" fo:font-size="24pt" fo:language="en" fo:country="GB" fo:font-weight="bold" style:font-size-asian="24pt" style:font-weight-asian="bold" style:font-size-complex="24pt"/>
    </style:style>
    <style:style style:name="T2" style:family="text">
      <style:text-properties style:font-name="Calibri" fo:font-size="36pt" fo:language="en" fo:country="GB" fo:font-weight="bold" style:font-size-asian="36pt" style:font-weight-asian="bold" style:font-name-complex="Calibri1" style:font-size-complex="20pt"/>
    </style:style>
    <style:style style:name="T3" style:family="text">
      <style:text-properties style:font-name="Calibri" fo:language="en" fo:country="GB" fo:font-style="italic" style:font-style-asian="italic" style:font-name-complex="Calibri1"/>
    </style:style>
    <style:style style:name="T4" style:family="text">
      <style:text-properties style:font-name="Calibri"/>
    </style:style>
    <style:style style:name="T5" style:family="text">
      <style:text-properties style:font-name="Calibri" fo:font-size="16pt" fo:font-weight="bold" style:font-size-asian="16pt" style:font-weight-asian="bold"/>
    </style:style>
    <style:style style:name="T6" style:family="text">
      <style:text-properties style:font-name="Calibri" fo:language="en" fo:country="GB"/>
    </style:style>
    <style:style style:name="T7" style:family="text">
      <style:text-properties style:font-name="Calibri" fo:font-size="16pt" fo:language="en" fo:country="GB" style:font-size-asian="16pt"/>
    </style:style>
    <style:style style:name="T8" style:family="text">
      <style:text-properties fo:language="en" fo:country="GB"/>
    </style:style>
    <style:style style:name="T9" style:family="text">
      <style:text-properties fo:language="en" fo:country="GB" fo:font-style="italic" style:font-style-asian="italic"/>
    </style:style>
    <style:style style:name="T10" style:family="text">
      <style:text-properties style:font-name="Calibri" style:font-name-complex="Calibri1"/>
    </style:style>
    <style:style style:name="T11" style:family="text">
      <style:text-properties style:use-window-font-color="true" loext:opacity="0%" fo:font-weight="normal" style:letter-kerning="true" style:font-name-asian="新細明體" style:font-weight-asian="normal" style:font-name-complex="Arial1" style:font-size-complex="12pt"/>
    </style:style>
    <style:style style:name="T12" style:family="text">
      <style:text-properties style:font-name-complex="Times New Roman1"/>
    </style:style>
    <style:style style:name="T13" style:family="text">
      <style:text-properties text:display="true"/>
    </style:style>
    <style:style style:name="T14" style:family="text">
      <style:text-properties style:use-window-font-color="true" loext:opacity="0%" style:letter-kerning="true" style:font-name-asian="新細明體" style:font-name-complex="Arial1" style:font-size-complex="12pt"/>
    </style:style>
    <style:style style:name="T15" style:family="text">
      <style:text-properties style:use-window-font-color="true" loext:opacity="0%" style:font-name="Calibri" style:letter-kerning="true" style:font-name-asian="新細明體" style:font-name-complex="Arial1" style:font-size-complex="12pt"/>
    </style:style>
    <style:style style:name="T16" style:family="text">
      <style:text-properties fo:language="en" fo:country="GB" style:font-name-complex="Times New Roman1"/>
    </style:style>
    <style:style style:name="T17" style:family="text">
      <style:text-properties style:font-name-complex="Calibri1" style:font-size-complex="12pt"/>
    </style:style>
    <style:style style:name="T18" style:family="text">
      <style:text-properties fo:font-size="12pt" fo:font-weight="bold" style:font-size-asian="12pt" style:font-weight-asian="bold" style:font-name-complex="Calibri1" style:font-size-complex="12pt"/>
    </style:style>
    <style:style style:name="T19" style:family="text">
      <style:text-properties fo:font-size="12pt" style:font-size-asian="12pt" style:font-name-complex="Calibri1" style:font-size-complex="12pt"/>
    </style:style>
    <style:style style:name="T20" style:family="text">
      <style:text-properties fo:font-family="Wingdings" style:font-family-generic="swiss" style:font-pitch="variable" style:font-charset="x-symbol" fo:font-size="12pt" style:font-family-asian="Wingdings" style:font-family-generic-asian="system" style:font-pitch-asian="variable" style:font-size-asian="12pt" style:font-family-complex="Wingdings" style:font-family-generic-complex="system" style:font-pitch-complex="variable" style:font-size-complex="12pt"/>
    </style:style>
    <style:style style:name="T21" style:family="text">
      <style:text-properties fo:font-family="Wingdings" style:font-family-generic="swiss" style:font-pitch="variable" style:font-charset="x-symbol" fo:font-size="12pt" style:font-family-asian="Wingdings" style:font-family-generic-asian="system" style:font-pitch-asian="variable" style:font-size-asian="12pt" style:font-name-complex="Calibri1" style:font-size-complex="12pt"/>
    </style:style>
    <style:style style:name="T22" style:family="text">
      <style:text-properties fo:language="en" fo:country="GB" style:language-asian="fr" style:country-asian="FR"/>
    </style:style>
    <style:style style:name="T23" style:family="text">
      <style:text-properties fo:font-weight="bold" style:font-weight-asian="bold" style:font-name-complex="Calibri1" style:font-size-complex="12pt" style:font-weight-complex="bold"/>
    </style:style>
    <style:style style:name="T24" style:family="text">
      <style:text-properties style:font-name="Calibri" fo:language="en" fo:country="GB" style:language-asian="fr" style:country-asian="FR"/>
    </style:style>
    <style:style style:name="T25" style:family="text">
      <style:text-properties style:font-name="Calibri" style:font-name-complex="Calibri1" style:font-size-complex="12pt"/>
    </style:style>
    <style:style style:name="T26" style:family="text">
      <style:text-properties fo:language="en" fo:country="GB" fo:font-weight="bold" style:font-weight-asian="bold" style:font-weight-complex="bold"/>
    </style:style>
    <style:style style:name="T27" style:family="text">
      <style:text-properties fo:font-size="7pt" fo:language="en" fo:country="GB" style:font-size-asian="7pt"/>
    </style:style>
    <style:style style:name="T28" style:family="text">
      <style:text-properties fo:language="en" fo:country="GB" style:text-underline-style="solid" style:text-underline-width="auto" style:text-underline-color="font-color" fo:font-weight="bold" style:font-weight-asian="bold" style:font-weight-complex="bold"/>
    </style:style>
    <style:style style:name="T29" style:family="text">
      <style:text-properties fo:language="en" fo:country="GB" style:text-underline-style="solid" style:text-underline-width="auto" style:text-underline-color="font-color" fo:font-weight="bold" style:font-weight-asian="bold"/>
    </style:style>
    <style:style style:name="T30" style:family="text">
      <style:text-properties fo:language="en" fo:country="GB" fo:font-weight="bold" style:font-weight-asian="bold"/>
    </style:style>
    <style:style style:name="T31" style:family="text">
      <style:text-properties fo:font-family="Wingdings" style:font-family-generic="swiss" style:font-pitch="variable" fo:language="en" fo:country="GB" style:font-family-asian="Wingdings" style:font-family-generic-asian="system" style:font-pitch-asian="variable" style:font-family-complex="Wingdings" style:font-family-generic-complex="system" style:font-pitch-complex="variable"/>
    </style:style>
    <style:style style:name="T32" style:family="text">
      <style:text-properties fo:language="en" fo:country="GB" fo:font-style="italic" fo:font-weight="bold" style:font-style-asian="italic" style:font-weight-asian="bold" style:font-style-complex="italic"/>
    </style:style>
    <style:style style:name="T33" style:family="text">
      <style:text-properties fo:font-weight="bold" style:font-weight-asian="bold"/>
    </style:style>
    <style:style style:name="T34" style:family="text">
      <style:text-properties fo:language="en" fo:country="GB" style:text-underline-style="solid" style:text-underline-width="auto" style:text-underline-color="font-color"/>
    </style:style>
    <style:style style:name="T35" style:family="text">
      <style:text-properties fo:font-size="10pt" fo:language="en" fo:country="GB" fo:font-weight="bold" style:font-size-asian="10pt" style:font-weight-asian="bold"/>
    </style:style>
    <style:style style:name="T36" style:family="text">
      <style:text-properties fo:font-size="10pt" fo:language="en" fo:country="GB" style:font-size-asian="10pt"/>
    </style:style>
    <style:style style:name="T37" style:family="text">
      <style:text-properties style:language-asian="fr" style:country-asian="FR"/>
    </style:style>
    <style:style style:name="T38" style:family="text">
      <style:text-properties style:font-name-complex="Calibri1"/>
    </style:style>
    <style:style style:name="T39" style:family="text">
      <style:text-properties fo:font-weight="bold" style:font-weight-asian="bold" style:font-name-complex="Calibri1"/>
    </style:style>
    <style:style style:name="T40" style:family="text">
      <style:text-properties style:font-name-complex="Calibri1" style:font-size-complex="12pt" fo:background-color="#ffffff"/>
    </style:style>
    <style:style style:name="T41" style:family="text">
      <style:text-properties style:font-name="Calibri" style:language-asian="fr" style:country-asian="FR"/>
    </style:style>
    <style:style style:name="T42" style:family="text">
      <style:text-properties fo:color="#333333" loext:opacity="100%" style:font-name="Courier New" fo:font-size="10pt" fo:background-color="#f8f8f8" loext:char-shading-value="0" style:font-name-asian="Times New Roman1" style:font-size-asian="10pt" style:language-asian="zh" style:country-asian="TW" style:font-name-complex="Courier New1" style:font-size-complex="10.5pt"/>
    </style:style>
    <style:style style:name="T43" style:family="text">
      <style:text-properties fo:color="#333333" loext:opacity="100%" style:font-name="Courier New" fo:font-size="10pt" style:font-name-asian="Times New Roman1" style:font-size-asian="10pt" style:language-asian="zh" style:country-asian="TW" style:font-name-complex="Courier New1" style:font-size-complex="10.5pt" style:font-weight-complex="bold"/>
    </style:style>
    <style:style style:name="T44" style:family="text">
      <style:text-properties style:use-window-font-color="true" loext:opacity="0%" style:font-name="Times New Roman" style:font-name-asian="Times New Roman1" style:language-asian="zh" style:country-asian="TW" style:font-name-complex="Times New Roman1" style:font-size-complex="12pt"/>
    </style:style>
    <style:style style:name="T45" style:family="text">
      <style:text-properties style:font-name="Courier New" style:font-name-complex="Courier New1" style:font-size-complex="12pt"/>
    </style:style>
    <style:style style:name="T46" style:family="text">
      <style:text-properties fo:font-weight="bold" style:font-weight-asian="bold" style:font-name-complex="Calibri1" style:font-size-complex="12pt"/>
    </style:style>
    <style:style style:name="T47" style:family="text">
      <style:text-properties style:font-name="Calibri" fo:font-weight="bold" style:language-asian="fr" style:country-asian="FR" style:font-weight-asian="bold"/>
    </style:style>
    <style:style style:name="T48" style:family="text">
      <style:text-properties fo:font-family="Wingdings" style:font-family-generic="swiss" style:font-pitch="variable" style:font-charset="x-symbol" fo:font-size="10pt" style:font-family-asian="Wingdings" style:font-family-generic-asian="system" style:font-pitch-asian="variable" style:font-size-asian="10pt" style:font-family-complex="Wingdings" style:font-family-generic-complex="system" style:font-pitch-complex="variable"/>
    </style:style>
    <style:style style:name="T49" style:family="text">
      <style:text-properties fo:color="#1155cc" loext:opacity="100%" style:text-underline-style="solid" style:text-underline-width="auto" style:text-underline-color="font-color" style:font-name-complex="Calibri1" style:font-size-complex="12pt"/>
    </style:style>
    <style:style style:name="T50" style:family="text">
      <style:text-properties style:text-underline-style="solid" style:text-underline-width="auto" style:text-underline-color="font-color" style:font-name-complex="Calibri1" style:font-size-complex="12pt"/>
    </style:style>
    <style:style style:name="T51" style:family="text">
      <style:text-properties fo:font-size="10pt" style:font-size-asian="10pt"/>
    </style:style>
    <style:style style:name="T52" style:family="text">
      <style:text-properties fo:font-style="italic" fo:font-weight="bold" style:font-style-asian="italic" style:font-weight-asian="bold" style:font-name-complex="Calibri1" style:font-size-complex="12pt"/>
    </style:style>
    <style:style style:name="T53" style:family="text">
      <style:text-properties fo:font-style="italic" style:font-style-asian="italic" style:font-name-complex="Calibri1" style:font-size-complex="12pt"/>
    </style:style>
    <style:style style:name="T54" style:family="text">
      <style:text-properties fo:font-style="italic" fo:font-weight="bold" style:font-style-asian="italic" style:font-weight-asian="bold" style:font-name-complex="Calibri1" style:font-size-complex="12pt" style:font-style-complex="italic" style:font-weight-complex="bold"/>
    </style:style>
    <style:style style:name="T55" style:family="text">
      <style:text-properties fo:font-style="italic" style:font-style-asian="italic"/>
    </style:style>
    <style:style style:name="T56" style:family="text">
      <style:text-properties fo:language="en" fo:country="GB" fo:font-weight="bold" style:language-asian="fr" style:country-asian="FR" style:font-weight-asian="bold"/>
    </style:style>
    <style:style style:name="T57" style:family="text">
      <style:text-properties fo:color="#333333" loext:opacity="100%" style:font-name-complex="Calibri1" style:font-size-complex="12pt" fo:background-color="#ffffff"/>
    </style:style>
    <style:style style:name="T58" style:family="text">
      <style:text-properties fo:language="en" fo:country="GB" fo:font-weight="bold" style:language-asian="fr" style:country-asian="FR" style:font-weight-asian="bold" style:font-weight-complex="bold"/>
    </style:style>
    <style:style style:name="T59" style:family="text">
      <style:text-properties style:font-name="Calibri" fo:font-weight="bold" style:font-weight-asian="bold" style:font-name-complex="Calibri1" style:font-size-complex="12pt"/>
    </style:style>
    <style:style style:name="T60" style:family="text">
      <style:text-properties style:font-name="Calibri" style:font-name-asian="Courier New1" style:font-name-complex="Calibri1"/>
    </style:style>
    <style:style style:name="T61" style:family="text">
      <style:text-properties fo:color="#2a00ff" loext:opacity="100%" style:font-name="Calibri" fo:font-size="10pt" style:font-size-asian="10pt" style:font-size-complex="10pt"/>
    </style:style>
    <style:style style:name="T62" style:family="text">
      <style:text-properties style:font-name="Calibri" fo:font-weight="bold" style:font-weight-asian="bold"/>
    </style:style>
    <style:style style:name="T63" style:family="text">
      <style:text-properties style:font-name="Courier New" fo:font-size="9pt" style:font-name-asian="Courier New1" style:font-size-asian="9pt"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ffffff" draw:stroke-linejoin="miter" svg:stroke-linecap="butt" draw:fill="solid" draw:fill-color="#ffffff" draw:textarea-vertical-align="top" draw:auto-grow-height="false" fo:min-height="0.1929in" fo:min-width="0.072in" fo:padding-top="0.0492in" fo:padding-bottom="0.0492in" fo:padding-left="0.0984in" fo:padding-right="0.0984in" fo:wrap-option="wrap" loext:decorative="false" fo:margin-left="0in" fo:margin-right="0.0236in" fo:margin-top="0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2" style:family="graphic">
      <style:graphic-properties draw:stroke="solid" svg:stroke-width="0.0102in" svg:stroke-color="#000000" draw:stroke-linejoin="miter" draw:fill="solid" draw:fill-color="#ffffff" draw:textarea-vertical-align="top" draw:auto-grow-height="false" fo:min-height="0.0173in" fo:min-width="0.2646in" fo:padding-top="0.0492in" fo:padding-bottom="0.0492in" fo:padding-left="0.0984in" fo:padding-right="0.0984in" fo:wrap-option="wrap" loext:decorative="false" fo:margin-left="0in" fo:margin-right="0in" fo:margin-top="0.1043in" fo:margin-bottom="0.0602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21567"/></text:p>
      <text:p text:style-name="P2" loext:marker-style-name="T1"/>
      <text:p text:style-name="P2" loext:marker-style-name="T1"/>
      <text:p text:style-name="P3" loext:marker-style-name="T1"><draw:frame draw:style-name="fr1" draw:name="Picture 7" text:anchor-type="as-char" svg:width="5.9846in" svg:height="1.6717in"><draw:image xlink:href="Pictures/100000010000023F000000A181A53279.png" xlink:type="simple" xlink:show="embed" xlink:actuate="onLoad" draw:mime-type="image/png"/></draw:frame></text:p>
      <text:p text:style-name="P2" loext:marker-style-name="T1"/>
      <text:p text:style-name="P2" loext:marker-style-name="T1"/>
      <text:p text:style-name="P2" loext:marker-style-name="T1"/>
      <text:p text:style-name="P3" loext:marker-style-name="T2"><text:span text:style-name="T2">Installing and <text:line-break/>Building Apps on a Mac</text:span><text:span text:style-name="T2"/></text:p>
      <text:p text:style-name="P4" loext:marker-style-name="T3"/>
      <text:p text:style-name="P4" loext:marker-style-name="T3"/>
      <text:p text:style-name="P3" loext:marker-style-name="T3"><text:span text:style-name="T3"><text:line-break/></text:span><text:span text:style-name="T3"/></text:p>
      <text:p text:style-name="P4" loext:marker-style-name="T3"/>
      <text:p text:style-name="P4" loext:marker-style-name="T3"/>
      <text:p text:style-name="P3" loext:marker-style-name="T3"><draw:frame draw:style-name="fr1" draw:name="Picture 52" text:anchor-type="as-char" svg:width="0.672in" svg:height="0.752in"><draw:image xlink:href="Pictures/1000000100000094000000A5C6F1C763.png" xlink:type="simple" xlink:show="embed" xlink:actuate="onLoad" draw:mime-type="image/png"/><svg:desc>Logo

Description automatically generated</svg:desc></draw:frame></text:p>
      <text:p text:style-name="P5" loext:marker-style-name="T4"/>
      <text:p text:style-name="Standard" loext:marker-style-name="T4"><text:span text:style-name="T4"><text:s/></text:span><text:span text:style-name="T4"/></text:p>
      <text:p text:style-name="P6" loext:marker-style-name="T5"><draw:custom-shape text:anchor-type="char" draw:z-index="0" draw:name="Rectangle 16" draw:style-name="gr1" draw:text-style-name="P7" svg:width="0.2689in" svg:height="0.2913in" svg:x="3.0299in" svg:y="0.580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loext:marker-style-name="T6"/>
      <text:p text:style-name="P9"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10" loext:marker-style-name="T6"/>
      <text:p text:style-name="P3" loext:marker-style-name="T7"><text:span text:style-name="T7">Dictionary App Builder: <text:line-break/>Installing and Building Apps on a Mac</text:span><text:span text:style-name="T7"/></text:p>
      <text:p text:style-name="P10" loext:marker-style-name="T6"/>
      <text:p text:style-name="P3" loext:marker-style-name="T8"><text:span text:style-name="T8">© 2021, SIL International</text:span><text:span text:style-name="T8"/></text:p>
      <text:p text:style-name="P11" loext:marker-style-name="T8"/>
      <text:p text:style-name="P3" loext:marker-style-name="T9"><text:span text:style-name="T9">Last updated: 25 March 2025</text:span><text:span text:style-name="T9"/></text:p>
      <text:p text:style-name="P10" loext:marker-style-name="T6"/>
      <text:p text:style-name="P10" loext:marker-style-name="T6"/>
      <text:p text:style-name="P10" loext:marker-style-name="T6"/>
      <text:p text:style-name="P10" loext:marker-style-name="T6"/>
      <text:p text:style-name="P10" loext:marker-style-name="T6"/>
      <text:p text:style-name="P3" loext:marker-style-name="T4"><text:span text:style-name="T4">You are free to print this manual for personal use and for training workshops.</text:span><text:span text:style-name="T4"/></text:p>
      <text:p text:style-name="P5" loext:marker-style-name="T4"/>
      <text:p text:style-name="P3" loext:marker-style-name="T4"><text:span text:style-name="T4">The latest version is available at</text:span><text:span text:style-name="T4"/></text:p>
      <text:p text:style-name="P3" loext:marker-style-name="T6"><text:a xlink:type="simple" xlink:href="http://software.sil.org/dictionaryappbuilder/resources/" text:style-name="Internet_20_link" text:visited-style-name="Visited_20_Internet_20_Link"><text:span text:style-name="Internet_20_link"><text:span text:style-name="T4">http://software.sil.org/dictionaryappbuilder/resources/</text:span></text:span></text:a><text:span text:style-name="T6"> <text:s/></text:span></text:p>
      <text:p text:style-name="P10" loext:marker-style-name="T6"/>
      <text:p text:style-name="P3" loext:marker-style-name="T6"><text:span text:style-name="T6">and on the Help menu of Dictionary App Builder.</text:span><text:span text:style-name="T6"/></text:p>
      <text:p text:style-name="P12" loext:marker-style-name="T5"/>
      <text:p text:style-name="P13" loext:marker-style-name="T5"><text:span text:style-name="T5">Contents</text:span><text:span text:style-name="T5"/></text:p>
      <text:p text:style-name="P14" loext:marker-style-name="T10"/>
      <text:p text:style-name="P14"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1"><text:a xlink:type="simple" xlink:href="#_Toc228353901" text:style-name="Index_20_Link" text:visited-style-name="Index_20_Link"><text:span text:style-name="T12">1.</text:span><text:span text:style-name="T11"><text:tab/></text:span>Introduction<text:span text:style-name="T13"><text:tab/>5</text:span></text:a></text:p>
          <text:p text:style-name="Contents_20_1" loext:marker-style-name="T11"><text:a xlink:type="simple" xlink:href="#_Toc228353902" text:style-name="Index_20_Link" text:visited-style-name="Index_20_Link"><text:span text:style-name="T12">2.</text:span><text:span text:style-name="T11"><text:tab/></text:span>Installing Dictionary App Builder<text:span text:style-name="T13"><text:tab/>5</text:span></text:a></text:p>
          <text:p text:style-name="Contents_20_1" loext:marker-style-name="T11"><text:a xlink:type="simple" xlink:href="#_Toc228353903" text:style-name="Index_20_Link" text:visited-style-name="Index_20_Link"><text:span text:style-name="T12">3.</text:span><text:span text:style-name="T11"><text:tab/></text:span>Installing Prerequisites for Android<text:span text:style-name="T13"><text:tab/>5</text:span></text:a></text:p>
          <text:p text:style-name="Contents_20_2" loext:marker-style-name="T14"><text:a xlink:type="simple" xlink:href="#_Toc228353904" text:style-name="Index_20_Link" text:visited-style-name="Index_20_Link">3.1.<text:span text:style-name="T14"><text:tab/></text:span>Java Development Kit (JDK)<text:span text:style-name="T13"><text:tab/>6</text:span></text:a></text:p>
          <text:p text:style-name="Contents_20_2" loext:marker-style-name="T14"><text:a xlink:type="simple" xlink:href="#_Toc228353905" text:style-name="Index_20_Link" text:visited-style-name="Index_20_Link"><text:span text:style-name="T8">3.2.</text:span><text:span text:style-name="T14"><text:tab/></text:span><text:span text:style-name="T8">Installing Android Software Development Kit (SDK)</text:span><text:span text:style-name="T13"><text:tab/>7</text:span></text:a></text:p>
          <text:p text:style-name="P15" loext:marker-style-name="T15"><text:a xlink:type="simple" xlink:href="#_Toc228353906" text:style-name="Index_20_Link" text:visited-style-name="Index_20_Link"><text:span text:style-name="T16">3.2.1.</text:span><text:span text:style-name="T15"><text:tab/></text:span><text:span text:style-name="T8">Downloading the Android SDK packages from the internet</text:span><text:span text:style-name="T13"><text:tab/>7</text:span></text:a></text:p>
          <text:p text:style-name="P15" loext:marker-style-name="T15"><text:a xlink:type="simple" xlink:href="#_Toc228353907" text:style-name="Index_20_Link" text:visited-style-name="Index_20_Link"><text:span text:style-name="T16">3.2.2.</text:span><text:span text:style-name="T15"><text:tab/></text:span><text:span text:style-name="T8">Copying the Android SDK files from someone else</text:span><text:span text:style-name="T13"><text:tab/>10</text:span></text:a></text:p>
          <text:p text:style-name="Contents_20_1" loext:marker-style-name="T11"><text:a xlink:type="simple" xlink:href="#_Toc228353908" text:style-name="Index_20_Link" text:visited-style-name="Index_20_Link"><text:span text:style-name="T12">4.</text:span><text:span text:style-name="T11"><text:tab/></text:span>Installing Prerequisites for iOS<text:span text:style-name="T13"><text:tab/>10</text:span></text:a></text:p>
          <text:p text:style-name="Contents_20_2" loext:marker-style-name="T14"><text:a xlink:type="simple" xlink:href="#_Toc228353909" text:style-name="Index_20_Link" text:visited-style-name="Index_20_Link">4.1.<text:span text:style-name="T14"><text:tab/></text:span>Install Xcode<text:span text:style-name="T13"><text:tab/>11</text:span></text:a></text:p>
          <text:p text:style-name="Contents_20_2" loext:marker-style-name="T14"><text:a xlink:type="simple" xlink:href="#_Toc228353910" text:style-name="Index_20_Link" text:visited-style-name="Index_20_Link">4.2.<text:span text:style-name="T14"><text:tab/></text:span>Verify Xcode Installation<text:span text:style-name="T13"><text:tab/>11</text:span></text:a></text:p>
          <text:p text:style-name="Contents_20_2" loext:marker-style-name="T14"><text:a xlink:type="simple" xlink:href="#_Toc228353911" text:style-name="Index_20_Link" text:visited-style-name="Index_20_Link">4.3.<text:span text:style-name="T14"><text:tab/></text:span>Install Transporter<text:span text:style-name="T13"><text:tab/>11</text:span></text:a></text:p>
          <text:p text:style-name="Contents_20_1" loext:marker-style-name="T11"><text:a xlink:type="simple" xlink:href="#_Toc228353912" text:style-name="Index_20_Link" text:visited-style-name="Index_20_Link"><text:span text:style-name="T12">5.</text:span><text:span text:style-name="T11"><text:tab/></text:span>Testing App in iOS Simulator<text:span text:style-name="T13"><text:tab/>12</text:span></text:a></text:p>
          <text:p text:style-name="Contents_20_2" loext:marker-style-name="T14"><text:a xlink:type="simple" xlink:href="#_Toc228353913" text:style-name="Index_20_Link" text:visited-style-name="Index_20_Link">5.1.<text:span text:style-name="T14"><text:tab/></text:span>Run the iOS Simulator<text:span text:style-name="T13"><text:tab/>12</text:span></text:a></text:p>
          <text:p text:style-name="Contents_20_2" loext:marker-style-name="T14"><text:a xlink:type="simple" xlink:href="#_Toc228353914" text:style-name="Index_20_Link" text:visited-style-name="Index_20_Link">5.2.<text:span text:style-name="T14"><text:tab/></text:span>Installing Additional Simulators<text:span text:style-name="T13"><text:tab/>13</text:span></text:a></text:p>
          <text:p text:style-name="Contents_20_2" loext:marker-style-name="T14"><text:a xlink:type="simple" xlink:href="#_Toc228353915" text:style-name="Index_20_Link" text:visited-style-name="Index_20_Link">5.3.<text:span text:style-name="T14"><text:tab/></text:span>Manually Installing Apps Into The Simulator<text:span text:style-name="T13"><text:tab/>13</text:span></text:a></text:p>
          <text:p text:style-name="Contents_20_1" loext:marker-style-name="T11"><text:a xlink:type="simple" xlink:href="#_Toc228353916" text:style-name="Index_20_Link" text:visited-style-name="Index_20_Link"><text:span text:style-name="T12">6.</text:span><text:span text:style-name="T11"><text:tab/></text:span>Creating iOS Certificates and Provisioning Profiles<text:span text:style-name="T13"><text:tab/>13</text:span></text:a></text:p>
          <text:p text:style-name="Contents_20_2" loext:marker-style-name="T14"><text:a xlink:type="simple" xlink:href="#_Toc228353917" text:style-name="Index_20_Link" text:visited-style-name="Index_20_Link">6.1.<text:span text:style-name="T14"><text:tab/></text:span>Enroll in the Apple Developer Program<text:span text:style-name="T13"><text:tab/>13</text:span></text:a></text:p>
          <text:p text:style-name="Contents_20_2" loext:marker-style-name="T14"><text:a xlink:type="simple" xlink:href="#_Toc228353918" text:style-name="Index_20_Link" text:visited-style-name="Index_20_Link">6.2.<text:span text:style-name="T14"><text:tab/></text:span>Create Signing Certificate<text:span text:style-name="T13"><text:tab/>14</text:span></text:a></text:p>
          <text:p text:style-name="Contents_20_2" loext:marker-style-name="T14"><text:a xlink:type="simple" xlink:href="#_Toc228353919" text:style-name="Index_20_Link" text:visited-style-name="Index_20_Link">6.3.<text:span text:style-name="T14"><text:tab/></text:span>Create Provisioning Profile<text:span text:style-name="T13"><text:tab/>15</text:span></text:a></text:p>
          <text:p text:style-name="Contents_20_1" loext:marker-style-name="T11"><text:a xlink:type="simple" xlink:href="#_Toc228353920" text:style-name="Index_20_Link" text:visited-style-name="Index_20_Link"><text:span text:style-name="T12">7.</text:span><text:span text:style-name="T11"><text:tab/></text:span>Building an iOS App<text:span text:style-name="T13"><text:tab/>16</text:span></text:a></text:p>
          <text:p text:style-name="Contents_20_1" loext:marker-style-name="T11"><text:a xlink:type="simple" xlink:href="#_Toc228353921" text:style-name="Index_20_Link" text:visited-style-name="Index_20_Link"><text:span text:style-name="T12">8.</text:span><text:span text:style-name="T11"><text:tab/></text:span>Testing an iOS App<text:span text:style-name="T13"><text:tab/>20</text:span></text:a></text:p>
          <text:p text:style-name="Contents_20_1" loext:marker-style-name="T11"><text:a xlink:type="simple" xlink:href="#_Toc228353922" text:style-name="Index_20_Link" text:visited-style-name="Index_20_Link"><text:span text:style-name="T12">9.</text:span><text:span text:style-name="T11"><text:tab/></text:span>Using Xcode to Test an iOS App<text:span text:style-name="T13"><text:tab/>20</text:span></text:a></text:p>
          <text:p text:style-name="Contents_20_1" loext:marker-style-name="T11"><text:a xlink:type="simple" xlink:href="#_Toc228353923" text:style-name="Index_20_Link" text:visited-style-name="Index_20_Link"><text:span text:style-name="T12">10.</text:span><text:span text:style-name="T11"><text:tab/></text:span>Using DeployGate to Test an iOS App<text:span text:style-name="T13"><text:tab/>21</text:span></text:a></text:p>
          <text:p text:style-name="Contents_20_2" loext:marker-style-name="T14"><text:a xlink:type="simple" xlink:href="#_Toc228353924" text:style-name="Index_20_Link" text:visited-style-name="Index_20_Link">10.1.<text:span text:style-name="T14"><text:tab/></text:span>Creating a DeployGate Account<text:span text:style-name="T13"><text:tab/>21</text:span></text:a></text:p>
          <text:p text:style-name="Contents_20_2" loext:marker-style-name="T14"><text:a xlink:type="simple" xlink:href="#_Toc228353925" text:style-name="Index_20_Link" text:visited-style-name="Index_20_Link">10.2.<text:span text:style-name="T14"><text:tab/></text:span>Uploading Your First App<text:span text:style-name="T13"><text:tab/>21</text:span></text:a></text:p>
          <text:p text:style-name="Contents_20_2" loext:marker-style-name="T14"><text:a xlink:type="simple" xlink:href="#_Toc228353926" text:style-name="Index_20_Link" text:visited-style-name="Index_20_Link">10.3.<text:span text:style-name="T14"><text:tab/></text:span>Registering a Device<text:span text:style-name="T13"><text:tab/>23</text:span></text:a></text:p>
          <text:p text:style-name="Contents_20_1" loext:marker-style-name="T11"><text:a xlink:type="simple" xlink:href="#_Toc228353927" text:style-name="Index_20_Link" text:visited-style-name="Index_20_Link"><text:span text:style-name="T12">11.</text:span><text:span text:style-name="T11"><text:tab/></text:span>Uploading an iOS App to Apple App Store<text:span text:style-name="T13"><text:tab/>29</text:span></text:a></text:p>
          <text:p text:style-name="Contents_20_1" loext:marker-style-name="T11"><text:a xlink:type="simple" xlink:href="#_Toc228353928" text:style-name="Index_20_Link" text:visited-style-name="Index_20_Link"><text:span text:style-name="T12">12.</text:span><text:span text:style-name="T11"><text:tab/></text:span>Using Test Flight to Test an iOS App<text:span text:style-name="T13"><text:tab/>30</text:span></text:a></text:p>
          <text:p text:style-name="Contents_20_1" loext:marker-style-name="T11"><text:a xlink:type="simple" xlink:href="#_Toc228353929" text:style-name="Index_20_Link" text:visited-style-name="Index_20_Link"><text:span text:style-name="T12">13.</text:span><text:span text:style-name="T11"><text:tab/></text:span>Building from Terminal<text:span text:style-name="T13"><text:tab/>31</text:span></text:a></text:p>
          <text:p text:style-name="Contents_20_2" loext:marker-style-name="T14"><text:a xlink:type="simple" xlink:href="#_Toc228353930" text:style-name="Index_20_Link" text:visited-style-name="Index_20_Link">13.1.<text:span text:style-name="T14"><text:tab/></text:span>Installing Command Line Interface<text:span text:style-name="T13"><text:tab/>31</text:span></text:a></text:p>
          <text:p text:style-name="Contents_20_2" loext:marker-style-name="T14"><text:a xlink:type="simple" xlink:href="#_Toc228353931" text:style-name="Index_20_Link" text:visited-style-name="Index_20_Link">13.2.<text:span text:style-name="T14"><text:tab/></text:span>Command Line Interface Options<text:span text:style-name="T13"><text:tab/>31</text:span></text:a></text:p>
        </text:index-body>
      </text:table-of-content>
      <text:p text:style-name="P5" loext:marker-style-name="T4"/>
      <text:h text:style-name="P16" text:outline-level="1"><text:bookmark text:name="_ib23mk4syx17"/><text:bookmark-start text:name="_Toc228353901"/><text:bookmark-start text:name="_Toc475369911"/>Introduction<text:bookmark-end text:name="_Toc228353901"/><text:bookmark-end text:name="_Toc475369911"/></text:h>
      <text:p text:style-name="Standard" loext:marker-style-name="T17"><text:span text:style-name="T17">This document provides information on how to install Dictionary App Builder and build apps on an Apple macOS system. It is possible to build an Android app using DAB on Windows, Linux or Mac, but if you want to build an iOS app for the iPhone or iPad, you will need to build it using a Mac computer.</text:span><text:span text:style-name="T17"/></text:p>
      <text:p text:style-name="P17" loext:marker-style-name="T17"/>
      <table:table table:name="Table1" table:style-name="Table1">
        <table:table-column table:style-name="Table1.A"/>
        <table:table-column table:style-name="Table1.B" table:number-columns-repeated="2"/>
        <table:table-row table:style-name="Table1.1">
          <table:table-cell table:style-name="Table1.A1" office:value-type="string">
            <text:p text:style-name="P18" loext:marker-style-name="T18"><text:span text:style-name="T18">App Builder</text:span></text:p>
            <text:p text:style-name="P18" loext:marker-style-name="T18"><text:span text:style-name="T18">Platform</text:span><text:span text:style-name="T18"/></text:p>
          </table:table-cell>
          <table:table-cell table:style-name="Table1.A1" office:value-type="string">
            <text:p text:style-name="P19" loext:marker-style-name="T18"><text:span text:style-name="T18">Build</text:span><text:span text:style-name="T18"/></text:p>
            <text:p text:style-name="P19" loext:marker-style-name="T18"><text:span text:style-name="T18">Android Apps</text:span><text:span text:style-name="T18"/></text:p>
          </table:table-cell>
          <table:table-cell table:style-name="Table1.A1" office:value-type="string">
            <text:p text:style-name="P19" loext:marker-style-name="T18"><text:span text:style-name="T18">Build</text:span><text:span text:style-name="T18"/></text:p>
            <text:p text:style-name="P19" loext:marker-style-name="T18"><text:span text:style-name="T18">iOS Apps</text:span><text:span text:style-name="T18"/></text:p>
          </table:table-cell>
        </table:table-row>
        <table:table-row table:style-name="Table1.1">
          <table:table-cell table:style-name="Table1.A1" office:value-type="string">
            <text:p text:style-name="P18" loext:marker-style-name="T19"><text:span text:style-name="T19">Windows</text:span><text:span text:style-name="T19"/></text:p>
          </table:table-cell>
          <table:table-cell table:style-name="Table1.A1" office:value-type="string">
            <text:p text:style-name="P20" loext:marker-style-name="T19"><text:span text:style-name="T20"></text:span><text:span text:style-name="T21"/></text:p>
          </table:table-cell>
          <table:table-cell table:style-name="Table1.A1" office:value-type="string">
            <text:p text:style-name="P21" loext:marker-style-name="T19"/>
          </table:table-cell>
        </table:table-row>
        <table:table-row table:style-name="Table1.1">
          <table:table-cell table:style-name="Table1.A1" office:value-type="string">
            <text:p text:style-name="P18" loext:marker-style-name="T19"><text:span text:style-name="T19">Linux</text:span><text:span text:style-name="T19"/></text:p>
          </table:table-cell>
          <table:table-cell table:style-name="Table1.A1" office:value-type="string">
            <text:p text:style-name="P20" loext:marker-style-name="T19"><text:span text:style-name="T20"></text:span><text:span text:style-name="T21"/></text:p>
          </table:table-cell>
          <table:table-cell table:style-name="Table1.A1" office:value-type="string">
            <text:p text:style-name="P21" loext:marker-style-name="T19"/>
          </table:table-cell>
        </table:table-row>
        <table:table-row table:style-name="Table1.1">
          <table:table-cell table:style-name="Table1.A1" office:value-type="string">
            <text:p text:style-name="P18" loext:marker-style-name="T19"><text:span text:style-name="T19">macOS</text:span><text:span text:style-name="T19"/></text:p>
          </table:table-cell>
          <table:table-cell table:style-name="Table1.A1" office:value-type="string">
            <text:p text:style-name="P20" loext:marker-style-name="T19"><text:span text:style-name="T20"></text:span><text:span text:style-name="T21"/></text:p>
          </table:table-cell>
          <table:table-cell table:style-name="Table1.A1" office:value-type="string">
            <text:p text:style-name="P20" loext:marker-style-name="T19"><text:span text:style-name="T20"></text:span><text:span text:style-name="T21"/></text:p>
          </table:table-cell>
        </table:table-row>
      </table:table>
      <text:p text:style-name="P17" loext:marker-style-name="T17"/>
      <text:p text:style-name="P22" loext:marker-style-name="T17"><text:span text:style-name="T17">Creating an Android app on a Mac is essentially the same process as it is for Windows or Linux. To create a corresponding iOS app, you will need to enter a few more configuration items. </text:span><text:span text:style-name="T17"/></text:p>
      <text:p text:style-name="P22" loext:marker-style-name="T17"><text:span text:style-name="T17">The apps generated by DAB for iOS will run on iPhones and iPads with iOS 12.2 or higher.</text:span><text:span text:style-name="T17"/></text:p>
      <text:p text:style-name="P17" loext:marker-style-name="T17"/>
      <text:h text:style-name="Heading_20_1" text:outline-level="1"><text:bookmark text:name="_aavgtmmhk0r5"/><text:bookmark-start text:name="_Toc475369912"/><text:bookmark-start text:name="_Toc228353902"/>Installing Dictionary App Builder<text:bookmark-end text:name="_Toc228353902"/></text:h>
      <text:p text:style-name="P23" loext:marker-style-name="T22"><text:span text:style-name="T22">To install the Dictionary App Builder program files:</text:span><text:span text:style-name="T22"/></text:p>
      <text:list text:style-name="WWNum15">
        <text:list-item>
          <text:p text:style-name="P24" loext:marker-style-name="T17"><text:span text:style-name="T17">Download the current Mac installer file (dmg) from the DAB website:</text:span><text:span text:style-name="T17"/></text:p>
        </text:list-item>
      </text:list>
      <text:p text:style-name="P25" loext:marker-style-name="T17"><text:a xlink:type="simple" xlink:href="http://software.sil.org/dictionaryappbuilder/download/" text:style-name="Internet_20_link" text:visited-style-name="Visited_20_Internet_20_Link"><text:span text:style-name="Internet_20_link"><text:span text:style-name="T17">http://software.sil.org/dictionaryappbuilder/download/</text:span></text:span></text:a><text:span text:style-name="T17"> </text:span></text:p>
      <text:list text:continue-numbering="true" text:style-name="WWNum15">
        <text:list-item>
          <text:p text:style-name="P24" loext:marker-style-name="T17"><text:span text:style-name="T17">Double click on the file within </text:span><text:span text:style-name="T23">Finder</text:span><text:span text:style-name="T17"> to open the disk image that contains the Dictionary App Builder application.</text:span></text:p>
        </text:list-item>
        <text:list-item>
          <text:p text:style-name="P24" loext:marker-style-name="T17"><text:span text:style-name="T17">Copy the </text:span><text:span text:style-name="T23">Dictionary App Builder</text:span><text:span text:style-name="T17"> application to your </text:span><text:span text:style-name="T23">Application</text:span><text:span text:style-name="T17"> folder. This can be done by dragging the Dictionary App Builder icon from the disk image window to the shortcut of the Applications folder in the same window.</text:span></text:p>
        </text:list-item>
      </text:list>
      <text:p text:style-name="P26" loext:marker-style-name="T24"/>
      <text:h text:style-name="Heading_20_1" text:outline-level="1"><text:bookmark-start text:name="_Toc228353903"/>Installing Prerequisites<text:bookmark-end text:name="_Toc475369912"/> for Android<text:bookmark-end text:name="_Toc228353903"/></text:h>
      <text:p text:style-name="P27" loext:marker-style-name="T17"><text:span text:style-name="T17">If you want to build Android apps, you need to install the following components on your computer:</text:span><text:span text:style-name="T17"/></text:p>
      <text:list text:style-name="WWNum11">
        <text:list-item>
          <text:p text:style-name="P28" loext:marker-style-name="T25"><text:span text:style-name="T25">Java Development Kit (JDK)</text:span><text:span text:style-name="T25"/></text:p>
        </text:list-item>
        <text:list-item>
          <text:p text:style-name="P28" loext:marker-style-name="T25"><text:span text:style-name="T25">Android Software Development Kit (SDK)</text:span><text:span text:style-name="T25"/></text:p>
        </text:list-item>
      </text:list>
      <text:h text:style-name="P29" text:outline-level="2"><text:bookmark text:name="_b03t0hmdkkzk"/><text:bookmark-start text:name="_Toc228353904"/><text:bookmark-start text:name="_Toc475369913"/>Java Development Kit (JDK)<text:bookmark-end text:name="_Toc228353904"/><text:bookmark-end text:name="_Toc475369913"/></text:h>
      <text:p text:style-name="P30" loext:marker-style-name="T8"><text:bookmark-start text:name="_Hlk534311866"/><text:span text:style-name="T8">You will need version 17 of the Java Development Kit (JDK) to build apps. We recommend you use Zulu, which is a free distribution of OpenJDK from Azul.</text:span><text:bookmark-end text:name="_Hlk534311866"/><text:span text:style-name="T8"/></text:p>
      <text:list text:style-name="WWNum43">
        <text:list-item>
          <text:p text:style-name="P31" loext:marker-style-name="T8"><text:span text:style-name="T8">Go to the </text:span><text:span text:style-name="T26">Download Zulu Builds of OpenJDK</text:span><text:span text:style-name="T8"> website:</text:span></text:p>
        </text:list-item>
      </text:list>
      <text:p text:style-name="P32" loext:marker-style-name="T27"/>
      <text:p text:style-name="P33"><text:a xlink:type="simple" xlink:href="https://www.azul.com/downloads/?version=java-17-lts&amp;os=macos&amp;architecture=arm-64-bit&amp;package=jdk-fx#zulu" text:style-name="Internet_20_link" text:visited-style-name="Visited_20_Internet_20_Link"><text:span text:style-name="Internet_20_link">https://www.azul.com/downloads/?version=java-17-lts&amp;os=macos&amp;architecture=arm-64-bit&amp;package=jdk-fx#zulu</text:span></text:a></text:p>
      <text:p text:style-name="Standard"/>
      <text:p text:style-name="P34" loext:marker-style-name="T8"><text:span text:style-name="T8">There are many downloads on this page, but the above link will filter the ones you see (Java Version: Java 17 LTS; Operating System: MacOS; Architecture: ARM 64-bit; Java Package: Java FX).</text:span><text:span text:style-name="T8"/></text:p>
      <text:p text:style-name="Standard"/>
      <text:p text:style-name="Standard"/>
      <text:list text:continue-numbering="true" text:style-name="WWNum43">
        <text:list-item>
          <text:p text:style-name="P35" loext:marker-style-name="T8"><text:span text:style-name="T8">Scroll down the page until you see the downloads under the heading </text:span><text:span text:style-name="T26">Download Azul Zulu Builds of OpenJDK</text:span><text:span text:style-name="T8">:</text:span></text:p>
        </text:list-item>
      </text:list>
      <text:p text:style-name="P36" loext:marker-style-name="T8"/>
      <text:p text:style-name="Standard" loext:marker-style-name="T8"><draw:frame draw:style-name="fr1" draw:name="Picture 2" text:anchor-type="as-char" svg:width="6.2638in" svg:height="4.372in"><draw:image xlink:href="Pictures/10000001000006850000048DE77F53FD.png" xlink:type="simple" xlink:show="embed" xlink:actuate="onLoad" draw:mime-type="image/png"/></draw:frame></text:p>
      <text:p text:style-name="P37" loext:marker-style-name="T8"/>
      <text:p text:style-name="P37" loext:marker-style-name="T8"/>
      <text:list text:style-name="WWNum44">
        <text:list-item>
          <text:p text:style-name="P38" loext:marker-style-name="T8"><text:span text:style-name="T8">You have a choice between two different architectures: </text:span><text:span text:style-name="T26">x86 64-bit</text:span><text:span text:style-name="T8"> and </text:span><text:span text:style-name="T26">ARM 64-bit</text:span><text:span text:style-name="T8">. You can find the processor type of your machine by clicking on the Apple symbol at the top left of your screen and selecting </text:span><text:span text:style-name="T26">About This Mac</text:span><text:span text:style-name="T8">. If you have an older Mac running with an Intel x86 chip, select x86 (64 bit) otherwise you will need the ARM 64-bit.</text:span></text:p>
        </text:list-item>
      </text:list>
      <text:p text:style-name="P36" loext:marker-style-name="T8"/>
      <text:p text:style-name="P39" loext:marker-style-name="T8"><text:span text:style-name="T8">Once you have identified your device architecture, you have a choice between a </text:span><text:span text:style-name="T26">dmg</text:span><text:span text:style-name="T8"> file, a </text:span><text:span text:style-name="T26">tar.gz</text:span><text:span text:style-name="T8"> file and a </text:span><text:span text:style-name="T26">zip</text:span><text:span text:style-name="T8"> file. </text:span><text:span text:style-name="T26">Download the .dmg file</text:span><text:span text:style-name="T8"> since it comes with its own installer program. </text:span></text:p>
      <text:p text:style-name="P40" loext:marker-style-name="T8"/>
      <text:p text:style-name="P41" loext:marker-style-name="T8"><text:span text:style-name="T8">The file you download will have a filename something like this:</text:span><text:span text:style-name="T8"/></text:p>
      <text:p text:style-name="P42" loext:marker-style-name="T8"><text:span text:style-name="T26">zulu17.64.17-ca-fx-jdk17.0.18-macosx_x64.dmg</text:span><text:span text:style-name="T8"><text:line-break/></text:span></text:p>
      <text:list text:continue-numbering="true" text:style-name="WWNum44">
        <text:list-item>
          <text:p text:style-name="P38" loext:marker-style-name="T8"><text:span text:style-name="T26">Double-click the file</text:span><text:span text:style-name="T8"> </text:span><text:span text:style-name="T26">in Finder </text:span><text:span text:style-name="T8">and follow the instructions in the installation wizard to install it. By default, the installer will install the JDK to the following folder:</text:span></text:p>
        </text:list-item>
      </text:list>
      <text:p text:style-name="P37" loext:marker-style-name="T8"/>
      <text:p text:style-name="P43" loext:marker-style-name="T26"><text:span text:style-name="T26">/Library/Java/JavaVirtualMachines/zulu-8.jdk/Contents/Home</text:span><text:span text:style-name="T26"/></text:p>
      <text:p text:style-name="P37" loext:marker-style-name="T8"/>
      <text:p text:style-name="P44" loext:marker-style-name="T8"><text:span text:style-name="T28">Important</text:span><text:span text:style-name="T8">: If you change the JDK install folder to something other than the default folder, you will need to remember the location of the folder so you can tell Dictionary App Builder where to find the JDK.</text:span></text:p>
      <text:p text:style-name="P37" loext:marker-style-name="T8"/>
      <text:p text:style-name="P45" loext:marker-style-name="T10"/>
      <text:h text:style-name="P46" text:outline-level="2" loext:marker-style-name="T8"><text:bookmark text:name="_mcyrni6cg1av"/><text:bookmark-start text:name="_Toc228353905"/><text:bookmark-start text:name="_Toc78622942"/><text:bookmark-start text:name="_Toc482020490"/><text:span text:style-name="T8">Installing Android Software Development Kit (SDK)</text:span><text:bookmark-end text:name="_Toc228353905"/><text:bookmark-end text:name="_Toc78622942"/><text:bookmark-end text:name="_Toc482020490"/><text:span text:style-name="T8"/></text:h>
      <text:p text:style-name="P30" loext:marker-style-name="T8"><text:span text:style-name="T8">The Android Software Development Kit (SDK) is needed for building Android apps. There are two ways of installing the Android SDK:</text:span><text:span text:style-name="T8"/></text:p>
      <text:list text:style-name="WWNum41">
        <text:list-item>
          <text:p text:style-name="P47" loext:marker-style-name="T8"><text:span text:style-name="T29">Online</text:span><text:span text:style-name="T30">: Download the Android SDK packages from the internet: </text:span><text:span text:style-name="T8"><text:line-break/>Use the Android SDK Installation wizard to download and install the command line tools and three additional packages. This method will require an internet connection. </text:span></text:p>
        </text:list-item>
      </text:list>
      <text:p text:style-name="P48" loext:marker-style-name="T8"><text:span text:style-name="T8">See 3.2.1 for more details.<text:line-break/></text:span><text:span text:style-name="T8"/></text:p>
      <text:list text:continue-numbering="true" text:style-name="WWNum41">
        <text:list-item>
          <text:p text:style-name="P47" loext:marker-style-name="T8"><text:span text:style-name="T29">Offline</text:span><text:span text:style-name="T30">: Copy the Android SDK files from someone else:</text:span><text:span text:style-name="T8"><text:line-break/>If you know someone who has already downloaded and installed the Android SDK, you can copy all the files from them.</text:span></text:p>
        </text:list-item>
      </text:list>
      <text:p text:style-name="P48" loext:marker-style-name="T8"><text:span text:style-name="T8">This method is especially useful in a training workshop where several people need to install the SDK but have limited internet bandwidth. </text:span><text:span text:style-name="T8"/></text:p>
      <text:p text:style-name="P48" loext:marker-style-name="T8"><text:span text:style-name="T8">See 3.2.2 for more details.</text:span><text:span text:style-name="T8"/></text:p>
      <text:p text:style-name="P37" loext:marker-style-name="T8"/>
      <text:h text:style-name="Heading_20_3" text:outline-level="3" loext:marker-style-name="T8"><text:bookmark-start text:name="_Toc77851809"/><text:bookmark-start text:name="_Toc228353906"/><text:bookmark-start text:name="_Toc78622943"/><text:span text:style-name="T8">Downloading the Android SDK packages from the internet</text:span><text:bookmark-end text:name="_Toc77851809"/><text:bookmark-end text:name="_Toc228353906"/><text:bookmark-end text:name="_Toc78622943"/><text:span text:style-name="T8"/></text:h>
      <text:p text:style-name="Standard" loext:marker-style-name="T8"><text:span text:style-name="T8">To install the Android SDK from the internet: </text:span><text:span text:style-name="T8"/></text:p>
      <text:p text:style-name="P37" loext:marker-style-name="T8"/>
      <text:list text:style-name="WWNum28">
        <text:list-item>
          <text:p text:style-name="P49" loext:marker-style-name="T8"><text:span text:style-name="T8">Launch </text:span><text:span text:style-name="T30">Dictionary App Builder</text:span><text:span text:style-name="T8">. </text:span></text:p>
        </text:list-item>
      </text:list>
      <text:p text:style-name="P50" loext:marker-style-name="T8"/>
      <text:list text:continue-numbering="true" text:style-name="WWNum28">
        <text:list-item>
          <text:p text:style-name="P49" loext:marker-style-name="T8"><text:span text:style-name="T8">Select </text:span><text:span text:style-name="T30">Dictionary App Builder</text:span><text:span text:style-name="T8"> </text:span><text:span text:style-name="T31">Ø</text:span><text:span text:style-name="T8"> </text:span><text:span text:style-name="T30">Preferences</text:span><text:span text:style-name="T8"> from the main menu.</text:span></text:p>
        </text:list-item>
      </text:list>
      <text:p text:style-name="P40" loext:marker-style-name="T8"/>
      <text:list text:continue-numbering="true" text:style-name="WWNum28">
        <text:list-item>
          <text:p text:style-name="P49" loext:marker-style-name="T8"><text:span text:style-name="T8">Go to the </text:span><text:span text:style-name="T30">Android SDK</text:span><text:span text:style-name="T8"> tab, which is the second tab.</text:span></text:p>
        </text:list-item>
      </text:list>
      <text:p text:style-name="P50" loext:marker-style-name="T8"/>
      <text:list text:continue-numbering="true" text:style-name="WWNum28">
        <text:list-item>
          <text:p text:style-name="P51" loext:marker-style-name="T8"><text:span text:style-name="T8">Click the </text:span><text:span text:style-name="T26">Install Android SDK</text:span><text:span text:style-name="T8"> button.</text:span></text:p>
        </text:list-item>
      </text:list>
      <text:p text:style-name="P52" loext:marker-style-name="T8"><draw:custom-shape text:anchor-type="char" draw:z-index="1" draw:name="AutoShape 7" draw:style-name="gr2" draw:text-style-name="P7" svg:width="0.548in" svg:height="0.2315in" draw:transform="rotate (0.602662190713642) translate (-0.0000382764654418195in 1.50756233595801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1" draw:name="Picture 61" text:anchor-type="as-char" svg:width="6.2547in" svg:height="4.3209in"><draw:image xlink:href="Pictures/1000000100000561000003B6042725EA.png" xlink:type="simple" xlink:show="embed" xlink:actuate="onLoad" draw:mime-type="image/png"/><svg:desc>Table

Description automatically generated</svg:desc></draw:frame></text:p>
      <text:p text:style-name="P53" loext:marker-style-name="T8"/>
      <text:p text:style-name="P53" loext:marker-style-name="T8"/>
      <text:list text:continue-numbering="true" text:style-name="WWNum28">
        <text:list-item>
          <text:p text:style-name="P51" loext:marker-style-name="T8"><text:span text:style-name="T8">Follow the instructions on each page of the </text:span><text:span text:style-name="T26">Install Android SDK</text:span><text:span text:style-name="T8"> wizard to download each of the Android SDK packages and install them.</text:span></text:p>
        </text:list-item>
      </text:list>
      <text:p text:style-name="P54" loext:marker-style-name="T8"/>
      <text:p text:style-name="P55" loext:marker-style-name="T8"><text:span text:style-name="T8">When you are asked to specify a target folder, a good place is:</text:span><text:span text:style-name="T8"/></text:p>
      <text:p text:style-name="P55" loext:marker-style-name="T8"><text:span text:style-name="T8"><text:s text:c="8"/></text:span><text:span text:style-name="T30">/Users/</text:span><text:span text:style-name="T32">your-name</text:span><text:span text:style-name="T30">/Android-SDK</text:span><text:span text:style-name="T8">.</text:span></text:p>
      <text:p text:style-name="P56" loext:marker-style-name="T8"/>
      <text:p text:style-name="P57" loext:marker-style-name="T8"><text:span text:style-name="T8">Four packages will be downloaded and installed:</text:span><text:span text:style-name="T8"/></text:p>
      <text:list text:style-name="WWNum42">
        <text:list-item>
          <text:p text:style-name="P58" loext:marker-style-name="T8"><text:span text:style-name="T8">Command line tools, </text:span><text:span text:style-name="T8"/></text:p>
        </text:list-item>
        <text:list-item>
          <text:p text:style-name="P58" loext:marker-style-name="T8"><text:span text:style-name="T8">Build Tools, </text:span><text:span text:style-name="T8"/></text:p>
        </text:list-item>
        <text:list-item>
          <text:p text:style-name="P58" loext:marker-style-name="T8"><text:span text:style-name="T8">Platform Tools, and </text:span><text:span text:style-name="T8"/></text:p>
        </text:list-item>
        <text:list-item>
          <text:p text:style-name="P58" loext:marker-style-name="T8"><text:span text:style-name="T8">Platform API.</text:span><text:span text:style-name="T8"/></text:p>
        </text:list-item>
      </text:list>
      <text:p text:style-name="P54" loext:marker-style-name="T8"/>
      <text:p text:style-name="P33" loext:marker-style-name="T8"><text:span text:style-name="T8">If the installation was successful, you will see the version numbers displayed in green.</text:span><text:span text:style-name="T8"/></text:p>
      <text:p text:style-name="P3" loext:marker-style-name="T33"><draw:frame draw:style-name="fr1" draw:name="Image2" text:anchor-type="as-char" svg:width="5.25in" svg:height="3.3165in"><draw:image xlink:href="Pictures/10000001000002D8000001CCF0060A39.png" xlink:type="simple" xlink:show="embed" xlink:actuate="onLoad" draw:mime-type="image/png"/></draw:frame></text:p>
      <text:p text:style-name="P37" loext:marker-style-name="T8"/>
      <text:p text:style-name="Standard" loext:marker-style-name="T8"><text:span text:style-name="T8">If any of the Build Tools, Platform Tools or Platform API is listed as “Not Found” (displayed in red), click the </text:span><text:span text:style-name="T26">Install Packages</text:span><text:span text:style-name="T8"> button to install them.</text:span></text:p>
      <text:p text:style-name="P37" loext:marker-style-name="T8"/>
      <text:p text:style-name="Standard" loext:marker-style-name="T8"><text:span text:style-name="T8">Click the </text:span><text:span text:style-name="T26">Check Installation</text:span><text:span text:style-name="T8"> button to confirm that all the packages have been installed correctly.</text:span></text:p>
      <text:p text:style-name="P37" loext:marker-style-name="T8"/>
      <text:p text:style-name="Standard" loext:marker-style-name="T8"><text:span text:style-name="T8">You can skip section 3.2.2 and go straight to section 4.<text:line-break/></text:span><text:span text:style-name="T8"/></text:p>
      <text:h text:style-name="Heading_20_3" text:outline-level="3" loext:marker-style-name="T8"><text:bookmark-start text:name="_Toc77851810"/><text:bookmark-start text:name="_Toc228353907"/><text:bookmark-start text:name="_Toc78622944"/><text:span text:style-name="T8">Copying the Android SDK files from someone else</text:span><text:bookmark-end text:name="_Toc77851810"/><text:bookmark-end text:name="_Toc228353907"/><text:bookmark-end text:name="_Toc78622944"/><text:span text:style-name="T8"/></text:h>
      <text:p text:style-name="Standard" loext:marker-style-name="T8"><text:span text:style-name="T8">If you know someone who has already downloaded and installed the Android SDK and is successfully building apps with it, you can copy all of their Android SDK files to a folder on your computer.</text:span><text:span text:style-name="T8"/></text:p>
      <text:p text:style-name="P22" loext:marker-style-name="T8"><text:span text:style-name="T8">You need to look for the top-level Android SDK folder, such as </text:span><text:span text:style-name="T30">/Users/</text:span><text:span text:style-name="T32">user-name</text:span><text:span text:style-name="T30">/Android-SDK</text:span><text:span text:style-name="T8">, and copy the whole folder and its contents to your computer. A location such as </text:span><text:span text:style-name="T30">/Users/</text:span><text:span text:style-name="T32">your-name</text:span><text:span text:style-name="T30">/Android-SDK</text:span><text:span text:style-name="T8"> is good. If it makes it easier, you can zip the folders and then unzip them onto your computer.</text:span></text:p>
      <text:p text:style-name="P22" loext:marker-style-name="T8"><text:span text:style-name="T8">Note that there is </text:span><text:span text:style-name="T34">no setup program to run</text:span><text:span text:style-name="T8">. Copying the files from one computer to another is sufficient.</text:span></text:p>
      <text:p text:style-name="P37" loext:marker-style-name="T8"/>
      <text:p text:style-name="P22" loext:marker-style-name="T8"><text:span text:style-name="T30">Tip</text:span><text:span text:style-name="T8">: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37" loext:marker-style-name="T8"/>
      <table:table table:name="Table2" table:style-name="Table2">
        <table:table-column table:style-name="Table2.A"/>
        <table:table-column table:style-name="Table2.B"/>
        <table:table-header-rows>
          <table:table-row table:style-name="Table2.1">
            <table:table-cell table:style-name="Table2.A1" office:value-type="string">
              <text:p text:style-name="P18" loext:marker-style-name="T35"><text:span text:style-name="T35">Android SDK Folder</text:span><text:span text:style-name="T35"/></text:p>
            </table:table-cell>
            <table:table-cell table:style-name="Table2.A1" office:value-type="string">
              <text:p text:style-name="P18" loext:marker-style-name="T35"><text:span text:style-name="T35">Required for building apps?</text:span><text:span text:style-name="T35"/></text:p>
            </table:table-cell>
          </table:table-row>
        </table:table-header-rows>
        <table:table-row table:style-name="Table2.1">
          <table:table-cell table:style-name="Table2.A2" office:value-type="string">
            <text:p text:style-name="P18" loext:marker-style-name="T36"><text:span text:style-name="T36">cmdline-tools (or tools)</text:span><text:span text:style-name="T36"/></text:p>
          </table:table-cell>
          <table:table-cell table:style-name="Table2.B2" office:value-type="string">
            <text:p text:style-name="P18" loext:marker-style-name="T36"><text:span text:style-name="T36">Yes</text:span><text:span text:style-name="T36"/></text:p>
          </table:table-cell>
        </table:table-row>
        <table:table-row table:style-name="Table2.1">
          <table:table-cell table:style-name="Table2.A3" office:value-type="string">
            <text:p text:style-name="P18" loext:marker-style-name="T36"><text:span text:style-name="T36">build-tools</text:span><text:span text:style-name="T36"/></text:p>
          </table:table-cell>
          <table:table-cell table:style-name="Table2.B3" office:value-type="string">
            <text:p text:style-name="P18" loext:marker-style-name="T36"><text:span text:style-name="T36">Yes <text:s/>(you only need the sub-folder for the latest version)</text:span><text:span text:style-name="T36"/></text:p>
          </table:table-cell>
        </table:table-row>
        <table:table-row table:style-name="Table2.1">
          <table:table-cell table:style-name="Table2.A4" office:value-type="string">
            <text:p text:style-name="P18" loext:marker-style-name="T36"><text:span text:style-name="T36">platforms</text:span><text:span text:style-name="T36"/></text:p>
          </table:table-cell>
          <table:table-cell table:style-name="Table2.B4" office:value-type="string">
            <text:p text:style-name="P18" loext:marker-style-name="T36"><text:span text:style-name="T36">Yes <text:s/>(you only need android-30 for now)</text:span><text:span text:style-name="T36"/></text:p>
          </table:table-cell>
        </table:table-row>
        <table:table-row table:style-name="Table2.1">
          <table:table-cell table:style-name="Table2.A5" office:value-type="string">
            <text:p text:style-name="P18" loext:marker-style-name="T36"><text:span text:style-name="T36">platform-tools</text:span><text:span text:style-name="T36"/></text:p>
          </table:table-cell>
          <table:table-cell table:style-name="Table2.B5" office:value-type="string">
            <text:p text:style-name="P18" loext:marker-style-name="T36"><text:span text:style-name="T36">Yes</text:span><text:span text:style-name="T36"/></text:p>
          </table:table-cell>
        </table:table-row>
        <table:table-row table:style-name="Table2.1">
          <table:table-cell table:style-name="Table2.A6" office:value-type="string">
            <text:p text:style-name="P18" loext:marker-style-name="T36"><text:span text:style-name="T36">add-ons</text:span><text:span text:style-name="T36"/></text:p>
          </table:table-cell>
          <table:table-cell table:style-name="Table2.B6" office:value-type="string">
            <text:p text:style-name="P18" loext:marker-style-name="T36"><text:span text:style-name="T36">No</text:span><text:span text:style-name="T36"/></text:p>
          </table:table-cell>
        </table:table-row>
        <table:table-row table:style-name="Table2.1">
          <table:table-cell table:style-name="Table2.A7" office:value-type="string">
            <text:p text:style-name="P18" loext:marker-style-name="T36"><text:span text:style-name="T36">docs</text:span><text:span text:style-name="T36"/></text:p>
          </table:table-cell>
          <table:table-cell table:style-name="Table2.B7" office:value-type="string">
            <text:p text:style-name="P18" loext:marker-style-name="T36"><text:span text:style-name="T36">No</text:span><text:span text:style-name="T36"/></text:p>
          </table:table-cell>
        </table:table-row>
        <table:table-row table:style-name="Table2.1">
          <table:table-cell table:style-name="Table2.A8" office:value-type="string">
            <text:p text:style-name="P18" loext:marker-style-name="T36"><text:span text:style-name="T36">emulator</text:span><text:span text:style-name="T36"/></text:p>
          </table:table-cell>
          <table:table-cell table:style-name="Table2.B8" office:value-type="string">
            <text:p text:style-name="P18" loext:marker-style-name="T36"><text:span text:style-name="T36">No, unless you want to use an emulator</text:span><text:span text:style-name="T36"/></text:p>
          </table:table-cell>
        </table:table-row>
        <table:table-row table:style-name="Table2.1">
          <table:table-cell table:style-name="Table2.A9" office:value-type="string">
            <text:p text:style-name="P18" loext:marker-style-name="T36"><text:span text:style-name="T36">extras</text:span><text:span text:style-name="T36"/></text:p>
          </table:table-cell>
          <table:table-cell table:style-name="Table2.B9" office:value-type="string">
            <text:p text:style-name="P18" loext:marker-style-name="T36"><text:span text:style-name="T36">No</text:span><text:span text:style-name="T36"/></text:p>
          </table:table-cell>
        </table:table-row>
        <table:table-row table:style-name="Table2.1">
          <table:table-cell table:style-name="Table2.A10" office:value-type="string">
            <text:p text:style-name="P18" loext:marker-style-name="T36"><text:span text:style-name="T36">licenses</text:span><text:span text:style-name="T36"/></text:p>
          </table:table-cell>
          <table:table-cell table:style-name="Table2.B10" office:value-type="string">
            <text:p text:style-name="P18" loext:marker-style-name="T36"><text:span text:style-name="T36">Yes</text:span><text:span text:style-name="T36"/></text:p>
          </table:table-cell>
        </table:table-row>
        <table:table-row table:style-name="Table2.1">
          <table:table-cell table:style-name="Table2.A11" office:value-type="string">
            <text:p text:style-name="P18" loext:marker-style-name="T36"><text:span text:style-name="T36">sources</text:span><text:span text:style-name="T36"/></text:p>
          </table:table-cell>
          <table:table-cell table:style-name="Table2.B11" office:value-type="string">
            <text:p text:style-name="P18" loext:marker-style-name="T36"><text:span text:style-name="T36">No</text:span><text:span text:style-name="T36"/></text:p>
          </table:table-cell>
        </table:table-row>
        <table:table-row table:style-name="Table2.1">
          <table:table-cell table:style-name="Table2.A12" office:value-type="string">
            <text:p text:style-name="P18" loext:marker-style-name="T36"><text:span text:style-name="T36">system-images</text:span><text:span text:style-name="T36"/></text:p>
          </table:table-cell>
          <table:table-cell table:style-name="Table2.B12" office:value-type="string">
            <text:p text:style-name="P18" loext:marker-style-name="T36"><text:span text:style-name="T36">No, unless you want to use an emulator</text:span><text:span text:style-name="T36"/></text:p>
          </table:table-cell>
        </table:table-row>
        <table:table-row table:style-name="Table2.1">
          <table:table-cell table:style-name="Table2.A13" office:value-type="string">
            <text:p text:style-name="P18" loext:marker-style-name="T36"><text:span text:style-name="T36">temp</text:span><text:span text:style-name="T36"/></text:p>
          </table:table-cell>
          <table:table-cell table:style-name="Table2.B13" office:value-type="string">
            <text:p text:style-name="P18" loext:marker-style-name="T36"><text:span text:style-name="T36">No</text:span><text:span text:style-name="T36"/></text:p>
          </table:table-cell>
        </table:table-row>
      </table:table>
      <text:p text:style-name="P37" loext:marker-style-name="T8"/>
      <text:p text:style-name="P59" loext:marker-style-name="T37"/>
      <text:h text:style-name="Heading_20_1" text:outline-level="1"><text:bookmark-start text:name="_Toc228353908"/>Installing Prerequisites for iOS<text:bookmark-end text:name="_Toc228353908"/></text:h>
      <text:p text:style-name="P60" loext:marker-style-name="T17"><text:bookmark text:name="_gyx6c51bzyd"/><text:span text:style-name="T17">If you want to build iOS apps and upload them to the Apple App Store, you need to install the following components: </text:span><text:span text:style-name="T17"/></text:p>
      <text:list text:style-name="WWNum12">
        <text:list-item>
          <text:p text:style-name="P61" loext:marker-style-name="T38"><text:span text:style-name="T39">Xcode</text:span><text:span text:style-name="T39"/></text:p>
        </text:list-item>
        <text:list-item>
          <text:p text:style-name="P61" loext:marker-style-name="T38"><text:span text:style-name="T39">Transporter</text:span><text:span text:style-name="T39"/></text:p>
        </text:list-item>
      </text:list>
      <text:h text:style-name="P29" text:outline-level="2"><text:bookmark text:name="_8y9itz56qcum"/><text:bookmark-start text:name="OLE_LINK41"/><text:bookmark-start text:name="OLE_LINK40"/><text:bookmark-start text:name="_Toc228353909"/><text:bookmark-start text:name="_Toc31750424"/><text:bookmark-start text:name="_Toc475369915"/>Install Xcode<text:bookmark-end text:name="OLE_LINK41"/><text:bookmark-end text:name="OLE_LINK40"/><text:bookmark-end text:name="_Toc228353909"/><text:bookmark-end text:name="_Toc31750424"/><text:bookmark-end text:name="_Toc475369915"/></text:h>
      <text:p text:style-name="Standard" loext:marker-style-name="T17"><text:span text:style-name="T23">Xcode</text:span><text:span text:style-name="T17"> is required to build iOS Apps. </text:span><text:span text:style-name="T40">To install Xcode, simply search for Xcode in the Mac App Store and install it. Open Xcode at least once to agree to the licensing restrictions and install components.</text:span></text:p>
      <text:p text:style-name="P3" loext:marker-style-name="T17"><draw:frame draw:style-name="fr1" draw:name="Picture 15" text:anchor-type="as-char" svg:width="4.5028in" svg:height="0.9835in"><draw:image xlink:href="Pictures/10000001000002C20000009AB34A9DC8.png" xlink:type="simple" xlink:show="embed" xlink:actuate="onLoad" draw:mime-type="image/png"/></draw:frame></text:p>
      <text:h text:style-name="P29" text:outline-level="2"><text:bookmark-start text:name="_Toc508705004"/><text:bookmark-start text:name="OLE_LINK43"/><text:bookmark-start text:name="OLE_LINK42"/><text:bookmark-start text:name="_Toc228353910"/>Verify Xcode Installation<text:bookmark-end text:name="_Toc508705004"/><text:bookmark-end text:name="_Toc228353910"/></text:h>
      <text:p text:style-name="Standard" loext:marker-style-name="T41"><text:span text:style-name="T41">To verify that you have successfully installed Xcode and that it is will be correctly used by Dictionary App Builder, please open Terminal and run the following command to print the path to the active developer directory:</text:span><text:span text:style-name="T41"/></text:p>
      <text:p text:style-name="P62">xcode-select -p</text:p>
      <text:p text:style-name="Standard" loext:marker-style-name="T42"><text:span text:style-name="T17"><text:line-break/></text:span><text:span text:style-name="T42">$ xcode-</text:span><text:span text:style-name="T43">select</text:span><text:span text:style-name="T42"> -p</text:span></text:p>
      <text:p text:style-name="P63" loext:marker-style-name="T44"><text:span text:style-name="T42">/Applications/Xcode.app/</text:span><text:span text:style-name="T43">Contents</text:span><text:span text:style-name="T42">/Developer</text:span></text:p>
      <text:p text:style-name="P64" loext:marker-style-name="T17"><text:span text:style-name="T17"><text:line-break/>If you have had Xcode Command-line Tools installed previously, it might still be pointing to that installation directory and Dictionary App Builder will not work correctly.<text:line-break/><text:line-break/></text:span><text:span text:style-name="T42">$ xcode-</text:span><text:span text:style-name="T43">select</text:span><text:span text:style-name="T42"> -p </text:span><text:span text:style-name="T45"><text:line-break/></text:span><text:span text:style-name="T42">/</text:span><text:span text:style-name="T43">Library</text:span><text:span text:style-name="T42">/Developer/CommandLineTools</text:span><text:bookmark-end text:name="OLE_LINK43"/><text:bookmark-end text:name="OLE_LINK42"/></text:p>
      <text:p text:style-name="Standard" loext:marker-style-name="T17"><text:span text:style-name="T17">To correct this situation, run the following command to set the active developer directory.</text:span><text:span text:style-name="T17"/></text:p>
      <text:p text:style-name="P62">sudo xcode-select -s /Applications/Xcode.app/Contents/Developer</text:p>
      <text:p text:style-name="P17" loext:marker-style-name="T17"/>
      <text:h text:style-name="P29" text:outline-level="2"><text:bookmark text:name="_m0jnku21w8d3"/><text:bookmark-start text:name="_Toc228353911"/><text:bookmark-start text:name="_Toc31750426"/><text:bookmark-start text:name="_Toc475369917"/>Install <text:bookmark-end text:name="_Toc475369917"/>Transporter<text:bookmark-end text:name="_Toc228353911"/><text:bookmark-end text:name="_Toc31750426"/></text:h>
      <text:p text:style-name="Standard" loext:marker-style-name="T17"><text:span text:style-name="T46">Transporter</text:span><text:span text:style-name="T17"> is used to upload iOS apps to App Store Connect. </text:span><text:span text:style-name="T40">To install Transporter, simply search for Transporter in the Mac App Store and install it.</text:span></text:p>
      <text:p text:style-name="P17" loext:marker-style-name="T17"/>
      <text:p text:style-name="P3" loext:marker-style-name="T8"><draw:frame draw:style-name="fr1" draw:name="Picture 39" text:anchor-type="as-char" svg:width="4.4972in" svg:height="0.9283in"><draw:image xlink:href="Pictures/10000001000002CF00000094317AA322.png" xlink:type="simple" xlink:show="embed" xlink:actuate="onLoad" draw:mime-type="image/png"/></draw:frame><text:bookmark text:name="_vv76das93ezq"/></text:p>
      <text:h text:style-name="Heading_20_1" text:outline-level="1"><text:bookmark text:name="_tpsgpqajyijx"/><text:bookmark-start text:name="_Toc475369919"/><text:bookmark-start text:name="_Toc228353912"/>Testing App in iOS Simulator<text:bookmark-end text:name="_Toc228353912"/></text:h>
      <text:p text:style-name="Standard" loext:marker-style-name="T24"><text:span text:style-name="T24">When you want to test your app, you can either use a device or a simulator. <text:s/>To test with a device, you will need a signing certificate and provisioning profile (see next section). To test with a simulator, you will need to download Xcode, the integrated development environment used to build and test iOS and Mac apps. Xcode is available for free in the Mac App Store and is quite large (5.46GB). DAB requires Xcode 26 or greater (which requires macOS Sequoia). To install:</text:span><text:span text:style-name="T24"/></text:p>
      <text:list text:style-name="WWNum16">
        <text:list-item>
          <text:p text:style-name="P65" loext:marker-style-name="T17"><text:span text:style-name="T17">Go to </text:span><text:a xlink:type="simple" xlink:href="https://itunes.apple.com/us/app/xcode/id497799835?mt=12" text:style-name="Internet_20_link" text:visited-style-name="Visited_20_Internet_20_Link"><text:span text:style-name="Internet_20_link"><text:span text:style-name="T17">https://itunes.apple.com/us/app/xcode/id497799835?mt=12</text:span></text:span></text:a><text:span text:style-name="T17"> or search for “Xcode” in the App Store app on macOS.</text:span></text:p>
        </text:list-item>
        <text:list-item>
          <text:p text:style-name="P66" loext:marker-style-name="T17"><text:span text:style-name="T17">Install from the App Store</text:span><text:span text:style-name="T17"/></text:p>
        </text:list-item>
        <text:list-item>
          <text:p text:style-name="P66" loext:marker-style-name="T17"><text:span text:style-name="T17">Start Xcode at least once to complete the installation</text:span><text:span text:style-name="T17"/></text:p>
        </text:list-item>
      </text:list>
      <text:h text:style-name="P29" text:outline-level="2"><text:bookmark-start text:name="_Toc228353913"/><text:bookmark-start text:name="OLE_LINK12"/>Run the iOS Simulator<text:bookmark-end text:name="_Toc228353913"/><text:bookmark-end text:name="OLE_LINK12"/></text:h>
      <text:p text:style-name="P22" loext:marker-style-name="T17"><text:span text:style-name="T17">Once you have a project configured and ready to test, click on the </text:span><text:span text:style-name="T46">Run iOS App in Simulator</text:span><text:span text:style-name="T17"> on the toolbar.</text:span></text:p>
      <text:p text:style-name="P67" loext:marker-style-name="T17"><draw:frame draw:style-name="fr1" draw:name="Picture 59" text:anchor-type="as-char" svg:width="4.0563in" svg:height="2.0492in"><draw:image xlink:href="Pictures/1000000100000188000000C6B75A4EA4.tif" xlink:type="simple" xlink:show="embed" xlink:actuate="onLoad" draw:mime-type="image/tiff"/></draw:frame></text:p>
      <text:p text:style-name="P22" loext:marker-style-name="T17"><text:span text:style-name="T17">Select the simulator you would like to run on and click </text:span><text:span text:style-name="T46">Start</text:span><text:span text:style-name="T17">. It takes a little bit of time for the simulator to start. <text:s/>If you want to switch simulators, select a different Simulator from the </text:span><text:span text:style-name="T46">Simulator Type </text:span><text:span text:style-name="T17">combo box and click </text:span><text:span text:style-name="T46">Start</text:span><text:span text:style-name="T17"> again. <text:s/>It will close the previous Simulator and start the new own. <text:s/></text:span></text:p>
      <text:p text:style-name="P22" loext:marker-style-name="T17"><text:span text:style-name="T17">Select the project you want to test (it defaults to the selected project in the Apps list) and click on </text:span><text:span text:style-name="T46">Build</text:span><text:span text:style-name="T17">. <text:s/>This will build the app for the Simulator in a separate terminal window. <text:s/>When the build is complete, you can click on </text:span><text:span text:style-name="T46">Launch</text:span><text:span text:style-name="T17"> to run the app in the Simulator.</text:span></text:p>
      <text:p text:style-name="P22" loext:marker-style-name="T17"><text:span text:style-name="T17">You may close the dialog and make changes to your project. <text:s/>When you restart the Run iOS Simulator dialog again, you will need to Build and Launch again for the changes to be included.</text:span><text:span text:style-name="T17"/></text:p>
      <text:h text:style-name="P29" text:outline-level="2"><text:bookmark-start text:name="_Toc228353914"/><text:bookmark-start text:name="OLE_LINK13"/>Installing Additional Simulators<text:bookmark-end text:name="_Toc228353914"/><text:bookmark-end text:name="OLE_LINK13"/></text:h>
      <text:p text:style-name="P22" loext:marker-style-name="T17"><text:span text:style-name="T17">You may install simulators for previous versions of iOS by launching Xcode and viewing the preferences dialog and selecting the Components tab.</text:span><text:span text:style-name="T17"/></text:p>
      <text:p text:style-name="P22" loext:marker-style-name="T17"><draw:frame draw:style-name="fr1" draw:name="Picture 60" text:anchor-type="as-char" svg:width="4.8063in" svg:height="3.2909in"><draw:image xlink:href="Pictures/10000001000001CE0000013C19B87C8F.tif" xlink:type="simple" xlink:show="embed" xlink:actuate="onLoad" draw:mime-type="image/tiff"/></draw:frame></text:p>
      <text:h text:style-name="P29" text:outline-level="2"><text:bookmark-start text:name="_Toc228353915"/>Manually Installing Apps Into The Simulator<text:bookmark-end text:name="_Toc228353915"/></text:h>
      <text:p text:style-name="Standard" loext:marker-style-name="T41"><text:span text:style-name="T41">If there is some problem with launching the simulator from the </text:span><text:span text:style-name="T47">Run iOS Simulator</text:span><text:span text:style-name="T41"> dialog, you can manually install the app by dragging the built app from the Simulator output folder (found in ~/App Builder/Dictionary Apps/Sim Output) onto the Simulator. <text:s/></text:span></text:p>
      <text:p text:style-name="P22" loext:marker-style-name="T41"><text:span text:style-name="T41">To start the Simulator, launch </text:span><text:span text:style-name="T47">Xcode</text:span><text:span text:style-name="T41"> and from the </text:span><text:span text:style-name="T47">Xcode</text:span><text:span text:style-name="T41"> menu select </text:span><text:span text:style-name="T47">Open Developer Tool</text:span><text:span text:style-name="T41"> </text:span><text:span text:style-name="T48"></text:span><text:span text:style-name="T41"> </text:span><text:span text:style-name="T47">Simulator</text:span><text:span text:style-name="T41">. <text:s/>You will still need to rebuild the app from the </text:span><text:span text:style-name="T47">Run iOS Simulator</text:span><text:span text:style-name="T41"> dialog.</text:span></text:p>
      <text:p text:style-name="P68" loext:marker-style-name="T41"/>
      <text:p text:style-name="P68" loext:marker-style-name="T41"/>
      <text:h text:style-name="Heading_20_1" text:outline-level="1"><text:bookmark-start text:name="_Toc228353916"/>Creating iOS Certificates and Provisioning<text:bookmark-end text:name="_Toc475369919"/> Profiles<text:bookmark-end text:name="_Toc228353916"/></text:h>
      <text:h text:style-name="P29" text:outline-level="2"><text:bookmark-start text:name="_Toc228353917"/><text:bookmark-start text:name="OLE_LINK11"/>Enroll in the Apple Developer Program<text:bookmark-end text:name="_Toc228353917"/><text:bookmark-end text:name="OLE_LINK11"/></text:h>
      <text:p text:style-name="Standard" loext:marker-style-name="T17"><text:span text:style-name="T17">To build iOS apps and distribute them through the Apple App Store, you will need to be enrolled in the Apple Developer Program. You can do this as either (i) an individual, or (ii) an organisation. The cost is USD $99 per year.</text:span><text:span text:style-name="T17"/></text:p>
      <text:p text:style-name="P22" loext:marker-style-name="T17"><text:span text:style-name="T17">To enroll:</text:span><text:span text:style-name="T17"/></text:p>
      <text:list text:style-name="WWNum37">
        <text:list-item>
          <text:p text:style-name="P69" loext:marker-style-name="T17"><text:bookmark-start text:name="OLE_LINK10"/><text:span text:style-name="T17">Go to </text:span><text:a xlink:type="simple" xlink:href="https://developer.apple.com/programs/enroll/" text:style-name="ListLabel_20_400" text:visited-style-name="ListLabel_20_400"><text:span text:style-name="T49">https://developer.apple.com/programs/enroll/</text:span></text:a><text:bookmark-end text:name="OLE_LINK10"/></text:p>
        </text:list-item>
        <text:list-item>
          <text:p text:style-name="P70" loext:marker-style-name="T17"><text:span text:style-name="T17">Press the </text:span><text:span text:style-name="T46">Start Your Enrollment</text:span><text:span text:style-name="T17"> button to start.</text:span></text:p>
        </text:list-item>
      </text:list>
      <text:p text:style-name="P71" loext:marker-style-name="T17"/>
      <text:h text:style-name="P29" text:outline-level="2"><text:bookmark-start text:name="_Toc228353918"/>Create Signing Certificate<text:bookmark-end text:name="_Toc228353918"/></text:h>
      <text:p text:style-name="P72" loext:marker-style-name="T17"><text:span text:style-name="T17">When you create an iOS app, it needs to be signed with a certificate. </text:span><text:span text:style-name="T17"/></text:p>
      <text:p text:style-name="P17" loext:marker-style-name="T17"/>
      <text:p text:style-name="Standard" loext:marker-style-name="T17"><text:span text:style-name="T17">To create a certificate:</text:span><text:span text:style-name="T17"/></text:p>
      <text:list text:style-name="WWNum13">
        <text:list-item>
          <text:p text:style-name="P73" loext:marker-style-name="T17"><text:span text:style-name="T17">Go to the </text:span><text:a xlink:type="simple" xlink:href="https://developer.apple.com/" text:style-name="Internet_20_link" text:visited-style-name="Visited_20_Internet_20_Link"><text:span text:style-name="Internet_20_link"><text:span text:style-name="T17">Apple Developer</text:span></text:span></text:a><text:span text:style-name="T17"> website and log in to your account if you are not already.</text:span></text:p>
        </text:list-item>
        <text:list-item>
          <text:p text:style-name="P73" loext:marker-style-name="T17"><text:span text:style-name="T17">Select </text:span><text:span text:style-name="T46">Certificates, Identifiers &amp; Profiles</text:span><text:span text:style-name="T17">.</text:span></text:p>
        </text:list-item>
        <text:list-item>
          <text:p text:style-name="P73" loext:marker-style-name="T17"><text:span text:style-name="T17">Click the</text:span><draw:frame draw:style-name="fr1" draw:name="Picture 12" text:anchor-type="as-char" svg:width="0.1945in" svg:height="0.2362in"><draw:image xlink:href="Pictures/100000010000001C0000002296E3C9AD.png" xlink:type="simple" xlink:show="embed" xlink:actuate="onLoad" draw:mime-type="image/png"/></draw:frame><text:span text:style-name="T17"> button to the right of the </text:span><text:span text:style-name="T46">Certificates</text:span><text:span text:style-name="T17"> header.</text:span></text:p>
        </text:list-item>
        <text:list-item>
          <text:p text:style-name="P73" loext:marker-style-name="T17"><text:span text:style-name="T17">On the </text:span><text:span text:style-name="T46">Create a New Certificates </text:span><text:span text:style-name="T17">page, select </text:span><text:span text:style-name="T46">Apple Distribution</text:span><text:span text:style-name="T17">. Then press the </text:span><text:span text:style-name="T46">Continue</text:span><text:span text:style-name="T17"> button.</text:span></text:p>
        </text:list-item>
        <text:list-item>
          <text:p text:style-name="P73" loext:marker-style-name="T17"><text:span text:style-name="T17">Upload a Certificate Signing Request. Press the </text:span><text:span text:style-name="T46">Learn more</text:span><text:span text:style-name="T17"> link for instructions on how to use Keychain Access on your Mac computer to complete this task. Then press the </text:span><text:span text:style-name="T46">Continue</text:span><text:span text:style-name="T17"> button.</text:span></text:p>
        </text:list-item>
        <text:list-item>
          <text:p text:style-name="P73" loext:marker-style-name="T17"><text:span text:style-name="T17">On the </text:span><text:span text:style-name="T46">Download Your Certificate</text:span><text:span text:style-name="T17"> page, press the </text:span><text:span text:style-name="T46">Download</text:span><text:span text:style-name="T17"> button to download the certificate (distribution.cer) to your Mac.</text:span></text:p>
        </text:list-item>
        <text:list-item>
          <text:p text:style-name="P73" loext:marker-style-name="T17"><text:span text:style-name="T17">Open the Keychain Access application. Choose the </text:span><text:span text:style-name="T46">login</text:span><text:span text:style-name="T17"> item from the Keychains section on the left. </text:span><text:bookmark-start text:name="OLE_LINK2"/><text:span text:style-name="T17">Choose the </text:span><text:span text:style-name="T46">File</text:span><text:span text:style-name="T17"> </text:span><text:span text:style-name="T48"></text:span><text:span text:style-name="T17"> </text:span><text:span text:style-name="T46">Import Items…</text:span><text:span text:style-name="T17"> </text:span><text:bookmark-end text:name="OLE_LINK2"/><text:span text:style-name="T17">menu item and browse to the Downloads folder and select the certificate (distribution.cer).</text:span></text:p>
        </text:list-item>
      </text:list>
      <text:p text:style-name="P17" loext:marker-style-name="T17"/>
      <text:p text:style-name="Standard" loext:marker-style-name="T17"><text:span text:style-name="T17">Now that the certificate is installed in the Keychain, you will be able to access it from within Dictionary App Builder.</text:span><text:span text:style-name="T17"/></text:p>
      <text:p text:style-name="P74" loext:marker-style-name="T17"><text:span text:style-name="T17">Note: To work with certificates, you will need the Apple Worldwide Developer Relations (WWDR) Certification Authority. It should have been installed with Xcode. When viewing your certificate in the Keychain Access application, if there is an error stating the certificate is not trusted, then install the certification authority.</text:span><text:span text:style-name="T17"/></text:p>
      <text:p text:style-name="P75" loext:marker-style-name="T17"><text:span text:style-name="T17">To get the certification authority:</text:span><text:span text:style-name="T17"/></text:p>
      <text:list text:style-name="WWNum1">
        <text:list-item>
          <text:p text:style-name="P76" loext:marker-style-name="T17"><text:span text:style-name="T17">Download the Apple WWDR Certification Authority from:<text:line-break/></text:span><text:a xlink:type="simple" xlink:href="https://developer.apple.com/certificationauthority/AppleWWDRCA.cer" text:style-name="Internet_20_link" text:visited-style-name="Visited_20_Internet_20_Link"><text:span text:style-name="Internet_20_link"><text:span text:style-name="T17">https://developer.apple.com/certificationauthority/AppleWWDRCA.cer</text:span></text:span></text:a></text:p>
        </text:list-item>
      </text:list>
      <text:p text:style-name="P77" loext:marker-style-name="T17"><text:span text:style-name="T17">For signing certificates created after January 28, 2021:<text:line-break/></text:span><text:a xlink:type="simple" xlink:href="https://www.apple.com/certificateauthority/AppleWWDRCAG3.cer" text:style-name="Internet_20_link" text:visited-style-name="Visited_20_Internet_20_Link"><text:span text:style-name="Internet_20_link"><text:span text:style-name="T17">https://www.apple.com/certificateauthority/AppleWWDRCAG3.cer</text:span></text:span></text:a><text:span text:style-name="T17"> </text:span></text:p>
      <text:list text:continue-numbering="true" text:style-name="WWNum1">
        <text:list-item>
          <text:p text:style-name="P76" loext:marker-style-name="T17"><text:span text:style-name="T17">Open the Keychain Access application. Choose the </text:span><text:span text:style-name="T46">System</text:span><text:span text:style-name="T17"> item from the Keychains section on the left. Choose the </text:span><text:span text:style-name="T46">File</text:span><text:span text:style-name="T17"> </text:span><text:span text:style-name="T48"></text:span><text:span text:style-name="T17"> </text:span><text:span text:style-name="T46">Import Items…</text:span><text:span text:style-name="T17"> menu item and browse to the Downloads folder and select the certification authority (AppleWWDRCA.cer). You will be prompted for a username and password that has admin privileges in order to modify the </text:span><text:span text:style-name="T46">System</text:span><text:span text:style-name="T17"> Keychain.</text:span></text:p>
        </text:list-item>
        <text:list-item>
          <text:p text:style-name="P76" loext:marker-style-name="T17"><text:span text:style-name="T17">Choose the </text:span><text:span text:style-name="T46">File</text:span><text:span text:style-name="T17"> </text:span><text:span text:style-name="T48"></text:span><text:span text:style-name="T17"> </text:span><text:span text:style-name="T46">Lock Keychain “System” </text:span><text:span text:style-name="T17">menu item.</text:span></text:p>
        </text:list-item>
      </text:list>
      <text:p text:style-name="P17" loext:marker-style-name="T17"/>
      <text:h text:style-name="P29" text:outline-level="2"><text:bookmark-start text:name="_Toc228353919"/>Create Provisioning Profile<text:bookmark-end text:name="_Toc228353919"/></text:h>
      <text:p text:style-name="P78" loext:marker-style-name="T37"><text:span text:style-name="T37">Distribution provisioning profiles are used to for two primary purposes:</text:span><text:span text:style-name="T37"/></text:p>
      <text:list text:style-name="WWNum40">
        <text:list-item>
          <text:p text:style-name="P79" loext:marker-style-name="T37"><text:span text:style-name="T37">AdHoc - to install your app on a limited number of registered devices for testing. </text:span><text:span text:style-name="T37"/></text:p>
        </text:list-item>
        <text:list-item>
          <text:p text:style-name="P79" loext:marker-style-name="T37"><text:span text:style-name="T37">App Store - to submit your app to the App Store.</text:span><text:span text:style-name="T37"/></text:p>
        </text:list-item>
      </text:list>
      <text:p text:style-name="P80" loext:marker-style-name="T46"><text:span text:style-name="T46">Creating a provisioning profile</text:span><text:span text:style-name="T46"/></text:p>
      <text:p text:style-name="P72" loext:marker-style-name="T17"><text:span text:style-name="T17">To create a new AdHoc provisioning profile, you will need an App ID and at least one registered device. To create a new App Store provisioning profile, you will need just the App ID.</text:span><text:span text:style-name="T17"/></text:p>
      <text:p text:style-name="P22" loext:marker-style-name="T17"><text:span text:style-name="T17">To create an </text:span><text:span text:style-name="T50">App ID</text:span><text:span text:style-name="T17">:</text:span></text:p>
      <text:list text:style-name="WWNum14">
        <text:list-item>
          <text:p text:style-name="P81" loext:marker-style-name="T17"><text:span text:style-name="T17">Go to the Apple Developer website and log in to your account if you are not already.</text:span><text:span text:style-name="T17"/></text:p>
        </text:list-item>
        <text:list-item>
          <text:p text:style-name="P81" loext:marker-style-name="T17"><text:span text:style-name="T17">Select </text:span><text:span text:style-name="T46">Certificates, Identifiers &amp; Profiles</text:span><text:span text:style-name="T17">.</text:span></text:p>
        </text:list-item>
        <text:list-item>
          <text:p text:style-name="P81" loext:marker-style-name="T17"><text:span text:style-name="T17">Select </text:span><text:span text:style-name="T46">Identifiers</text:span><text:span text:style-name="T17"> on the left of the page.</text:span></text:p>
        </text:list-item>
        <text:list-item>
          <text:p text:style-name="P81" loext:marker-style-name="T17"><text:span text:style-name="T17">Click the</text:span><draw:frame draw:style-name="fr1" draw:name="Picture 29" text:anchor-type="as-char" svg:width="0.1945in" svg:height="0.2362in"><draw:image xlink:href="Pictures/100000010000001C0000002296E3C9AD.png" xlink:type="simple" xlink:show="embed" xlink:actuate="onLoad" draw:mime-type="image/png"/></draw:frame><text:span text:style-name="T17"> button to the right of the </text:span><text:span text:style-name="T46">Identifiers</text:span><text:span text:style-name="T17"> header.</text:span></text:p>
        </text:list-item>
        <text:list-item>
          <text:p text:style-name="P81" loext:marker-style-name="T17"><text:span text:style-name="T17">Select </text:span><text:span text:style-name="T46">App IDs</text:span><text:span text:style-name="T17"> and click the </text:span><text:span text:style-name="T46">Continue</text:span><text:span text:style-name="T17"> button.</text:span></text:p>
        </text:list-item>
        <text:list-item>
          <text:p text:style-name="P81" loext:marker-style-name="T17"><text:span text:style-name="T17">Select </text:span><text:span text:style-name="T46">App</text:span><text:span text:style-name="T17"> and clock the </text:span><text:span text:style-name="T46">Continue</text:span><text:span text:style-name="T17"> button</text:span></text:p>
        </text:list-item>
        <text:list-item>
          <text:p text:style-name="P81" loext:marker-style-name="T17"><text:bookmark-start text:name="OLE_LINK22"/><text:bookmark-start text:name="OLE_LINK21"/><text:bookmark-start text:name="OLE_LINK20"/><text:bookmark-start text:name="OLE_LINK23"/><text:span text:style-name="T17">Enter a</text:span><text:span text:style-name="T46"> Description</text:span><text:span text:style-name="T17"> of your choice.<text:line-break/>It can be the </text:span><text:span text:style-name="T46">App Name</text:span><text:span text:style-name="T17"> from the </text:span><text:span text:style-name="T46">App</text:span><text:span text:style-name="T17"> </text:span><text:span text:style-name="T48"></text:span><text:span text:style-name="T51"> </text:span><text:span text:style-name="T46">Package</text:span><text:span text:style-name="T17"> page of Dictionary App Builder.</text:span><text:bookmark-end text:name="OLE_LINK22"/><text:bookmark-end text:name="OLE_LINK23"/></text:p>
        </text:list-item>
        <text:list-item>
          <text:p text:style-name="P81" loext:marker-style-name="T17"><text:bookmark-start text:name="OLE_LINK24"/><text:bookmark-start text:name="OLE_LINK25"/><text:span text:style-name="T17">For Bundle ID, choose </text:span><text:span text:style-name="T46">Explicit </text:span><text:span text:style-name="T17">and enter your app package name from the </text:span><text:span text:style-name="T46">App</text:span><text:span text:style-name="T17"> </text:span><text:bookmark-start text:name="OLE_LINK19"/><text:bookmark-start text:name="OLE_LINK18"/><text:span text:style-name="T48"></text:span><text:span text:style-name="T51"> </text:span><text:span text:style-name="T46">Package</text:span><text:span text:style-name="T17"> page of Dictionary App Builder.</text:span><text:bookmark-end text:name="OLE_LINK24"/><text:bookmark-end text:name="OLE_LINK25"/><text:bookmark-end text:name="OLE_LINK19"/><text:bookmark-end text:name="OLE_LINK18"/><text:bookmark-end text:name="OLE_LINK21"/><text:bookmark-end text:name="OLE_LINK20"/></text:p>
        </text:list-item>
        <text:list-item>
          <text:p text:style-name="P81" loext:marker-style-name="T17"><text:span text:style-name="T17">Leave all the App Services unchecked. None are needed in the app. </text:span><text:span text:style-name="T17"/></text:p>
        </text:list-item>
        <text:list-item>
          <text:p text:style-name="P81" loext:marker-style-name="T17"><text:span text:style-name="T17">Click the </text:span><text:span text:style-name="T46">Continue</text:span><text:span text:style-name="T17"> button.</text:span></text:p>
        </text:list-item>
      </text:list>
      <text:p text:style-name="P17" loext:marker-style-name="T17"/>
      <text:p text:style-name="P82" loext:marker-style-name="T17"><text:span text:style-name="T17">To register a </text:span><text:span text:style-name="T50">device</text:span><text:span text:style-name="T17"> (i.e. a specific iPhone or iPad for testing):</text:span></text:p>
      <text:list text:style-name="WWNum17">
        <text:list-item>
          <text:p text:style-name="P83" loext:marker-style-name="T17"><text:span text:style-name="T17">Select </text:span><text:span text:style-name="T46">Devices</text:span><text:span text:style-name="T17"> on the left of the page.</text:span></text:p>
        </text:list-item>
        <text:list-item>
          <text:p text:style-name="P83" loext:marker-style-name="T17"><text:span text:style-name="T17">Click the</text:span><draw:frame draw:style-name="fr1" draw:name="Picture 30" text:anchor-type="as-char" svg:width="0.1945in" svg:height="0.2362in"><draw:image xlink:href="Pictures/100000010000001C0000002296E3C9AD.png" xlink:type="simple" xlink:show="embed" xlink:actuate="onLoad" draw:mime-type="image/png"/></draw:frame><text:span text:style-name="T17"> button to the right of the </text:span><text:span text:style-name="T46">Devices</text:span><text:span text:style-name="T17"> header.</text:span></text:p>
        </text:list-item>
        <text:list-item>
          <text:p text:style-name="P83" loext:marker-style-name="T17">In the section <text:span text:style-name="T33">Register a Device</text:span>, enter a name of the device (such as “John Smith’s iPhone”) and its UDID (unique device identifier, a sequence of 40 letters and numbers). Press <text:span text:style-name="T33">Continue</text:span>.</text:p>
        </text:list-item>
        <text:list-item>
          <text:p text:style-name="P83" loext:marker-style-name="T17"><text:span text:style-name="T17">On the next page, check that the device information is displayed correctly and click </text:span><text:span text:style-name="T46">Register</text:span><text:span text:style-name="T17"> to confirm.</text:span></text:p>
        </text:list-item>
      </text:list>
      <text:p text:style-name="P84" loext:marker-style-name="T17"><text:span text:style-name="T17">Note that you can register up to 100 devices of each type (e.g. up to 100 iPhones, 100 iPads) per year of your Apple Developer Program membership. You can remove devices that you no longer need at the beginning of the next membership year.</text:span><text:span text:style-name="T17"/></text:p>
      <text:p text:style-name="P85" loext:marker-style-name="T17"/>
      <text:p text:style-name="P82" loext:marker-style-name="T17"><text:span text:style-name="T17">To create a </text:span><text:span text:style-name="T50">provisioning profile</text:span><text:span text:style-name="T17">:</text:span></text:p>
      <text:list text:style-name="WWNum18">
        <text:list-item>
          <text:p text:style-name="P86" loext:marker-style-name="T17"><text:span text:style-name="T17">Select </text:span><text:span text:style-name="T46">Profiles</text:span><text:span text:style-name="T17"> on the left of the page.</text:span></text:p>
        </text:list-item>
        <text:list-item>
          <text:p text:style-name="P86" loext:marker-style-name="T17"><text:span text:style-name="T17">Click the</text:span><draw:frame draw:style-name="fr1" draw:name="Picture 33" text:anchor-type="as-char" svg:width="0.1945in" svg:height="0.2362in"><draw:image xlink:href="Pictures/100000010000001C0000002296E3C9AD.png" xlink:type="simple" xlink:show="embed" xlink:actuate="onLoad" draw:mime-type="image/png"/></draw:frame><text:span text:style-name="T17"> button to the right of the </text:span><text:span text:style-name="T46">Profiles</text:span><text:span text:style-name="T17"> header.</text:span></text:p>
        </text:list-item>
        <text:list-item>
          <text:p text:style-name="P86" loext:marker-style-name="T17"><text:span text:style-name="T17">On the </text:span><text:span text:style-name="T46">Register a New Provisioning Profile</text:span><text:span text:style-name="T17"> page, under </text:span><text:span text:style-name="T46">Distribution</text:span><text:span text:style-name="T17">, select </text:span><text:span text:style-name="T46">Ad Hoc</text:span><text:span text:style-name="T17"> (for testing) or </text:span><text:span text:style-name="T46">App Store</text:span><text:span text:style-name="T17"> (for submission to the App Store). Click </text:span><text:span text:style-name="T46">Continue</text:span><text:span text:style-name="T17"> to move to the next page.</text:span></text:p>
        </text:list-item>
        <text:list-item>
          <text:p text:style-name="P86" loext:marker-style-name="T17"><text:span text:style-name="T17">On the ‘Select an App ID’ page, select the App ID from the list of App IDs you have already defined. Click the </text:span><text:span text:style-name="T46">Continue</text:span><text:span text:style-name="T17"> button.</text:span></text:p>
        </text:list-item>
        <text:list-item>
          <text:p text:style-name="P86" loext:marker-style-name="T17"><text:span text:style-name="T17">On the ‘Select Certificates’ page, select the certificate (Distribution) to include in the profile. Click the </text:span><text:span text:style-name="T46">Continue</text:span><text:span text:style-name="T17"> button.</text:span></text:p>
        </text:list-item>
        <text:list-item>
          <text:p text:style-name="P86" loext:marker-style-name="T17"><text:span text:style-name="T17">If creating an AdHoc provisioning profile:<text:line-break/>On the ‘Select Devices’ page, check the device(s) that you want to be able to install and run the app. Click the </text:span><text:span text:style-name="T46">Continue</text:span><text:span text:style-name="T17"> button.</text:span></text:p>
        </text:list-item>
        <text:list-item>
          <text:p text:style-name="P86" loext:marker-style-name="T17"><text:span text:style-name="T17">On the ‘Review, Name, and Generate’ page, give the profile a name of your choice. It is helpful to include “App Store” or “AdHoc” in the name. Click the </text:span><text:span text:style-name="T46">Continue</text:span><text:span text:style-name="T17"> button.</text:span></text:p>
        </text:list-item>
        <text:list-item>
          <text:p text:style-name="P86" loext:marker-style-name="T17"><text:span text:style-name="T17">On the ‘Download and Install’ page, click </text:span><text:span text:style-name="T46">Download</text:span><text:span text:style-name="T17"> to save your new .mobileprovision file to your computer. </text:span></text:p>
        </text:list-item>
      </text:list>
      <text:p text:style-name="P84" loext:marker-style-name="T17"><text:span text:style-name="T17">This is the Provisioning Profile file that you will select in Dictionary App Builder.</text:span><text:span text:style-name="T17"/></text:p>
      <text:p text:style-name="P87" loext:marker-style-name="T46"><text:span text:style-name="T46">Download existing mobile provision files</text:span><text:span text:style-name="T46"/></text:p>
      <text:p text:style-name="Standard" loext:marker-style-name="T17"><text:span text:style-name="T17">If other members of your team have already created provisioning profiles, there are several ways to download them. They can be downloaded from the App Developer website by selecting the profile to be downloaded and pressing the </text:span><text:span text:style-name="T46">Download</text:span><text:span text:style-name="T17"> button. <text:s/></text:span></text:p>
      <text:h text:style-name="Heading_20_1" text:outline-level="1"><text:bookmark text:name="_q7i9umrolddd"/><text:bookmark-start text:name="_Toc228353920"/><text:bookmark-start text:name="_Toc475369921"/>Building an iOS App<text:bookmark-end text:name="_Toc228353920"/><text:bookmark-end text:name="_Toc475369921"/></text:h>
      <text:p text:style-name="P88" loext:marker-style-name="T22"><text:span text:style-name="T22">To build an iOS app:</text:span><text:span text:style-name="T22"/></text:p>
      <text:list text:style-name="WWNum22">
        <text:list-item>
          <text:p text:style-name="P89" loext:marker-style-name="T17"><text:span text:style-name="T17">Create a new app project following the instructions in the DAB </text:span><text:span text:style-name="T46">Building Apps</text:span><text:span text:style-name="T17"> document.</text:span></text:p>
        </text:list-item>
        <text:list-item>
          <text:p text:style-name="P89" loext:marker-style-name="T17"><text:span text:style-name="T17">Select the </text:span><text:span text:style-name="T46">Signing (iOS)</text:span><text:span text:style-name="T17"> tab to open the iOS signing options for the app.<text:line-break/></text:span></text:p>
        </text:list-item>
      </text:list>
      <text:p text:style-name="P90" loext:marker-style-name="T17"><draw:frame draw:style-name="fr1" draw:name="Picture 17" text:anchor-type="as-char" svg:width="5.6811in" svg:height="3.928in"><draw:image xlink:href="Pictures/10000001000002220000017A4CD95FB5.tif" xlink:type="simple" xlink:show="embed" xlink:actuate="onLoad" draw:mime-type="image/tiff"/></draw:frame></text:p>
      <text:list text:continue-numbering="true" text:style-name="WWNum22">
        <text:list-item>
          <text:p text:style-name="P91" loext:marker-style-name="T17"><text:span text:style-name="T17">Select the </text:span><text:span text:style-name="T46">Signing Identity</text:span><text:span text:style-name="T17"> from the drop-down list of signing certificates which have been downloaded and installed to this system in the earlier steps.</text:span></text:p>
        </text:list-item>
        <text:list-item>
          <text:p text:style-name="P91" loext:marker-style-name="T17"><text:span text:style-name="T17">For the </text:span><text:span text:style-name="T46">Provisioning Profile </text:span><text:span text:style-name="T17">entry, enter or browse to the mobile provisioning file associated with the app that was downloaded in the earlier steps. <text:line-break/></text:span></text:p>
        </text:list-item>
      </text:list>
      <text:p text:style-name="P33" loext:marker-style-name="T17"><draw:frame draw:style-name="fr1" draw:name="Picture 3" text:anchor-type="as-char" svg:width="6.2681in" svg:height="3.3362in"><draw:image xlink:href="Pictures/100000010000045C0000025234A54609.png" xlink:type="simple" xlink:show="embed" xlink:actuate="onLoad" draw:mime-type="image/png"/><svg:desc>A screenshot of a dictionary

AI-generated content may be incorrect.</svg:desc></draw:frame></text:p>
      <text:p text:style-name="P92" loext:marker-style-name="T17"/>
      <text:list text:continue-numbering="true" text:style-name="WWNum22">
        <text:list-item>
          <text:p text:style-name="P91" loext:marker-style-name="T17"><text:span text:style-name="T17">Click on the </text:span><text:span text:style-name="T46">IPA</text:span><text:span text:style-name="T17"> tab. <text:s/></text:span></text:p>
        </text:list-item>
      </text:list>
      <text:p text:style-name="P77" loext:marker-style-name="T17"><text:span text:style-name="T17">This allows you to set the name of the ipa file to be generated as well as the build and version information.</text:span><text:span text:style-name="T17"/></text:p>
      <text:p text:style-name="P77" loext:marker-style-name="T17"><text:span text:style-name="T17">The </text:span><text:span text:style-name="T52">Filename</text:span><text:span text:style-name="T17"> field on the screen specifies the base name of the ipa file to be generated. <text:s/>If the checkbox at the bottom of the screen for </text:span><text:span text:style-name="T53">Append version name to ipa filename</text:span><text:span text:style-name="T17"> is checked, then the version indicated by the </text:span><text:span text:style-name="T53">Version Name</text:span><text:span text:style-name="T17"> fields is added to the base filename. <text:s/></text:span></text:p>
      <text:p text:style-name="P93" loext:marker-style-name="T17"><text:span text:style-name="T17">The </text:span><text:span text:style-name="T52">Build</text:span><text:span text:style-name="T53"> </text:span><text:span text:style-name="T17">field referenced as </text:span><text:span text:style-name="T53">Build </text:span><text:span text:style-name="T17">is also called </text:span><text:span text:style-name="T53">Bundle Version String, Bundle Version</text:span><text:span text:style-name="T17"> or </text:span><text:span text:style-name="T53">CFBundleVersion</text:span><text:span text:style-name="T17"> within Xcode and ITunes Connect. It represents the build number. The </text:span><text:span text:style-name="T53">Build</text:span><text:span text:style-name="T17"> field expects an integer value and should be incremented with each file that is submitted to the ITunes Connect for release or testing. </text:span></text:p>
      <text:p text:style-name="P93" loext:marker-style-name="T17"><text:span text:style-name="T17">The </text:span><text:span text:style-name="T52">Version Name</text:span><text:span text:style-name="T53"> </text:span><text:span text:style-name="T17">field is referenced as </text:span><text:span text:style-name="T53">Version, Bundle Short Version String, Bundle versions string, short </text:span><text:span text:style-name="T17">and </text:span><text:span text:style-name="T53">CFBundleShortVersionString </text:span><text:span text:style-name="T17">within Xcode and ITunes Connect. The field is created as a concatenation of the values of the three fields separated by a period. If the final field has a value of 0, then the version string is created from just the first two values. So for values of 1, 2 and 0, the resulting string is “1.2”. <text:s/>For values of 1, 2 and 3, the resulting version string is “1.2.3”.</text:span></text:p>
      <text:p text:style-name="P93" loext:marker-style-name="T17"><text:span text:style-name="T17">The </text:span><text:span text:style-name="T54">Apple ID</text:span><text:span text:style-name="T17"> field is the id assigned by App Store Connect to the application in the app store. <text:s/>It can be obtained from </text:span><text:span text:style-name="T23">Apple ID </text:span><text:span text:style-name="T17">filed on the App Information tab in the App Store Connect entry for the app.</text:span></text:p>
      <text:p text:style-name="P94" loext:marker-style-name="T23"><text:span text:style-name="T17">The </text:span><text:span text:style-name="T54">Bundle ID</text:span><text:span text:style-name="T17"> section allows the user to specify a Bundle ID for the app that is different than the package name. <text:s/>By default, the </text:span><text:span text:style-name="T54">Package Name </text:span><text:span text:style-name="T17">field from the </text:span><text:span text:style-name="T54">Package</text:span><text:span text:style-name="T17"> tab is used as the Application Bundle ID that is used in creating the provisioning profiles and as the application identifier for the Apple App Store. <text:s/>If the user wants the iOS version of the app to have an identifier that is different than the package name that is used for the Android version of the app, press the </text:span><text:span text:style-name="T54">Specify a Bundle ID</text:span><text:span text:style-name="T17"> button and then enter the ID to be used in the text box labelled </text:span><text:span text:style-name="T54">Bundle ID.</text:span></text:p>
      <text:p text:style-name="P95" loext:marker-style-name="T17"/>
      <text:list text:continue-numbering="true" text:style-name="WWNum22">
        <text:list-item>
          <text:p text:style-name="P96" loext:marker-style-name="T17"><text:span text:style-name="T17">Click on the </text:span><text:span text:style-name="T46">Build iOS App </text:span><text:span text:style-name="T17">button at the top of the screen. A terminal window should open. The build script for the iOS app should run within that terminal window.</text:span></text:p>
        </text:list-item>
      </text:list>
      <text:p text:style-name="P97" loext:marker-style-name="T17"><draw:frame draw:style-name="fr1" draw:name="Picture 18" text:anchor-type="as-char" svg:width="5.7083in" svg:height="4.0028in"><draw:image xlink:href="Pictures/100000010000022600000182A1298296.png" xlink:type="simple" xlink:show="embed" xlink:actuate="onLoad" draw:mime-type="image/png"/></draw:frame></text:p>
      <text:list text:continue-numbering="true" text:style-name="WWNum22">
        <text:list-item>
          <text:p text:style-name="P91" loext:marker-style-name="T17"><text:span text:style-name="T17">Examine the terminal window once the shell script has been completed. The message “Signed release IPA built successfully” should appear in the window if the app has been built successfully. (Note that occasionally the terminal window will appear behind the Dictionary App Builder and that you have to select the terminal to review the results).</text:span><text:span text:style-name="T17"/></text:p>
        </text:list-item>
        <text:list-item>
          <text:p text:style-name="P98" loext:marker-style-name="T17"><text:span text:style-name="T17">The results of the build are an IPA file and an app that can be run in the simulator.<text:line-break/></text:span><text:bookmark-start text:name="OLE_LINK14"/><text:span text:style-name="T17">They can be found in ~/App Builder/Dictionary Apps/Ipa Output/</text:span><text:bookmark-end text:name="OLE_LINK14"/><text:span text:style-name="T17"> and ~/App Builder/Dictionary Apps/Sim Output/.</text:span><text:span text:style-name="T17"/></text:p>
        </text:list-item>
      </text:list>
      <text:p text:style-name="Standard" loext:marker-style-name="T4"><text:span text:style-name="T4"><text:tab/></text:span><draw:frame draw:style-name="fr1" draw:name="Picture 26" text:anchor-type="as-char" svg:width="5.0016in" svg:height="2.5492in"><draw:image xlink:href="Pictures/10000001000001E1000000F58AEA7280.png" xlink:type="simple" xlink:show="embed" xlink:actuate="onLoad" draw:mime-type="image/png"/></draw:frame></text:p>
      <text:p text:style-name="P99" loext:marker-style-name="T4"/>
      <text:h text:style-name="Heading_20_1" text:outline-level="1"><text:bookmark text:name="_e55ehiika5jz"/><text:bookmark-start text:name="_Toc475369922"/><text:bookmark-start text:name="_Toc228353921"/>Testing an iOS App<text:bookmark-end text:name="_Toc228353921"/></text:h>
      <text:p text:style-name="No_20_Spacing">After building the iOS IPA file, you will want to install it and test it on one or more devices before you submit it for publication to the Apple App Store. This manual describes two ways of doing this:</text:p>
      <text:p text:style-name="No_20_Spacing"/>
      <text:list text:style-name="WWNum23">
        <text:list-item>
          <text:p text:style-name="P100">Use <text:span text:style-name="T33">Xcode</text:span> to install the IPA file to an iPhone or iPad that is connected to your computer.</text:p>
        </text:list-item>
      </text:list>
      <text:p text:style-name="P101" loext:marker-style-name="T55"><text:span text:style-name="T55">This method is recommended if you have your test devices with you. It does not involve uploading and downloading the IPA to and from the internet.</text:span><text:span text:style-name="T55"/></text:p>
      <text:list text:continue-numbering="true" text:style-name="WWNum23">
        <text:list-item>
          <text:p text:style-name="P102">Use <text:span text:style-name="T33">DeployGate</text:span> to upload the IPA file to the internet and share it with limited number of devices to download, install and test.</text:p>
        </text:list-item>
      </text:list>
      <text:p text:style-name="P101" loext:marker-style-name="T55"><text:span text:style-name="T55">This method is recommended if you have good internet access and/or you have a team of testers who are elsewhere.</text:span><text:span text:style-name="T55"/></text:p>
      <text:p text:style-name="P26" loext:marker-style-name="T24"/>
      <text:h text:style-name="Heading_20_1" text:outline-level="1"><text:bookmark-start text:name="_Toc508705017"/><text:bookmark-start text:name="_Toc228353922"/>Using Xcode to Test an iOS App<text:bookmark-end text:name="_Toc508705017"/><text:bookmark-end text:name="_Toc228353922"/></text:h>
      <text:p text:style-name="No_20_Spacing" loext:marker-style-name="T22"><text:span text:style-name="T22">To test your iOS IPA file using </text:span><text:span text:style-name="T56">Xcode</text:span><text:span text:style-name="T22">, do the following:</text:span></text:p>
      <text:list text:style-name="WWNum24">
        <text:list-item>
          <text:p text:style-name="P103" loext:marker-style-name="T22"><text:span text:style-name="T22">Launch </text:span><text:span text:style-name="T56">Xcode</text:span><text:span text:style-name="T22"> and select </text:span><text:bookmark-start text:name="OLE_LINK29"/><text:bookmark-start text:name="OLE_LINK28"/><text:span text:style-name="T56">Window</text:span><text:span text:style-name="T22"> </text:span><text:span text:style-name="T48"></text:span><text:span text:style-name="T22"> </text:span><text:span text:style-name="T56">Devices and Simulators</text:span><text:bookmark-end text:name="OLE_LINK29"/><text:bookmark-end text:name="OLE_LINK28"/><text:span text:style-name="T22">.</text:span></text:p>
        </text:list-item>
        <text:list-item>
          <text:p text:style-name="P103" loext:marker-style-name="T22"><text:span text:style-name="T22">Connect an iPhone or iPad to the Mac using a cable and unlock the device.</text:span><text:span text:style-name="T22"/></text:p>
        </text:list-item>
        <text:list-item>
          <text:p text:style-name="P103" loext:marker-style-name="T22"><text:span text:style-name="T22">On the Mac, iTunes may launch and show a dialog asking “Do you want to allow this computer to access information…” Click on the </text:span><text:span text:style-name="T56">Cancel</text:span><text:span text:style-name="T22"> button. </text:span></text:p>
          <text:list>
            <text:list-item>
              <text:p text:style-name="P104" loext:marker-style-name="T22"><text:span text:style-name="T22">Note: This feature can be turned off in iTunes. Select </text:span><text:span text:style-name="T56">iTunes</text:span><text:span text:style-name="T22"> </text:span><text:span text:style-name="T48"></text:span><text:span text:style-name="T22"> </text:span><text:span text:style-name="T56">Preferences…</text:span><text:span text:style-name="T22">, select the </text:span><text:span text:style-name="T56">Devices</text:span><text:span text:style-name="T22"> tab, and click on the </text:span><text:span text:style-name="T56">Prevent iPods, iPhone, and iPad from syncing automatically</text:span><text:span text:style-name="T22"> checkbox.</text:span></text:p>
            </text:list-item>
          </text:list>
        </text:list-item>
        <text:list-item>
          <text:p text:style-name="P103" loext:marker-style-name="T22"><text:span text:style-name="T22">On the device, it may prompt to </text:span><text:span text:style-name="T56">Trust This Computer</text:span><text:span text:style-name="T22">. Tap on the </text:span><text:span text:style-name="T56">Trust</text:span><text:span text:style-name="T22"> button. <text:s/>This may require to enter the Passcode to trust this computer. <text:s/>The device will show up in the </text:span><text:span text:style-name="T56">Xcode</text:span><text:span text:style-name="T22"> </text:span><text:span text:style-name="T56">Devices</text:span><text:span text:style-name="T22"> window.</text:span></text:p>
        </text:list-item>
        <text:list-item>
          <text:p text:style-name="P105" loext:marker-style-name="T22"><text:span text:style-name="T22">The first time the device is connected to the Mac, Xcode will take some time to Prepare debugger support. <text:s/>This may take some time. <text:s/>Please wait.</text:span><text:span text:style-name="T22"/></text:p>
        </text:list-item>
        <text:list-item>
          <text:p text:style-name="P105" loext:marker-style-name="T22"><text:span text:style-name="T22">In the </text:span><text:span text:style-name="T56">Xcode</text:span><text:span text:style-name="T22"> </text:span><text:span text:style-name="T56">Devices</text:span><text:span text:style-name="T22"> window, there will be a section named </text:span><text:span text:style-name="T56">INSTALLED APPS</text:span><text:span text:style-name="T22">. Click on the </text:span><text:span text:style-name="T56">+</text:span><text:span text:style-name="T22"> button. </text:span></text:p>
        </text:list-item>
        <text:list-item>
          <text:p text:style-name="P105" loext:marker-style-name="T22"><text:span text:style-name="T22">Find the IPA file to add. Click </text:span><text:span text:style-name="T56">Open</text:span><text:span text:style-name="T22"> after you have selected it.</text:span></text:p>
        </text:list-item>
        <text:list-item>
          <text:p text:style-name="P105" loext:marker-style-name="T22"><text:span text:style-name="T22">Click the </text:span><text:span text:style-name="T56">Install</text:span><text:span text:style-name="T22"> button next to the name of the app.</text:span></text:p>
        </text:list-item>
        <text:list-item>
          <text:p text:style-name="P105" loext:marker-style-name="T22"><text:span text:style-name="T22">Wait until the Mac installs the app to your device.</text:span><text:span text:style-name="T22"/></text:p>
        </text:list-item>
      </text:list>
      <text:p text:style-name="P106" loext:marker-style-name="T22"/>
      <text:p text:style-name="No_20_Spacing" loext:marker-style-name="T22"><text:span text:style-name="T22">After the install is complete, you will see the app icon on your device and you can test it.</text:span><text:span text:style-name="T22"/></text:p>
      <text:p text:style-name="P26" loext:marker-style-name="T24"/>
      <text:h text:style-name="Heading_20_1" text:outline-level="1"><text:bookmark-start text:name="_Toc228353923"/>Using DeployGate to Test an iOS App<text:bookmark-end text:name="_Toc228353923"/><text:bookmark-end text:name="_Toc475369922"/></text:h>
      <text:p text:style-name="Standard" loext:marker-style-name="T17"><text:span text:style-name="T46">DeployGate</text:span><text:span text:style-name="T17"> enables you to test your app and share it with a limited number of users to test. You upload the IPA file for iOS apps or the APK for Android apps and then download them to your phone or tablet device. You can also invite testers to install your app and help with the testing.</text:span></text:p>
      <text:p text:style-name="P22" loext:marker-style-name="T17"><text:span text:style-name="T17">A DeployGate app is installed on the testing device. It will show all of the apps that you have uploaded to DeployGate and allows them to be installed on the device.</text:span><text:span text:style-name="T17"/></text:p>
      <text:h text:style-name="P29" text:outline-level="2"><text:bookmark text:name="_1pqgp28vmb7n"/><text:bookmark-start text:name="_Toc228353924"/><text:bookmark-start text:name="_Toc475369923"/>Creating a DeployGate Account<text:bookmark-end text:name="_Toc228353924"/><text:bookmark-end text:name="_Toc475369923"/></text:h>
      <text:p text:style-name="Standard" loext:marker-style-name="T17"><text:span text:style-name="T17">The first step is to create a DeployGate account. To do this:</text:span><text:span text:style-name="T17"/></text:p>
      <text:list text:style-name="WWNum9">
        <text:list-item>
          <text:p text:style-name="P107" loext:marker-style-name="T17"><text:span text:style-name="T17">Go to </text:span><text:a xlink:type="simple" xlink:href="https://deploygate.com/" text:style-name="ListLabel_20_401" text:visited-style-name="ListLabel_20_401"><text:span text:style-name="T49">https://deploygate.com</text:span></text:a><text:span text:style-name="T17"> </text:span></text:p>
        </text:list-item>
        <text:list-item>
          <text:p text:style-name="P108" loext:marker-style-name="T17"><text:span text:style-name="T17">Press the </text:span><text:span text:style-name="T46">Get Started</text:span><text:span text:style-name="T17"> button. </text:span></text:p>
        </text:list-item>
        <text:list-item>
          <text:p text:style-name="P108" loext:marker-style-name="T17"><text:span text:style-name="T17">Enter an email address, a user name and a password. </text:span><text:span text:style-name="T17"/></text:p>
        </text:list-item>
        <text:list-item>
          <text:p text:style-name="P108" loext:marker-style-name="T17"><text:span text:style-name="T17">Press the </text:span><text:span text:style-name="T46">Sign up for DeployGate</text:span><text:span text:style-name="T17"> button.</text:span></text:p>
        </text:list-item>
      </text:list>
      <text:p text:style-name="P109" loext:marker-style-name="T17"/>
      <text:p text:style-name="Standard" loext:marker-style-name="T17"><text:span text:style-name="T17"><text:s text:c="2"/></text:span><draw:frame draw:style-name="fr1" draw:name="image39.png" text:anchor-type="as-char" svg:width="5.8075in" svg:height="2.4291in"><draw:image xlink:href="Pictures/10000001000003630000016CDAB2D706.png" xlink:type="simple" xlink:show="embed" xlink:actuate="onLoad" draw:mime-type="image/png"/></draw:frame></text:p>
      <text:h text:style-name="P29" text:outline-level="2"><text:bookmark text:name="_es66kyf6etzn"/><text:bookmark-start text:name="_Toc228353925"/><text:bookmark-start text:name="_Toc475369924"/>Uploading Your First App<text:bookmark-end text:name="_Toc228353925"/><text:bookmark-end text:name="_Toc475369924"/></text:h>
      <text:p text:style-name="P27" loext:marker-style-name="T17"><text:span text:style-name="T17">Once the sign in screen has been successfully completed, you are presented with a screen that prompts you to upload your app. <text:s/>While there are several methods described for embedding it as part of your build process, the way we have used this to date is to simply upload the IPA file that has been created by locating the ipa file in Finder and then dragging it to the bottom area of the screen where it has a green </text:span><text:span text:style-name="T46">Upload App</text:span><text:span text:style-name="T17"> area:</text:span></text:p>
      <text:p text:style-name="P3" loext:marker-style-name="T17"><draw:frame draw:style-name="fr1" draw:name="image49.png" text:anchor-type="as-char" svg:width="4.8807in" svg:height="4.4374in"><draw:image xlink:href="Pictures/10000001000001D5000001AA4146FACF.png" xlink:type="simple" xlink:show="embed" xlink:actuate="onLoad" draw:mime-type="image/png"/></draw:frame></text:p>
      <text:p text:style-name="P110" loext:marker-style-name="T17"><text:span text:style-name="T17">Dragging the file to the upload area causes a new dialog to be displayed with the name of the file and a text box where you can enter a short note that will be displayed on your profile window and also on the DeployGate app when the user is selecting the app. It is a good place to write a short note on the reason for the update so that it is easy for the testers to see that the app has been updated and to see what the primary reason they need to update is. Complete the screen and press the </text:span><text:span text:style-name="T46">Upload</text:span><text:span text:style-name="T17"> button.</text:span></text:p>
      <text:p text:style-name="P17" loext:marker-style-name="T17"/>
      <text:p text:style-name="Standard" loext:marker-style-name="T4"><draw:frame draw:style-name="fr1" draw:name="image28.png" text:anchor-type="as-char" svg:width="5.5161in" svg:height="2.8638in"><draw:image xlink:href="Pictures/10000001000002AB000001634B4F0C2B.png" xlink:type="simple" xlink:show="embed" xlink:actuate="onLoad" draw:mime-type="image/png"/></draw:frame></text:p>
      <text:p text:style-name="P99" loext:marker-style-name="T4"/>
      <text:p text:style-name="P27" loext:marker-style-name="T17"><text:span text:style-name="T17">When the upload is complete, a new dialog is displayed with a QCode bar code and the option to send an email to your device. The QCode can be read in with your iPhone or iPad which will trigger an installation of the DeployGate app using your app profile. </text:span><text:span text:style-name="T17"/></text:p>
      <text:p text:style-name="P27" loext:marker-style-name="T17"><text:span text:style-name="T17">Alternatively, you can enter an email address at this point, which you would also open on the iPhone to install the DeployGate app with the correct profile. Or you can simply go on and add users and devices later.</text:span><text:span text:style-name="T17"/></text:p>
      <text:p text:style-name="P3" loext:marker-style-name="T17"><draw:frame draw:style-name="fr1" draw:name="image38.png" text:anchor-type="as-char" svg:width="4.2965in" svg:height="2.3465in"><draw:image xlink:href="Pictures/10000001000001FD00000116E6E59501.png" xlink:type="simple" xlink:show="embed" xlink:actuate="onLoad" draw:mime-type="image/png"/></draw:frame></text:p>
      <text:p text:style-name="P110" loext:marker-style-name="T17"><text:span text:style-name="T17">After this, the screen that is displayed is what you will normally see when you login. The screen has an entry for each app that you have uploaded. It has an </text:span><text:span text:style-name="T46">Upload App</text:span><text:span text:style-name="T17"> button that can be used to upload new versions of the same app or to upload a new app.<text:line-break/></text:span></text:p>
      <text:p text:style-name="P3" loext:marker-style-name="T17"><draw:frame draw:style-name="fr1" draw:name="image48.png" text:anchor-type="as-char" svg:width="5.339in" svg:height="3.1138in"><draw:image xlink:href="Pictures/10000001000001FF0000012AB712E6CB.png" xlink:type="simple" xlink:show="embed" xlink:actuate="onLoad" draw:mime-type="image/png"/></draw:frame></text:p>
      <text:h text:style-name="P29" text:outline-level="2"><text:bookmark text:name="_707sllp4p5x6"/><text:bookmark-start text:name="_Toc228353926"/><text:bookmark-start text:name="_Toc475369925"/>Registering a Device<text:bookmark-end text:name="_Toc228353926"/><text:bookmark-end text:name="_Toc475369925"/></text:h>
      <text:p text:style-name="Standard" loext:marker-style-name="T17"><text:span text:style-name="T17">If the iOS device was not originally in the mobile provisioning profile and if the device has not been previously registered in your Apple Developer account, you need to add it to both. There is a method for manually doing this, but DeployGate provides a way of simplifying the process so that you don’t need to go and look up UDID for the device.</text:span><text:span text:style-name="T17"/></text:p>
      <text:p text:style-name="P22" loext:marker-style-name="T17"><text:span text:style-name="T17">First, try to install the app using the method described above. You will not be able to install it because the UDID is not registered for the app. However this will result in the device being registered in DeployGate which allows the following steps.</text:span><text:span text:style-name="T17"/></text:p>
      <text:p text:style-name="P22" loext:marker-style-name="T17"><text:span text:style-name="T17">After attempting to install the app, re-enter DeployGate in your browser and open the entry for your app. As you can see in the screen below, it will show that a new UDID has been registered for the device. Press the </text:span><text:span text:style-name="T46">Options</text:span><text:span text:style-name="T17"> button below and select the </text:span><text:span text:style-name="T46">Package Archive</text:span><text:span text:style-name="T17"> option. </text:span><text:span text:style-name="T57">Next click the little tag symbol inside the app box to open the UDID list.</text:span></text:p>
      <text:p text:style-name="P17" loext:marker-style-name="T17"/>
      <text:p text:style-name="P17" loext:marker-style-name="T17"/>
      <text:p text:style-name="Standard" loext:marker-style-name="T17"><draw:frame draw:style-name="fr1" draw:name="image47.png" text:anchor-type="as-char" svg:width="6.5in" svg:height="3.5417in"><draw:image xlink:href="Pictures/10000001000002700000015437DAEF84.png" xlink:type="simple" xlink:show="embed" xlink:actuate="onLoad" draw:mime-type="image/png"/></draw:frame></text:p>
      <text:p text:style-name="P111" loext:marker-style-name="T17"><text:span text:style-name="T17">The next screen shows a list of the devices that have been observed by DeployGate or that were included in the provisioning profile. Your new device entry will show up on the screen with a </text:span><text:span text:style-name="T46">Not Exist</text:span><text:span text:style-name="T17"> entry. Make sure that the entry for the new device is checked and then press the </text:span><text:span text:style-name="T46">Export Selected UDIDs</text:span><text:span text:style-name="T17"> button. This will create a file “multiple-device-upload-ios.txt” that can be used on the Apple Developer website to add these devices to the mobile provisioning file.</text:span></text:p>
      <text:p text:style-name="P17" loext:marker-style-name="T17"/>
      <text:p text:style-name="Standard" loext:marker-style-name="T17"><draw:frame draw:style-name="fr1" draw:name="image21.png" text:anchor-type="as-char" svg:width="5.9425in" svg:height="2.8571in"><draw:image xlink:href="Pictures/100000010000023B000001124673708A.png" xlink:type="simple" xlink:show="embed" xlink:actuate="onLoad" draw:mime-type="image/png"/></draw:frame></text:p>
      <text:p text:style-name="P112" loext:marker-style-name="T17"><text:span text:style-name="T17">After logging in to Apple Developer, click on </text:span><text:span text:style-name="T46">Certificates, IDs and Profiles</text:span><text:span text:style-name="T17">. Press the </text:span><text:span text:style-name="T46">All</text:span><text:span text:style-name="T17"> selection under </text:span><text:span text:style-name="T46">Devices</text:span><text:span text:style-name="T17"> as shown in the illustration below and then select </text:span><text:span text:style-name="T46">Register Multiple Devices</text:span><text:span text:style-name="T17">. Then press the </text:span><text:span text:style-name="T46">Choose File</text:span><text:span text:style-name="T17"> button.</text:span></text:p>
      <text:p text:style-name="Standard" loext:marker-style-name="T17"><draw:frame draw:style-name="fr1" draw:name="image23.png" text:anchor-type="as-char" svg:width="6.172in" svg:height="5.2126in"><draw:image xlink:href="Pictures/1000000100000251000001F5E4EAB25B.png" xlink:type="simple" xlink:show="embed" xlink:actuate="onLoad" draw:mime-type="image/png"/></draw:frame></text:p>
      <text:p text:style-name="P111" loext:marker-style-name="T17"><text:span text:style-name="T17">Find the multiple-device-upload-ios.txt file that was created by DeployGate and then press </text:span><text:span text:style-name="T46">Continue</text:span><text:span text:style-name="T17">.</text:span></text:p>
      <text:p text:style-name="Standard" loext:marker-style-name="T17"><draw:frame draw:style-name="fr1" draw:name="image17.png" text:anchor-type="as-char" svg:width="6.1098in" svg:height="5.1008in"><draw:image xlink:href="Pictures/100000010000024B000001EADDEE00E3.png" xlink:type="simple" xlink:show="embed" xlink:actuate="onLoad" draw:mime-type="image/png"/></draw:frame></text:p>
      <text:p text:style-name="P17" loext:marker-style-name="T17"/>
      <text:p text:style-name="P113" loext:marker-style-name="T17"><text:span text:style-name="T17">A review screen will be displayed which should list the name to be assigned to the device along with the UDID associated with the device. Review to ensure this is correct and press </text:span><text:span text:style-name="T46">Register</text:span><text:span text:style-name="T17">.</text:span></text:p>
      <text:p text:style-name="Standard" loext:marker-style-name="T17"><draw:frame draw:style-name="fr1" draw:name="image15.png" text:anchor-type="as-char" svg:width="6.2244in" svg:height="5.6953in"><draw:image xlink:href="Pictures/10000001000003FC000003A53BB51DFC.png" xlink:type="simple" xlink:show="embed" xlink:actuate="onLoad" draw:mime-type="image/png"/></draw:frame></text:p>
      <text:p text:style-name="P17" loext:marker-style-name="T17"/>
      <text:p text:style-name="P113" loext:marker-style-name="T17"><text:span text:style-name="T17">At this point your device has been registered to your Apple Developer account. <text:s/>You now need to add the device to the provisioning profile for your app. <text:s/>Select the provisioning profile being used to test the app. Make sure your test device is checked in the list of devices at the bottom of the screen. Press </text:span><text:span text:style-name="T46">Generate</text:span><text:span text:style-name="T17">. <text:s/></text:span></text:p>
      <text:p text:style-name="P60" loext:marker-style-name="T17"><text:span text:style-name="T46">Note:</text:span><text:span text:style-name="T17"> For the purposes of testing with DeployGate, an AdHoc type of provision profile must be created and used. If you have not selected AdHoc, the list of devices will not be available on the screen.</text:span></text:p>
      <text:p text:style-name="P3" loext:marker-style-name="T17"><draw:frame draw:style-name="fr1" draw:name="image18.png" text:anchor-type="as-char" svg:width="5.7453in" svg:height="4.9929in"><draw:image xlink:href="Pictures/1000000100000228000001DFCE146D18.png" xlink:type="simple" xlink:show="embed" xlink:actuate="onLoad" draw:mime-type="image/png"/></draw:frame></text:p>
      <text:p text:style-name="P17" loext:marker-style-name="T17"/>
      <text:p text:style-name="P111" loext:marker-style-name="T17"><text:span text:style-name="T17">The following screen will display:</text:span><text:span text:style-name="T17"/></text:p>
      <text:p text:style-name="P3" loext:marker-style-name="T17"><draw:frame draw:style-name="fr1" draw:name="image33.png" text:anchor-type="as-char" svg:width="5.7035in" svg:height="4.7965in"><draw:image xlink:href="Pictures/1000000100000224000001CEC2A72D79.png" xlink:type="simple" xlink:show="embed" xlink:actuate="onLoad" draw:mime-type="image/png"/></draw:frame></text:p>
      <text:p text:style-name="P111" loext:marker-style-name="T17"><text:span text:style-name="T17">Now you can download the new provisioning profile that has been generated.</text:span><text:span text:style-name="T17"/></text:p>
      <text:p text:style-name="P111" loext:marker-style-name="T17"><text:span text:style-name="T17">Next you need to rebuild the iOS app using the new profile and upload it to DeployGate again. This time when you attempt to install it, the </text:span><text:span text:style-name="T46">Install</text:span><text:span text:style-name="T17"> button should be enabled and will allow you to install your app.</text:span></text:p>
      <text:h text:style-name="Heading_20_1" text:outline-level="1"><text:bookmark-start text:name="_Toc228353927"/>Uploading an iOS App to Apple App Store<text:bookmark-end text:name="_Toc228353927"/></text:h>
      <text:p text:style-name="Standard" loext:marker-style-name="T37"><text:span text:style-name="T22">Before attempting to upload the app, you will need to create an entry in App Store Connect (</text:span><text:a xlink:type="simple" xlink:href="https://appstoreconnect.apple.com/" text:style-name="Internet_20_link" text:visited-style-name="Visited_20_Internet_20_Link"><text:span text:style-name="Internet_20_link"><text:span text:style-name="T22">https://appstoreconnect.apple.com</text:span></text:span></text:a><text:span text:style-name="T22">). <text:s/></text:span></text:p>
      <text:p text:style-name="P106" loext:marker-style-name="T22"/>
      <text:p text:style-name="Standard" loext:marker-style-name="T22"><text:span text:style-name="T22">Select the appropriate distribution </text:span><text:span text:style-name="T58">Signing Identity</text:span><text:span text:style-name="T22"> and </text:span><text:span text:style-name="T58">App Store</text:span><text:span text:style-name="T22"> provisioning profile on the </text:span><text:span text:style-name="T58">Signing (iOS)</text:span><text:span text:style-name="T22"> tab and click Build iOS App. This will create an IPA file in the IPA Output Folder.</text:span></text:p>
      <text:p text:style-name="P106" loext:marker-style-name="T22"/>
      <text:p text:style-name="Standard" loext:marker-style-name="T22"><text:span text:style-name="T22">Launch </text:span><text:span text:style-name="T58">Transporter</text:span><text:span text:style-name="T22"> and click </text:span><text:span text:style-name="T58">Sign In</text:span><text:span text:style-name="T22"> using the Apple ID for your Apple Developer Account. Drag and drop the IPA file from the IPA Output Folder to Transporter. Once the app is added to Transporter, click on the </text:span><text:span text:style-name="T58">Deliver</text:span><text:span text:style-name="T22"> button. After it is uploaded, you can click on the </text:span><text:span text:style-name="T58">…</text:span><text:span text:style-name="T22"> button and select </text:span><text:span text:style-name="T58">View in App Store Connect</text:span><text:span text:style-name="T22">. Selecting the Activity tab will show the status of the processing of the upload.</text:span></text:p>
      <text:h text:style-name="Heading_20_1" text:outline-level="1"><text:bookmark-start text:name="_Toc31914052"/><text:bookmark-start text:name="_Toc228353928"/>Using <text:bookmark-end text:name="_Toc31914052"/>Test Flight to Test an iOS App<text:bookmark-end text:name="_Toc228353928"/></text:h>
      <text:p text:style-name="Standard" loext:marker-style-name="T22"><text:span text:style-name="T22">It will take a little bit of time (around 20 minutes) for the app to be processed in App Store Connect. You will receive an email when the app is done processing. Switching to the Test Flight tab in App Store Connect, you will see that app is Missing Compliance.</text:span><text:span text:style-name="T22"/></text:p>
      <text:p text:style-name="P3" loext:marker-style-name="T22"><draw:frame draw:style-name="fr1" draw:name="Picture 45" text:anchor-type="as-char" svg:width="4.4972in" svg:height="1.3516in"><draw:image xlink:href="Pictures/10000001000002070000009C808BEE25.png" xlink:type="simple" xlink:show="embed" xlink:actuate="onLoad" draw:mime-type="image/png"/></draw:frame></text:p>
      <text:p text:style-name="Standard" loext:marker-style-name="T22"><text:span text:style-name="T22">Click on the build number and you will be taken to a page where you can click on </text:span><text:span text:style-name="T58">Provide Export Compliance Information</text:span><text:span text:style-name="T22">. The app uses an encryption algorithm to protect the text of the app. </text:span></text:p>
      <text:p text:style-name="P106" loext:marker-style-name="T22"/>
      <text:p text:style-name="Standard" loext:marker-style-name="T22"><text:span text:style-name="T22">Click </text:span><text:span text:style-name="T58">Yes</text:span><text:span text:style-name="T22"> to the first dialog that the app uses encryption and then click </text:span><text:span text:style-name="T58">Next</text:span><text:span text:style-name="T22">.</text:span></text:p>
      <text:p text:style-name="P3" loext:marker-style-name="T22"><draw:frame draw:style-name="fr1" draw:name="Picture 46" text:anchor-type="as-char" svg:width="4.4937in" svg:height="1.3071in"><draw:image xlink:href="Pictures/1000000100000234000000A4F72C7BA1.png" xlink:type="simple" xlink:show="embed" xlink:actuate="onLoad" draw:mime-type="image/png"/></draw:frame></text:p>
      <text:p text:style-name="Standard" loext:marker-style-name="T22"><text:span text:style-name="T22">Click </text:span><text:span text:style-name="T58">Yes</text:span><text:span text:style-name="T22"> to the second dialog to indicate that the app qualifies for an exemption due to </text:span><text:span text:style-name="T58">(b) Limited to intellectual property and copyright protection</text:span><text:span text:style-name="T22"> and then click </text:span><text:span text:style-name="T58">Start Internal Testing</text:span><text:span text:style-name="T22">.</text:span></text:p>
      <text:p text:style-name="P3" loext:marker-style-name="T22"><draw:frame draw:style-name="fr1" draw:name="Picture 47" text:anchor-type="as-char" svg:width="4.5102in" svg:height="3.4972in"><draw:image xlink:href="Pictures/1000000100000228000001ACDD465328.png" xlink:type="simple" xlink:show="embed" xlink:actuate="onLoad" draw:mime-type="image/png"/></draw:frame></text:p>
      <text:p text:style-name="Standard" loext:marker-style-name="T24"><text:span text:style-name="T22">You can add App Store Connect users (normally users in your organization) to test the app. There is a link at the left for </text:span><text:span text:style-name="T58">Add External Testers</text:span><text:span text:style-name="T22">. This will require the app to go through Beta App Review.</text:span></text:p>
      <text:h text:style-name="Heading_20_1" text:outline-level="1"><text:bookmark text:name="_2tg0gs5dyul6"/><text:bookmark-start text:name="_Toc228353929"/><text:bookmark-start text:name="_Toc475369926"/>Building from Terminal<text:bookmark-end text:name="_Toc228353929"/><text:bookmark-end text:name="_Toc475369926"/></text:h>
      <text:p text:style-name="P22" loext:marker-style-name="T25"><text:span text:style-name="T25">Dictionary App Builder </text:span><text:bookmark-start text:name="OLE_LINK3"/><text:span text:style-name="T25">has a command line interface which allows you to create a new app and build it or load an existing app and build it. <text:s/></text:span><text:span text:style-name="T25"/></text:p>
      <text:h text:style-name="P29" text:outline-level="2"><text:bookmark-start text:name="_Toc228353930"/>Installing Command Line Interface<text:bookmark-end text:name="_Toc228353930"/></text:h>
      <text:p text:style-name="Standard" loext:marker-style-name="T37"><text:span text:style-name="T17">Choose the </text:span><text:span text:style-name="T46">Tools</text:span><text:span text:style-name="T17"> </text:span><text:span text:style-name="T48"></text:span><text:span text:style-name="T17"> </text:span><text:span text:style-name="T46">Install dab command in PATH</text:span><text:span text:style-name="T17"> </text:span><text:span text:style-name="T37">menu item to enable the use of the command line interface. <text:s/>You will be prompted to enter your login password to install the command.</text:span></text:p>
      <text:h text:style-name="P29" text:outline-level="2"><text:bookmark-start text:name="_Toc228353931"/>Command Line Interface Options<text:bookmark-end text:name="_Toc228353931"/></text:h>
      <text:p text:style-name="P22" loext:marker-style-name="T25"><text:bookmark-start text:name="OLE_LINK1"/><text:span text:style-name="T25">Run the following command to run the Dictionary App Builder application followed by a series of options described below.</text:span><text:bookmark-end text:name="OLE_LINK1"/><text:span text:style-name="T25"> <text:s/>The command is:</text:span><text:span text:style-name="T25"/></text:p>
      <text:p text:style-name="P22" loext:marker-style-name="T25"><text:span text:style-name="T25">dab</text:span><text:bookmark-end text:name="OLE_LINK3"/><text:span text:style-name="T25"/></text:p>
      <text:p text:style-name="P114" loext:marker-style-name="T25"><text:span text:style-name="T25">The available parameters are:</text:span><text:span text:style-name="T25"/></text:p>
      <text:p text:style-name="P22" loext:marker-style-name="T25"><text:span text:style-name="T25"><text:s/></text:span><text:span text:style-name="T25"/></text:p>
      <table:table table:name="Table3" table:style-name="Table3">
        <table:table-column table:style-name="Table3.A"/>
        <table:table-column table:style-name="Table3.B"/>
        <table:table-row table:style-name="Table3.1">
          <table:table-cell table:style-name="Table3.A1" office:value-type="string">
            <text:p text:style-name="P115" loext:marker-style-name="T25"><text:span text:style-name="T59">Option</text:span><text:span text:style-name="T59"/></text:p>
          </table:table-cell>
          <table:table-cell table:style-name="Table3.B1" office:value-type="string">
            <text:p text:style-name="P115" loext:marker-style-name="T25"><text:span text:style-name="T59">Description</text:span><text:span text:style-name="T59"/></text:p>
          </table:table-cell>
        </table:table-row>
        <table:table-row table:style-name="Table3.1">
          <table:table-cell table:style-name="Table3.A2" office:value-type="string">
            <text:p text:style-name="P63" loext:marker-style-name="T10"><text:span text:style-name="T60">-new</text:span><text:span text:style-name="T60"/></text:p>
          </table:table-cell>
          <table:table-cell table:style-name="Table3.B2" office:value-type="string">
            <text:p text:style-name="P63" loext:marker-style-name="T10"><text:span text:style-name="T10">Create a new app project</text:span><text:span text:style-name="T10"/></text:p>
          </table:table-cell>
        </table:table-row>
        <table:table-row table:style-name="Table3.1">
          <table:table-cell table:style-name="Table3.A2" office:value-type="string">
            <text:p text:style-name="P63" loext:marker-style-name="T10"><text:span text:style-name="T60">-load &lt;project&gt;</text:span><text:span text:style-name="T60"/></text:p>
          </table:table-cell>
          <table:table-cell table:style-name="Table3.B2" office:value-type="string">
            <text:p text:style-name="P63" loext:marker-style-name="T10"><text:span text:style-name="T10">Load an existing app project</text:span><text:span text:style-name="T10"/></text:p>
          </table:table-cell>
        </table:table-row>
        <table:table-row table:style-name="Table3.1">
          <table:table-cell table:style-name="Table3.A2" office:value-type="string">
            <text:p text:style-name="P63" loext:marker-style-name="T10"><text:span text:style-name="T60">-build</text:span><text:span text:style-name="T60"/></text:p>
          </table:table-cell>
          <table:table-cell table:style-name="Table3.B2" office:value-type="string">
            <text:p text:style-name="P63" loext:marker-style-name="T10"><text:span text:style-name="T10">Build app project (use with either -new or -load)</text:span><text:span text:style-name="T10"/></text:p>
          </table:table-cell>
        </table:table-row>
        <table:table-row table:style-name="Table3.1">
          <table:table-cell table:style-name="Table3.A2" office:value-type="string">
            <text:p text:style-name="P63" loext:marker-style-name="T10"><text:span text:style-name="T60">-no-save</text:span></text:p>
          </table:table-cell>
          <table:table-cell table:style-name="Table3.B2" office:value-type="string">
            <text:p text:style-name="P63" loext:marker-style-name="T10"><text:span text:style-name="T10">Do not save changes to app (use with -load)</text:span><text:span text:style-name="T10"/></text:p>
          </table:table-cell>
        </table:table-row>
        <table:table-row table:style-name="Table3.1">
          <table:table-cell table:style-name="Table3.A2" office:value-type="string">
            <text:p text:style-name="P63" loext:marker-style-name="T10"><text:span text:style-name="T60">-resign</text:span><text:span text:style-name="T60"/></text:p>
          </table:table-cell>
          <table:table-cell table:style-name="Table3.B2" office:value-type="string">
            <text:p text:style-name="P63" loext:marker-style-name="T10"><text:span text:style-name="T10">Resign iOS Template App (use with either -new or -load)</text:span><text:span text:style-name="T10"/></text:p>
          </table:table-cell>
        </table:table-row>
        <table:table-row table:style-name="Table3.1">
          <table:table-cell table:style-name="Table3.A2" office:value-type="string">
            <text:p text:style-name="P63" loext:marker-style-name="T10"><text:span text:style-name="T60"/></text:p>
          </table:table-cell>
          <table:table-cell table:style-name="Table3.B2" office:value-type="string">
            <text:p text:style-name="P63" loext:marker-style-name="T10"><text:span text:style-name="T10"/></text:p>
          </table:table-cell>
        </table:table-row>
        <table:table-row table:style-name="Table3.1">
          <table:table-cell table:style-name="Table3.A2" office:value-type="string">
            <text:p text:style-name="P63" loext:marker-style-name="T10"><text:span text:style-name="T60">-?</text:span><text:span text:style-name="T60"/></text:p>
          </table:table-cell>
          <table:table-cell table:style-name="Table3.B2" office:value-type="string">
            <text:p text:style-name="P63" loext:marker-style-name="T10"><text:span text:style-name="T10">Show command line help</text:span><text:span text:style-name="T10"/></text:p>
          </table:table-cell>
        </table:table-row>
        <table:table-row table:style-name="Table3.1">
          <table:table-cell table:style-name="Table3.A2" office:value-type="string">
            <text:p text:style-name="P63" loext:marker-style-name="T10"><text:span text:style-name="T60"/></text:p>
          </table:table-cell>
          <table:table-cell table:style-name="Table3.B2" office:value-type="string">
            <text:p text:style-name="P63" loext:marker-style-name="T10"><text:span text:style-name="T10"/></text:p>
          </table:table-cell>
        </table:table-row>
        <table:table-row table:style-name="Table3.1">
          <table:table-cell table:style-name="Table3.A2" office:value-type="string">
            <text:p text:style-name="P63" loext:marker-style-name="T10"><text:span text:style-name="T60">-n &lt;app-name&gt;</text:span></text:p>
          </table:table-cell>
          <table:table-cell table:style-name="Table3.B2" office:value-type="string">
            <text:p text:style-name="P63" loext:marker-style-name="T10"><text:span text:style-name="T10">Set app name.</text:span><text:span text:style-name="T10"/></text:p>
            <text:p text:style-name="P63" loext:marker-style-name="T10"><text:span text:style-name="T10">Enclose the name in "double quotes" if it contains spaces.</text:span><text:span text:style-name="T10"/></text:p>
          </table:table-cell>
        </table:table-row>
        <table:table-row table:style-name="Table3.1">
          <table:table-cell table:style-name="Table3.A2" office:value-type="string">
            <text:p text:style-name="P63" loext:marker-style-name="T10"><text:span text:style-name="T60">-p &lt;package-name&gt;</text:span></text:p>
          </table:table-cell>
          <table:table-cell table:style-name="Table3.B2" office:value-type="string">
            <text:p text:style-name="P63" loext:marker-style-name="T10"><text:span text:style-name="T10">Set package name, e.g. com.myorg.language.appname</text:span><text:span text:style-name="T10"/></text:p>
          </table:table-cell>
        </table:table-row>
        <table:table-row table:style-name="Table3.1">
          <table:table-cell table:style-name="Table3.A2" office:value-type="string">
            <text:p text:style-name="P63" loext:marker-style-name="T10"><text:span text:style-name="T60">-b &lt;filename&gt;</text:span></text:p>
          </table:table-cell>
          <table:table-cell table:style-name="Table3.B2" office:value-type="string">
            <text:p text:style-name="P63" loext:marker-style-name="T10"><text:span text:style-name="T10">Add book or bundle file. This could be a USFM file or a zipped set of USFM files. It could also be a Digital Bible Library text release bundle.</text:span><text:span text:style-name="T10"/></text:p>
          </table:table-cell>
        </table:table-row>
        <table:table-row table:style-name="Table3.1">
          <table:table-cell table:style-name="Table3.A2" office:value-type="string">
            <text:p text:style-name="P63" loext:marker-style-name="T10"><text:span text:style-name="T60">-i &lt;filename&gt;</text:span></text:p>
          </table:table-cell>
          <table:table-cell table:style-name="Table3.B2" office:value-type="string">
            <text:p text:style-name="P63" loext:marker-style-name="T10"><text:span text:style-name="T10">Include additional parameters file.</text:span><text:span text:style-name="T10"/></text:p>
            <text:p text:style-name="P63" loext:marker-style-name="T10"><text:span text:style-name="T10">Use the full path of the file and enclose it in "double quotes" if there is a space in the path.</text:span><text:span text:style-name="T10"/></text:p>
          </table:table-cell>
        </table:table-row>
        <table:table-row table:style-name="Table3.1">
          <table:table-cell table:style-name="Table3.A2" office:value-type="string">
            <text:p text:style-name="P63" loext:marker-style-name="T10"><text:span text:style-name="T60"/></text:p>
          </table:table-cell>
          <table:table-cell table:style-name="Table3.B2" office:value-type="string">
            <text:p text:style-name="P63" loext:marker-style-name="T10"><text:span text:style-name="T10"/></text:p>
          </table:table-cell>
        </table:table-row>
        <table:table-row table:style-name="Table3.1">
          <table:table-cell table:style-name="Table3.A2" office:value-type="string">
            <text:p text:style-name="P63" loext:marker-style-name="T10"><text:span text:style-name="T60">-a &lt;filename&gt;</text:span></text:p>
          </table:table-cell>
          <table:table-cell table:style-name="Table3.B2" office:value-type="string">
            <text:p text:style-name="P63" loext:marker-style-name="T10"><text:span text:style-name="T10">Set about box text, contained in text file.</text:span><text:span text:style-name="T10"/></text:p>
            <text:p text:style-name="P63" loext:marker-style-name="T10"><text:span text:style-name="T10">Use the full path of the file and enclose it in "double quotes" if there is a space in the path.</text:span><text:span text:style-name="T10"/></text:p>
          </table:table-cell>
        </table:table-row>
        <table:table-row table:style-name="Table3.1">
          <table:table-cell table:style-name="Table3.A2" office:value-type="string">
            <text:p text:style-name="P63" loext:marker-style-name="T10"><text:span text:style-name="T60">-f &lt;fontname&gt;</text:span></text:p>
          </table:table-cell>
          <table:table-cell table:style-name="Table3.B2" office:value-type="string">
            <text:p text:style-name="P63" loext:marker-style-name="T10"><text:span text:style-name="T10">Set font name or filename, e.g. "Charis SIL Compact", "c:\fonts\myfont.ttf"</text:span><text:span text:style-name="T10"/></text:p>
            <text:p text:style-name="P63" loext:marker-style-name="T10"><text:span text:style-name="T10">The font name must be one of the items in the list of fonts in the New App wizard. For other fonts, specify the full path to the font filename.</text:span><text:span text:style-name="T10"/></text:p>
          </table:table-cell>
        </table:table-row>
        <table:table-row table:style-name="Table3.1">
          <table:table-cell table:style-name="Table3.A2" office:value-type="string">
            <text:p text:style-name="P63" loext:marker-style-name="T10"><text:span text:style-name="T60">-g</text:span></text:p>
          </table:table-cell>
          <table:table-cell table:style-name="Table3.B2" office:value-type="string">
            <text:p text:style-name="P63" loext:marker-style-name="T10"><text:span text:style-name="T10">Use Grandroid</text:span><text:span text:style-name="T10"/></text:p>
          </table:table-cell>
        </table:table-row>
        <table:table-row table:style-name="Table3.1">
          <table:table-cell table:style-name="Table3.A2" office:value-type="string">
            <text:p text:style-name="P63" loext:marker-style-name="T10"><text:span text:style-name="T60">-ic &lt;filename&gt;</text:span></text:p>
          </table:table-cell>
          <table:table-cell table:style-name="Table3.B2" office:value-type="string">
            <text:p text:style-name="P63" loext:marker-style-name="T10"><text:span text:style-name="T10">Add launcher icon (one or more .png files).</text:span><text:span text:style-name="T10"/></text:p>
            <text:p text:style-name="P63" loext:marker-style-name="T10"><text:span text:style-name="T10">Use the full path of the files and enclose them in "double quotes" if there is a space in the path.</text:span><text:span text:style-name="T10"/></text:p>
          </table:table-cell>
        </table:table-row>
        <table:table-row table:style-name="Table3.1">
          <table:table-cell table:style-name="Table3.A2" office:value-type="string">
            <text:p text:style-name="P63" loext:marker-style-name="T10"><text:span text:style-name="T60">-l &lt;lang-code&gt;</text:span></text:p>
          </table:table-cell>
          <table:table-cell table:style-name="Table3.B2" office:value-type="string">
            <text:p text:style-name="P63" loext:marker-style-name="T10"><text:span text:style-name="T10">Set language for menu items and settings, e.g. en, fr, es</text:span><text:span text:style-name="T10"/></text:p>
          </table:table-cell>
        </table:table-row>
        <table:table-row table:style-name="Table3.1">
          <table:table-cell table:style-name="Table3.A2" office:value-type="string">
            <text:p text:style-name="P63" loext:marker-style-name="T10"><text:span text:style-name="T60">-ft &lt;feature=value&gt;</text:span><text:span text:style-name="T60"/></text:p>
          </table:table-cell>
          <table:table-cell table:style-name="Table3.B2" office:value-type="string">
            <text:p text:style-name="P63" loext:marker-style-name="T10"><text:span text:style-name="T10">Set a feature, e.g. book-select=grid</text:span><text:span text:style-name="T10"/></text:p>
          </table:table-cell>
        </table:table-row>
        <table:table-row table:style-name="Table3.1">
          <table:table-cell table:style-name="Table3.A2" office:value-type="string">
            <text:p text:style-name="P63" loext:marker-style-name="T10"><text:span text:style-name="T60"/></text:p>
          </table:table-cell>
          <table:table-cell table:style-name="Table3.B2" office:value-type="string">
            <text:p text:style-name="P63" loext:marker-style-name="T10"><text:span text:style-name="T10"/></text:p>
          </table:table-cell>
        </table:table-row>
        <table:table-row table:style-name="Table3.1">
          <table:table-cell table:style-name="Table3.A2" office:value-type="string">
            <text:p text:style-name="P63" loext:marker-style-name="T10"><text:span text:style-name="T60">-vc &lt;integer&gt;</text:span></text:p>
          </table:table-cell>
          <table:table-cell table:style-name="Table3.B2" office:value-type="string">
            <text:p text:style-name="P63" loext:marker-style-name="T10"><text:span text:style-name="T10">Set version code, e.g. 1, 2, 3, or +1 to increment the current version code by 1.</text:span><text:span text:style-name="T10"/></text:p>
          </table:table-cell>
        </table:table-row>
        <table:table-row table:style-name="Table3.1">
          <table:table-cell table:style-name="Table3.A2" office:value-type="string">
            <text:p text:style-name="P63" loext:marker-style-name="T10"><text:span text:style-name="T60">-vn &lt;string&gt;</text:span></text:p>
          </table:table-cell>
          <table:table-cell table:style-name="Table3.B2" office:value-type="string">
            <text:p text:style-name="P63" loext:marker-style-name="T10"><text:span text:style-name="T10">Set version name, e.g. 1.0, 2.1.4, or use +1, +0.1, +0.0.1 to increment the current value.</text:span><text:span text:style-name="T10"/></text:p>
          </table:table-cell>
        </table:table-row>
        <table:table-row table:style-name="Table3.1">
          <table:table-cell table:style-name="Table3.A2" office:value-type="string">
            <text:p text:style-name="P63" loext:marker-style-name="T10"><text:span text:style-name="T60"/></text:p>
          </table:table-cell>
          <table:table-cell table:style-name="Table3.B2" office:value-type="string">
            <text:p text:style-name="P63" loext:marker-style-name="T10"><text:span text:style-name="T10"/></text:p>
          </table:table-cell>
        </table:table-row>
        <table:table-row table:style-name="Table3.1">
          <table:table-cell table:style-name="Table3.A2" office:value-type="string">
            <text:p text:style-name="P63" loext:marker-style-name="T10"><text:span text:style-name="T60">-ks &lt;filename&gt;</text:span></text:p>
          </table:table-cell>
          <table:table-cell table:style-name="Table3.B2" office:value-type="string">
            <text:p text:style-name="P63" loext:marker-style-name="T10"><text:span text:style-name="T10">Set keystore filename.</text:span><text:span text:style-name="T10"/></text:p>
            <text:p text:style-name="P63" loext:marker-style-name="T10"><text:span text:style-name="T10">Use the full path of the file and enclose it in "double quotes" if there is a space in the path.</text:span><text:span text:style-name="T10"/></text:p>
          </table:table-cell>
        </table:table-row>
        <table:table-row table:style-name="Table3.1">
          <table:table-cell table:style-name="Table3.A2" office:value-type="string">
            <text:p text:style-name="P63" loext:marker-style-name="T10"><text:span text:style-name="T60">-ksp &lt;password&gt;</text:span></text:p>
          </table:table-cell>
          <table:table-cell table:style-name="Table3.B2" office:value-type="string">
            <text:p text:style-name="P63" loext:marker-style-name="T10"><text:span text:style-name="T10">Set keystore password</text:span><text:span text:style-name="T10"/></text:p>
          </table:table-cell>
        </table:table-row>
        <table:table-row table:style-name="Table3.1">
          <table:table-cell table:style-name="Table3.A2" office:value-type="string">
            <text:p text:style-name="P63" loext:marker-style-name="T10"><text:span text:style-name="T60">-ka &lt;alias&gt;</text:span></text:p>
          </table:table-cell>
          <table:table-cell table:style-name="Table3.B2" office:value-type="string">
            <text:p text:style-name="P63" loext:marker-style-name="T10"><text:span text:style-name="T10">Set key alias</text:span><text:span text:style-name="T10"/></text:p>
          </table:table-cell>
        </table:table-row>
        <table:table-row table:style-name="Table3.1">
          <table:table-cell table:style-name="Table3.A2" office:value-type="string">
            <text:p text:style-name="P63" loext:marker-style-name="T10"><text:span text:style-name="T60">-kap &lt;password&gt;</text:span></text:p>
          </table:table-cell>
          <table:table-cell table:style-name="Table3.B2" office:value-type="string">
            <text:p text:style-name="P63" loext:marker-style-name="T10"><text:span text:style-name="T10">Set key alias password</text:span><text:span text:style-name="T10"/></text:p>
          </table:table-cell>
        </table:table-row>
        <table:table-row table:style-name="Table3.1">
          <table:table-cell table:style-name="Table3.A2" office:value-type="string">
            <text:p text:style-name="P63" loext:marker-style-name="T10"><text:span text:style-name="T60"/></text:p>
          </table:table-cell>
          <table:table-cell table:style-name="Table3.B2" office:value-type="string">
            <text:p text:style-name="P63" loext:marker-style-name="T10"><text:span text:style-name="T10"/></text:p>
          </table:table-cell>
        </table:table-row>
        <table:table-row table:style-name="Table3.1">
          <table:table-cell table:style-name="Table3.A2" office:value-type="string">
            <text:p text:style-name="P63" loext:marker-style-name="T10"><text:span text:style-name="T60">-fp &lt;folder=path&gt;</text:span></text:p>
          </table:table-cell>
          <table:table-cell table:style-name="Table3.B2" office:value-type="string">
            <text:p text:style-name="P63" loext:marker-style-name="T10"><text:span text:style-name="T10">Set a folder path, e.g. "app.builder=/Developer/Dictionary App Builder".</text:span><text:span text:style-name="T10"/></text:p>
          </table:table-cell>
        </table:table-row>
        <table:table-row table:style-name="Table3.1">
          <table:table-cell table:style-name="Table3.A2" office:value-type="string">
            <text:p text:style-name="P63" loext:marker-style-name="T10"><text:span text:style-name="T60">-ta &lt;target-api&gt;</text:span></text:p>
          </table:table-cell>
          <table:table-cell table:style-name="Table3.B2" office:value-type="string">
            <text:p text:style-name="P63" loext:marker-style-name="T10"><text:span text:style-name="T10">Set Target API, e.g. 21 for Android 5.0, 22 for Android 5.1.</text:span><text:span text:style-name="T10"/></text:p>
          </table:table-cell>
        </table:table-row>
        <table:table-row table:style-name="Table3.1">
          <table:table-cell table:style-name="Table3.A2" office:value-type="string">
            <text:p text:style-name="P116" loext:marker-style-name="T10"/>
          </table:table-cell>
          <table:table-cell table:style-name="Table3.B2" office:value-type="string">
            <text:p text:style-name="P116" loext:marker-style-name="T10"/>
          </table:table-cell>
        </table:table-row>
        <table:table-row table:style-name="Table3.1">
          <table:table-cell table:style-name="Table3.A2" office:value-type="string">
            <text:p text:style-name="P63" loext:marker-style-name="T10"><text:span text:style-name="T60">-si &lt;signing identity&gt;</text:span><text:span text:style-name="T60"/></text:p>
          </table:table-cell>
          <table:table-cell table:style-name="Table3.B2" office:value-type="string">
            <text:p text:style-name="P63" loext:marker-style-name="T10"><text:span text:style-name="T10">Set Signing Identity to use for iOS Resigning</text:span><text:span text:style-name="T10"/></text:p>
          </table:table-cell>
        </table:table-row>
        <table:table-row table:style-name="Table3.1">
          <table:table-cell table:style-name="Table3.A2" office:value-type="string">
            <text:p text:style-name="P63" loext:marker-style-name="T10"><text:span text:style-name="T60">-pp &lt;provisioning profile&gt;</text:span><text:span text:style-name="T60"/></text:p>
          </table:table-cell>
          <table:table-cell table:style-name="Table3.B2" office:value-type="string">
            <text:p text:style-name="P63" loext:marker-style-name="T10"><text:span text:style-name="T10">Set full path to provisioning profile for iOS resigning</text:span><text:span text:style-name="T10"/></text:p>
          </table:table-cell>
        </table:table-row>
        <table:table-row table:style-name="Table3.1">
          <table:table-cell table:style-name="Table3.A2" office:value-type="string">
            <text:p text:style-name="P63" loext:marker-style-name="T10"><text:span text:style-name="T60">-bn &lt;integer&gt;</text:span><text:span text:style-name="T60"/></text:p>
          </table:table-cell>
          <table:table-cell table:style-name="Table3.B2" office:value-type="string">
            <text:p text:style-name="P63" loext:marker-style-name="T10"><text:span text:style-name="T10">Set build number for ipa file, e.g. 1, 2, 3, or +1 to increment by 1</text:span><text:span text:style-name="T10"/></text:p>
          </table:table-cell>
        </table:table-row>
        <table:table-row table:style-name="Table3.1">
          <table:table-cell table:style-name="Table3.A2" office:value-type="string">
            <text:p text:style-name="P63" loext:marker-style-name="T10"><text:span text:style-name="T60">-vs &lt;string&gt;</text:span><text:span text:style-name="T60"/></text:p>
          </table:table-cell>
          <table:table-cell table:style-name="Table3.B2" office:value-type="string">
            <text:p text:style-name="P63" loext:marker-style-name="T10"><text:span text:style-name="T10">Set version string for ipa file, e.g. 1.0, 2.1.4 or +1, +0.1, +0.0.1</text:span><text:span text:style-name="T10"/></text:p>
          </table:table-cell>
        </table:table-row>
      </table:table>
      <text:p text:style-name="P22" loext:marker-style-name="T4"><text:span text:style-name="T61"><text:s/></text:span><text:span text:style-name="T61"/></text:p>
      <text:p text:style-name="Standard" loext:marker-style-name="T4"><text:span text:style-name="T62">Examples:</text:span><text:span text:style-name="T62"/></text:p>
      <text:p text:style-name="P22" loext:marker-style-name="T63"><text:span text:style-name="T63">dab -load "Mali" -resign -bn "5" -vs "2.3.2" -si "iPhone Distribution: Summer Institute of Linguistics, Inc (SIL) (4YF5X97M4H) " -pp "/Users/builder/Documents/MobileProvision/AdHoc_org.wycliffe.app.mali.mobileprovision"</text:span><text:span text:style-name="T63"/></text:p>
      <text:p text:style-name="P99" loext:marker-style-name="T4"><text:bookmark-start text:name="OLE_LINK4"/></text:p>
      <text:p text:style-name="P22" loext:marker-style-name="T25"><text:span text:style-name="T25">Running the command line with no parameters will start the Dictionary App Builder UI from the command line.</text:span><text:bookmark-end text:name="OLE_LINK4"/><text:span text:style-name="T25"/></text:p>
      <text:p text:style-name="P99"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left" style:justify-single-word="false" fo:orphans="2" fo:widows="2" style:writing-mode="lr-tb"/>
      <style:text-properties style:font-name="Calibri" fo:font-family="Calibri" style:font-family-generic="swiss" style:font-pitch="variable"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line-height="100%" fo:keep-with-next="always"/>
      <style:text-properties style:use-window-font-color="true" loext:opacity="0%"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937in" fo:margin-top="0.25in" fo:margin-bottom="0.0417in" style:contextual-spacing="false" fo:line-height="100%" fo:text-indent="-0.3937in" style:auto-text-indent="false" fo:keep-with-next="always">
        <style:tab-stops>
          <style:tab-stop style:position="0.3937in"/>
        </style:tab-stops>
      </style:paragraph-properties>
      <style:text-properties style:use-window-font-color="true" loext:opacity="0%"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222in" fo:margin-bottom="0.0555in" style:contextual-spacing="true" fo:keep-together="always" fo:keep-with-next="always"/>
      <style:text-properties style:use-window-font-color="true" loext:opacity="0%" fo:font-weight="bold" style:font-weight-asian="bold" style:font-size-complex="14pt"/>
    </style:style>
    <style:style style:name="Heading_20_4" style:display-name="Heading 4" style:family="paragraph" style:parent-style-name="Standard" style:next-style-name="Standard" style:default-outline-level="4" style:list-style-name="" style:class="chapter">
      <style:paragraph-properties fo:margin-top="0.1945in" fo:margin-bottom="0.0555in" style:contextual-spacing="true" fo:keep-together="always" fo:keep-with-next="always"/>
      <style:text-properties fo:color="#666666" loext:opacity="100%" style:font-size-complex="12pt"/>
    </style:style>
    <style:style style:name="Heading_20_5" style:display-name="Heading 5" style:family="paragraph" style:parent-style-name="Standard" style:next-style-name="Standard" style:default-outline-level="5" style:list-style-name="" style:class="chapter">
      <style:paragraph-properties fo:margin-top="0.1665in" fo:margin-bottom="0.0555in" style:contextual-spacing="tru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chapter">
      <style:paragraph-properties fo:margin-top="0.1665in" fo:margin-bottom="0.0555in" style:contextual-spacing="true" fo:keep-together="always" fo:keep-with-next="always"/>
      <style:text-properties fo:color="#666666" loext:opacity="100%" fo:font-style="italic" style:font-style-asian="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style:class="chapter">
      <style:paragraph-properties fo:margin-top="0in" fo:margin-bottom="0.0417in" style:contextual-spacing="tru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true" fo:keep-together="always" fo:keep-with-next="always"/>
      <style:text-properties fo:color="#666666" loext:opacity="100%" fo:font-size="15pt" style:font-size-asian="15pt" style:font-size-complex="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text-indent="0in" style:auto-text-indent="false"/>
      <style:text-properties fo:color="#2f5496" loext:opacity="100%" style:font-name="Calibri Light" fo:font-family="'Calibri Light'" style:font-family-generic="swiss" style:font-pitch="variable" fo:language="en" fo:country="US" fo:font-weight="normal" style:letter-kerning="false" style:font-name-asian="新細明體" style:font-family-asian="新細明體" style:font-family-generic-asian="system" style:font-pitch-asian="variable" style:language-asian="en" style:country-asian="US" style:font-weight-asian="normal" style:font-name-complex="Times New Roman1" style:font-family-complex="'Times New Roman'"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1665in" fo:margin-bottom="0.0693in" style:contextual-spacing="false">
        <style:tab-stops>
          <style:tab-stop style:position="0.3055in"/>
          <style:tab-stop style:position="6.2681in" style:type="right" style:leader-style="dotted" style:leader-text="."/>
        </style:tab-stops>
      </style:paragraph-properties>
      <style:text-properties style:font-name="Calibri" fo:font-family="Calibri" style:font-family-generic="swiss" style:font-pitch="variable" fo:font-weight="bold" style:font-weight-asian="bold" style:font-name-complex="Calibri1"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ab-stops>
          <style:tab-stop style:position="0.611in"/>
          <style:tab-stop style:position="6.261in" style:type="right" style:leader-style="dotted" style:leader-text="."/>
        </style:tab-stops>
      </style:paragraph-properties>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List_20_Paragraph" style:display-name="List Paragraph" style:family="paragraph" style:parent-style-name="Standard">
      <style:paragraph-properties fo:margin-left="0.5in" fo:margin-top="0in" fo:margin-bottom="0in" style:contextual-spacing="true"/>
    </style:style>
    <style:style style:name="FAQ" style:family="paragraph" style:parent-style-name="Standard" style:list-style-name="WWNum10" style:list-level="3"/>
    <style:style style:name="No_20_Spacing" style:display-name="No Spacing" style:family="paragraph">
      <style:paragraph-properties fo:margin-top="0in" fo:margin-bottom="0in" style:contextual-spacing="false" fo:line-height="100%" fo:text-align="left" style:justify-single-word="false" fo:orphans="2" fo:widows="2" style:writing-mode="lr-tb"/>
      <style:text-properties style:font-name="Calibri" fo:font-family="Calibri" style:font-family-generic="swiss" style:font-pitch="variable" fo:font-size="12pt" style:font-size-asian="12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line-height="100%" fo:background-color="#f2f2f2" fo:padding="0.0835in" fo:border="0.51pt solid #ffffff" style:shadow="none"/>
      <style:text-properties fo:color="#0070c0" loext:opacity="100%" style:font-name="Courier New" fo:font-family="'Courier New'" style:font-family-generic="swiss" style:font-pitch="variable" fo:font-size="10pt" fo:language="en" fo:country="GB" fo:font-weight="bold" style:font-name-asian="Times New Roman1" style:font-family-asian="'Times New Roman'" style:font-family-generic-asian="system" style:font-pitch-asian="variable" style:font-size-asian="10pt" style:language-asian="fr" style:country-asian="FR" style:font-weight-asian="bold"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loext:linked-style-name="Balloon_20_Text_20_Char">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loext:linked-style-name="Heading_20_1">
      <style:text-properties style:use-window-font-color="true" loext:opacity="0%" style:font-name="Calibri" fo:font-family="Calibri" style:font-family-generic="swiss" style:font-pitch="variable"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_20_Char" style:display-name="Heading 2 Char" style:family="text" loext:linked-style-name="Heading_20_2">
      <style:text-properties style:use-window-font-color="true" loext:opacity="0%" style:font-name="Calibri" fo:font-family="Calibri" style:font-family-generic="swiss"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1" style:font-family-complex="'Times New Roman'" style:font-family-generic-complex="system" style:font-pitch-complex="variable"/>
    </style:style>
    <style:style style:name="ListLabel_20_3" style:display-name="ListLabel 3" style:family="text">
      <style:text-properties style:text-underline-style="none" style:font-name-complex="Times New Roman1" style:font-family-complex="'Times New Roman'" style:font-family-generic-complex="system" style:font-pitch-complex="variable"/>
    </style:style>
    <style:style style:name="ListLabel_20_4" style:display-name="ListLabel 4" style:family="text">
      <style:text-properties style:text-underline-style="none" style:font-name-complex="Times New Roman1" style:font-family-complex="'Times New Roman'" style:font-family-generic-complex="system" style:font-pitch-complex="variable"/>
    </style:style>
    <style:style style:name="ListLabel_20_5" style:display-name="ListLabel 5" style:family="text">
      <style:text-properties style:text-underline-style="none" style:font-name-complex="Times New Roman1" style:font-family-complex="'Times New Roman'" style:font-family-generic-complex="system" style:font-pitch-complex="variable"/>
    </style:style>
    <style:style style:name="ListLabel_20_6" style:display-name="ListLabel 6" style:family="text">
      <style:text-properties style:text-underline-style="none" style:font-name-complex="Times New Roman1" style:font-family-complex="'Times New Roman'" style:font-family-generic-complex="system" style:font-pitch-complex="variable"/>
    </style:style>
    <style:style style:name="ListLabel_20_7" style:display-name="ListLabel 7" style:family="text">
      <style:text-properties style:text-underline-style="none" style:font-name-complex="Times New Roman1" style:font-family-complex="'Times New Roman'" style:font-family-generic-complex="system" style:font-pitch-complex="variable"/>
    </style:style>
    <style:style style:name="ListLabel_20_8" style:display-name="ListLabel 8" style:family="text">
      <style:text-properties style:text-underline-style="none" style:font-name-complex="Times New Roman1" style:font-family-complex="'Times New Roman'" style:font-family-generic-complex="system" style:font-pitch-complex="variable"/>
    </style:style>
    <style:style style:name="ListLabel_20_9" style:display-name="ListLabel 9" style:family="text">
      <style:text-properties style:text-underline-style="none" style:font-name-complex="Times New Roman1" style:font-family-complex="'Times New Roman'"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font-name-complex="Times New Roman1" style:font-family-complex="'Times New Roman'" style:font-family-generic-complex="system" style:font-pitch-complex="variable"/>
    </style:style>
    <style:style style:name="ListLabel_20_12" style:display-name="ListLabel 12" style:family="text">
      <style:text-properties style:text-underline-style="none" style:font-name-complex="Times New Roman1" style:font-family-complex="'Times New Roman'" style:font-family-generic-complex="system" style:font-pitch-complex="variable"/>
    </style:style>
    <style:style style:name="ListLabel_20_13" style:display-name="ListLabel 13" style:family="text">
      <style:text-properties style:text-underline-style="none" style:font-name-complex="Times New Roman1" style:font-family-complex="'Times New Roman'" style:font-family-generic-complex="system" style:font-pitch-complex="variable"/>
    </style:style>
    <style:style style:name="ListLabel_20_14" style:display-name="ListLabel 14" style:family="text">
      <style:text-properties style:text-underline-style="none" style:font-name-complex="Times New Roman1" style:font-family-complex="'Times New Roman'" style:font-family-generic-complex="system" style:font-pitch-complex="variable"/>
    </style:style>
    <style:style style:name="ListLabel_20_15" style:display-name="ListLabel 15" style:family="text">
      <style:text-properties style:text-underline-style="none" style:font-name-complex="Times New Roman1" style:font-family-complex="'Times New Roman'" style:font-family-generic-complex="system" style:font-pitch-complex="variable"/>
    </style:style>
    <style:style style:name="ListLabel_20_16" style:display-name="ListLabel 16" style:family="text">
      <style:text-properties style:text-underline-style="none" style:font-name-complex="Times New Roman1" style:font-family-complex="'Times New Roman'" style:font-family-generic-complex="system" style:font-pitch-complex="variable"/>
    </style:style>
    <style:style style:name="ListLabel_20_17" style:display-name="ListLabel 17" style:family="text">
      <style:text-properties style:text-underline-style="none" style:font-name-complex="Times New Roman1" style:font-family-complex="'Times New Roman'" style:font-family-generic-complex="system" style:font-pitch-complex="variable"/>
    </style:style>
    <style:style style:name="ListLabel_20_18" style:display-name="ListLabel 18" style:family="text">
      <style:text-properties style:text-underline-style="none" style:font-name-complex="Times New Roman1" style:font-family-complex="'Times New Roman'"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font-name-complex="Times New Roman1" style:font-family-complex="'Times New Roman'" style:font-family-generic-complex="system" style:font-pitch-complex="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Times New Roman1" style:font-family-complex="'Times New Roman'" style:font-family-generic-complex="system" style:font-pitch-complex="variable"/>
    </style:style>
    <style:style style:name="ListLabel_20_41" style:display-name="ListLabel 41" style:family="text">
      <style:text-properties style:text-underline-style="none" style:font-name-complex="Times New Roman1" style:font-family-complex="'Times New Roman'" style:font-family-generic-complex="system" style:font-pitch-complex="variable"/>
    </style:style>
    <style:style style:name="ListLabel_20_42" style:display-name="ListLabel 42" style:family="text">
      <style:text-properties style:text-underline-style="none" style:font-name-complex="Times New Roman1" style:font-family-complex="'Times New Roman'" style:font-family-generic-complex="system" style:font-pitch-complex="variable"/>
    </style:style>
    <style:style style:name="ListLabel_20_43" style:display-name="ListLabel 43" style:family="text">
      <style:text-properties style:text-underline-style="none" style:font-name-complex="Times New Roman1" style:font-family-complex="'Times New Roman'" style:font-family-generic-complex="system" style:font-pitch-complex="variable"/>
    </style:style>
    <style:style style:name="ListLabel_20_44" style:display-name="ListLabel 44" style:family="text">
      <style:text-properties style:text-underline-style="none" style:font-name-complex="Times New Roman1" style:font-family-complex="'Times New Roman'" style:font-family-generic-complex="system" style:font-pitch-complex="variable"/>
    </style:style>
    <style:style style:name="ListLabel_20_45" style:display-name="ListLabel 45" style:family="text">
      <style:text-properties style:text-underline-style="none" style:font-name-complex="Times New Roman1" style:font-family-complex="'Times New Roman'"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font-name-complex="Times New Roman1" style:font-family-complex="'Times New Roman'" style:font-family-generic-complex="system" style:font-pitch-complex="variable"/>
    </style:style>
    <style:style style:name="ListLabel_20_49" style:display-name="ListLabel 49" style:family="text">
      <style:text-properties style:text-underline-style="none" style:font-name-complex="Times New Roman1" style:font-family-complex="'Times New Roman'" style:font-family-generic-complex="system" style:font-pitch-complex="variable"/>
    </style:style>
    <style:style style:name="ListLabel_20_50" style:display-name="ListLabel 50" style:family="text">
      <style:text-properties style:text-underline-style="none" style:font-name-complex="Times New Roman1" style:font-family-complex="'Times New Roman'" style:font-family-generic-complex="system" style:font-pitch-complex="variable"/>
    </style:style>
    <style:style style:name="ListLabel_20_51" style:display-name="ListLabel 51" style:family="text">
      <style:text-properties style:text-underline-style="none" style:font-name-complex="Times New Roman1" style:font-family-complex="'Times New Roman'" style:font-family-generic-complex="system" style:font-pitch-complex="variable"/>
    </style:style>
    <style:style style:name="ListLabel_20_52" style:display-name="ListLabel 52" style:family="text">
      <style:text-properties style:text-underline-style="none" style:font-name-complex="Times New Roman1" style:font-family-complex="'Times New Roman'" style:font-family-generic-complex="system" style:font-pitch-complex="variable"/>
    </style:style>
    <style:style style:name="ListLabel_20_53" style:display-name="ListLabel 53" style:family="text">
      <style:text-properties style:text-underline-style="none" style:font-name-complex="Times New Roman1" style:font-family-complex="'Times New Roman'" style:font-family-generic-complex="system" style:font-pitch-complex="variable"/>
    </style:style>
    <style:style style:name="ListLabel_20_54" style:display-name="ListLabel 54" style:family="text">
      <style:text-properties style:text-underline-style="none" style:font-name-complex="Times New Roman1" style:font-family-complex="'Times New Roman'"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font-name-complex="Times New Roman1" style:font-family-complex="'Times New Roman'" style:font-family-generic-complex="system" style:font-pitch-complex="variable"/>
    </style:style>
    <style:style style:name="ListLabel_20_111" style:display-name="ListLabel 111" style:family="text">
      <style:text-properties style:text-underline-style="none" style:font-name-complex="Times New Roman1" style:font-family-complex="'Times New Roman'" style:font-family-generic-complex="system" style:font-pitch-complex="variable"/>
    </style:style>
    <style:style style:name="ListLabel_20_112" style:display-name="ListLabel 112" style:family="text">
      <style:text-properties style:text-underline-style="none" style:font-name-complex="Times New Roman1" style:font-family-complex="'Times New Roman'" style:font-family-generic-complex="system" style:font-pitch-complex="variable"/>
    </style:style>
    <style:style style:name="ListLabel_20_113" style:display-name="ListLabel 113" style:family="text">
      <style:text-properties style:text-underline-style="none" style:font-name-complex="Times New Roman1" style:font-family-complex="'Times New Roman'" style:font-family-generic-complex="system" style:font-pitch-complex="variable"/>
    </style:style>
    <style:style style:name="ListLabel_20_114" style:display-name="ListLabel 114" style:family="text">
      <style:text-properties style:text-underline-style="none" style:font-name-complex="Times New Roman1" style:font-family-complex="'Times New Roman'" style:font-family-generic-complex="system" style:font-pitch-complex="variable"/>
    </style:style>
    <style:style style:name="ListLabel_20_115" style:display-name="ListLabel 115" style:family="text">
      <style:text-properties style:text-underline-style="none" style:font-name-complex="Times New Roman1" style:font-family-complex="'Times New Roman'" style:font-family-generic-complex="system" style:font-pitch-complex="variable"/>
    </style:style>
    <style:style style:name="ListLabel_20_116" style:display-name="ListLabel 116" style:family="text">
      <style:text-properties style:text-underline-style="none" style:font-name-complex="Times New Roman1" style:font-family-complex="'Times New Roman'" style:font-family-generic-complex="system" style:font-pitch-complex="variable"/>
    </style:style>
    <style:style style:name="ListLabel_20_117" style:display-name="ListLabel 117" style:family="text">
      <style:text-properties style:text-underline-style="none" style:font-name-complex="Times New Roman1" style:font-family-complex="'Times New Roman'"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font-name-complex="Times New Roman1" style:font-family-complex="'Times New Roman'" style:font-family-generic-complex="system" style:font-pitch-complex="variable"/>
    </style:style>
    <style:style style:name="ListLabel_20_120" style:display-name="ListLabel 120" style:family="text">
      <style:text-properties style:text-underline-style="none" style:font-name-complex="Times New Roman1" style:font-family-complex="'Times New Roman'" style:font-family-generic-complex="system" style:font-pitch-complex="variable"/>
    </style:style>
    <style:style style:name="ListLabel_20_121" style:display-name="ListLabel 121" style:family="text">
      <style:text-properties style:text-underline-style="none" style:font-name-complex="Times New Roman1" style:font-family-complex="'Times New Roman'" style:font-family-generic-complex="system" style:font-pitch-complex="variable"/>
    </style:style>
    <style:style style:name="ListLabel_20_122" style:display-name="ListLabel 122" style:family="text">
      <style:text-properties style:text-underline-style="none" style:font-name-complex="Times New Roman1" style:font-family-complex="'Times New Roman'" style:font-family-generic-complex="system" style:font-pitch-complex="variable"/>
    </style:style>
    <style:style style:name="ListLabel_20_123" style:display-name="ListLabel 123" style:family="text">
      <style:text-properties style:text-underline-style="none" style:font-name-complex="Times New Roman1" style:font-family-complex="'Times New Roman'" style:font-family-generic-complex="system" style:font-pitch-complex="variable"/>
    </style:style>
    <style:style style:name="ListLabel_20_124" style:display-name="ListLabel 124" style:family="text">
      <style:text-properties style:text-underline-style="none" style:font-name-complex="Times New Roman1" style:font-family-complex="'Times New Roman'" style:font-family-generic-complex="system" style:font-pitch-complex="variable"/>
    </style:style>
    <style:style style:name="ListLabel_20_125" style:display-name="ListLabel 125" style:family="text">
      <style:text-properties style:text-underline-style="none" style:font-name-complex="Times New Roman1" style:font-family-complex="'Times New Roman'" style:font-family-generic-complex="system" style:font-pitch-complex="variable"/>
    </style:style>
    <style:style style:name="ListLabel_20_126" style:display-name="ListLabel 126" style:family="text">
      <style:text-properties style:text-underline-style="none" style:font-name-complex="Times New Roman1" style:font-family-complex="'Times New Roman'"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font-name-complex="Times New Roman1" style:font-family-complex="'Times New Roman'" style:font-family-generic-complex="system" style:font-pitch-complex="variable"/>
    </style:style>
    <style:style style:name="ListLabel_20_129" style:display-name="ListLabel 129" style:family="text">
      <style:text-properties style:text-underline-style="none" style:font-name-complex="Times New Roman1" style:font-family-complex="'Times New Roman'" style:font-family-generic-complex="system" style:font-pitch-complex="variable"/>
    </style:style>
    <style:style style:name="ListLabel_20_130" style:display-name="ListLabel 130" style:family="text">
      <style:text-properties style:text-underline-style="none" style:font-name-complex="Times New Roman1" style:font-family-complex="'Times New Roman'" style:font-family-generic-complex="system" style:font-pitch-complex="variable"/>
    </style:style>
    <style:style style:name="ListLabel_20_131" style:display-name="ListLabel 131" style:family="text">
      <style:text-properties style:text-underline-style="none" style:font-name-complex="Times New Roman1" style:font-family-complex="'Times New Roman'" style:font-family-generic-complex="system" style:font-pitch-complex="variable"/>
    </style:style>
    <style:style style:name="ListLabel_20_132" style:display-name="ListLabel 132" style:family="text">
      <style:text-properties style:text-underline-style="none" style:font-name-complex="Times New Roman1" style:font-family-complex="'Times New Roman'" style:font-family-generic-complex="system" style:font-pitch-complex="variable"/>
    </style:style>
    <style:style style:name="ListLabel_20_133" style:display-name="ListLabel 133" style:family="text">
      <style:text-properties style:text-underline-style="none" style:font-name-complex="Times New Roman1" style:font-family-complex="'Times New Roman'" style:font-family-generic-complex="system" style:font-pitch-complex="variable"/>
    </style:style>
    <style:style style:name="ListLabel_20_134" style:display-name="ListLabel 134" style:family="text">
      <style:text-properties style:text-underline-style="none" style:font-name-complex="Times New Roman1" style:font-family-complex="'Times New Roman'" style:font-family-generic-complex="system" style:font-pitch-complex="variable"/>
    </style:style>
    <style:style style:name="ListLabel_20_135" style:display-name="ListLabel 135" style:family="text">
      <style:text-properties style:text-underline-style="none" style:font-name-complex="Times New Roman1" style:font-family-complex="'Times New Roman'"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font-name-complex="Times New Roman1" style:font-family-complex="'Times New Roman'" style:font-family-generic-complex="system" style:font-pitch-complex="variable"/>
    </style:style>
    <style:style style:name="ListLabel_20_147" style:display-name="ListLabel 147" style:family="text">
      <style:text-properties style:text-underline-style="none" style:font-name-complex="Times New Roman1" style:font-family-complex="'Times New Roman'" style:font-family-generic-complex="system" style:font-pitch-complex="variable"/>
    </style:style>
    <style:style style:name="ListLabel_20_148" style:display-name="ListLabel 148" style:family="text">
      <style:text-properties style:text-underline-style="none" style:font-name-complex="Times New Roman1" style:font-family-complex="'Times New Roman'" style:font-family-generic-complex="system" style:font-pitch-complex="variable"/>
    </style:style>
    <style:style style:name="ListLabel_20_149" style:display-name="ListLabel 149" style:family="text">
      <style:text-properties style:text-underline-style="none" style:font-name-complex="Times New Roman1" style:font-family-complex="'Times New Roman'" style:font-family-generic-complex="system" style:font-pitch-complex="variable"/>
    </style:style>
    <style:style style:name="ListLabel_20_150" style:display-name="ListLabel 150" style:family="text">
      <style:text-properties style:text-underline-style="none" style:font-name-complex="Times New Roman1" style:font-family-complex="'Times New Roman'" style:font-family-generic-complex="system" style:font-pitch-complex="variable"/>
    </style:style>
    <style:style style:name="ListLabel_20_151" style:display-name="ListLabel 151" style:family="text">
      <style:text-properties style:text-underline-style="none" style:font-name-complex="Times New Roman1" style:font-family-complex="'Times New Roman'" style:font-family-generic-complex="system" style:font-pitch-complex="variable"/>
    </style:style>
    <style:style style:name="ListLabel_20_152" style:display-name="ListLabel 152" style:family="text">
      <style:text-properties style:text-underline-style="none" style:font-name-complex="Times New Roman1" style:font-family-complex="'Times New Roman'" style:font-family-generic-complex="system" style:font-pitch-complex="variable"/>
    </style:style>
    <style:style style:name="ListLabel_20_153" style:display-name="ListLabel 153" style:family="text">
      <style:text-properties style:text-underline-style="none" style:font-name-complex="Times New Roman1" style:font-family-complex="'Times New Roman'" style:font-family-generic-complex="system" style:font-pitch-complex="variabl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font-name-complex="Times New Roman1" style:font-family-complex="'Times New Roman'" style:font-family-generic-complex="system" style:font-pitch-complex="variable"/>
    </style:style>
    <style:style style:name="ListLabel_20_156" style:display-name="ListLabel 156" style:family="text">
      <style:text-properties style:text-underline-style="none" style:font-name-complex="Times New Roman1" style:font-family-complex="'Times New Roman'" style:font-family-generic-complex="system" style:font-pitch-complex="variable"/>
    </style:style>
    <style:style style:name="ListLabel_20_157" style:display-name="ListLabel 157" style:family="text">
      <style:text-properties style:text-underline-style="none" style:font-name-complex="Times New Roman1" style:font-family-complex="'Times New Roman'" style:font-family-generic-complex="system" style:font-pitch-complex="variable"/>
    </style:style>
    <style:style style:name="ListLabel_20_158" style:display-name="ListLabel 158" style:family="text">
      <style:text-properties style:text-underline-style="none" style:font-name-complex="Times New Roman1" style:font-family-complex="'Times New Roman'" style:font-family-generic-complex="system" style:font-pitch-complex="variable"/>
    </style:style>
    <style:style style:name="ListLabel_20_159" style:display-name="ListLabel 159" style:family="text">
      <style:text-properties style:text-underline-style="none" style:font-name-complex="Times New Roman1" style:font-family-complex="'Times New Roman'" style:font-family-generic-complex="system" style:font-pitch-complex="variable"/>
    </style:style>
    <style:style style:name="ListLabel_20_160" style:display-name="ListLabel 160" style:family="text">
      <style:text-properties style:text-underline-style="none" style:font-name-complex="Times New Roman1" style:font-family-complex="'Times New Roman'" style:font-family-generic-complex="system" style:font-pitch-complex="variable"/>
    </style:style>
    <style:style style:name="ListLabel_20_161" style:display-name="ListLabel 161" style:family="text">
      <style:text-properties style:text-underline-style="none" style:font-name-complex="Times New Roman1" style:font-family-complex="'Times New Roman'" style:font-family-generic-complex="system" style:font-pitch-complex="variable"/>
    </style:style>
    <style:style style:name="ListLabel_20_162" style:display-name="ListLabel 162" style:family="text">
      <style:text-properties style:text-underline-style="none" style:font-name-complex="Times New Roman1" style:font-family-complex="'Times New Roman'" style:font-family-generic-complex="system" style:font-pitch-complex="variable"/>
    </style:style>
    <style:style style:name="ListLabel_20_163" style:display-name="ListLabel 163"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font-name-complex="Times New Roman1" style:font-family-complex="'Times New Roman'" style:font-family-generic-complex="system" style:font-pitch-complex="variable"/>
    </style:style>
    <style:style style:name="ListLabel_20_193" style:display-name="ListLabel 193" style:family="text">
      <style:text-properties style:text-underline-style="none" style:font-name-complex="Times New Roman1" style:font-family-complex="'Times New Roman'" style:font-family-generic-complex="system" style:font-pitch-complex="variable"/>
    </style:style>
    <style:style style:name="ListLabel_20_194" style:display-name="ListLabel 194" style:family="text">
      <style:text-properties style:text-underline-style="none" style:font-name-complex="Times New Roman1" style:font-family-complex="'Times New Roman'" style:font-family-generic-complex="system" style:font-pitch-complex="variable"/>
    </style:style>
    <style:style style:name="ListLabel_20_195" style:display-name="ListLabel 195" style:family="text">
      <style:text-properties style:text-underline-style="none" style:font-name-complex="Times New Roman1" style:font-family-complex="'Times New Roman'" style:font-family-generic-complex="system" style:font-pitch-complex="variable"/>
    </style:style>
    <style:style style:name="ListLabel_20_196" style:display-name="ListLabel 196" style:family="text">
      <style:text-properties style:text-underline-style="none" style:font-name-complex="Times New Roman1" style:font-family-complex="'Times New Roman'" style:font-family-generic-complex="system" style:font-pitch-complex="variable"/>
    </style:style>
    <style:style style:name="ListLabel_20_197" style:display-name="ListLabel 197" style:family="text">
      <style:text-properties style:text-underline-style="none" style:font-name-complex="Times New Roman1" style:font-family-complex="'Times New Roman'" style:font-family-generic-complex="system" style:font-pitch-complex="variable"/>
    </style:style>
    <style:style style:name="ListLabel_20_198" style:display-name="ListLabel 198" style:family="text">
      <style:text-properties style:text-underline-style="none" style:font-name-complex="Times New Roman1" style:font-family-complex="'Times New Roman'" style:font-family-generic-complex="system" style:font-pitch-complex="variabl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font-name-complex="Times New Roman1" style:font-family-complex="'Times New Roman'" style:font-family-generic-complex="system" style:font-pitch-complex="variable"/>
    </style:style>
    <style:style style:name="ListLabel_20_202" style:display-name="ListLabel 202" style:family="text">
      <style:text-properties style:text-underline-style="none" style:font-name-complex="Times New Roman1" style:font-family-complex="'Times New Roman'" style:font-family-generic-complex="system" style:font-pitch-complex="variable"/>
    </style:style>
    <style:style style:name="ListLabel_20_203" style:display-name="ListLabel 203" style:family="text">
      <style:text-properties style:text-underline-style="none" style:font-name-complex="Times New Roman1" style:font-family-complex="'Times New Roman'" style:font-family-generic-complex="system" style:font-pitch-complex="variable"/>
    </style:style>
    <style:style style:name="ListLabel_20_204" style:display-name="ListLabel 204" style:family="text">
      <style:text-properties style:text-underline-style="none" style:font-name-complex="Times New Roman1" style:font-family-complex="'Times New Roman'" style:font-family-generic-complex="system" style:font-pitch-complex="variable"/>
    </style:style>
    <style:style style:name="ListLabel_20_205" style:display-name="ListLabel 205" style:family="text">
      <style:text-properties style:text-underline-style="none" style:font-name-complex="Times New Roman1" style:font-family-complex="'Times New Roman'" style:font-family-generic-complex="system" style:font-pitch-complex="variable"/>
    </style:style>
    <style:style style:name="ListLabel_20_206" style:display-name="ListLabel 206" style:family="text">
      <style:text-properties style:text-underline-style="none" style:font-name-complex="Times New Roman1" style:font-family-complex="'Times New Roman'" style:font-family-generic-complex="system" style:font-pitch-complex="variable"/>
    </style:style>
    <style:style style:name="ListLabel_20_207" style:display-name="ListLabel 207" style:family="text">
      <style:text-properties style:text-underline-style="none" style:font-name-complex="Times New Roman1" style:font-family-complex="'Times New Roman'" style:font-family-generic-complex="system" style:font-pitch-complex="variabl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font-name-complex="Times New Roman1" style:font-family-complex="'Times New Roman'" style:font-family-generic-complex="system" style:font-pitch-complex="variable"/>
    </style:style>
    <style:style style:name="ListLabel_20_211" style:display-name="ListLabel 211" style:family="text">
      <style:text-properties style:text-underline-style="none" style:font-name-complex="Times New Roman1" style:font-family-complex="'Times New Roman'" style:font-family-generic-complex="system" style:font-pitch-complex="variable"/>
    </style:style>
    <style:style style:name="ListLabel_20_212" style:display-name="ListLabel 212" style:family="text">
      <style:text-properties style:text-underline-style="none" style:font-name-complex="Times New Roman1" style:font-family-complex="'Times New Roman'" style:font-family-generic-complex="system" style:font-pitch-complex="variable"/>
    </style:style>
    <style:style style:name="ListLabel_20_213" style:display-name="ListLabel 213" style:family="text">
      <style:text-properties style:text-underline-style="none" style:font-name-complex="Times New Roman1" style:font-family-complex="'Times New Roman'" style:font-family-generic-complex="system" style:font-pitch-complex="variable"/>
    </style:style>
    <style:style style:name="ListLabel_20_214" style:display-name="ListLabel 214" style:family="text">
      <style:text-properties style:text-underline-style="none" style:font-name-complex="Times New Roman1" style:font-family-complex="'Times New Roman'" style:font-family-generic-complex="system" style:font-pitch-complex="variable"/>
    </style:style>
    <style:style style:name="ListLabel_20_215" style:display-name="ListLabel 215" style:family="text">
      <style:text-properties style:text-underline-style="none" style:font-name-complex="Times New Roman1" style:font-family-complex="'Times New Roman'" style:font-family-generic-complex="system" style:font-pitch-complex="variable"/>
    </style:style>
    <style:style style:name="ListLabel_20_216" style:display-name="ListLabel 216" style:family="text">
      <style:text-properties style:text-underline-style="none" style:font-name-complex="Times New Roman1" style:font-family-complex="'Times New Roman'" style:font-family-generic-complex="system" style:font-pitch-complex="variabl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font-name-complex="Times New Roman1" style:font-family-complex="'Times New Roman'" style:font-family-generic-complex="system" style:font-pitch-complex="variable"/>
    </style:style>
    <style:style style:name="ListLabel_20_219" style:display-name="ListLabel 219" style:family="text">
      <style:text-properties style:text-underline-style="none" style:font-name-complex="Times New Roman1" style:font-family-complex="'Times New Roman'" style:font-family-generic-complex="system" style:font-pitch-complex="variable"/>
    </style:style>
    <style:style style:name="ListLabel_20_220" style:display-name="ListLabel 220" style:family="text">
      <style:text-properties style:text-underline-style="none" style:font-name-complex="Times New Roman1" style:font-family-complex="'Times New Roman'" style:font-family-generic-complex="system" style:font-pitch-complex="variable"/>
    </style:style>
    <style:style style:name="ListLabel_20_221" style:display-name="ListLabel 221" style:family="text">
      <style:text-properties style:text-underline-style="none" style:font-name-complex="Times New Roman1" style:font-family-complex="'Times New Roman'" style:font-family-generic-complex="system" style:font-pitch-complex="variable"/>
    </style:style>
    <style:style style:name="ListLabel_20_222" style:display-name="ListLabel 222" style:family="text">
      <style:text-properties style:text-underline-style="none" style:font-name-complex="Times New Roman1" style:font-family-complex="'Times New Roman'" style:font-family-generic-complex="system" style:font-pitch-complex="variable"/>
    </style:style>
    <style:style style:name="ListLabel_20_223" style:display-name="ListLabel 223" style:family="text">
      <style:text-properties style:text-underline-style="none" style:font-name-complex="Times New Roman1" style:font-family-complex="'Times New Roman'" style:font-family-generic-complex="system" style:font-pitch-complex="variable"/>
    </style:style>
    <style:style style:name="ListLabel_20_224" style:display-name="ListLabel 224" style:family="text">
      <style:text-properties style:text-underline-style="none" style:font-name-complex="Times New Roman1" style:font-family-complex="'Times New Roman'" style:font-family-generic-complex="system" style:font-pitch-complex="variable"/>
    </style:style>
    <style:style style:name="ListLabel_20_225" style:display-name="ListLabel 225" style:family="text">
      <style:text-properties style:text-underline-style="none"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alibri" fo:font-family="Calibri" style:font-family-generic="swiss" style:font-pitch="variable"/>
    </style:style>
    <style:style style:name="ListLabel_20_398" style:display-name="ListLabel 398" style:family="text">
      <style:text-properties style:font-name-complex="Calibri1" style:font-family-complex="Calibri" style:font-family-generic-complex="system" style:font-pitch-complex="variable" style:font-size-complex="12pt"/>
    </style:style>
    <style:style style:name="ListLabel_20_399" style:display-name="ListLabel 399" style:family="text"/>
    <style:style style:name="ListLabel_20_400" style:display-name="ListLabel 400" style:family="text">
      <style:text-properties fo:color="#1155cc" loext:opacity="100%" style:text-underline-style="solid" style:text-underline-width="auto" style:text-underline-color="font-color" style:font-name-complex="Calibri1" style:font-family-complex="Calibri" style:font-family-generic-complex="system" style:font-pitch-complex="variable" style:font-size-complex="12pt"/>
    </style:style>
    <style:style style:name="ListLabel_20_401" style:display-name="ListLabel 401" style:family="text">
      <style:text-properties fo:color="#1155cc" loext:opacity="100%" style:text-underline-style="solid" style:text-underline-width="auto" style:text-underline-color="font-color" style:font-name-complex="Calibri1" style:font-family-complex="Calibri" style:font-family-generic-complex="system" style:font-pitch-complex="variable" style:font-size-complex="12pt"/>
    </style:style>
    <style:style style:name="ListLabel_20_402" style:display-name="ListLabel 402" style:family="text">
      <style:text-properties fo:language="en" fo:country="GB" style:language-asian="fr" style:country-asian="F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164"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65"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66"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67"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68"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9"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0"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71"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48"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0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1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5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6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67"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70"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36"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0"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Calibri"/>
    </style:style>
    <style:style style:name="MT1" style:family="text">
      <style:text-properties style:font-name="Calibri"/>
    </style:style>
    <style:style style:name="MT2" style:family="text">
      <style:text-properties style:font-name="Calibri" style:font-name-complex="Calibri1"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text:page-number text:select-page="current">6</text:page-number></text:span></text:p>
        <text:p text:style-name="MP2" loext:marker-style-name="MT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ictionary App Builder: Installing and Building on Mac</dc:title>
    <dc:creator>David Moore</dc:creator>
    <meta:editing-cycles>3</meta:editing-cycles>
    <meta:print-date>2018-03-13T18:27:00</meta:print-date>
    <meta:creation-date>2026-04-29T15:18:00</meta:creation-date>
    <dc:date>2026-04-29T15:22:00</dc:date>
    <meta:editing-duration>P0D</meta:editing-duration>
    <meta:generator>LibreOffice/26.2.3.2$Linux_X86_64 LibreOffice_project/620$Build-2</meta:generator>
    <meta:document-statistic meta:table-count="3" meta:image-count="32" meta:object-count="0" meta:page-count="6" meta:paragraph-count="406" meta:word-count="5652" meta:character-count="32445" meta:non-whitespace-character-count="27189"/>
    <meta:user-defined meta:name="AppVersion">16.0000</meta:user-defined>
    <meta:template xlink:type="simple" xlink:actuate="onRequest" xlink:title="Normal.dotm" xlink:href=""/>
  </office:meta>
</office:document-meta>
</file>