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100000523000002328EF02B45.png" manifest:media-type="image/png"/>
  <manifest:file-entry manifest:full-path="Pictures/1000000000000305000001832242D61E.png" manifest:media-type="image/png"/>
  <manifest:file-entry manifest:full-path="Pictures/10000000000001F3000001839EF83E27.png" manifest:media-type="image/png"/>
  <manifest:file-entry manifest:full-path="Pictures/100000010000006200000036B65513BC.png" manifest:media-type="image/png"/>
  <manifest:file-entry manifest:full-path="Pictures/10000000000003B1000002612EB5139F.png" manifest:media-type="image/png"/>
  <manifest:file-entry manifest:full-path="Pictures/100000010000084600000272C9A24F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222in" fo:margin-left="0.3938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3.4451in"/>
    </style:style>
    <style:style style:name="Table1.1" style:family="table-row">
      <style:table-row-properties fo:keep-together="auto"/>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fo:font-style="italic" style:font-style-asian="italic"/>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10" style:family="paragraph" style:parent-style-name="Heading_20_1">
      <style:paragraph-properties fo:margin-top="0in" fo:margin-bottom="0.0417in" style:contextual-spacing="false" fo:break-before="page"/>
    </style:style>
    <style:style style:name="P11" style:family="paragraph" style:parent-style-name="Standard" style:list-style-name="WWNum1">
      <style:paragraph-properties fo:margin-left="0.4957in" fo:margin-top="0.0835in" fo:margin-bottom="0in" style:contextual-spacing="false" fo:text-indent="-0.248in" style:auto-text-indent="false"/>
    </style:style>
    <style:style style:name="P12" style:family="paragraph" style:parent-style-name="Standard" style:list-style-name="WWNum1"/>
    <style:style style:name="P13" style:family="paragraph" style:parent-style-name="Standard" style:list-style-name="WWNum1">
      <style:paragraph-properties fo:margin-left="0.4957in" fo:margin-top="0.1665in" fo:margin-bottom="0in" style:contextual-spacing="false" fo:text-indent="-0.248in" style:auto-text-indent="false"/>
    </style:style>
    <style:style style:name="P14" style:family="paragraph" style:parent-style-name="Heading_20_2">
      <style:paragraph-properties fo:margin-left="0.0984in" fo:text-indent="-0.3484in" style:auto-text-indent="false"/>
    </style:style>
    <style:style style:name="P15" style:family="paragraph" style:parent-style-name="Standard">
      <style:paragraph-properties fo:margin-top="0.1665in" fo:margin-bottom="0in" style:contextual-spacing="false"/>
    </style:style>
    <style:style style:name="P16" style:family="paragraph" style:parent-style-name="List_20_Paragraph" style:list-style-name="WWNum7">
      <style:paragraph-properties fo:margin-top="0.1665in" fo:margin-bottom="0in" style:contextual-spacing="false"/>
    </style:style>
    <style:style style:name="P17" style:family="paragraph" style:parent-style-name="Standard">
      <style:paragraph-properties fo:margin-top="0.1665in" fo:margin-bottom="0in" style:contextual-spacing="false" fo:keep-with-next="always"/>
    </style:style>
    <style:style style:name="P18" style:family="paragraph" style:parent-style-name="List_20_Paragraph" style:list-style-name="WWNum14">
      <style:paragraph-properties fo:margin-top="0.1665in" fo:margin-bottom="0in" style:contextual-spacing="true" fo:keep-with-next="always"/>
    </style:style>
    <style:style style:name="P19" style:family="paragraph" style:parent-style-name="List_20_Paragraph" style:list-style-name="WWNum14">
      <style:paragraph-properties fo:margin-top="0.1665in" fo:margin-bottom="0in" style:contextual-spacing="false"/>
    </style:style>
    <style:style style:name="P20" style:family="paragraph" style:parent-style-name="List_20_Paragraph">
      <style:paragraph-properties fo:margin-top="0.1665in" fo:margin-bottom="0in" style:contextual-spacing="false"/>
      <style:text-properties fo:language="en" fo:country="GB"/>
    </style:style>
    <style:style style:name="P21" style:family="paragraph" style:parent-style-name="List_20_Paragraph" style:list-style-name="WWNum13">
      <style:paragraph-properties fo:margin-top="0.1665in" fo:margin-bottom="0in" style:contextual-spacing="false"/>
    </style:style>
    <style:style style:name="P22" style:family="paragraph" style:parent-style-name="Standard">
      <style:paragraph-properties fo:margin-top="0.25in" fo:margin-bottom="0in" style:contextual-spacing="false"/>
    </style:style>
    <style:style style:name="P23" style:family="paragraph" style:parent-style-name="Standard">
      <style:paragraph-properties fo:margin-top="0.1665in" fo:margin-bottom="0in" style:contextual-spacing="false"/>
      <style:text-properties fo:language="en" fo:country="GB"/>
    </style:style>
    <style:style style:name="P24" style:family="paragraph" style:parent-style-name="List_20_Paragraph" style:list-style-name="WWNum10">
      <style:paragraph-properties fo:margin-top="0.1665in" fo:margin-bottom="0in" style:contextual-spacing="false"/>
    </style:style>
    <style:style style:name="P25" style:family="paragraph" style:parent-style-name="Standard">
      <style:paragraph-properties fo:keep-with-next="always"/>
      <style:text-properties fo:font-size="7pt" fo:language="en" fo:country="GB" style:font-size-asian="7pt"/>
    </style:style>
    <style:style style:name="P26" style:family="paragraph" style:parent-style-name="Standard">
      <style:paragraph-properties fo:margin-left="0.4898in"/>
    </style:style>
    <style:style style:name="P27" style:family="paragraph" style:parent-style-name="Standard">
      <style:paragraph-properties fo:margin-left="0.4898in"/>
      <style:text-properties fo:language="en" fo:country="GB"/>
    </style:style>
    <style:style style:name="P28" style:family="paragraph" style:parent-style-name="List_20_Paragraph" style:list-style-name="WWNum10"/>
    <style:style style:name="P29" style:family="paragraph">
      <loext:graphic-properties draw:fill="solid" draw:fill-color="#ffffff"/>
      <style:paragraph-properties fo:text-align="left"/>
      <style:text-properties fo:font-size="18pt"/>
    </style:style>
    <style:style style:name="P30" style:family="paragraph" style:parent-style-name="List_20_Paragraph">
      <style:text-properties fo:language="en" fo:country="GB"/>
    </style:style>
    <style:style style:name="P31" style:family="paragraph" style:parent-style-name="List_20_Paragraph">
      <style:paragraph-properties fo:keep-with-next="always"/>
    </style:style>
    <style:style style:name="P32" style:family="paragraph" style:parent-style-name="Standard">
      <style:paragraph-properties fo:margin-left="0.4917in" fo:margin-top="0.0835in" fo:margin-bottom="0in" style:contextual-spacing="false" fo:text-indent="0.4917in" style:auto-text-indent="false"/>
    </style:style>
    <style:style style:name="P33" style:family="paragraph" style:parent-style-name="Standard">
      <style:paragraph-properties fo:margin-left="0.4909in" fo:margin-top="0.0835in" fo:margin-bottom="0in" style:contextual-spacing="false" fo:text-indent="0.4925in" style:auto-text-indent="false"/>
    </style:style>
    <style:style style:name="P34" style:family="paragraph" style:parent-style-name="Standard">
      <style:text-properties fo:language="de" fo:country="DE"/>
    </style:style>
    <style:style style:name="P35" style:family="paragraph" style:parent-style-name="Standard">
      <loext:graphic-properties draw:fill="solid" draw:fill-color="#f2f2f2"/>
      <style:paragraph-properties fo:margin-left="0.5in" fo:background-color="#f2f2f2" fo:padding="0.0835in" fo:border="0.51pt solid #ffffff" style:shadow="none"/>
    </style:style>
    <style:style style:name="P36" style:family="paragraph" style:parent-style-name="List_20_Paragraph" style:list-style-name="WWNum11">
      <style:paragraph-properties fo:margin-top="0.1665in" fo:margin-bottom="0in" style:contextual-spacing="false"/>
    </style:style>
    <style:style style:name="P37" style:family="paragraph" style:parent-style-name="List_20_Paragraph">
      <style:paragraph-properties fo:margin-top="0.0835in" fo:margin-bottom="0in" style:contextual-spacing="false"/>
    </style:style>
    <style:style style:name="P38" style:family="paragraph" style:parent-style-name="Standard" style:list-style-name="WWNum4"/>
    <style:style style:name="P39" style:family="paragraph" style:parent-style-name="Standard">
      <style:paragraph-properties fo:margin-left="0.25in"/>
      <style:text-properties fo:language="en" fo:country="GB"/>
    </style:style>
    <style:style style:name="P40" style:family="paragraph" style:parent-style-name="Standard" style:list-style-name="WWNum4">
      <style:paragraph-properties fo:margin-left="0.5in" fo:text-indent="-0.248in" style:auto-text-indent="false" fo:keep-with-next="always"/>
    </style:style>
    <style:style style:name="P41" style:family="paragraph" style:parent-style-name="Standard">
      <style:paragraph-properties fo:margin-left="0.5in" fo:keep-with-next="always"/>
      <style:text-properties fo:language="en" fo:country="GB"/>
    </style:style>
    <style:style style:name="P42" style:family="paragraph" style:parent-style-name="Standard">
      <style:paragraph-properties fo:margin-left="0.5in" fo:keep-with-next="always"/>
    </style:style>
    <style:style style:name="P43" style:family="paragraph" style:parent-style-name="Standard">
      <style:paragraph-properties fo:keep-with-next="always"/>
      <style:text-properties fo:language="en" fo:country="GB"/>
    </style:style>
    <style:style style:name="P44" style:family="paragraph" style:parent-style-name="Standard">
      <style:paragraph-properties fo:margin-left="0.4925in" fo:margin-top="0in" fo:margin-bottom="0.0835in" style:contextual-spacing="false" fo:keep-with-next="always"/>
    </style:style>
    <style:style style:name="P45" style:family="paragraph" style:parent-style-name="List_20_Paragraph" style:list-style-name="WWNum12">
      <style:paragraph-properties fo:keep-with-next="always"/>
    </style:style>
    <style:style style:name="P46" style:family="paragraph" style:parent-style-name="Standard">
      <style:paragraph-properties fo:margin-left="0.5in"/>
    </style:style>
    <style:style style:name="P47" style:family="paragraph" style:parent-style-name="Standard">
      <style:paragraph-properties fo:text-align="center" style:justify-single-word="false"/>
      <style:text-properties fo:language="en" fo:country="GB" fo:font-weight="bold" style:font-weight-asian="bold"/>
    </style:style>
    <style:style style:name="P48" style:family="paragraph" style:parent-style-name="Standard">
      <style:paragraph-properties fo:text-align="center" style:justify-single-word="false"/>
      <style:text-properties fo:font-weight="bold" style:font-weight-asian="bold"/>
    </style:style>
    <style:style style:name="P49" style:family="paragraph" style:parent-style-name="Standard">
      <style:paragraph-properties fo:margin-top="0.0835in" fo:margin-bottom="0in" style:contextual-spacing="false"/>
      <style:text-properties fo:language="en" fo:country="GB"/>
    </style:style>
    <style:style style:name="P50" style:family="paragraph" style:parent-style-name="Standard">
      <style:paragraph-properties fo:margin-top="0.0835in" fo:margin-bottom="0in" style:contextual-spacing="false"/>
    </style:style>
    <style:style style:name="P51"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2" style:family="paragraph" style:parent-style-name="Standard">
      <style:paragraph-properties fo:margin-top="0.1665in" fo:margin-bottom="0.0835in" style:contextual-spacing="false"/>
    </style:style>
    <style:style style:name="P53" style:family="paragraph" style:parent-style-name="Standard">
      <style:paragraph-properties fo:margin-top="0in" fo:margin-bottom="0.25in" style:contextual-spacing="false"/>
    </style:style>
    <style:style style:name="P54" style:family="paragraph" style:parent-style-name="List_20_Paragraph" style:list-style-name="WWNum9">
      <style:paragraph-properties fo:keep-with-next="always"/>
    </style:style>
    <style:style style:name="P55" style:family="paragraph" style:parent-style-name="List_20_Paragraph" style:list-style-name="WWNum9">
      <style:paragraph-properties fo:margin-left="0.248in" fo:margin-top="0.1665in" fo:margin-bottom="0in" style:contextual-spacing="false" fo:text-indent="-0.248in" style:auto-text-indent="false" fo:keep-with-next="always"/>
    </style:style>
    <style:style style:name="P56" style:family="paragraph" style:parent-style-name="List_20_Paragraph">
      <style:paragraph-properties fo:margin-left="0.25in" fo:keep-with-next="always"/>
      <style:text-properties style:font-name="Calibri1" fo:language="en" fo:country="GB"/>
    </style:style>
    <style:style style:name="P57" style:family="paragraph" style:parent-style-name="List_20_Paragraph">
      <style:text-properties style:font-name="Calibri1" fo:language="en" fo:country="GB"/>
    </style:style>
    <style:style style:name="P58" style:family="paragraph" style:parent-style-name="List_20_Paragraph">
      <style:paragraph-properties fo:margin-left="0.248in" fo:text-align="center" style:justify-single-word="false"/>
    </style:style>
    <style:style style:name="P59" style:family="paragraph" style:parent-style-name="List_20_Paragraph" style:list-style-name="WWNum9">
      <style:paragraph-properties fo:margin-left="0.248in" fo:text-indent="-0.248in" style:auto-text-indent="false"/>
    </style:style>
    <style:style style:name="P60" style:family="paragraph" style:parent-style-name="List_20_Paragraph" style:list-style-name="WWNum9"/>
    <style:style style:name="P61" style:family="paragraph" style:parent-style-name="Standard">
      <style:paragraph-properties fo:margin-left="0.25in"/>
    </style:style>
    <style:style style:name="P62" style:family="paragraph" style:parent-style-name="Standard">
      <style:paragraph-properties fo:margin-left="0.25in" fo:text-align="center" style:justify-single-word="false"/>
    </style:style>
    <style:style style:name="P63" style:family="paragraph" style:parent-style-name="Standard">
      <loext:graphic-properties draw:fill="solid" draw:fill-color="#f2f2f2"/>
      <style:paragraph-properties fo:background-color="#f2f2f2" fo:padding="0.0835in" fo:border="0.51pt solid #ffffff" style:shadow="none"/>
    </style:style>
    <style:style style:name="P64" style:family="paragraph" style:parent-style-name="Standard" style:list-style-name="WWNum5">
      <style:paragraph-properties fo:margin-top="0.0835in" fo:margin-bottom="0in" style:contextual-spacing="false"/>
    </style:style>
    <style:style style:name="P65" style:family="paragraph" style:parent-style-name="Standard" style:list-style-name="WWNum5"/>
    <style:style style:name="P66" style:family="paragraph" style:parent-style-name="List_20_Paragraph" style:list-style-name="WWNum8">
      <style:paragraph-properties fo:margin-left="0.4957in" fo:margin-top="0.0835in" fo:margin-bottom="0in" style:contextual-spacing="false" fo:text-indent="-0.248in" style:auto-text-indent="false"/>
    </style:style>
    <style:style style:name="P67" style:family="paragraph" style:parent-style-name="List_20_Paragraph" style:list-style-name="WWNum6"/>
    <style:style style:name="P68" style:family="paragraph" style:parent-style-name="Command_20_Line">
      <style:paragraph-properties fo:margin-left="0.5in"/>
    </style:style>
    <style:style style:name="P69" style:family="paragraph" style:parent-style-name="Standard">
      <style:paragraph-properties fo:keep-together="always" fo:keep-with-next="always"/>
      <style:text-properties fo:language="en" fo:country="GB"/>
    </style:style>
    <style:style style:name="P70" style:family="paragraph" style:parent-style-name="Standard">
      <style:paragraph-properties fo:keep-together="always" fo:keep-with-next="always"/>
    </style:style>
    <style:style style:name="P71" style:family="paragraph" style:parent-style-name="Command_20_Line">
      <style:paragraph-properties fo:keep-together="always" fo:keep-with-next="always"/>
    </style:style>
    <style:style style:name="P72" style:family="paragraph" style:parent-style-name="Standard">
      <style:text-properties style:font-name="Consolas" fo:font-size="11pt" fo:language="en" fo:country="GB" style:font-size-asian="11pt" style:font-size-complex="11pt"/>
    </style:style>
    <style:style style:name="P73" style:family="paragraph" style:parent-style-name="Standard">
      <style:paragraph-properties fo:keep-with-next="always"/>
    </style:style>
    <style:style style:name="P74" style:family="paragraph" style:parent-style-name="Standard">
      <style:paragraph-properties>
        <style:tab-stops>
          <style:tab-stop style:position="3.9618in"/>
        </style:tab-stops>
      </style:paragraph-properties>
    </style:style>
    <style:style style:name="P75" style:family="paragraph" style:parent-style-name="Command_20_Line">
      <style:paragraph-properties fo:keep-with-next="always"/>
    </style:style>
    <style:style style:name="P76" style:family="paragraph" style:parent-style-name="Heading_20_1">
      <style:paragraph-properties fo:text-indent="-0.248in" style:auto-text-indent="false" fo:break-before="page"/>
    </style:style>
    <style:style style:name="P77" style:family="paragraph" style:parent-style-name="Standard">
      <style:text-properties style:font-name="Courier New" fo:font-size="10pt" fo:language="en" fo:country="GB" style:font-size-asian="10pt" style:font-name-complex="Courier New1" style:font-size-complex="10pt"/>
    </style:style>
    <style:style style:name="P78"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font-size="36pt" fo:font-weight="bold" style:font-size-asian="36pt" style:font-weight-asian="bold" style:font-size-complex="20pt"/>
    </style:style>
    <style:style style:name="T4" style:family="text">
      <style:text-properties fo:language="en" fo:country="GB" fo:font-style="italic" style:font-style-asian="italic"/>
    </style:style>
    <style:style style:name="T5" style:family="text">
      <style:text-properties fo:language="en" fo:country="GB"/>
    </style:style>
    <style:style style:name="T6" style:family="text">
      <style:text-properties fo:font-size="16pt" fo:language="en" fo:country="GB" style:font-size-asian="16pt"/>
    </style:style>
    <style:style style:name="T7" style:family="text">
      <style:text-properties fo:font-size="16pt" style:font-size-asian="16pt"/>
    </style:style>
    <style:style style:name="T8" style:family="text">
      <style:text-properties fo:font-size="11pt" fo:language="en" fo:country="GB" fo:font-style="italic" style:font-size-asian="11pt" style:font-style-asian="italic"/>
    </style:style>
    <style:style style:name="T9" style:family="text">
      <style:text-properties fo:font-size="11pt" fo:font-style="italic" style:font-size-asian="11pt" style:font-style-asian="italic"/>
    </style:style>
    <style:style style:name="T10" style:family="text">
      <style:text-properties fo:font-size="16pt" fo:language="en" fo:country="GB" fo:font-weight="bold" style:font-size-asian="16pt" style:font-weight-asian="bold" style:font-size-complex="16pt"/>
    </style:style>
    <style:style style:name="T11" style:family="text">
      <style:text-properties fo:font-size="16pt" fo:font-weight="bold" style:font-size-asian="16pt" style:font-weight-asian="bold" style:font-size-complex="16pt"/>
    </style:style>
    <style:style style:name="T12"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3" style:family="text">
      <style:text-properties style:font-name="Calibri1" fo:font-weight="normal" style:letter-kerning="true" style:font-family-asian="'ＭＳ 明朝'" style:font-family-generic-asian="system" style:font-pitch-asian="variable" style:language-asian="en" style:country-asian="GB" style:font-weight-asian="normal" style:font-name-complex="Arial1"/>
    </style:style>
    <style:style style:name="T14" style:family="text">
      <style:text-properties text:display="true"/>
    </style:style>
    <style:style style:name="T15"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6" style:family="text">
      <style:text-properties style:font-name="Calibri1" fo:font-style="normal" style:letter-kerning="true" style:font-family-asian="'ＭＳ 明朝'" style:font-family-generic-asian="system" style:font-pitch-asian="variable" style:language-asian="en" style:country-asian="GB" style:font-style-asian="normal" style:font-name-complex="Arial1"/>
    </style:style>
    <style:style style:name="T17"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8" style:family="text">
      <style:text-properties style:font-name="Calibri1" fo:font-size="12pt" style:letter-kerning="true" style:font-family-asian="'ＭＳ 明朝'" style:font-family-generic-asian="system" style:font-pitch-asian="variable" style:font-size-asian="12pt" style:language-asian="en" style:country-asian="GB" style:font-name-complex="Arial1"/>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family="Wingdings" style:font-family-generic="swiss" style:font-pitch="variable" style:font-charset="x-symbol" style:font-family-asian="Wingdings" style:font-family-generic-asian="system" style:font-pitch-asian="variable" style:font-family-complex="Wingdings" style:font-family-generic-complex="system" style:font-pitch-complex="variable"/>
    </style:style>
    <style:style style:name="T22" style:family="text">
      <style:text-properties fo:font-size="7pt" fo:language="en" fo:country="GB" style:font-size-asian="7pt"/>
    </style:style>
    <style:style style:name="T23" style:family="text">
      <style:text-properties fo:font-size="11pt" fo:language="en" fo:country="GB" style:font-size-asian="11pt" style:font-size-complex="11pt"/>
    </style:style>
    <style:style style:name="T24" style:family="text">
      <style:text-properties fo:font-size="11pt" style:font-size-asian="11pt" style:font-size-complex="11pt"/>
    </style:style>
    <style:style style:name="T25" style:family="text">
      <style:text-properties fo:language="en" fo:country="GB" fo:font-weight="bold" style:font-weight-asian="bold" style:font-weight-complex="bold"/>
    </style:style>
    <style:style style:name="T26" style:family="text">
      <style:text-properties fo:language="de" fo:country="DE"/>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style:font-weight-asian="bold"/>
    </style:style>
    <style:style style:name="T29" style:family="text">
      <style:text-properties fo:language="en" fo:country="GB" fo:font-weight="bold" style:font-weight-asian="bold"/>
    </style:style>
    <style:style style:name="T30" style:family="text">
      <style:text-properties style:text-underline-style="solid" style:text-underline-width="auto" style:text-underline-color="font-color"/>
    </style:style>
    <style:style style:name="T31" style:family="text">
      <style:text-properties fo:font-size="10pt" fo:language="en" fo:country="GB" fo:font-weight="bold" style:font-size-asian="10pt" style:font-weight-asian="bold"/>
    </style:style>
    <style:style style:name="T32" style:family="text">
      <style:text-properties fo:font-size="10pt" fo:font-weight="bold" style:font-size-asian="10pt" style:font-weight-asian="bold"/>
    </style:style>
    <style:style style:name="T33" style:family="text">
      <style:text-properties fo:font-size="10pt" fo:language="en" fo:country="GB" style:font-size-asian="10pt"/>
    </style:style>
    <style:style style:name="T34" style:family="text">
      <style:text-properties fo:font-size="10pt" style:font-size-asian="10pt"/>
    </style:style>
    <style:style style:name="T35" style:family="text">
      <style:text-properties style:font-name="Calibri1" fo:language="en" fo:country="GB" style:font-family-complex="Tahoma" style:font-family-generic-complex="system" style:font-pitch-complex="variable"/>
    </style:style>
    <style:style style:name="T36" style:family="text">
      <style:text-properties style:font-name="Calibri1" style:font-family-complex="Tahoma" style:font-family-generic-complex="system" style:font-pitch-complex="variable"/>
    </style:style>
    <style:style style:name="T37" style:family="text">
      <style:text-properties style:font-name="Calibri1" fo:font-weight="bold" style:font-weight-asian="bold" style:font-family-complex="Tahoma" style:font-family-generic-complex="system" style:font-pitch-complex="variable" style:font-weight-complex="bold"/>
    </style:style>
    <style:style style:name="T38" style:family="text">
      <style:text-properties style:font-name="Calibri1" fo:font-weight="bold" style:font-weight-asian="bold" style:font-family-complex="Tahoma" style:font-family-generic-complex="system" style:font-pitch-complex="variable"/>
    </style:style>
    <style:style style:name="T39" style:family="text">
      <style:text-properties style:font-name="Calibri1" fo:language="en" fo:country="GB"/>
    </style:style>
    <style:style style:name="T40" style:family="text">
      <style:text-properties style:font-name="Calibri1"/>
    </style:style>
    <style:style style:name="T41" style:family="text">
      <style:text-properties style:font-name="Calibri1" fo:font-weight="bold" style:font-weight-asian="bold"/>
    </style:style>
    <style:style style:name="T42" style:family="text">
      <style:text-properties style:font-weight-complex="bold"/>
    </style:style>
    <style:style style:name="T43" style:family="text">
      <style:text-properties fo:language="fr" fo:country="FR"/>
    </style:style>
    <style:style style:name="T44" style:family="text">
      <style:text-properties style:font-name="Consolas" fo:font-size="11pt" fo:language="en" fo:country="GB" style:font-size-asian="11pt" style:font-size-complex="11pt"/>
    </style:style>
    <style:style style:name="T45" style:family="text">
      <style:text-properties fo:font-style="italic" style:font-style-asian="italic"/>
    </style:style>
    <style:style style:name="T46" style:family="text">
      <style:text-properties style:font-name="Courier New" fo:font-size="10pt" fo:language="en" fo:country="GB"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solid" draw:fill-color="#ffffff" draw:textarea-vertical-align="top" draw:auto-grow-height="false" fo:min-height="0.0181in" fo:min-width="0.2244in" fo:padding-top="0.0492in" fo:padding-bottom="0.0492in" fo:padding-left="0.0984in" fo:padding-right="0.0984in" fo:wrap-option="wrap" loext:decorative="false" fo:margin-left="0.0752in" fo:margin-right="0.1102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6" text:anchor-type="as-char" svg:width="5.9846in" svg:height="1.7689in"><draw:image xlink:href="Pictures/100000010000084600000272C9A24FF7.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3">Instructions d’installation</text:span><text:span text:style-name="T2"/></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2" loext:marker-style-name="T4"><draw:frame draw:style-name="fr1" draw:name="Picture 1" text:anchor-type="as-char" svg:width="1.2193in" svg:height="0.6646in"><draw:image xlink:href="Pictures/100000010000006200000036B65513BC.png" xlink:type="simple" xlink:show="embed" xlink:actuate="onLoad" draw:mime-type="image/png"/><svg:desc>Icône

Description générée automatiquement</svg:desc></draw:frame></text:p>
      <text:p text:style-name="P4" loext:marker-style-name="T4"/>
      <text:p text:style-name="P5"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7" loext:marker-style-name="T5"/>
      <text:p text:style-name="P2" loext:marker-style-name="T6"><text:span text:style-name="T7">Scripture App Builder : Instructions d'installation</text:span><text:span text:style-name="T6"/></text:p>
      <text:p text:style-name="P7" loext:marker-style-name="T5"/>
      <text:p text:style-name="P2" loext:marker-style-name="T5">© 2024, SIL Global<text:span text:style-name="T5"/></text:p>
      <text:p text:style-name="P7" loext:marker-style-name="T5"/>
      <text:p text:style-name="P2" loext:marker-style-name="T8"><text:span text:style-name="T9">Dernière mise à jour : 10 septembre 2024</text:span><text:span text:style-name="T8"/></text:p>
      <text:p text:style-name="P7" loext:marker-style-name="T5"/>
      <text:p text:style-name="P7" loext:marker-style-name="T5"/>
      <text:p text:style-name="P7" loext:marker-style-name="T5"/>
      <text:p text:style-name="P7" loext:marker-style-name="T5"/>
      <text:p text:style-name="P7" loext:marker-style-name="T5"/>
      <text:p text:style-name="P2" loext:marker-style-name="T5">Vous êtes libre d'imprimer ce manuel pour un usage personnel <text:line-break/>et pour des ateliers de formation.<text:span text:style-name="T5"/></text:p>
      <text:p text:style-name="P7" loext:marker-style-name="T5"/>
      <text:p text:style-name="P2" loext:marker-style-name="T5">La dernière version est disponible à l'adresse<text:span text:style-name="T5"/></text:p>
      <text:p text:style-name="P2" loext:marker-style-name="T5"><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7" loext:marker-style-name="T5"/>
      <text:p text:style-name="P2" loext:marker-style-name="T5">et dans le menu Aide de Scripture App Builder.<text:span text:style-name="T5"/></text:p>
      <text:p text:style-name="P6" loext:marker-style-name="T5"/>
      <text:p text:style-name="P6" loext:marker-style-name="T5"/>
      <text:p text:style-name="P6" loext:marker-style-name="T5"/>
      <text:p text:style-name="P8" loext:marker-style-name="T10"><text:span text:style-name="T11">Contenu</text:span><text:span text:style-name="T10"/></text:p>
      <text:p text:style-name="P9"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2"><text:a xlink:type="simple" xlink:href="#_Toc169552721" text:style-name="Index_20_Link" text:visited-style-name="Index_20_Link">1.<text:span text:style-name="T13"><text:tab/></text:span>Introduction<text:span text:style-name="T14"><text:tab/>4</text:span></text:a></text:p>
          <text:p text:style-name="Contents_20_1" loext:marker-style-name="T12"><text:a xlink:type="simple" xlink:href="#_Toc169552722" text:style-name="Index_20_Link" text:visited-style-name="Index_20_Link">2.<text:span text:style-name="T13"><text:tab/></text:span>Windows Installation<text:span text:style-name="T14"><text:tab/>4</text:span></text:a></text:p>
          <text:p text:style-name="Contents_20_2" loext:marker-style-name="T15"><text:a xlink:type="simple" xlink:href="#_Toc169552723" text:style-name="Index_20_Link" text:visited-style-name="Index_20_Link">2.1.<text:span text:style-name="T16"><text:tab/></text:span>Installation de Scripture App Builder<text:span text:style-name="T14"><text:tab/>5</text:span></text:a></text:p>
          <text:p text:style-name="Contents_20_2" loext:marker-style-name="T15"><text:a xlink:type="simple" xlink:href="#_Toc169552724" text:style-name="Index_20_Link" text:visited-style-name="Index_20_Link">2.2.<text:span text:style-name="T16"><text:tab/></text:span>Installation du kit de développement Java (JDK)<text:span text:style-name="T14"><text:tab/>5</text:span></text:a></text:p>
          <text:p text:style-name="Contents_20_3" loext:marker-style-name="T17"><text:a xlink:type="simple" xlink:href="#_Toc169552725" text:style-name="Index_20_Link" text:visited-style-name="Index_20_Link">2.2.1.<text:span text:style-name="T18"><text:tab/></text:span>Installation du JDK à l'aide de l'assistant d'installation du JDK<text:span text:style-name="T14"><text:tab/>5</text:span></text:a></text:p>
          <text:p text:style-name="Contents_20_3" loext:marker-style-name="T17"><text:a xlink:type="simple" xlink:href="#_Toc169552726" text:style-name="Index_20_Link" text:visited-style-name="Index_20_Link">2.2.2.<text:span text:style-name="T18"><text:tab/></text:span>Installation du JDK à partir du site Web d'Azul<text:span text:style-name="T14"><text:tab/>5</text:span></text:a></text:p>
          <text:p text:style-name="Contents_20_2" loext:marker-style-name="T15"><text:a xlink:type="simple" xlink:href="#_Toc169552727" text:style-name="Index_20_Link" text:visited-style-name="Index_20_Link">2.3.<text:span text:style-name="T16"><text:tab/></text:span>Installation du kit de développement logiciel (SDK) Android<text:span text:style-name="T14"><text:tab/>7</text:span></text:a></text:p>
          <text:p text:style-name="Contents_20_3" loext:marker-style-name="T17"><text:a xlink:type="simple" xlink:href="#_Toc169552728" text:style-name="Index_20_Link" text:visited-style-name="Index_20_Link">2.3.1.<text:span text:style-name="T18"><text:tab/></text:span>Téléchargement des packages SDK Android à partir d'Internet<text:span text:style-name="T14"><text:tab/>7</text:span></text:a></text:p>
          <text:p text:style-name="Contents_20_3" loext:marker-style-name="T17"><text:a xlink:type="simple" xlink:href="#_Toc169552729" text:style-name="Index_20_Link" text:visited-style-name="Index_20_Link">2.3.2.<text:span text:style-name="T18"><text:tab/></text:span>Copier les fichiers du SDK Android d'une autre personne<text:span text:style-name="T14"><text:tab/>8</text:span></text:a></text:p>
          <text:p text:style-name="Contents_20_2" loext:marker-style-name="T15"><text:a xlink:type="simple" xlink:href="#_Toc169552730" text:style-name="Index_20_Link" text:visited-style-name="Index_20_Link">2.4.<text:span text:style-name="T16"><text:tab/></text:span>Installation d'aeneas pour la synchronisation audio-texte<text:span text:style-name="T14"><text:tab/>9</text:span></text:a></text:p>
          <text:p text:style-name="Contents_20_1" loext:marker-style-name="T12"><text:a xlink:type="simple" xlink:href="#_Toc169552731" text:style-name="Index_20_Link" text:visited-style-name="Index_20_Link">3.<text:span text:style-name="T13"><text:tab/></text:span>Linux Installation<text:span text:style-name="T14"><text:tab/>12</text:span></text:a></text:p>
          <text:p text:style-name="Contents_20_2" loext:marker-style-name="T15"><text:a xlink:type="simple" xlink:href="#_Toc169552732" text:style-name="Index_20_Link" text:visited-style-name="Index_20_Link">3.1.<text:span text:style-name="T16"><text:tab/></text:span>Ajouter un référentiel SIL pour Ubuntu<text:span text:style-name="T14"><text:tab/>12</text:span></text:a></text:p>
          <text:p text:style-name="Contents_20_2" loext:marker-style-name="T15"><text:a xlink:type="simple" xlink:href="#_Toc169552733" text:style-name="Index_20_Link" text:visited-style-name="Index_20_Link">3.2.<text:span text:style-name="T16"><text:tab/></text:span>Installation de tous les paquets à partir d'Internet<text:span text:style-name="T14"><text:tab/>13</text:span></text:a></text:p>
          <text:p text:style-name="Contents_20_2" loext:marker-style-name="T15"><text:a xlink:type="simple" xlink:href="#_Toc169552734" text:style-name="Index_20_Link" text:visited-style-name="Index_20_Link">3.3.<text:span text:style-name="T16"><text:tab/></text:span>Téléchargement des fichiers Android SDK avant l'installation du package<text:span text:style-name="T14"><text:tab/>13</text:span></text:a></text:p>
          <text:p text:style-name="Contents_20_3" loext:marker-style-name="T17"><text:a xlink:type="simple" xlink:href="#_Toc169552735" text:style-name="Index_20_Link" text:visited-style-name="Index_20_Link">3.3.1.<text:span text:style-name="T18"><text:tab/></text:span>Téléchargement des fichiers SDK Android<text:span text:style-name="T14"><text:tab/>13</text:span></text:a></text:p>
          <text:p text:style-name="Contents_20_3" loext:marker-style-name="T17"><text:a xlink:type="simple" xlink:href="#_Toc169552736" text:style-name="Index_20_Link" text:visited-style-name="Index_20_Link">3.3.2.<text:span text:style-name="T18"><text:tab/></text:span>Fournir des fichiers zip lors de l'installation du package<text:span text:style-name="T14"><text:tab/>13</text:span></text:a></text:p>
          <text:p text:style-name="Contents_20_2" loext:marker-style-name="T15"><text:a xlink:type="simple" xlink:href="#_Toc169552737" text:style-name="Index_20_Link" text:visited-style-name="Index_20_Link">3.4.<text:span text:style-name="T16"><text:tab/></text:span>Installation sans SDK Android<text:span text:style-name="T14"><text:tab/>14</text:span></text:a></text:p>
          <text:p text:style-name="Contents_20_2" loext:marker-style-name="T15"><text:a xlink:type="simple" xlink:href="#_Toc169552738" text:style-name="Index_20_Link" text:visited-style-name="Index_20_Link">3.5.<text:span text:style-name="T16"><text:tab/></text:span>Automatisation de l'installation du SDK Android<text:span text:style-name="T14"><text:tab/>14</text:span></text:a></text:p>
          <text:p text:style-name="Contents_20_1" loext:marker-style-name="T12"><text:a xlink:type="simple" xlink:href="#_Toc169552739" text:style-name="Index_20_Link" text:visited-style-name="Index_20_Link">4.<text:span text:style-name="T13"><text:tab/></text:span>Comment créer votre première application<text:span text:style-name="T14"><text:tab/>15</text:span></text:a></text:p>
        </text:index-body>
      </text:table-of-content>
      <text:p text:style-name="P6" loext:marker-style-name="T5"/>
      <text:p text:style-name="P6" loext:marker-style-name="T5"/>
      <text:h text:style-name="P10" text:outline-level="1" loext:marker-style-name="T5"><text:bookmark-start text:name="_Toc169552721"/>Introduction<text:bookmark-end text:name="_Toc169552721"/><text:span text:style-name="T5"/></text:h>
      <text:p text:style-name="Standard" loext:marker-style-name="T5">Scripture App Builder fait ce que son nom suggère : il vous aide à créer des applications bibliques personnalisées pour les smartphones et les tablettes.<text:span text:style-name="T5"/></text:p>
      <text:p text:style-name="P6" loext:marker-style-name="T5"/>
      <text:p text:style-name="Standard" loext:marker-style-name="T5">Vous spécifiez les fichiers bibliques à utiliser, le nom de l'application, les polices, les couleurs, les informations de la boîte à propos, l'audio et les icônes. Scripture App Builder regroupera tout et créera l'application personnalisée pour vous. Vous l'installez ensuite sur votre appareil mobile, l'envoyez à d'autres personnes par le biais d'une application de transfert Bluetooth ou Wi-Fi, le partagez sur des cartes mémoire microSD et le publiez sur des magasins d'applications sur Internet.<text:span text:style-name="T5"/></text:p>
      <text:p text:style-name="P6" loext:marker-style-name="T5"/>
      <text:p text:style-name="Standard" loext:marker-style-name="T5"><draw:frame draw:style-name="fr1" draw:name="Image2" text:anchor-type="as-char" svg:width="5.9098in" svg:height="2.9654in"><draw:image xlink:href="Pictures/1000000000000305000001832242D61E.png" xlink:type="simple" xlink:show="embed" xlink:actuate="onLoad" draw:mime-type="image/png"/></draw:frame></text:p>
      <text:p text:style-name="P6" loext:marker-style-name="T5"/>
      <text:p text:style-name="Standard" loext:marker-style-name="T5">Pour installer Scripture App Builder sur <text:span text:style-name="T19">Windows</text:span>, veuillez suivre les instructions de la section 2. Pour <text:span text:style-name="T19">Linux</text:span>, veuillez trouver les instructions dans la section 3. </text:p>
      <text:p text:style-name="P6" loext:marker-style-name="T5"/>
      <text:p text:style-name="Standard" loext:marker-style-name="T5">Pour <text:span text:style-name="T19">Mac</text:span>, vous pouvez trouver les instructions d'installation dans le document <text:span text:style-name="T19">Installation et création d'applications sur un Mac</text:span>.</text:p>
      <text:p text:style-name="P6" loext:marker-style-name="T5"/>
      <text:h text:style-name="Heading_20_1" text:outline-level="1" loext:marker-style-name="T5"><text:bookmark-start text:name="_Toc169552722"/>Windows Installation<text:bookmark-end text:name="_Toc169552722"/><text:span text:style-name="T5"/></text:h>
      <text:p text:style-name="Standard" loext:marker-style-name="T5">Pour exécuter Scripture App Builder sur Windows, vous devez avoir 3 composants installés sur votre ordinateur :<text:span text:style-name="T5"/></text:p>
      <text:list text:style-name="WWNum1">
        <text:list-item>
          <text:p text:style-name="P11" loext:marker-style-name="T5">Scripture App Builder<text:span text:style-name="T5"/></text:p>
        </text:list-item>
        <text:list-item>
          <text:p text:style-name="P12" loext:marker-style-name="T5">Kit de développement Java (JDK)<text:span text:style-name="T5"/></text:p>
        </text:list-item>
        <text:list-item>
          <text:p text:style-name="P12" loext:marker-style-name="T5">Kit de développement logiciel (SDK) Android<text:span text:style-name="T5"/></text:p>
        </text:list-item>
      </text:list>
      <text:p text:style-name="P6" loext:marker-style-name="T5"/>
      <text:p text:style-name="Standard" loext:marker-style-name="T5">Il existe un quatrième composant facultatif à installer si vous souhaitez synchroniser le texte et l'audio :<text:span text:style-name="T5"/></text:p>
      <text:list text:continue-numbering="true" text:style-name="WWNum1">
        <text:list-item>
          <text:p text:style-name="P13" loext:marker-style-name="T5">Outil de synchronisation audio-texte Aeneas.<text:span text:style-name="T5"/></text:p>
        </text:list-item>
      </text:list>
      <text:p text:style-name="P6" loext:marker-style-name="T5"/>
      <text:p text:style-name="Standard" loext:marker-style-name="T5">Voici plus de détails sur l'installation de chacun de ces composants.<text:span text:style-name="T5"/></text:p>
      <text:p text:style-name="P6" loext:marker-style-name="T5"/>
      <text:h text:style-name="P14" text:outline-level="2"><text:bookmark-start text:name="_Toc169552723"/>Installation de Scripture App Builder<text:bookmark-end text:name="_Toc169552723"/></text:h>
      <text:p text:style-name="P15" loext:marker-style-name="T5">Pour installer le programme Scripture App Builder, procédez comme suit :<text:span text:style-name="T5"/></text:p>
      <text:list text:style-name="WWNum7">
        <text:list-item>
          <text:p text:style-name="P16" loext:marker-style-name="T5">Allez sur la page de téléchargement du site Web de l'App Builder : <text:a xlink:type="simple" xlink:href="http://software.sil.org/scriptureappbuilder/download/" text:style-name="Internet_20_link" text:visited-style-name="Visited_20_Internet_20_Link"><text:span text:style-name="Internet_20_link">http://software.sil.org/scriptureappbuilder/download</text:span></text:a> </text:p>
        </text:list-item>
        <text:list-item>
          <text:p text:style-name="P16" loext:marker-style-name="T5">Téléchargez le dernier programme d'installation pour Windows.<text:span text:style-name="T5"/></text:p>
        </text:list-item>
        <text:list-item>
          <text:p text:style-name="P16" loext:marker-style-name="T5">Exécutez le programme d'installation, <text:span text:style-name="T19">Scripture-App-Builder-x.x-Setup.exe</text:span>, pour installer Scripture App Builder sur votre ordinateur.</text:p>
        </text:list-item>
      </text:list>
      <text:p text:style-name="Standard" loext:marker-style-name="T5"><text:line-break/><text:span text:style-name="T5"/></text:p>
      <text:h text:style-name="P14" text:outline-level="2"><text:bookmark-start text:name="_Toc169552724"/>Installation du kit de développement Java (JDK)<text:bookmark-end text:name="_Toc169552724"/></text:h>
      <text:p text:style-name="P17" loext:marker-style-name="T5"><text:bookmark-start text:name="_Hlk534311866"/>Vous aurez besoin de la version 17 du kit de développement Java (JDK) pour créer des applications. Il y a deux façons de l'installer :<text:span text:style-name="T5"/></text:p>
      <text:list text:style-name="WWNum14">
        <text:list-item>
          <text:p text:style-name="P18" loext:marker-style-name="T5">Utilisez l'assistant d'installation de JDK dans Scripture App Builder (voir section 2.2.1), ou<text:span text:style-name="T5"/></text:p>
        </text:list-item>
        <text:list-item>
          <text:p text:style-name="P19" loext:marker-style-name="T5">Téléchargez le fichier d'installation du JDK à partir du site Web d'Azul et lancez l'installateur (voir section 2.2.2).<text:span text:style-name="T5"/></text:p>
        </text:list-item>
      </text:list>
      <text:p text:style-name="P20" loext:marker-style-name="T5"/>
      <text:h text:style-name="Heading_20_3" text:outline-level="3" loext:marker-style-name="T5"><text:bookmark-start text:name="_Toc169552725"/>Installation du JDK à l'aide de l'assistant d'installation du JDK<text:bookmark-end text:name="_Toc169552725"/><text:span text:style-name="T5"/></text:h>
      <text:p text:style-name="P17" loext:marker-style-name="T5">La façon la plus simple d'installer le kit de développement Java (JDK) est d'utiliser l'assistant d'installation de JDK dans Scripture App Builder :<text:span text:style-name="T5"/></text:p>
      <text:list text:style-name="WWNum13">
        <text:list-item>
          <text:p text:style-name="P21" loext:marker-style-name="T5">Lancez <text:span text:style-name="T20">Scripture App Builder</text:span>.</text:p>
        </text:list-item>
        <text:list-item>
          <text:p text:style-name="P21" loext:marker-style-name="T5">Cliquez sur le bouton<text:span text:style-name="T20"> Installer JDK </text:span>sur la page d'accueil (ou sélectionnez <text:span text:style-name="T20">Outils </text:span><text:span text:style-name="T21"></text:span> <text:span text:style-name="T20">Installer JDK</text:span> dans le menu principal).</text:p>
        </text:list-item>
        <text:list-item>
          <text:p text:style-name="P21" loext:marker-style-name="T5">Suivez les instructions de l'Assistant pour télécharger et installer le JDK.<text:span text:style-name="T5"/></text:p>
        </text:list-item>
      </text:list>
      <text:p text:style-name="P22" loext:marker-style-name="T5">Si le JDK a été installé avec succès, ignorez la section 2.2.2 et passez à la section 2.3 pour installer le SDK Android.<text:span text:style-name="T5"/></text:p>
      <text:p text:style-name="P23" loext:marker-style-name="T5"/>
      <text:h text:style-name="Heading_20_3" text:outline-level="3" loext:marker-style-name="T5"><text:bookmark-start text:name="_Toc169552726"/>Installation du JDK à partir du site Web d'Azul<text:bookmark-end text:name="_Toc169552726"/><text:span text:style-name="T5"/></text:h>
      <text:p text:style-name="P17" loext:marker-style-name="T5">Nous vous recommandons d'utiliser Zulu, qui est une distribution gratuite d'OpenJDK d'Azul.<text:bookmark-end text:name="_Hlk534311866"/><text:span text:style-name="T5"/></text:p>
      <text:list text:style-name="WWNum10">
        <text:list-item>
          <text:p text:style-name="P24" loext:marker-style-name="T5">Allez sur le site Web<text:span text:style-name="T20"> </text:span>de téléchargement des versions <text:span text:style-name="T20">Zulu </text:span>d'OpenJDK :</text:p>
        </text:list-item>
      </text:list>
      <text:p text:style-name="P25" loext:marker-style-name="T22"/>
      <text:p text:style-name="P26" loext:marker-style-name="T23"><text:a xlink:type="simple" xlink:href="https://www.azul.com/downloads/?version=java-17-lts&amp;os=windows&amp;architecture=x86-64-bit&amp;package=jdk#zulu" text:style-name="Internet_20_link" text:visited-style-name="Visited_20_Internet_20_Link"><text:span text:style-name="Internet_20_link"><text:span text:style-name="T24">https://www.azul.com/downloads/?version=java-17-lts&amp;os=windows&amp;architecture=x86-64-bit&amp;package=jdk#zulu</text:span></text:span></text:a><text:span text:style-name="T23"/></text:p>
      <text:p text:style-name="P27" loext:marker-style-name="T5"/>
      <text:p text:style-name="P26" loext:marker-style-name="T5">Il y a beaucoup de téléchargements sur cette page, mais le lien ci-dessus filtrera ceux que vous voyez (Version Java : Java 17 LTS ; Système d'exploitation : Windows ; Architecture : x86 64 bits ; Package Java : JDK).<text:span text:style-name="T5"/></text:p>
      <text:p text:style-name="P6" loext:marker-style-name="T5"/>
      <text:p text:style-name="P6" loext:marker-style-name="T5"/>
      <text:list text:continue-numbering="true" text:style-name="WWNum10">
        <text:list-item>
          <text:p text:style-name="P28" loext:marker-style-name="T5">Faites défiler la page jusqu'à ce que vous voyiez les téléchargements :<text:span text:style-name="T5"/></text:p>
        </text:list-item>
      </text:list>
      <text:p text:style-name="P6" loext:marker-style-name="T5"/>
      <text:p text:style-name="Standard" loext:marker-style-name="T5"><draw:custom-shape text:anchor-type="char" draw:z-index="0" draw:name="AutoShape 7" draw:style-name="gr1" draw:text-style-name="P29" svg:width="0.5079in" svg:height="0.2323in" draw:transform="rotate (-0.867952237016781) translate (5.5871062992126in 2.33053368328959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1" draw:name="Image3" text:anchor-type="as-char" svg:width="5.9846in" svg:height="2.5575in"><draw:image xlink:href="Pictures/1000000100000523000002328EF02B45.png" xlink:type="simple" xlink:show="embed" xlink:actuate="onLoad" draw:mime-type="image/png"/><svg:desc>Une capture d'écran d'un ordinateur

Description générée automatiquement</svg:desc></draw:frame></text:p>
      <text:p text:style-name="P6" loext:marker-style-name="T5"/>
      <text:p text:style-name="P6" loext:marker-style-name="T5"/>
      <text:list text:continue-numbering="true" text:style-name="WWNum10">
        <text:list-item>
          <text:p text:style-name="P28" loext:marker-style-name="T5">Vous avez le choix entre un fichier zip et un fichier msi. <text:span text:style-name="T20">Téléchargez le fichier .msi</text:span> car il est livré avec son propre programme d'installation. </text:p>
        </text:list-item>
      </text:list>
      <text:p text:style-name="P30" loext:marker-style-name="T5"/>
      <text:p text:style-name="P31" loext:marker-style-name="T5">Le fichier que vous téléchargez aura un nom de fichier comme ceci :<text:span text:style-name="T5"/></text:p>
      <text:p text:style-name="P32" loext:marker-style-name="T25"><text:span text:style-name="T20">zulu17.44.15-ca-jdk17.0.8-win_x64.msi</text:span><text:span text:style-name="T25"/></text:p>
      <text:p text:style-name="List_20_Paragraph" loext:marker-style-name="T5"><text:line-break/><text:span text:style-name="T5"/></text:p>
      <text:list text:continue-numbering="true" text:style-name="WWNum10">
        <text:list-item>
          <text:p text:style-name="P28" loext:marker-style-name="T5"><text:span text:style-name="T20">Double-cliquez sur le fichier msi</text:span> et suivez les instructions de l'assistant d'installation pour l'installer. Par défaut, le programme d'installation de .msi installe le JDK dans le dossier suivant :</text:p>
        </text:list-item>
      </text:list>
      <text:p text:style-name="P33" loext:marker-style-name="T26">C :\Program Files\Zulu\zulu-17\<text:span text:style-name="T26"/></text:p>
      <text:p text:style-name="P34" loext:marker-style-name="T26"/>
      <text:p text:style-name="P34" loext:marker-style-name="T26"/>
      <text:p text:style-name="P35" loext:marker-style-name="T5"><text:span text:style-name="T27">Important </text:span>: Si vous remplacez le dossier d'installation du JDK par un autre dossier que le dossier par défaut, vous devrez vous souvenir de l'emplacement du dossier afin de pouvoir indiquer à Scripture App Builder où trouver le JDK.</text:p>
      <text:p text:style-name="P6" loext:marker-style-name="T5"/>
      <text:p text:style-name="P6" loext:marker-style-name="T5"/>
      <text:h text:style-name="P14" text:outline-level="2"><text:bookmark-start text:name="_Toc169552727"/>Installation du kit de développement logiciel (SDK) Android<text:bookmark-end text:name="_Toc169552727"/></text:h>
      <text:p text:style-name="P17" loext:marker-style-name="T5">Le troisième composant nécessaire au développement d'applications Android est le kit de développement logiciel (SDK) Android. Il existe deux façons d'installer le SDK Android :<text:span text:style-name="T5"/></text:p>
      <text:list text:style-name="WWNum11">
        <text:list-item>
          <text:p text:style-name="P36" loext:marker-style-name="T5"><text:span text:style-name="T28">En ligne </text:span><text:span text:style-name="T19">: téléchargez les packages Android SDK à partir d'Internet : </text:span><text:line-break/>utilisez l'assistant d'installation Android SDK pour télécharger et installer les outils de ligne de commande et trois packages supplémentaires. Cette méthode nécessitera une connexion Internet. </text:p>
        </text:list-item>
      </text:list>
      <text:p text:style-name="P37" loext:marker-style-name="T5">Voir 2.3.1 pour plus de détails.<text:line-break/><text:span text:style-name="T5"/></text:p>
      <text:list text:continue-numbering="true" text:style-name="WWNum11">
        <text:list-item>
          <text:p text:style-name="P36" loext:marker-style-name="T5"><text:span text:style-name="T28">Hors ligne </text:span><text:span text:style-name="T19">: copiez les fichiers du SDK Android de quelqu'un d'autre :</text:span><text:line-break/>Si vous connaissez quelqu'un qui a déjà téléchargé et installé le SDK Android, vous pouvez copier tous les fichiers de celui-ci. </text:p>
        </text:list-item>
      </text:list>
      <text:p text:style-name="P37" loext:marker-style-name="T5">Cette méthode est particulièrement utile dans un atelier de formation où plusieurs personnes doivent installer le SDK mais disposent d'une bande passante Internet limitée. <text:span text:style-name="T5"/></text:p>
      <text:p text:style-name="P37" loext:marker-style-name="T5">Voir 2.3.2 pour plus de détails.<text:span text:style-name="T5"/></text:p>
      <text:p text:style-name="P6" loext:marker-style-name="T5"/>
      <text:h text:style-name="Heading_20_3" text:outline-level="3" loext:marker-style-name="T5"><text:bookmark-start text:name="_Toc169552728"/>Téléchargement des packages SDK Android à partir d'Internet<text:bookmark-end text:name="_Toc169552728"/><text:span text:style-name="T5"/></text:h>
      <text:p text:style-name="Standard" loext:marker-style-name="T5">Pour installer le SDK Android à partir d'Internet : <text:span text:style-name="T5"/></text:p>
      <text:p text:style-name="P6" loext:marker-style-name="T5"/>
      <text:list text:style-name="WWNum4">
        <text:list-item>
          <text:p text:style-name="P38" loext:marker-style-name="T5">Lancez <text:span text:style-name="T19">Scripture App Builder</text:span>. </text:p>
        </text:list-item>
      </text:list>
      <text:p text:style-name="P39" loext:marker-style-name="T5"/>
      <text:list text:continue-numbering="true" text:style-name="WWNum4">
        <text:list-item>
          <text:p text:style-name="P38" loext:marker-style-name="T5">Cliquez sur le <text:s/>bouton <text:span text:style-name="T20">Installer le SDK Android</text:span> sur la page d'accueil (ou sélectionnez <text:span text:style-name="T19">Outils </text:span><text:span text:style-name="T21"></text:span> <text:span text:style-name="T19">d'installation du SDK Android</text:span> dans le menu principal).</text:p>
        </text:list-item>
      </text:list>
      <text:p text:style-name="P30" loext:marker-style-name="T5"/>
      <text:list text:continue-numbering="true" text:style-name="WWNum4">
        <text:list-item>
          <text:p text:style-name="P40" loext:marker-style-name="T5">Suivez les instructions de chaque page de l'assistant d'installation du <text:span text:style-name="T20">SDK Android </text:span>pour télécharger chacun des packages du SDK Android et les installer.</text:p>
        </text:list-item>
      </text:list>
      <text:p text:style-name="P41" loext:marker-style-name="T5"/>
      <text:p text:style-name="P42" loext:marker-style-name="T5">Lorsqu'il vous est demandé de spécifier un dossier cible, il est recommandé d'indiquer <text:span text:style-name="T20">C :\sdk</text:span>.</text:p>
      <text:p text:style-name="P43" loext:marker-style-name="T5"/>
      <text:p text:style-name="P44" loext:marker-style-name="T5">Quatre packages seront téléchargés et installés :<text:span text:style-name="T5"/></text:p>
      <text:list text:style-name="WWNum12">
        <text:list-item>
          <text:p text:style-name="P45" loext:marker-style-name="T5">« Command line tools » <text:span text:style-name="T5"/></text:p>
        </text:list-item>
        <text:list-item>
          <text:p text:style-name="P45" loext:marker-style-name="T5">« Build tools »  <text:span text:style-name="T5"/></text:p>
        </text:list-item>
        <text:list-item>
          <text:p text:style-name="P45" loext:marker-style-name="T5">« Platform tools » and <text:span text:style-name="T5"/></text:p>
        </text:list-item>
        <text:list-item>
          <text:p text:style-name="P45" loext:marker-style-name="T5">API de la plate-forme.<text:span text:style-name="T5"/></text:p>
        </text:list-item>
      </text:list>
      <text:p text:style-name="P41" loext:marker-style-name="T5"/>
      <text:p text:style-name="P46" loext:marker-style-name="T5">Si l'installation a réussi, les numéros de version s'affichent en vert.<text:span text:style-name="T5"/></text:p>
      <text:p text:style-name="P47" loext:marker-style-name="T29"/>
      <text:p text:style-name="P48" loext:marker-style-name="T19"/>
      <text:p text:style-name="Standard" loext:marker-style-name="T5"><draw:frame draw:style-name="fr1" draw:name="Image4" text:anchor-type="as-char" svg:width="5.9846in" svg:height="3.8571in"><draw:image xlink:href="Pictures/10000000000003B1000002612EB5139F.png" xlink:type="simple" xlink:show="embed" xlink:actuate="onLoad" draw:mime-type="image/png"/></draw:frame></text:p>
      <text:p text:style-name="Standard" loext:marker-style-name="T5"><text:line-break/>Si l'un des outils de génération, des outils de plate-forme ou de l'API de plate-forme est répertorié comme « Introuvable » (affiché en rouge), accédez aux <text:span text:style-name="T20">Outils </text:span><text:span text:style-name="T21"></text:span> <text:span text:style-name="T20">Paramètres</text:span>, sélectionnez l'onglet <text:span text:style-name="T20">SDK Android</text:span> et cliquez sur le <text:s/>bouton <text:span text:style-name="T20">Installer les packages</text:span> pour les installer.</text:p>
      <text:p text:style-name="P6" loext:marker-style-name="T5"/>
      <text:p text:style-name="Standard" loext:marker-style-name="T5">Cliquez sur le <text:s/>bouton <text:span text:style-name="T20">Vérifier l'installation</text:span> pour confirmer que tous les packages ont été correctement installés.</text:p>
      <text:p text:style-name="P6" loext:marker-style-name="T5"/>
      <text:p text:style-name="Standard" loext:marker-style-name="T5">Vous pouvez sauter la section 2.3.2 et passer directement à la section 2.4.<text:span text:style-name="T5"/></text:p>
      <text:p text:style-name="P49" loext:marker-style-name="T5"/>
      <text:h text:style-name="Heading_20_3" text:outline-level="3" loext:marker-style-name="T5"><text:bookmark-start text:name="_Toc169552729"/>Copier les fichiers du SDK Android d'une autre personne<text:bookmark-end text:name="_Toc169552729"/><text:span text:style-name="T5"/></text:h>
      <text:p text:style-name="Standard" loext:marker-style-name="T5">Si vous connaissez quelqu'un qui a déjà téléchargé et installé le SDK Android et qui réussit à créer des applications avec, vous pouvez copier tous ses fichiers SDK Android dans un dossier de votre ordinateur.<text:span text:style-name="T5"/></text:p>
      <text:p text:style-name="P50" loext:marker-style-name="T5">Vous devez rechercher le dossier SDK Android de niveau supérieur, tel que <text:span text:style-name="T19">c:\sdk</text:span>, et copier l'intégralité du dossier et son contenu sur votre ordinateur. Un emplacement tel que c :\sdk est bon. Si cela vous facilite la tâche, vous pouvez compresser les dossiers, puis les décompresser sur votre ordinateur.</text:p>
      <text:p text:style-name="P50" loext:marker-style-name="T5">Notez qu'il n'y a <text:span text:style-name="T30">pas de programme d'installation à exécuter</text:span>. Il suffit de copier les fichiers d'un ordinateur à un autre.</text:p>
      <text:p text:style-name="P6" loext:marker-style-name="T5"/>
      <text:p text:style-name="P50" loext:marker-style-name="T5"><text:span text:style-name="T19">Astuce </text:span>: Un dossier SDK Android typique peut être assez volumineux (plus de 1 Go, selon les packages supplémentaires qui ont été installés). Pour créer une application, vous n'avez pas besoin de tous les fichiers SDK Android. Si vous souhaitez réduire le nombre de fichiers, voici une liste des dossiers essentiels et facultatifs :</text:p>
      <text:p text:style-name="P6" loext:marker-style-name="T5"/>
      <table:table table:name="Table1" table:style-name="Table1">
        <table:table-column table:style-name="Table1.A"/>
        <table:table-column table:style-name="Table1.B"/>
        <table:table-header-rows>
          <table:table-row table:style-name="Table1.1">
            <table:table-cell table:style-name="Table1.A1" office:value-type="string">
              <text:p text:style-name="P51" loext:marker-style-name="T31"><text:span text:style-name="T32">Dossier SDK Android</text:span><text:span text:style-name="T31"/></text:p>
            </table:table-cell>
            <table:table-cell table:style-name="Table1.A1" office:value-type="string">
              <text:p text:style-name="P51" loext:marker-style-name="T31"><text:span text:style-name="T32">Requis pour la création d'applications ?</text:span><text:span text:style-name="T31"/></text:p>
            </table:table-cell>
          </table:table-row>
        </table:table-header-rows>
        <table:table-row table:style-name="Table1.1">
          <table:table-cell table:style-name="Table1.A2" office:value-type="string">
            <text:p text:style-name="P51" loext:marker-style-name="T33"><text:span text:style-name="T34">cmdline-tools (or tools)</text:span><text:span text:style-name="T33"/></text:p>
          </table:table-cell>
          <table:table-cell table:style-name="Table1.B2" office:value-type="string">
            <text:p text:style-name="P51" loext:marker-style-name="T33"><text:span text:style-name="T34">Oui</text:span><text:span text:style-name="T33"/></text:p>
          </table:table-cell>
        </table:table-row>
        <table:table-row table:style-name="Table1.1">
          <table:table-cell table:style-name="Table1.A3" office:value-type="string">
            <text:p text:style-name="P51" loext:marker-style-name="T33"><text:span text:style-name="T34">build-tools</text:span><text:span text:style-name="T33"/></text:p>
          </table:table-cell>
          <table:table-cell table:style-name="Table1.B3" office:value-type="string">
            <text:p text:style-name="P51" loext:marker-style-name="T33"><text:span text:style-name="T34">Oui (vous n'avez besoin du sous-dossier que pour la dernière version)</text:span><text:span text:style-name="T33"/></text:p>
          </table:table-cell>
        </table:table-row>
        <table:table-row table:style-name="Table1.1">
          <table:table-cell table:style-name="Table1.A4" office:value-type="string">
            <text:p text:style-name="P51" loext:marker-style-name="T33"><text:span text:style-name="T34">platforms</text:span><text:span text:style-name="T33"/></text:p>
          </table:table-cell>
          <table:table-cell table:style-name="Table1.B4" office:value-type="string">
            <text:p text:style-name="P51" loext:marker-style-name="T33"><text:span text:style-name="T34">Oui (vous n'avez besoin que d'android-34)</text:span><text:span text:style-name="T33"/></text:p>
          </table:table-cell>
        </table:table-row>
        <table:table-row table:style-name="Table1.1">
          <table:table-cell table:style-name="Table1.A5" office:value-type="string">
            <text:p text:style-name="P51" loext:marker-style-name="T33"><text:span text:style-name="T34">platform-tools</text:span><text:span text:style-name="T33"/></text:p>
          </table:table-cell>
          <table:table-cell table:style-name="Table1.B5" office:value-type="string">
            <text:p text:style-name="P51" loext:marker-style-name="T33"><text:span text:style-name="T34">Oui</text:span><text:span text:style-name="T33"/></text:p>
          </table:table-cell>
        </table:table-row>
        <table:table-row table:style-name="Table1.1">
          <table:table-cell table:style-name="Table1.A6" office:value-type="string">
            <text:p text:style-name="P51" loext:marker-style-name="T33"><text:span text:style-name="T34">Add-ons</text:span><text:span text:style-name="T33"/></text:p>
          </table:table-cell>
          <table:table-cell table:style-name="Table1.B6" office:value-type="string">
            <text:p text:style-name="P51" loext:marker-style-name="T33"><text:span text:style-name="T34">Non</text:span><text:span text:style-name="T33"/></text:p>
          </table:table-cell>
        </table:table-row>
        <table:table-row table:style-name="Table1.1">
          <table:table-cell table:style-name="Table1.A7" office:value-type="string">
            <text:p text:style-name="P51" loext:marker-style-name="T33"><text:span text:style-name="T34">docs</text:span><text:span text:style-name="T33"/></text:p>
          </table:table-cell>
          <table:table-cell table:style-name="Table1.B7" office:value-type="string">
            <text:p text:style-name="P51" loext:marker-style-name="T33"><text:span text:style-name="T34">Non</text:span><text:span text:style-name="T33"/></text:p>
          </table:table-cell>
        </table:table-row>
        <table:table-row table:style-name="Table1.1">
          <table:table-cell table:style-name="Table1.A8" office:value-type="string">
            <text:p text:style-name="P51" loext:marker-style-name="T33"><text:span text:style-name="T34">emulator</text:span><text:span text:style-name="T33"/></text:p>
          </table:table-cell>
          <table:table-cell table:style-name="Table1.B8" office:value-type="string">
            <text:p text:style-name="P51" loext:marker-style-name="T33"><text:span text:style-name="T34">Non, sauf si vous souhaitez utiliser un émulateur</text:span><text:span text:style-name="T33"/></text:p>
          </table:table-cell>
        </table:table-row>
        <table:table-row table:style-name="Table1.1">
          <table:table-cell table:style-name="Table1.A9" office:value-type="string">
            <text:p text:style-name="P51" loext:marker-style-name="T33"><text:span text:style-name="T34">extras</text:span><text:span text:style-name="T33"/></text:p>
          </table:table-cell>
          <table:table-cell table:style-name="Table1.B9" office:value-type="string">
            <text:p text:style-name="P51" loext:marker-style-name="T33"><text:span text:style-name="T34">Non</text:span><text:span text:style-name="T33"/></text:p>
          </table:table-cell>
        </table:table-row>
        <table:table-row table:style-name="Table1.1">
          <table:table-cell table:style-name="Table1.A10" office:value-type="string">
            <text:p text:style-name="P51" loext:marker-style-name="T33"><text:span text:style-name="T34">licenses</text:span><text:span text:style-name="T33"/></text:p>
          </table:table-cell>
          <table:table-cell table:style-name="Table1.B10" office:value-type="string">
            <text:p text:style-name="P51" loext:marker-style-name="T33"><text:span text:style-name="T34">Oui</text:span><text:span text:style-name="T33"/></text:p>
          </table:table-cell>
        </table:table-row>
        <table:table-row table:style-name="Table1.1">
          <table:table-cell table:style-name="Table1.A11" office:value-type="string">
            <text:p text:style-name="P51" loext:marker-style-name="T33"><text:span text:style-name="T34">sources</text:span><text:span text:style-name="T33"/></text:p>
          </table:table-cell>
          <table:table-cell table:style-name="Table1.B11" office:value-type="string">
            <text:p text:style-name="P51" loext:marker-style-name="T33"><text:span text:style-name="T34">Non</text:span><text:span text:style-name="T33"/></text:p>
          </table:table-cell>
        </table:table-row>
        <table:table-row table:style-name="Table1.1">
          <table:table-cell table:style-name="Table1.A12" office:value-type="string">
            <text:p text:style-name="P51" loext:marker-style-name="T33"><text:span text:style-name="T34">images-system</text:span><text:span text:style-name="T33"/></text:p>
          </table:table-cell>
          <table:table-cell table:style-name="Table1.B12" office:value-type="string">
            <text:p text:style-name="P51" loext:marker-style-name="T33"><text:span text:style-name="T34">Non, sauf si vous souhaitez utiliser un émulateur</text:span><text:span text:style-name="T33"/></text:p>
          </table:table-cell>
        </table:table-row>
        <table:table-row table:style-name="Table1.1">
          <table:table-cell table:style-name="Table1.A13" office:value-type="string">
            <text:p text:style-name="P51" loext:marker-style-name="T33"><text:span text:style-name="T34">temp</text:span><text:span text:style-name="T33"/></text:p>
          </table:table-cell>
          <table:table-cell table:style-name="Table1.B13" office:value-type="string">
            <text:p text:style-name="P51" loext:marker-style-name="T33"><text:span text:style-name="T34">Non</text:span><text:span text:style-name="T33"/></text:p>
          </table:table-cell>
        </table:table-row>
      </table:table>
      <text:p text:style-name="P6" loext:marker-style-name="T5"/>
      <text:p text:style-name="P6" loext:marker-style-name="T5"/>
      <text:h text:style-name="P14" text:outline-level="2"><text:bookmark-start text:name="_Toc44921079"/><text:bookmark-start text:name="_Toc169552730"/>Installation d'aeneas pour la synchronisation audio-texte<text:bookmark-end text:name="_Toc44921079"/><text:bookmark-end text:name="_Toc169552730"/></text:h>
      <text:p text:style-name="P52" loext:marker-style-name="T35"><text:span text:style-name="T36">Scripture App Builder utilise un outil appelé </text:span><text:span text:style-name="T37">aeneas</text:span><text:span text:style-name="T36"> pour synchroniser le texte et l'audio.</text:span></text:p>
      <text:p text:style-name="P53" loext:marker-style-name="T35"><text:span text:style-name="T36">Pour configurer </text:span><text:span text:style-name="T38">aeneas</text:span><text:span text:style-name="T36"> sur Windows, il y a plusieurs programmes et modules à télécharger et à installer : FFmpeg, eSpeak, Python et aeneas. Ceux-ci sont installés à l'aide d'un seul programme d'installation.</text:span></text:p>
      <text:list text:style-name="WWNum9">
        <text:list-item>
          <text:p text:style-name="P54" loext:marker-style-name="T39"><text:span text:style-name="T40">Allez sur la <text:s/>page </text:span><text:span text:style-name="T41">de téléchargement</text:span><text:span text:style-name="T40"> sur le site Web de Scripture App Builder </text:span><text:a xlink:type="simple" xlink:href="http://software.sil.org/scriptureappbuilder/download/" text:style-name="Internet_20_link" text:visited-style-name="Visited_20_Internet_20_Link"><text:span text:style-name="Internet_20_link"><text:span text:style-name="T40">http://software.sil.org/scriptureappbuilder/download/</text:span></text:span></text:a><text:span text:style-name="T40"> et téléchargez le dernier programme d'installation d'Énée pour Windows. Vous le trouverez sous la rubrique </text:span><text:span text:style-name="T41">Outils de synchronisation audio</text:span><text:span text:style-name="T40">.</text:span></text:p>
        </text:list-item>
        <text:list-item>
          <text:p text:style-name="P55" loext:marker-style-name="T39"><text:span text:style-name="T40">Le nom du fichier sera quelque chose comme </text:span><text:span text:style-name="T41">aeneas-windows-setup-1.7.3.exe</text:span><text:span text:style-name="T40">.</text:span></text:p>
        </text:list-item>
      </text:list>
      <text:p text:style-name="P56" loext:marker-style-name="T39"/>
      <text:list text:continue-numbering="true" text:style-name="WWNum9">
        <text:list-item>
          <text:p text:style-name="P54" loext:marker-style-name="T39"><text:span text:style-name="T40">Double-cliquez sur le fichier que vous avez téléchargé pour démarrer l'assistant d'installation.</text:span><text:span text:style-name="T39"/></text:p>
        </text:list-item>
      </text:list>
      <text:p text:style-name="P57" loext:marker-style-name="T39"/>
      <text:p text:style-name="P58" loext:marker-style-name="T39"><draw:frame draw:style-name="fr1" draw:name="Image 4" text:anchor-type="as-char" svg:width="4.5075in" svg:height="3.4957in"><draw:image xlink:href="Pictures/10000000000001F3000001839EF83E27.png" xlink:type="simple" xlink:show="embed" xlink:actuate="onLoad" draw:mime-type="image/png"/></draw:frame></text:p>
      <text:p text:style-name="P57" loext:marker-style-name="T39"/>
      <text:list text:continue-numbering="true" text:style-name="WWNum9">
        <text:list-item>
          <text:p text:style-name="P59" loext:marker-style-name="T39"><text:span text:style-name="T40">Suivez les instructions de l'assistant. Vous pouvez accepter toutes les valeurs par défaut. </text:span><text:span text:style-name="T39"/></text:p>
        </text:list-item>
      </text:list>
      <text:p text:style-name="P56" loext:marker-style-name="T39"/>
      <text:list text:continue-numbering="true" text:style-name="WWNum9">
        <text:list-item>
          <text:p text:style-name="P54" loext:marker-style-name="T39"><text:span text:style-name="T40">Sur la page </text:span><text:span text:style-name="T41">Sélectionner les composants</text:span><text:span text:style-name="T40">, vous avez besoin de l'</text:span><text:span text:style-name="T41">installation complète</text:span><text:span text:style-name="T40"> qui doit être sélectionnée par défaut.</text:span></text:p>
        </text:list-item>
      </text:list>
      <text:p text:style-name="P6" loext:marker-style-name="T5"/>
      <text:p text:style-name="P58" loext:marker-style-name="T5"><draw:frame draw:style-name="fr1" draw:name="Image 11" text:anchor-type="as-char" svg:width="4.5134in" svg:height="3.5in"><draw:image xlink:href="Pictures/10000000000001F300000183AD3955D7.png" xlink:type="simple" xlink:show="embed" xlink:actuate="onLoad" draw:mime-type="image/png"/></draw:frame></text:p>
      <text:p text:style-name="P6" loext:marker-style-name="T5"/>
      <text:p text:style-name="P6" loext:marker-style-name="T5"/>
      <text:list text:continue-numbering="true" text:style-name="WWNum9">
        <text:list-item>
          <text:p text:style-name="P60" loext:marker-style-name="T39"><text:span text:style-name="T40">Sur la <text:s/>page </text:span><text:span text:style-name="T41">Prêt pour l'installation</text:span><text:span text:style-name="T40">, cliquez sur </text:span><text:span text:style-name="T41">Installer</text:span><text:span text:style-name="T40">.</text:span></text:p>
        </text:list-item>
      </text:list>
      <text:p text:style-name="P6" loext:marker-style-name="T5"/>
      <text:p text:style-name="P61" loext:marker-style-name="T5">Vous verrez l'assistant exécuter plusieurs installateurs différents : pour FFmpeg, eSpeak, Python. Il installera également trois modules Python.<text:span text:style-name="T5"/></text:p>
      <text:p text:style-name="P39" loext:marker-style-name="T5"/>
      <text:p text:style-name="P61" loext:marker-style-name="T5">Avant la fin de l'assistant, vous devriez voir apparaître une boîte de commande pendant quelques secondes qui vérifie l'installation d'aeneas. <text:span text:style-name="T5"/></text:p>
      <text:p text:style-name="P39" loext:marker-style-name="T5"/>
      <text:p text:style-name="P62" loext:marker-style-name="T5"><draw:frame draw:style-name="fr1" draw:name="Picture 12" text:anchor-type="as-char" svg:width="4.3335in" svg:height="2.1965in"><draw:image xlink:href="Pictures/10000000000002930000014EBAE60B85.png" xlink:type="simple" xlink:show="embed" xlink:actuate="onLoad" draw:mime-type="image/png"/></draw:frame></text:p>
      <text:p text:style-name="P39" loext:marker-style-name="T5"/>
      <text:p text:style-name="P39" loext:marker-style-name="T5"/>
      <text:p text:style-name="P63" loext:marker-style-name="T5"><text:span text:style-name="T27">Important </text:span>: Si Scripture App Builder était ouvert pendant que vous installiez aeneas, fermez-le et redémarrez-le pour vous assurer qu'il prend en compte les modifications apportées à vos paramètres de chemin.</text:p>
      <text:p text:style-name="P6" loext:marker-style-name="T5"/>
      <text:h text:style-name="P10" text:outline-level="1" loext:marker-style-name="T5"><text:bookmark-start text:name="_Toc169552731"/><text:bookmark-start text:name="OLE_LINK5"/><text:bookmark-start text:name="OLE_LINK2"/><text:bookmark-start text:name="OLE_LINK1"/>Linux Installation<text:bookmark-end text:name="_Toc169552731"/><text:span text:style-name="T5"/></text:h>
      <text:p text:style-name="P15" loext:marker-style-name="T5">Pour exécuter Scripture App Builder sur Linux, vous devez avoir 3 composants installés sur votre ordinateur :<text:span text:style-name="T5"/></text:p>
      <text:list text:style-name="WWNum5">
        <text:list-item>
          <text:p text:style-name="P64" loext:marker-style-name="T5">Créateur d'applications d'écriture<text:span text:style-name="T5"/></text:p>
        </text:list-item>
        <text:list-item>
          <text:p text:style-name="P65" loext:marker-style-name="T5">Kit de développement Java OpenJDK (JDK)<text:span text:style-name="T5"/></text:p>
        </text:list-item>
        <text:list-item>
          <text:p text:style-name="P65" loext:marker-style-name="T5">Kit de développement logiciel (SDK) Android<text:span text:style-name="T5"/></text:p>
        </text:list-item>
      </text:list>
      <text:p text:style-name="P6" loext:marker-style-name="T5"/>
      <text:p text:style-name="Standard" loext:marker-style-name="T5">Les packages sont conçus pour les distributions basées sur Ubuntu (y compris <text:a xlink:type="simple" xlink:href="https://www.wastalinux.org/" text:style-name="Internet_20_link" text:visited-style-name="Visited_20_Internet_20_Link"><text:span text:style-name="Internet_20_link">Wasta-Linux</text:span></text:a>) et sont disponibles dans le <text:a xlink:type="simple" xlink:href="https://packages.sil.org/" text:style-name="Internet_20_link" text:visited-style-name="Visited_20_Internet_20_Link"><text:span text:style-name="Internet_20_link">référentiel SIL pour Ubuntu</text:span></text:a>. Le paquet pour Scripture App Builder comprend déjà les dépendances sur le paquet pour OpenJDK et un paquet qui téléchargera le SDK Android depuis Internet et l'installera. <text:s/></text:p>
      <text:p text:style-name="P6" loext:marker-style-name="T5"/>
      <text:p text:style-name="Standard" loext:marker-style-name="T5"><text:bookmark-start text:name="_Hlk534311954"/>Vous disposez des options d'installation suivantes pour l'installation du SDK Android :<text:span text:style-name="T5"/></text:p>
      <text:list text:style-name="WWNum8">
        <text:list-item>
          <text:p text:style-name="P66" loext:marker-style-name="T5">Suivez les instructions de la section 3.2 pour tout télécharger directement depuis Internet.<text:span text:style-name="T5"/></text:p>
        </text:list-item>
        <text:list-item>
          <text:p text:style-name="P66" loext:marker-style-name="T5">Suivez les instructions de la section 3.3 pour télécharger les fichiers SDK Android avant d'installer les packages.<text:span text:style-name="T5"/></text:p>
        </text:list-item>
        <text:list-item>
          <text:p text:style-name="P66" loext:marker-style-name="T5">Suivez les instructions de la section 3.4 si vous avez déjà installé le SDK Android et que vous ne souhaitez pas qu'une autre copie soit installée.<text:bookmark-end text:name="_Hlk534311954"/><text:line-break/><text:span text:style-name="T5"/></text:p>
        </text:list-item>
      </text:list>
      <text:h text:style-name="P14" text:outline-level="2"><text:bookmark-start text:name="_Toc169552732"/>Ajouter un référentiel SIL pour Ubuntu<text:bookmark-end text:name="_Toc169552732"/></text:h>
      <text:p text:style-name="Standard" loext:marker-style-name="T5">Pour installer des packages à partir du référentiel SIL pour Ubuntu, le référentiel doit être ajouté aux sources APT. <text:span text:style-name="T5"/></text:p>
      <text:p text:style-name="P6" loext:marker-style-name="T5"/>
      <text:p text:style-name="Standard" loext:marker-style-name="T5"><text:span text:style-name="T42">Remarque : </text:span><text:span text:style-name="T20">Wasta-Linux</text:span> inclut déjà la configuration du référentiel SIL pour Ubuntu et vous pouvez donc ignorer cette section.</text:p>
      <text:p text:style-name="P6" loext:marker-style-name="T5"/>
      <text:p text:style-name="Standard" loext:marker-style-name="T5">Si vous utilisez une autre <text:span text:style-name="T20">distribution basée sur Ubuntu</text:span>, veuillez suivre les instructions ci-dessous (de la section « Activer l'accès aux logiciels SIL et aux polices dans Ubuntu » sur <text:a xlink:type="simple" xlink:href="https://packages.sil.org/" text:style-name="Internet_20_link" text:visited-style-name="Visited_20_Internet_20_Link"><text:span text:style-name="Internet_20_link">https://packages.sil.org</text:span></text:a>).</text:p>
      <text:p text:style-name="P6" loext:marker-style-name="T5"/>
      <text:list text:style-name="WWNum6">
        <text:list-item>
          <text:p text:style-name="P67" loext:marker-style-name="T5">Ouvrez une fenêtre de terminal.<text:span text:style-name="T5"/></text:p>
        </text:list-item>
      </text:list>
      <text:p text:style-name="P30" loext:marker-style-name="T5"/>
      <text:list text:continue-numbering="true" text:style-name="WWNum6">
        <text:list-item>
          <text:p text:style-name="P67" loext:marker-style-name="T5">Ajoutez la clé de sécurité du référentiel :<text:span text:style-name="T5"/></text:p>
        </text:list-item>
      </text:list>
      <text:p text:style-name="P68">(wget -O- https://packages.sil.org/keys/pso-keyring-2016.gpg | sudo tee /etc/apt/trusted.gpg.d/pso-keyring-2016.gpg)&amp;&gt;/dev/null</text:p>
      <text:p text:style-name="P30" loext:marker-style-name="T5"/>
      <text:list text:continue-numbering="true" text:style-name="WWNum6">
        <text:list-item>
          <text:p text:style-name="P67" loext:marker-style-name="T5">Ajouter la source :<text:span text:style-name="T5"/></text:p>
        </text:list-item>
      </text:list>
      <text:p text:style-name="Command_20_Line" loext:marker-style-name="T43">(. /etc/os-release &amp;&amp; sudo tee /etc/apt/sources.list.d/packages-sil-org.list&gt;/dev/null &lt;&lt;&lt; « deb http://packages.sil.org/$ID $VERSION_CODENAME main »)<text:span text:style-name="T43"/></text:p>
      <text:h text:style-name="P14" text:outline-level="2"><text:bookmark-start text:name="_Toc169552733"/>Installation de tous les paquets à partir d'Internet<text:bookmark-end text:name="_Toc169552733"/></text:h>
      <text:p text:style-name="P69" loext:marker-style-name="T5"><text:bookmark text:name="OLE_LINK9"/><text:bookmark text:name="OLE_LINK10"/></text:p>
      <text:p text:style-name="P70" loext:marker-style-name="T5">Pour installer tous les logiciels requis à partir de la ligne de commande, tapez :<text:span text:style-name="T5"/></text:p>
      <text:p text:style-name="P71">sudo apt-get update</text:p>
      <text:p text:style-name="Command_20_Line">sudo apt-get install -y scripture-app-builder</text:p>
      <text:p text:style-name="P6" loext:marker-style-name="T5"/>
      <text:p text:style-name="Standard" loext:marker-style-name="T5">Remarque : <text:span text:style-name="T19">Wasta-Linux</text:span> n'installe pas automatiquement les paquets recommandés. <text:s/>Pour que tout soit installé, installez également android-sdk-installer.</text:p>
      <text:p text:style-name="Command_20_Line"><text:bookmark-start text:name="OLE_LINK3"/><text:bookmark-start text:name="OLE_LINK4"/>sudo apt-get install -y scripture-app-builder android-sdk-installer</text:p>
      <text:p text:style-name="P6" loext:marker-style-name="T5"/>
      <text:h text:style-name="P14" text:outline-level="2"><text:bookmark-end text:name="OLE_LINK3"/><text:bookmark-end text:name="OLE_LINK4"/><text:bookmark-start text:name="_Toc169552734"/>Téléchargement des fichiers Android SDK avant l'installation du package<text:bookmark-end text:name="_Toc169552734"/></text:h>
      <text:p text:style-name="Standard" loext:marker-style-name="T5">Le <text:s/>package <text:span text:style-name="T19">android-sdk-installer</text:span> simplifie le téléchargement et l'installation du SDK Android. Son comportement par défaut est de télécharger les fichiers appropriés à partir du référentiel de logiciels Android de Google lors de l'installation. Si cela pose un problème en raison de l'utilisation de la bande passante pendant l'installation, les fichiers peuvent être téléchargés avant l'installation.</text:p>
      <text:h text:style-name="Heading_20_3" text:outline-level="3" loext:marker-style-name="T5"><text:bookmark-start text:name="_Toc169552735"/>Téléchargement des fichiers SDK Android<text:bookmark-end text:name="_Toc169552735"/><text:span text:style-name="T5"/></text:h>
      <text:p text:style-name="Standard" loext:marker-style-name="T5">Sur un ordinateur connecté à Internet, utilisez les instructions de ligne de commande suivantes pour créer un nouveau dossier et télécharger 4 fichiers zip (environ 400 Mo). <text:s/><text:span text:style-name="T5"/></text:p>
      <text:p text:style-name="Command_20_Line">mkdir -p ~/Downloads/android-sdk-zips</text:p>
      <text:p text:style-name="Command_20_Line">cd ~/ Downloads /android-sdk-zips</text:p>
      <text:p text:style-name="Command_20_Line">wget -ci http://bit.ly/android-sdk-urls</text:p>
      <text:p text:style-name="P72" loext:marker-style-name="T44"/>
      <text:p text:style-name="Standard" loext:marker-style-name="T5">Remarque : l'option -c permet de reprendre les téléchargements en cas d'échec en cours de téléchargement.<text:span text:style-name="T5"/></text:p>
      <text:p text:style-name="P72" loext:marker-style-name="T44"/>
      <text:h text:style-name="Heading_20_3" text:outline-level="3" loext:marker-style-name="T5"><text:bookmark-start text:name="_Toc169552736"/>Fournir des fichiers zip lors de l'installation du package<text:bookmark-end text:name="_Toc169552736"/><text:span text:style-name="T5"/></text:h>
      <text:p text:style-name="P73" loext:marker-style-name="T5">Utilisez <text:span text:style-name="T19">debconf</text:span> pour pré-amorcer le paquet avec l'emplacement des fichiers et installer le paquet.</text:p>
      <text:p text:style-name="Command_20_Line">echo android-sdk-installer android-sdk-installer/dldir string ~/ Downloads /android-sdk-zips | sudo debconf-set-selections</text:p>
      <text:p text:style-name="Command_20_Line">sudo apt-get install android-sdk-installer</text:p>
      <text:p text:style-name="Command_20_Line">echo android-sdk-installer android-sdk-installer/dldir string | sudo debconf-set-selections</text:p>
      <text:p text:style-name="P72" loext:marker-style-name="T44"/>
      <text:h text:style-name="P14" text:outline-level="2"><text:bookmark-start text:name="_Toc169552737"/>Installation sans SDK Android<text:bookmark-end text:name="_Toc169552737"/></text:h>
      <text:p text:style-name="Standard" loext:marker-style-name="T5">Le <text:s/>paquet <text:span text:style-name="T19">android-sdk-installer</text:span> est un paquet recommandé pour le <text:s/>paquet <text:span text:style-name="T19">scripture-app-builder</text:span>. Si le SDK Android est déjà installé, Scripture App Builder peut utiliser l'installation actuelle.</text:p>
      <text:p text:style-name="Command_20_Line">sudo apt-get update</text:p>
      <text:p text:style-name="Command_20_Line">sudo apt-get install scripture-app-builder --no-install-recommends</text:p>
      <text:p text:style-name="P74" loext:marker-style-name="T5"><text:tab/><text:span text:style-name="T5"/></text:p>
      <text:p text:style-name="Standard" loext:marker-style-name="T5">Définissez la variable d'environnement ANDROID_HOME sur le chemin d'installation du SDK Android pour permettre à Scripture App Builder de la trouver automatiquement. Sinon, vous pouvez utiliser la <text:span text:style-name="T19"><text:s/>boîte de dialogue Paramètres des outils </text:span><text:span text:style-name="T21"></text:span> <text:s/>dans Scripture App Builder pour spécifier le chemin.</text:p>
      <text:p text:style-name="P6" loext:marker-style-name="T5"/>
      <text:h text:style-name="P14" text:outline-level="2"><text:bookmark-start text:name="_Toc169552738"/>Automatisation de l'installation du SDK Android<text:bookmark-end text:name="_Toc169552738"/></text:h>
      <text:p text:style-name="Standard" loext:marker-style-name="T5">Le <text:span text:style-name="T19">programme d'installation android-sdk</text:span> vous invite à accepter la licence du SDK Android. Pour automatiser l'installation (par exemple dans un playbook Ansible), préamorcez la réponse à cette question.</text:p>
      <text:p text:style-name="P75">echo android-sdk-installer android-sdk-installer/accepted-android-sdk-eula boolean true | sudo debconf-set-selections</text:p>
      <text:p text:style-name="Command_20_Line">sudo apt-get install android-sdk-installer</text:p>
      <text:p text:style-name="P6" loext:marker-style-name="T5"/>
      <text:h text:style-name="P76" text:outline-level="1" loext:marker-style-name="T5"><text:bookmark-end text:name="OLE_LINK1"/><text:bookmark-end text:name="OLE_LINK5"/><text:bookmark-end text:name="OLE_LINK2"/><text:bookmark-start text:name="_Toc169552739"/>Comment créer votre première application<text:bookmark-end text:name="_Toc169552739"/><text:span text:style-name="T5"/></text:h>
      <text:p text:style-name="Standard" loext:marker-style-name="T5">Pour créer votre première application avec Scripture App Builder, suivez les instructions du premier chapitre du document <text:span text:style-name="T45">« Scripture App Builder – 2 Building Apps ».</text:span><text:span text:style-name="T4"/></text:p>
      <text:p text:style-name="P6" loext:marker-style-name="T5"/>
      <text:p text:style-name="P77" loext:marker-style-name="T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0984in" fo:margin-top="0.1665in" fo:margin-bottom="0.0417in" style:contextual-spacing="false" fo:text-indent="-0.3484in" style:auto-text-indent="false" fo:keep-with-next="always">
        <style:tab-stops>
          <style:tab-stop style:position="0.0984in"/>
          <style:tab-stop style:position="0.3154in"/>
        </style:tab-stops>
      </style:paragraph-propertie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margin-top="0.0417in" fo:margin-bottom="0in" style:contextual-spacing="false"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1"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4pt" fo:font-weight="bold" style:font-size-asian="14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3pt" fo:language="fr" fo:country="FR" fo:font-weight="bold" style:font-size-asian="13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fo:font-size="11pt" style:font-size-asian="11pt" style:font-size-complex="11pt"/>
    </style:style>
    <style:style style:name="ListLabel_20_129" style:display-name="ListLabel 129" style:family="text">
      <style:text-properties style:font-name="Calibri" fo:font-family="Calibri" style:font-family-generic="roman" style:font-pitch="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9"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20"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21"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22"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23"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24"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25"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26"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27"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5"><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Instructions d'installation</dc:title>
    <meta:initial-creator>Richard Margetts</meta:initial-creator>
    <dc:creator>Richard Margetts</dc:creator>
    <meta:editing-cycles>1</meta:editing-cycles>
    <meta:print-date>2019-01-04T10:26:00</meta:print-date>
    <meta:creation-date>2015-08-15T09:35:00</meta:creation-date>
    <dc:date>2024-09-10T10:08:00</dc:date>
    <meta:editing-duration>P0D</meta:editing-duration>
    <meta:generator>LibreOffice/26.2.3.2$Linux_X86_64 LibreOffice_project/620$Build-2</meta:generator>
    <meta:document-statistic meta:table-count="1" meta:image-count="8" meta:object-count="0" meta:page-count="6" meta:paragraph-count="195" meta:word-count="2300" meta:character-count="15594" meta:non-whitespace-character-count="13497"/>
    <meta:user-defined meta:name="AppVersion">16.0000</meta:user-defined>
    <meta:template xlink:type="simple" xlink:actuate="onRequest" xlink:title="Normal.dotm" xlink:href=""/>
  </office:meta>
</office:document-meta>
</file>