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800000080353264D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2611in" fo:margin-left="0in" fo:margin-top="0in" fo:margin-bottom="0in" table:align="left" style:writing-mode="lr-tb"/>
    </style:style>
    <style:style style:name="Table1.A" style:family="table-column">
      <style:table-column-properties style:column-width="3.4458in"/>
    </style:style>
    <style:style style:name="Table1.B" style:family="table-column">
      <style:table-column-properties style:column-width="2.815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2611in" fo:margin-left="0.0035in" fo:margin-top="0in" fo:margin-bottom="0in" table:align="left" style:writing-mode="lr-tb"/>
    </style:style>
    <style:style style:name="Table2.A" style:family="table-column">
      <style:table-column-properties style:column-width="0.3896in"/>
    </style:style>
    <style:style style:name="Table2.B" style:family="table-column">
      <style:table-column-properties style:column-width="5.8715in"/>
    </style:style>
    <style:style style:name="Table2.1" style:family="table-row">
      <style:table-row-properties fo:keep-together="auto"/>
    </style:style>
    <style:style style:name="Table2.A1" style:family="table-cell">
      <style:table-cell-properties fo:padding-left="0.075in" fo:padding-right="0.075in" fo:padding-top="0.1181in" fo:padding-bottom="0.1972in" fo:border="0.5pt solid #000000" style:writing-mode="lr-tb"/>
    </style:style>
    <style:style style:name="Table3" style:family="table">
      <style:table-properties style:width="6.2611in" fo:margin-left="0.0035in" fo:margin-top="0in" fo:margin-bottom="0in" table:align="left" style:writing-mode="lr-tb"/>
    </style:style>
    <style:style style:name="Table3.A" style:family="table-column">
      <style:table-column-properties style:column-width="0.3896in"/>
    </style:style>
    <style:style style:name="Table3.B" style:family="table-column">
      <style:table-column-properties style:column-width="5.8715in"/>
    </style:style>
    <style:style style:name="Table3.1" style:family="table-row">
      <style:table-row-properties fo:keep-together="auto"/>
    </style:style>
    <style:style style:name="Table3.A1" style:family="table-cell">
      <style:table-cell-properties fo:padding-left="0.075in" fo:padding-right="0.075in" fo:padding-top="0.1181in" fo:padding-bottom="0.1972in" fo:border="0.5pt solid #000000" style:writing-mode="lr-tb"/>
    </style:style>
    <style:style style:name="P1" style:family="paragraph" style:parent-style-name="Standard">
      <style:paragraph-properties fo:margin-top="0.0417in" fo:margin-bottom="0in" style:contextual-spacing="fals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2" style:family="paragraph" style:parent-style-name="Standard">
      <style:paragraph-properties fo:margin-top="0.0835in" fo:margin-bottom="0in" style:contextual-spacing="fals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3" style:family="paragraph" style:parent-style-name="Standard">
      <style:paragraph-properties fo:margin-top="0in" fo:margin-bottom="0in" style:contextual-spacing="fals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4" style:family="paragraph" style:parent-style-name="Standard">
      <style:paragraph-properties fo:margin-top="0.25in" fo:margin-bottom="0.1665in" style:contextual-spacing="false"/>
    </style:style>
    <style:style style:name="P5" style:family="paragraph" style:parent-style-name="Heading_20_1" style:list-style-name="WWNum6">
      <style:paragraph-properties fo:margin-left="0in" fo:margin-top="0in" fo:margin-bottom="0in" style:contextual-spacing="false" fo:text-align="left" style:justify-single-word="false" fo:orphans="2" fo:widows="2" fo:text-indent="0in" style:auto-text-indent="false"/>
      <style:text-properties fo:font-size="11pt" fo:language="en" fo:country="GB" style:letter-kerning="false" style:font-size-asian="11pt" style:language-asian="en" style:country-asian="US" style:language-complex="ar" style:country-complex="SA"/>
    </style:style>
    <style:style style:name="P6" style:family="paragraph" style:parent-style-name="Standard">
      <style:paragraph-properties fo:margin-top="0.1665in" fo:margin-bottom="0in" style:contextual-spacing="fals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7" style:family="paragraph" style:parent-style-name="List_20_Paragraph" style:list-style-name="WWNum1">
      <style:paragraph-properties fo:margin-top="0.0417in" fo:margin-bottom="0in" style:contextual-spacing="tru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8" style:family="paragraph" style:parent-style-name="List_20_Paragraph" style:list-style-name="WWNum1">
      <style:paragraph-properties fo:margin-left="0.4957in" fo:margin-top="0.0417in" fo:margin-bottom="0in" style:contextual-spacing="false" fo:line-height="100%" fo:text-align="left" style:justify-single-word="false" fo:orphans="2" fo:widows="2" fo:text-indent="-0.248in" style:auto-text-indent="false"/>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9" style:family="paragraph" style:parent-style-name="List_20_Paragraph" style:list-style-name="WWNum1">
      <style:paragraph-properties fo:margin-top="0.0835in" fo:margin-bottom="0in" style:contextual-spacing="tru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10" style:family="paragraph" style:parent-style-name="Standard">
      <style:paragraph-properties fo:margin-top="0.1665in" fo:margin-bottom="0in" style:contextual-spacing="false" fo:line-height="100%" fo:text-align="left" style:justify-single-word="false" fo:orphans="2" fo:widows="2" fo:keep-with-next="always"/>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11" style:family="paragraph" style:parent-style-name="List_20_Paragraph" style:list-style-name="WWNum1">
      <style:paragraph-properties fo:margin-left="0.4957in" fo:margin-top="0.0417in" fo:margin-bottom="0in" style:contextual-spacing="true" fo:line-height="100%" fo:text-align="left" style:justify-single-word="false" fo:orphans="2" fo:widows="2" fo:text-indent="-0.248in" style:auto-text-indent="false"/>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12" style:family="paragraph" style:parent-style-name="List_20_Paragraph" style:list-style-name="WWNum5">
      <style:paragraph-properties fo:margin-top="0.0835in" fo:margin-bottom="0in" style:contextual-spacing="tru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13" style:family="paragraph" style:parent-style-name="List_20_Paragraph" style:list-style-name="WWNum5">
      <style:paragraph-properties fo:margin-left="0.4957in" fo:margin-top="0.0835in" fo:margin-bottom="0in" style:contextual-spacing="false" fo:line-height="100%" fo:text-align="left" style:justify-single-word="false" fo:orphans="2" fo:widows="2" fo:text-indent="-0.248in" style:auto-text-indent="false"/>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14" style:family="paragraph" style:parent-style-name="List_20_Paragraph" style:list-style-name="WWNum3">
      <style:paragraph-properties fo:margin-left="0.4957in" fo:margin-top="0.0835in" fo:margin-bottom="0in" style:contextual-spacing="false" fo:line-height="100%" fo:text-align="left" style:justify-single-word="false" fo:orphans="2" fo:widows="2" fo:text-indent="-0.248in" style:auto-text-indent="false"/>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15" style:family="paragraph" style:parent-style-name="List_20_Paragraph" style:list-style-name="WWNum3">
      <style:paragraph-properties fo:margin-top="0.0835in" fo:margin-bottom="0in" style:contextual-spacing="fals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16" style:family="paragraph" style:parent-style-name="List_20_Paragraph" style:list-style-name="WWNum1">
      <style:paragraph-properties fo:margin-top="0in" fo:margin-bottom="0in" style:contextual-spacing="tru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17" style:family="paragraph" style:parent-style-name="List_20_Paragraph" style:list-style-name="WWNum7">
      <style:paragraph-properties fo:margin-left="0.4957in" fo:margin-top="0.0835in" fo:margin-bottom="0in" style:contextual-spacing="false" fo:line-height="100%" fo:text-align="left" style:justify-single-word="false" fo:orphans="2" fo:widows="2" fo:text-indent="-0.248in" style:auto-text-indent="false"/>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18" style:family="paragraph" style:parent-style-name="List_20_Paragraph" style:list-style-name="WWNum1">
      <style:paragraph-properties fo:margin-left="0.4957in" fo:margin-top="0.0835in" fo:margin-bottom="0in" style:contextual-spacing="true" fo:line-height="100%" fo:text-align="left" style:justify-single-word="false" fo:orphans="2" fo:widows="2" fo:text-indent="-0.248in" style:auto-text-indent="false"/>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19" style:family="paragraph" style:parent-style-name="List_20_Paragraph" style:list-style-name="WWNum1">
      <style:paragraph-properties fo:margin-left="0.4957in" fo:margin-top="0.0835in" fo:margin-bottom="0in" style:contextual-spacing="false" fo:line-height="100%" fo:text-align="left" style:justify-single-word="false" fo:orphans="2" fo:widows="2" fo:text-indent="-0.248in" style:auto-text-indent="false" fo:keep-with-next="always"/>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20" style:family="paragraph" style:parent-style-name="Standard">
      <style:paragraph-properties fo:margin-left="0.7118in" fo:margin-top="0.0835in" fo:margin-bottom="0in" style:contextual-spacing="fals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21" style:family="paragraph" style:parent-style-name="List_20_Paragraph" style:list-style-name="WWNum1">
      <style:paragraph-properties fo:margin-left="0.4957in" fo:margin-top="0.1665in" fo:margin-bottom="0in" style:contextual-spacing="false" fo:line-height="100%" fo:text-align="left" style:justify-single-word="false" fo:orphans="2" fo:widows="2" fo:text-indent="-0.248in" style:auto-text-indent="false"/>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22" style:family="paragraph" style:parent-style-name="List_20_Paragraph">
      <style:paragraph-properties fo:margin-left="0.4957in" fo:margin-top="0.111in" fo:margin-bottom="0in" style:contextual-spacing="fals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23" style:family="paragraph" style:parent-style-name="List_20_Paragraph" style:list-style-name="WWNum1">
      <style:paragraph-properties fo:margin-left="0.4957in" fo:margin-top="0.1665in" fo:margin-bottom="0in" style:contextual-spacing="false" fo:line-height="100%" fo:text-align="left" style:justify-single-word="false" fo:orphans="2" fo:widows="2" fo:text-indent="-0.248in" style:auto-text-indent="false" fo:keep-with-next="always"/>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24" style:family="paragraph" style:parent-style-name="List_20_Paragraph">
      <style:paragraph-properties fo:margin-left="0.7118in" fo:margin-top="0.0835in" fo:margin-bottom="0in" style:contextual-spacing="fals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25" style:family="paragraph" style:parent-style-name="List_20_Paragraph">
      <style:paragraph-properties fo:margin-left="0.4957in" fo:margin-top="0.139in" fo:margin-bottom="0in" style:contextual-spacing="fals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26" style:family="paragraph" style:parent-style-name="Standard">
      <style:paragraph-properties fo:margin-top="0.0835in" fo:margin-bottom="0in" style:contextual-spacing="false" fo:line-height="100%" fo:text-align="left" style:justify-single-word="false" fo:orphans="2" fo:widows="2" fo:keep-with-next="always"/>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27" style:family="paragraph" style:parent-style-name="List_20_Paragraph" style:list-style-name="WWNum1">
      <style:paragraph-properties fo:margin-left="0.4957in" fo:margin-top="0.0417in" fo:margin-bottom="0in" style:contextual-spacing="true" fo:line-height="100%" fo:text-align="left" style:justify-single-word="false" fo:orphans="2" fo:widows="2" fo:text-indent="-0.248in" style:auto-text-indent="false" fo:keep-with-next="always"/>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28" style:family="paragraph" style:parent-style-name="List_20_Paragraph" style:list-style-name="WWNum10">
      <style:paragraph-properties fo:margin-top="0.0835in" fo:margin-bottom="0in" style:contextual-spacing="tru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29" style:family="paragraph" style:parent-style-name="List_20_Paragraph" style:list-style-name="WWNum10">
      <style:paragraph-properties fo:margin-left="0.4957in" fo:margin-top="0.0417in" fo:margin-bottom="0in" style:contextual-spacing="false" fo:line-height="100%" fo:text-align="left" style:justify-single-word="false" fo:orphans="2" fo:widows="2" fo:text-indent="-0.248in" style:auto-text-indent="false"/>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30" style:family="paragraph" style:parent-style-name="List_20_Paragraph" style:list-style-name="WWNum4">
      <style:paragraph-properties fo:margin-top="0.0835in" fo:margin-bottom="0in" style:contextual-spacing="tru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31" style:family="paragraph" style:parent-style-name="List_20_Paragraph" style:list-style-name="WWNum8">
      <style:paragraph-properties fo:margin-left="0.4957in" fo:margin-top="0.0417in" fo:margin-bottom="0in" style:contextual-spacing="false" fo:line-height="100%" fo:text-align="left" style:justify-single-word="false" fo:orphans="2" fo:widows="2" fo:text-indent="-0.248in" style:auto-text-indent="false"/>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32" style:family="paragraph" style:parent-style-name="List_20_Paragraph" style:list-style-name="WWNum4">
      <style:paragraph-properties fo:margin-left="0.4957in" fo:margin-top="0.0835in" fo:margin-bottom="0in" style:contextual-spacing="false" fo:line-height="100%" fo:text-align="left" style:justify-single-word="false" fo:orphans="2" fo:widows="2" fo:text-indent="-0.248in" style:auto-text-indent="false"/>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33" style:family="paragraph" style:parent-style-name="List_20_Paragraph" style:list-style-name="WWNum8">
      <style:paragraph-properties fo:margin-top="0.0835in" fo:margin-bottom="0in" style:contextual-spacing="tru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34" style:family="paragraph" style:parent-style-name="List_20_Paragraph" style:list-style-name="WWNum8">
      <style:paragraph-properties fo:margin-left="0.4957in" fo:margin-top="0.0835in" fo:margin-bottom="0in" style:contextual-spacing="false" fo:line-height="100%" fo:text-align="left" style:justify-single-word="false" fo:orphans="2" fo:widows="2" fo:text-indent="-0.248in" style:auto-text-indent="false"/>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35" style:family="paragraph" style:parent-style-name="List_20_Paragraph" style:list-style-name="WWNum8">
      <style:paragraph-properties fo:margin-top="0.0835in" fo:margin-bottom="0in" style:contextual-spacing="true" fo:line-height="100%" fo:text-align="left" style:justify-single-word="false" fo:orphans="2" fo:widows="2" fo:keep-with-next="always"/>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36" style:family="paragraph" style:parent-style-name="List_20_Paragraph" style:list-style-name="WWNum1">
      <style:paragraph-properties fo:margin-left="0.4957in" fo:margin-top="0.0835in" fo:margin-bottom="0in" style:contextual-spacing="false" fo:line-height="100%" fo:text-align="left" style:justify-single-word="false" fo:orphans="2" fo:widows="2" fo:text-indent="-0.248in" style:auto-text-indent="false"/>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37" style:family="paragraph" style:parent-style-name="List_20_Paragraph">
      <style:paragraph-properties fo:margin-left="0.4957in" fo:margin-top="0.0835in" fo:margin-bottom="0in" style:contextual-spacing="fals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38" style:family="paragraph" style:parent-style-name="List_20_Paragraph" style:list-style-name="WWNum1">
      <style:paragraph-properties fo:margin-top="0.0835in" fo:margin-bottom="0in" style:contextual-spacing="fals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39" style:family="paragraph" style:parent-style-name="List_20_Paragraph">
      <style:paragraph-properties fo:margin-top="0.0835in" fo:margin-bottom="0in" style:contextual-spacing="false" fo:line-height="100%" fo:text-align="left" style:justify-single-word="false" fo:orphans="2" fo:widows="2"/>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40" style:family="paragraph" style:parent-style-name="Standard">
      <style:paragraph-properties fo:text-align="right" style:justify-single-word="false"/>
      <style:text-properties fo:font-size="7pt" style:font-size-asian="7pt"/>
    </style:style>
    <style:style style:name="P41" style:family="paragraph" style:parent-style-name="Standard">
      <style:paragraph-properties fo:margin-top="0in" fo:margin-bottom="0in" style:contextual-spacing="false" fo:line-height="100%" fo:text-align="left" style:justify-single-word="false" fo:keep-together="always" fo:orphans="2" fo:widows="2" fo:keep-with-next="always"/>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42" style:family="paragraph" style:parent-style-name="Standard">
      <style:paragraph-properties fo:margin-top="0.0835in" fo:margin-bottom="0in" style:contextual-spacing="false" fo:line-height="100%" fo:text-align="left" style:justify-single-word="false" fo:keep-together="always" fo:orphans="2" fo:widows="2" fo:keep-with-next="always"/>
      <style:text-properties style:font-name="Calibri" fo:font-size="11pt" fo:language="en" fo:country="GB" style:letter-kerning="false" style:font-name-asian="Calibri2" style:font-size-asian="11pt" style:language-asian="en" style:country-asian="US" style:font-name-complex="Arial1" style:font-size-complex="11pt" style:language-complex="ar" style:country-complex="SA"/>
    </style:style>
    <style:style style:name="P43" style:family="paragraph" style:parent-style-name="Standard">
      <style:paragraph-properties fo:keep-together="always" fo:keep-with-next="always"/>
      <style:text-properties fo:font-size="10pt" style:font-size-asian="10pt"/>
    </style:style>
    <style:style style:name="P44" style:family="paragraph" style:parent-style-name="Standard">
      <style:paragraph-properties fo:text-align="right" style:justify-single-word="false" fo:keep-together="always" fo:keep-with-next="always"/>
    </style:style>
    <style:style style:name="T1" style:family="text">
      <style:text-properties fo:font-size="26pt" fo:font-weight="bold" style:font-size-asian="26pt" style:font-weight-asian="bold"/>
    </style:style>
    <style:style style:name="T2" style:family="text">
      <style:text-properties fo:font-size="22pt" fo:font-weight="bold" style:font-size-asian="22pt" style:font-weight-asian="bold"/>
    </style:style>
    <style:style style:name="T3" style:family="text">
      <style:text-properties fo:font-size="24pt" fo:font-weight="bold" style:font-size-asian="24pt" style:font-weight-asian="bold"/>
    </style:style>
    <style:style style:name="T4" style:family="text">
      <style:text-properties fo:font-style="italic" fo:font-weight="bold" style:font-style-asian="italic" style:font-weight-asian="bold"/>
    </style:style>
    <style:style style:name="T5" style:family="text">
      <style:text-properties fo:font-size="12pt" fo:font-style="italic" fo:font-weight="bold" style:font-size-asian="12pt" style:font-style-asian="italic" style:font-weight-asian="bold"/>
    </style:style>
    <style:style style:name="T6" style:family="text">
      <style:text-properties fo:font-weight="bold" style:font-weight-asian="bold"/>
    </style:style>
    <style:style style:name="T7" style:family="text">
      <style:text-properties fo:font-size="10pt" style:font-size-asian="10pt"/>
    </style:style>
    <style:style style:name="T8" style:family="text">
      <style:text-properties fo:font-family="'MS Gothic'" style:font-family-generic="roman" style:font-pitch="variable" style:font-family-asian="'MS Gothic'" style:font-family-generic-asian="system" style:font-pitch-asian="variable" style:script-type="asian"/>
    </style:style>
    <style:style style:name="T9" style:family="text">
      <style:text-properties fo:font-family="Wingdings" style:font-family-generic="roman" style:font-pitch="variable" style:font-charset="x-symbol" fo:font-size="10pt" style:font-family-asian="Wingdings" style:font-family-generic-asian="system" style:font-pitch-asian="variable" style:font-size-asian="10pt" style:font-family-complex="Wingdings" style:font-family-generic-complex="system" style:font-pitch-complex="variable"/>
    </style:style>
    <style:style style:name="T10" style:family="text">
      <style:text-properties fo:font-size="10pt" fo:font-weight="bold" style:font-size-asian="10pt" style:font-weight-asian="bold"/>
    </style:style>
    <style:style style:name="T11" style:family="text">
      <style:text-properties fo:font-size="10pt" fo:font-weight="bold" style:font-size-asian="10pt" style:font-weight-asian="bold" style:font-weight-complex="bold"/>
    </style:style>
    <style:style style:name="T12" style:family="text">
      <style:text-properties fo:font-size="10pt" fo:font-style="italic" style:font-size-asian="10pt" style:font-style-asian="italic"/>
    </style:style>
    <style:style style:name="T13" style:family="text">
      <style:text-properties fo:font-size="10pt" style:font-size-asian="10pt" style:font-size-complex="10pt"/>
    </style:style>
    <style:style style:name="T14" style:family="text">
      <style:text-properties fo:color="#2e74b5" loext:opacity="100%" fo:font-size="10pt" style:font-size-asian="10pt">
        <loext:char-complex-color loext:theme-type="accent1" loext:color-type="theme">
          <loext:transformation loext:type="shade" loext:value="2509"/>
        </loext:char-complex-color>
      </style:text-properties>
    </style:style>
    <style:style style:name="T15" style:family="text">
      <style:text-properties fo:color="#0070c0" loext:opacity="100%" fo:font-size="10pt" style:font-size-asian="10pt"/>
    </style:style>
    <style:style style:name="T16" style:family="text">
      <style:text-properties fo:font-size="10pt" fo:language="fr" fo:country="FR" style:font-size-asian="10pt"/>
    </style:style>
    <style:style style:name="T17" style:family="text">
      <style:text-properties fo:font-size="10pt" fo:language="fr" fo:country="FR" fo:font-weight="bold" style:font-size-asian="10pt" style:font-weight-asian="bold"/>
    </style:style>
    <style:style style:name="T18" style:family="text">
      <style:text-properties fo:font-size="10pt" style:font-size-asian="10pt" style:font-size-complex="9pt"/>
    </style:style>
    <style:style style:name="T19" style:family="text">
      <style:text-properties fo:font-size="9pt" style:font-size-asian="9pt" style:font-size-complex="9pt"/>
    </style:style>
    <style:style style:name="T20" style:family="text">
      <style:text-properties fo:font-size="10pt" fo:font-style="italic" fo:font-weight="bold" style:font-size-asian="10pt" style:font-style-asian="italic" style:font-weight-asian="bold"/>
    </style:style>
    <style:style style:name="T21" style:family="text">
      <style:text-properties fo:font-family="'MS Gothic'" style:font-family-generic="roman" style:font-pitch="variable" style:font-family-asian="'MS Gothic'" style:font-family-generic-asian="system" style:font-pitch-asian="variable"/>
    </style:style>
    <style:style style:name="T22" style:family="text">
      <style:text-properties fo:font-size="7pt" style:font-size-asian="7pt"/>
    </style:style>
    <style:style style:name="fr1"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 loext:marker-style-name="T1"><text:span text:style-name="T2">App Publishing Checklist</text:span><text:span text:style-name="T3"> </text:span></text:p>
            <text:p text:style-name="P2" loext:marker-style-name="T4"><text:span text:style-name="T5"><text:s text:c="3"/>Is your app ready to publish?</text:span><text:span text:style-name="T5"/></text:p>
          </table:table-cell>
          <table:table-cell table:style-name="Table1.A1" office:value-type="string">
            <text:p text:style-name="P3" loext:marker-style-name="T6"><draw:frame draw:style-name="fr1" draw:name="Picture 1" text:anchor-type="as-char" svg:width="2.5827in" svg:height="0.7508in"><draw:image xlink:href="Pictures/10000001000001B800000080353264D0.png" xlink:type="simple" xlink:show="embed" xlink:actuate="onLoad" draw:mime-type="image/png"/><svg:desc>C:\Users\Richard\AppData\Local\Microsoft\Windows\INetCacheContent.Word\SAB-logo-128.png</svg:desc></draw:frame></text:p>
          </table:table-cell>
        </table:table-row>
      </table:table>
      <text:p text:style-name="Standard"/>
      <text:p text:style-name="P4" loext:marker-style-name="T7"><text:span text:style-name="T7">Before you release your app and make it available for users to install and share, here is a list of things to check. This checklist can be used by those responsible for checking digital publications in your organisation.</text:span><text:span text:style-name="T7"/></text:p>
      <table:table table:name="Table2" table:style-name="Table2">
        <table:table-column table:style-name="Table2.A"/>
        <table:table-column table:style-name="Table2.B"/>
        <table:table-row table:style-name="Table2.1">
          <table:table-cell table:style-name="Table2.A1" office:value-type="string">
            <text:p text:style-name="P3"><text:span text:style-name="T8">☐</text:span></text:p>
          </table:table-cell>
          <table:table-cell table:style-name="Table2.A1" office:value-type="string">
            <text:list text:style-name="WWNum6">
              <text:list-item>
                <text:h text:style-name="P5" text:outline-level="1">Consultant Checks</text:h>
              </text:list-item>
            </text:list>
            <text:p text:style-name="P2" loext:marker-style-name="T7"><text:span text:style-name="T7">Has the app content passed through the required consultant checking? E.g. has translated Scripture been checked by a translation consultant? Has it been approved for publication?</text:span><text:span text:style-name="T7"/></text:p>
            <text:p text:style-name="P2" loext:marker-style-name="T7"><text:span text:style-name="T7">Are you using an approved orthography?</text:span><text:span text:style-name="T7"/></text:p>
            <text:p text:style-name="P6"><text:span text:style-name="T7">If you are using SAB to create apps to be used by a limited number of users, such as a reviewers’ committee, or if it is a trial orthography which you will want to update in a few months, please see the section below on ‘Expiry Date or Limited Device Distribution’.</text:span></text:p>
          </table:table-cell>
        </table:table-row>
        <table:table-row table:style-name="Table2.1">
          <table:table-cell table:style-name="Table2.A1" office:value-type="string">
            <text:p text:style-name="P3"><text:span text:style-name="T8">☐</text:span></text:p>
          </table:table-cell>
          <table:table-cell table:style-name="Table2.A1" office:value-type="string">
            <text:list xml:id="list131420355292318" text:continue-numbering="true" text:style-name="WWNum6">
              <text:list-item>
                <text:h text:style-name="P5" text:outline-level="1">Paratext Checks</text:h>
              </text:list-item>
            </text:list>
            <text:p text:style-name="P2" loext:marker-style-name="T7"><text:span text:style-name="T7">If you are using Paratext files, have you run the Paratext basic checks? (In Paratext, select Checking </text:span><text:span text:style-name="T9"></text:span><text:span text:style-name="T7"> Run Basic Checks….) Has the text passed each of these checks?</text:span></text:p>
            <text:p text:style-name="P2" loext:marker-style-name="T7"><text:span text:style-name="T7">Critical checks:</text:span><text:span text:style-name="T7"/></text:p>
            <text:list text:style-name="WWNum1">
              <text:list-item>
                <text:p text:style-name="P7" loext:marker-style-name="T10"><text:span text:style-name="T10">Chapter/Verse Numbers: </text:span><text:span text:style-name="T7">Checks for duplicate or invalid chapter or verse numbers. Checks that all chapters and verses defined in the versification for the project are present.</text:span></text:p>
              </text:list-item>
              <text:list-item>
                <text:p text:style-name="P8" loext:marker-style-name="T10"><text:span text:style-name="T10">Markers: </text:span><text:span text:style-name="T7">Checks you are using valid USFM markers and they are not in unexpected places.</text:span></text:p>
              </text:list-item>
              <text:list-item>
                <text:p text:style-name="P8" loext:marker-style-name="T7"><text:span text:style-name="T10">References: </text:span><text:span text:style-name="T7">Checks that Scripture references, e.g. “Mat 6:1-5”, follow exact abbreviations and syntax. If not, they will not work as links in the app.</text:span></text:p>
              </text:list-item>
            </text:list>
            <text:p text:style-name="P2" loext:marker-style-name="T7"><text:span text:style-name="T7">Important checks:</text:span><text:span text:style-name="T7"/></text:p>
            <text:list xml:id="list131420749268146" text:continue-numbering="true" text:style-name="WWNum1">
              <text:list-item>
                <text:p text:style-name="P8" loext:marker-style-name="T7"><text:span text:style-name="T7">All of the remaining basic checks: Characters, Punctuation, Capitalization, Repeated Words, Unmatched Pairs of Punctuation, Quotations, Numbers.</text:span><text:span text:style-name="T7"/></text:p>
              </text:list-item>
              <text:list-item>
                <text:p text:style-name="P8" loext:marker-style-name="T7"><text:span text:style-name="T10">Spelling</text:span><text:span text:style-name="T7">: In Paratext, select Checking </text:span><text:span text:style-name="T9"></text:span><text:span text:style-name="T7"> Spell Check Current Book…</text:span></text:p>
              </text:list-item>
            </text:list>
            <text:p text:style-name="P6" loext:marker-style-name="T7"><text:span text:style-name="T7">If you are using a Digital Bible Library text release bundle rather than Paratext USFM files, the basic checks will have been run already.</text:span><text:span text:style-name="T7"/></text:p>
          </table:table-cell>
        </table:table-row>
        <table:table-row table:style-name="Table2.1">
          <table:table-cell table:style-name="Table2.A1" office:value-type="string">
            <text:p text:style-name="P3"><text:span text:style-name="T8">☐</text:span></text:p>
          </table:table-cell>
          <table:table-cell table:style-name="Table2.A1" office:value-type="string">
            <text:list xml:id="list131420961234734" text:continue-list="list131420355292318" text:style-name="WWNum6">
              <text:list-item>
                <text:h text:style-name="P5" text:outline-level="1">Permission to Distribute Content</text:h>
              </text:list-item>
            </text:list>
            <text:p text:style-name="P2" loext:marker-style-name="T7"><text:span text:style-name="T7">Ensure that you have the necessary permissions to distribute the content in the app:</text:span><text:span text:style-name="T7"/></text:p>
            <text:list text:continue-list="list131420749268146" text:style-name="WWNum1">
              <text:list-item>
                <text:p text:style-name="P9" loext:marker-style-name="T7"><text:span text:style-name="T7">Do you have permission to distribute the </text:span><text:span text:style-name="T11">text</text:span><text:span text:style-name="T7">?</text:span></text:p>
              </text:list-item>
              <text:list-item>
                <text:p text:style-name="P8" loext:marker-style-name="T7"><text:span text:style-name="T7">Do you have permission to distribute the </text:span><text:span text:style-name="T11">audio</text:span><text:span text:style-name="T7"> files, if any?</text:span></text:p>
              </text:list-item>
              <text:list-item>
                <text:p text:style-name="P8" loext:marker-style-name="T7"><text:span text:style-name="T7">Do you have permission to distribute the </text:span><text:span text:style-name="T11">videos</text:span><text:span text:style-name="T7">, if any?</text:span></text:p>
              </text:list-item>
              <text:list-item>
                <text:p text:style-name="P8" loext:marker-style-name="T7"><text:span text:style-name="T7">Do you have permission to distribute each of the </text:span><text:span text:style-name="T11">images</text:span><text:span text:style-name="T7">, if any?</text:span></text:p>
              </text:list-item>
            </text:list>
            <text:p text:style-name="P6" loext:marker-style-name="T6"><text:span text:style-name="T7">Remember that for text, audio, videos and images, the copyright is often held by different owners. You must have permission for each.</text:span><text:span text:style-name="T10"/></text:p>
            <text:p text:style-name="P10" loext:marker-style-name="T7"><text:span text:style-name="T7">You will have permission if:</text:span><text:span text:style-name="T7"/></text:p>
            <text:list xml:id="list131421772252988" text:continue-numbering="true" text:style-name="WWNum1">
              <text:list-item>
                <text:p text:style-name="P11" loext:marker-style-name="T7"><text:span text:style-name="T7">You are the owner (intellectual property rights holder) of the content, or</text:span><text:span text:style-name="T7"/></text:p>
              </text:list-item>
              <text:list-item>
                <text:p text:style-name="P8" loext:marker-style-name="T7"><text:span text:style-name="T7">You have been given permission from the rights holder to distribute their content. Such permission may be granted: (i) in a license, such as a Creative Commons license, or (ii) in a specific agreement signed between you and the rights holder. </text:span><text:span text:style-name="T7"/></text:p>
              </text:list-item>
            </text:list>
            <text:p text:style-name="P6" loext:marker-style-name="T7"><text:span text:style-name="T7">It is important to know whether you have permission to distribute the content in </text:span><text:span text:style-name="T12">digital</text:span><text:span text:style-name="T7"> publications. For example, if you know you have the permission to use a certain image in a printed booklet, you will also need to check whether you have permission to use it in an app.</text:span></text:p>
          </table:table-cell>
        </table:table-row>
        <table:table-row table:style-name="Table2.1">
          <table:table-cell table:style-name="Table2.A1" office:value-type="string">
            <text:p text:style-name="P3"><text:span text:style-name="T8">☐</text:span></text:p>
          </table:table-cell>
          <table:table-cell table:style-name="Table2.A1" office:value-type="string">
            <text:list xml:id="list131421502504818" text:continue-list="list131420961234734" text:style-name="WWNum6">
              <text:list-item>
                <text:h text:style-name="P5" text:outline-level="1">App Installation and Navigation</text:h>
              </text:list-item>
            </text:list>
            <text:p text:style-name="P2" loext:marker-style-name="T7"><text:span text:style-name="T7">Install the app on at least two different smartphones with different Android versions. Choose models of phones that are owned by typical users, i.e. test on low and mid-range phones and not simply the fastest and most expensive phones you can find.</text:span><text:span text:style-name="T7"/></text:p>
            <text:list text:style-name="WWNum5">
              <text:list-item>
                <text:p text:style-name="P12"><text:span text:style-name="T7">Does the app install OK?</text:span></text:p>
              </text:list-item>
              <text:list-item>
                <text:p text:style-name="P13"><text:span text:style-name="T7">Are you able to navigate around the app without any problems? Try selecting books and chapters, scrolling, swiping between chapters, searching, for words etc.</text:span></text:p>
              </text:list-item>
              <text:list-item>
                <text:p text:style-name="P13"><text:span text:style-name="T7">Is text highlighting synchronized correctly when the audio is playing?</text:span></text:p>
              </text:list-item>
              <text:list-item>
                <text:p text:style-name="P13"><text:span text:style-name="T7">Are you able to view the contents of the About box?</text:span></text:p>
              </text:list-item>
            </text:list>
          </table:table-cell>
        </table:table-row>
        <table:table-row table:style-name="Table2.1">
          <table:table-cell table:style-name="Table2.A1" office:value-type="string">
            <text:p text:style-name="P3"><text:span text:style-name="T8">☐</text:span></text:p>
          </table:table-cell>
          <table:table-cell table:style-name="Table2.A1" office:value-type="string">
            <text:list xml:id="list131419960469871" text:continue-list="list131421502504818" text:style-name="WWNum6">
              <text:list-item>
                <text:h text:style-name="P5" text:outline-level="1">App Name</text:h>
              </text:list-item>
            </text:list>
            <text:p text:style-name="P2" loext:marker-style-name="T6"><text:span text:style-name="T7">This is the main title of the app, displayed on the user’s phone under the app icon.</text:span><text:span text:style-name="T10"/></text:p>
            <text:list text:style-name="WWNum3">
              <text:list-item>
                <text:p text:style-name="P14" loext:marker-style-name="T13"><text:span text:style-name="T13">Is the name short enough, e.g. “Giryama Bible” rather than “The Holy Bible in the Giryama Language”? Otherwise some of the name will be cut off when displayed on the phone.</text:span><text:span text:style-name="T13"/></text:p>
              </text:list-item>
              <text:list-item>
                <text:p text:style-name="P14" loext:marker-style-name="T13"><text:span text:style-name="T13">Is the name clear and understandable by speakers of the language? Is it better to use a name in a language of wider communication or a name in the local language?</text:span><text:span text:style-name="T13"/></text:p>
              </text:list-item>
              <text:list-item>
                <text:p text:style-name="P14" loext:marker-style-name="T13"><text:span text:style-name="T13">Is mixed case used, e.g. “Tharaka Bible”, not “THARAKA BIBLE”?</text:span><text:span text:style-name="T13"/></text:p>
              </text:list-item>
              <text:list-item>
                <text:p text:style-name="P15" loext:marker-style-name="T13"><text:span text:style-name="T13">Remember that app names will be displayed using the system font and not the app font. Are special characters avoided in the name which would require a special font?</text:span><text:span text:style-name="T13"/></text:p>
              </text:list-item>
              <text:list-item>
                <text:p text:style-name="P14"><text:span text:style-name="T13">If</text:span><text:span text:style-name="T7"> the app will be used in different countries with different official languages, have you provided translations of the app name, where appropriate? E.g. if you want the app name to be ‘Suba Bible’ in English-speaking countries and ‘Bible en suba’ in French-speaking countries.</text:span></text:p>
              </text:list-item>
            </text:list>
          </table:table-cell>
        </table:table-row>
        <table:table-row table:style-name="Table2.1">
          <table:table-cell table:style-name="Table2.A1" office:value-type="string">
            <text:p text:style-name="P3"><text:span text:style-name="T8">☐</text:span></text:p>
          </table:table-cell>
          <table:table-cell table:style-name="Table2.A1" office:value-type="string">
            <text:list xml:id="list131420751659045" text:continue-list="list131419960469871" text:style-name="WWNum6">
              <text:list-item>
                <text:h text:style-name="P5" text:outline-level="1">App Icon</text:h>
              </text:list-item>
            </text:list>
            <text:p text:style-name="P2" loext:marker-style-name="T6"><text:span text:style-name="T7">The app icon is the icon that represents the app on a user’s smartphone or tablet.</text:span><text:span text:style-name="T10"/></text:p>
            <text:list xml:id="list131420877394417" text:continue-list="list131421772252988" text:style-name="WWNum1">
              <text:list-item>
                <text:p text:style-name="P11" loext:marker-style-name="T7"><text:span text:style-name="T7">Is the image clear and not blurred?</text:span><text:span text:style-name="T7"/></text:p>
              </text:list-item>
              <text:list-item>
                <text:p text:style-name="P11" loext:marker-style-name="T7"><text:span text:style-name="T7">Will typical users understand what it represents?</text:span><text:span text:style-name="T7"/></text:p>
              </text:list-item>
              <text:list-item>
                <text:p text:style-name="P16" loext:marker-style-name="T7"><text:span text:style-name="T7">Is it culturally appropriate?</text:span><text:span text:style-name="T7"/></text:p>
              </text:list-item>
              <text:list-item>
                <text:p text:style-name="P16" loext:marker-style-name="T7"><text:span text:style-name="T7">Is the quality of the design sufficiently professional?</text:span><text:span text:style-name="T7"/></text:p>
              </text:list-item>
              <text:list-item>
                <text:p text:style-name="P16" loext:marker-style-name="T7"><text:span text:style-name="T7">Have you defined adaptive icons for Android as well as legacy icons?</text:span><text:span text:style-name="T7"/></text:p>
              </text:list-item>
            </text:list>
            <text:p text:style-name="P6" loext:marker-style-name="T7"><text:span text:style-name="T7">Sometimes people make an app icon that has too much detail, such as text, which looks fine when you are working on it in an image editor but is not visible when the icon is viewed on the phone.</text:span><text:span text:style-name="T7"/></text:p>
          </table:table-cell>
        </table:table-row>
        <table:table-row table:style-name="Table2.1">
          <table:table-cell table:style-name="Table2.A1" office:value-type="string">
            <text:p text:style-name="P3"><text:span text:style-name="T8">☐</text:span></text:p>
          </table:table-cell>
          <table:table-cell table:style-name="Table2.A1" office:value-type="string">
            <text:list xml:id="list131421665839084" text:continue-list="list131420751659045" text:style-name="WWNum6">
              <text:list-item>
                <text:h text:style-name="P5" text:outline-level="1">Splash Screen</text:h>
              </text:list-item>
            </text:list>
            <text:p text:style-name="P2" loext:marker-style-name="T6"><text:span text:style-name="T7">The splash screen is the image that appears full screen when the app is loading. It is optional, but if it is included:</text:span><text:span text:style-name="T10"/></text:p>
            <text:list xml:id="list131421088042453" text:continue-list="list131420877394417" text:style-name="WWNum1">
              <text:list-item>
                <text:p text:style-name="P11" loext:marker-style-name="T7"><text:span text:style-name="T7">Is the image clear and not blurred?</text:span><text:span text:style-name="T7"/></text:p>
              </text:list-item>
              <text:list-item>
                <text:p text:style-name="P11" loext:marker-style-name="T7"><text:span text:style-name="T7">Will typical users understand what it represents?</text:span><text:span text:style-name="T7"/></text:p>
              </text:list-item>
              <text:list-item>
                <text:p text:style-name="P16" loext:marker-style-name="T7"><text:span text:style-name="T7">Is it culturally appropriate?</text:span><text:span text:style-name="T7"/></text:p>
              </text:list-item>
              <text:list-item>
                <text:p text:style-name="P16" loext:marker-style-name="T7"><text:span text:style-name="T7">Is the quality of the design sufficiently professional?</text:span><text:span text:style-name="T7"/></text:p>
              </text:list-item>
            </text:list>
          </table:table-cell>
        </table:table-row>
        <table:table-row table:style-name="Table2.1">
          <table:table-cell table:style-name="Table2.A1" office:value-type="string">
            <text:p text:style-name="P3"><text:span text:style-name="T8">☐</text:span></text:p>
          </table:table-cell>
          <table:table-cell table:style-name="Table2.A1" office:value-type="string">
            <text:list xml:id="list131420289500332" text:continue-list="list131421665839084" text:style-name="WWNum6">
              <text:list-item>
                <text:h text:style-name="P5" text:outline-level="1">Navigation Drawer Image</text:h>
              </text:list-item>
            </text:list>
            <text:p text:style-name="P2" loext:marker-style-name="T6"><text:span text:style-name="T7">The navigation drawer image is displayed at the top of the drawer that slides in from the side of the screen when the user taps the hamburger icon or swipes in from the side of the device.</text:span><text:span text:style-name="T10"/></text:p>
            <text:list xml:id="list131421785817211" text:continue-list="list131421088042453" text:style-name="WWNum1">
              <text:list-item>
                <text:p text:style-name="P11" loext:marker-style-name="T7"><text:span text:style-name="T7">Is the image clear and not blurred?</text:span><text:span text:style-name="T7"/></text:p>
              </text:list-item>
              <text:list-item>
                <text:p text:style-name="P11" loext:marker-style-name="T7"><text:span text:style-name="T7">Will typical users understand what it represents?</text:span><text:span text:style-name="T7"/></text:p>
              </text:list-item>
              <text:list-item>
                <text:p text:style-name="P16" loext:marker-style-name="T7"><text:span text:style-name="T7">Is it culturally appropriate?</text:span><text:span text:style-name="T7"/></text:p>
              </text:list-item>
              <text:list-item>
                <text:p text:style-name="P16" loext:marker-style-name="T7"><text:span text:style-name="T7">Is the quality of the design sufficiently professional?</text:span><text:span text:style-name="T7"/></text:p>
              </text:list-item>
            </text:list>
          </table:table-cell>
        </table:table-row>
        <table:table-row table:style-name="Table2.1">
          <table:table-cell table:style-name="Table2.A1" office:value-type="string">
            <text:p text:style-name="P3"><text:span text:style-name="T8">☐</text:span></text:p>
          </table:table-cell>
          <table:table-cell table:style-name="Table2.A1" office:value-type="string">
            <text:list text:continue-list="list131420289500332" text:style-name="WWNum6">
              <text:list-item>
                <text:h text:style-name="P5" text:outline-level="1">Fonts</text:h>
              </text:list-item>
            </text:list>
            <text:p text:style-name="P2" loext:marker-style-name="T7"><text:span text:style-name="T7">Are the font(s) readable and suitable for the language and app content? Are special characters displayed correctly?</text:span><text:span text:style-name="T7"/></text:p>
            <text:p text:style-name="P2" loext:marker-style-name="T7"><text:span text:style-name="T7">Is the default font size reasonable? i.e. the size of the text when someone launches the app for the first time. If you have an Arabic script, you may need to specify a default font size that is larger than the typical default Roman script font size.</text:span><text:span text:style-name="T7"/></text:p>
            <text:p text:style-name="P2" loext:marker-style-name="T6"><text:span text:style-name="T7">If you use a font with a non-Roman script (such as Arabic, Ethiopic, Thai), or if you use a Roman script with combining diacritics (ɔ́, ɛ̀), check that phones with different Android versions are displaying these correctly. Android versions 4.3 and lower will need Grandroid enabled within the app, otherwise the characters will not be displayed properly.</text:span><text:span text:style-name="T10"/></text:p>
          </table:table-cell>
        </table:table-row>
        <table:table-row table:style-name="Table2.1">
          <table:table-cell table:style-name="Table2.A1" office:value-type="string">
            <text:p text:style-name="P3"><text:span text:style-name="T8">☐</text:span></text:p>
          </table:table-cell>
          <table:table-cell table:style-name="Table2.A1" office:value-type="string">
            <text:list xml:id="list131419975318641" text:continue-numbering="true" text:style-name="WWNum6">
              <text:list-item>
                <text:h text:style-name="P5" text:outline-level="1">Package Name</text:h>
              </text:list-item>
            </text:list>
            <text:p text:style-name="P2" loext:marker-style-name="T10"><text:span text:style-name="T7">The package name uniquely identifies the app. It is a lowercase dot-separated string without spaces, such as </text:span><text:span text:style-name="T14">org.wycliffe.mamara.bible</text:span><text:span text:style-name="T7">.</text:span></text:p>
            <text:list text:style-name="WWNum7">
              <text:list-item>
                <text:p text:style-name="P17"><text:span text:style-name="T13">Does the package name begin with your organisation’s website name reversed? E.g “org.wycliffe”, “org.biblesociety”, rather than “wycliffe.org”. Ensure you have the right to use this organisation’s address.</text:span></text:p>
              </text:list-item>
              <text:list-item>
                <text:p text:style-name="P17"><text:span text:style-name="T7">Are the other components of the package name well chosen? It is a good idea to include the language name and/or code (e.g. ‘minyanka’ or ‘myk’) and the type of publication (‘bible’).</text:span></text:p>
              </text:list-item>
            </text:list>
            <text:p text:style-name="P6" loext:marker-style-name="T7"><text:span text:style-name="T7">The package name can be seen by users when they view the app’s store details in Google Play so it is important to chose it well. You cannot change an app’s package name in the future if you want to update the same app.</text:span><text:span text:style-name="T7"/></text:p>
            <text:p text:style-name="P2"><text:span text:style-name="T7">If you are publishing an app with New Testament books but there is the possibility of updating the app to include Old Testament books in the future, it might be better to have a package name which mentions ‘bible’ rather than ‘nt’ (for New Testament), e.g. </text:span><text:span text:style-name="T15">org.wycliffe.mamara.bible</text:span><text:span text:style-name="T7"> rather than </text:span><text:span text:style-name="T15">org.wycliffe.mamara.nt</text:span><text:span text:style-name="T7">.</text:span></text:p>
          </table:table-cell>
        </table:table-row>
        <table:table-row table:style-name="Table2.1">
          <table:table-cell table:style-name="Table2.A1" office:value-type="string">
            <text:p text:style-name="P3"><text:span text:style-name="T8">☐</text:span></text:p>
          </table:table-cell>
          <table:table-cell table:style-name="Table2.A1" office:value-type="string">
            <text:list xml:id="list131420484244784" text:continue-list="list131419975318641" text:style-name="WWNum6">
              <text:list-item>
                <text:h text:style-name="P5" text:outline-level="1">About Box Information</text:h>
              </text:list-item>
            </text:list>
            <text:p text:style-name="P2" loext:marker-style-name="T6"><text:span text:style-name="T7">Check that the About box of the app has the following information, where appropriate:</text:span><text:span text:style-name="T10"/></text:p>
            <text:list text:continue-list="list131421785817211" text:style-name="WWNum1">
              <text:list-item>
                <text:p text:style-name="P18" loext:marker-style-name="T7"><text:span text:style-name="T7">The </text:span><text:span text:style-name="T10">title</text:span><text:span text:style-name="T7"> of the app.</text:span></text:p>
              </text:list-item>
              <text:list-item>
                <text:p text:style-name="P19" loext:marker-style-name="T7"><text:span text:style-name="T7">A </text:span><text:span text:style-name="T10">description</text:span><text:span text:style-name="T7"> of the app, e.g.</text:span></text:p>
              </text:list-item>
            </text:list>
            <text:p text:style-name="P20" loext:marker-style-name="T14"><text:span text:style-name="T14">The New Testament in the Angave language of Papua New Guinea</text:span><text:span text:style-name="T14"/></text:p>
            <text:list text:continue-numbering="true" text:style-name="WWNum1">
              <text:list-item>
                <text:p text:style-name="P21" loext:marker-style-name="T7"><text:span text:style-name="T10">Contact information</text:span><text:span text:style-name="T7"> for your organisation, <text:line-break/> <text:s text:c="2"/>e.g. your website address, telephone number, postal address, etc.</text:span></text:p>
              </text:list-item>
            </text:list>
            <text:p text:style-name="P22" loext:marker-style-name="T7"><text:span text:style-name="T7">Are hyperlinks used for websites and phone numbers so that the user can tap on the web address to go to the site, or tap on the phone number to launch the phone dialer?</text:span><text:span text:style-name="T7"/></text:p>
            <text:list text:continue-numbering="true" text:style-name="WWNum1">
              <text:list-item>
                <text:p text:style-name="P23" loext:marker-style-name="T7"><text:span text:style-name="T10">Copyright information for the text</text:span><text:span text:style-name="T7"> as required by the rights holder, e.g.</text:span></text:p>
              </text:list-item>
            </text:list>
            <text:p text:style-name="P20" loext:marker-style-name="T14"><text:span text:style-name="T14">Text: © 1997 Wycliffe Bible Translators, Inc.</text:span><text:span text:style-name="T14"/></text:p>
            <text:list text:continue-numbering="true" text:style-name="WWNum1">
              <text:list-item>
                <text:p text:style-name="P21" loext:marker-style-name="T7"><text:span text:style-name="T10">Copyright information for the</text:span><text:span text:style-name="T7"> </text:span><text:span text:style-name="T10">audio</text:span><text:span text:style-name="T7"> as required by the rights holder, e.g.</text:span></text:p>
              </text:list-item>
            </text:list>
            <text:p text:style-name="P24" loext:marker-style-name="T14"><text:span text:style-name="T14">Audio: ℗ 2005 Hosanna. Bible.is.</text:span><text:span text:style-name="T14"/></text:p>
            <text:p text:style-name="P25" loext:marker-style-name="T7"><text:span text:style-name="T7">The ℗ symbol is used to represent the copyright of a sound recording. If the font you are using does not include ℗, you could use (P) instead.</text:span><text:span text:style-name="T7"/></text:p>
            <text:list text:continue-numbering="true" text:style-name="WWNum1">
              <text:list-item>
                <text:p text:style-name="P21" loext:marker-style-name="T7"><text:span text:style-name="T10">Copyright information for the</text:span><text:span text:style-name="T7"> </text:span><text:span text:style-name="T10">images</text:span><text:span text:style-name="T7"> as required by the rights holder, e.g.</text:span></text:p>
              </text:list-item>
            </text:list>
            <text:p text:style-name="P24" loext:marker-style-name="T7"><text:span text:style-name="T14">Illustrations: © 2015, Jennifer Coulibaly. Used with permission.</text:span><text:span text:style-name="T14"/></text:p>
            <text:list xml:id="list131419820203077" text:continue-numbering="true" text:style-name="WWNum1">
              <text:list-item>
                <text:p text:style-name="P23" loext:marker-style-name="T7"><text:span text:style-name="T10">License</text:span><text:span text:style-name="T7"> </text:span><text:span text:style-name="T10">information</text:span><text:span text:style-name="T7">: tell the users of the app what they can do with the various content in the app and the app itself.</text:span></text:p>
              </text:list-item>
            </text:list>
            <text:p text:style-name="P3"/>
            <text:p text:style-name="P3" loext:marker-style-name="T7"><text:span text:style-name="T10">Choice of language: <text:line-break/></text:span><text:span text:style-name="T7">Ensure that the about box information is in a language that many of your users and members of the wider community will understand. Think of the way in which you would use an official language on the copyright</text:span><text:span text:style-name="T16"> page</text:span><text:span text:style-name="T7"> of a printed local language book. For example, for South American language apps, provide the license in Spanish or Portuguese rather than (or as well as) English. Creative Commons license wording in several languages is available via links on the Creative Commons website.</text:span></text:p>
            <text:p text:style-name="P6" loext:marker-style-name="T7"><text:span text:style-name="T10">IMPORTANT: <text:line-break/></text:span><text:span text:style-name="T7">If you are unsure about any of these details, please do not guess them. Please contact those responsible for digital publishing in your organisation for advice and suggested wording.</text:span></text:p>
            <text:p text:style-name="P2" loext:marker-style-name="T7"><text:span text:style-name="T7">Do not simply copy the About Box information from a printed copy of the text. The publisher information, licences, publishing date you find on a printed front matter page will often be different from what is needed for an app. A digital publication is not the same as a printed publication.</text:span><text:span text:style-name="T7"/></text:p>
          </table:table-cell>
        </table:table-row>
        <table:table-row table:style-name="Table2.1">
          <table:table-cell table:style-name="Table2.A1" office:value-type="string">
            <text:p text:style-name="P3"><text:span text:style-name="T8">☐</text:span></text:p>
          </table:table-cell>
          <table:table-cell table:style-name="Table2.A1" office:value-type="string">
            <text:list xml:id="list131421129589826" text:continue-list="list131420484244784" text:style-name="WWNum6">
              <text:list-item>
                <text:h text:style-name="P5" text:outline-level="1">Books and Book Names</text:h>
              </text:list-item>
            </text:list>
            <text:p text:style-name="P2" loext:marker-style-name="T7"><text:span text:style-name="T7">Are all the books included that should be included? Make sure that you are not missing out a book of the Bible by accident.</text:span><text:span text:style-name="T7"/></text:p>
            <text:p text:style-name="P26" loext:marker-style-name="T6"><text:span text:style-name="T7">Look at the list of book names for the app:</text:span><text:span text:style-name="T10"/></text:p>
            <text:list xml:id="list131421793690819" text:continue-list="list131419820203077" text:style-name="WWNum1">
              <text:list-item>
                <text:p text:style-name="P27" loext:marker-style-name="T7"><text:span text:style-name="T7">Are they consistent, i.e. not a mixture of full names and abbreviations? </text:span><text:span text:style-name="T7"/></text:p>
              </text:list-item>
              <text:list-item>
                <text:p text:style-name="P11" loext:marker-style-name="T7"><text:span text:style-name="T7">Is mixed case used, i.e. “Matthew”, not “MATTHEW”?</text:span><text:span text:style-name="T7"/></text:p>
              </text:list-item>
            </text:list>
          </table:table-cell>
        </table:table-row>
        <table:table-row table:style-name="Table2.1">
          <table:table-cell table:style-name="Table2.A1" office:value-type="string">
            <text:p text:style-name="P3"><text:span text:style-name="T8">☐</text:span></text:p>
          </table:table-cell>
          <table:table-cell table:style-name="Table2.A1" office:value-type="string">
            <text:list text:continue-list="list131421129589826" text:style-name="WWNum6">
              <text:list-item>
                <text:h text:style-name="P5" text:outline-level="1">Cross Reference Links</text:h>
              </text:list-item>
            </text:list>
            <text:p text:style-name="P2" loext:marker-style-name="T7"><text:span text:style-name="T7">If you have </text:span><text:span text:style-name="T10">cross references</text:span><text:span text:style-name="T7"> in the app, are the links generated correctly? e.g. if you click on a link such as ‘Luke 15:8’, are you are taken to the right book, chapter and verse?</text:span></text:p>
          </table:table-cell>
        </table:table-row>
        <table:table-row table:style-name="Table2.1">
          <table:table-cell table:style-name="Table2.A1" office:value-type="string">
            <text:p text:style-name="P3"><text:span text:style-name="T8">☐</text:span></text:p>
          </table:table-cell>
          <table:table-cell table:style-name="Table2.A1" office:value-type="string">
            <text:list text:continue-numbering="true" text:style-name="WWNum6">
              <text:list-item>
                <text:h text:style-name="P5" text:outline-level="1">Glossary Links</text:h>
              </text:list-item>
            </text:list>
            <text:p text:style-name="P2" loext:marker-style-name="T16"><text:span text:style-name="T7">If you have a </text:span><text:span text:style-name="T10">glossary</text:span><text:span text:style-name="T7"> book in the app, are the links from the text to glossary items generated correctly? e.g. if you click on a link such as </text:span><text:span text:style-name="T16">‘Abraham’ in the book of Matthew, are you shown the glossary entry for ‘Abraham’ in a popup window? </text:span></text:p>
            <text:p text:style-name="P2" loext:marker-style-name="T10"><text:span text:style-name="T16">If links are not appearing, check that you have used the \w … \w* markers correctly.</text:span><text:span text:style-name="T17"/></text:p>
          </table:table-cell>
        </table:table-row>
        <table:table-row table:style-name="Table2.1">
          <table:table-cell table:style-name="Table2.A1" office:value-type="string">
            <text:p text:style-name="P3"><text:span text:style-name="T8">☐</text:span></text:p>
          </table:table-cell>
          <table:table-cell table:style-name="Table2.A1" office:value-type="string">
            <text:list xml:id="list131419859237117" text:continue-numbering="true" text:style-name="WWNum6">
              <text:list-item>
                <text:h text:style-name="P5" text:outline-level="1">Search</text:h>
              </text:list-item>
            </text:list>
            <text:p text:style-name="P2" loext:marker-style-name="T7"><text:span text:style-name="T7">If Search is enabled in the app:</text:span><text:span text:style-name="T7"/></text:p>
            <text:list xml:id="list658614993" text:style-name="WWNum10">
              <text:list-item>
                <text:p text:style-name="P28" loext:marker-style-name="T10"><text:span text:style-name="T7">Is search working OK?</text:span><text:span text:style-name="T10"/></text:p>
              </text:list-item>
              <text:list-item>
                <text:p text:style-name="P29" loext:marker-style-name="T10"><text:span text:style-name="T7">Has a suitable Keyman keyboard been included for typing search words in the language? Or have special character input buttons been specified? (These are the buttons that a user can press in addition to the phone’s system keyboard.)</text:span><text:span text:style-name="T10"/></text:p>
              </text:list-item>
            </text:list>
          </table:table-cell>
        </table:table-row>
        <table:table-row table:style-name="Table2.1">
          <table:table-cell table:style-name="Table2.A1" office:value-type="string">
            <text:p text:style-name="P3"><text:span text:style-name="T8">☐</text:span></text:p>
          </table:table-cell>
          <table:table-cell table:style-name="Table2.A1" office:value-type="string">
            <text:list xml:id="list131419970932448" text:continue-list="list131419859237117" text:style-name="WWNum6">
              <text:list-item>
                <text:h text:style-name="P5" text:outline-level="1">Multiple Book Collections</text:h>
              </text:list-item>
            </text:list>
            <text:p text:style-name="P2" loext:marker-style-name="T13"><text:span text:style-name="T7">If the </text:span><text:span text:style-name="T13">app contains multiple book collections, e.g. other translations in local or major languages:</text:span></text:p>
            <text:list text:continue-list="list658614993" text:style-name="WWNum10">
              <text:list-item>
                <text:p text:style-name="P28" loext:marker-style-name="T13"><text:span text:style-name="T13">Are the names of each of these book collections clear and understandable in the Layout configuration dialog box? </text:span><text:span text:style-name="T13"/></text:p>
              </text:list-item>
              <text:list-item>
                <text:p text:style-name="P29"><text:span text:style-name="T13">Are the short names which are displayed in the small button at the top right of the text understandable and wide enough to be tapped by the user? It is better to use a short language name, e.g. “Mamara” rather than a language code, “myk”, which might be hard for users to understand and too small to tap.</text:span></text:p>
              </text:list-item>
              <text:list-item>
                <text:p text:style-name="P29"><text:span text:style-name="T13">Are suitable fonts used for each of the book collections? Have you specified appropriate default font sizes for each? (e.g. you might need to make the default font size of an Arabic script book collection to be slightly larger than that of a Roman script book collection.)</text:span></text:p>
              </text:list-item>
              <text:list-item>
                <text:p text:style-name="P29"><text:span text:style-name="T13">Is copyright and licensing information provided in the About box for each collection?</text:span></text:p>
              </text:list-item>
              <text:list-item>
                <text:p text:style-name="P29"><text:span text:style-name="T18">Have restrictions been set correctly for each book collection? E.g. you might have been given permission to use a certain translation only if it appears alongside another translation and not on its own.</text:span></text:p>
              </text:list-item>
            </text:list>
          </table:table-cell>
        </table:table-row>
        <table:table-row table:style-name="Table2.1">
          <table:table-cell table:style-name="Table2.A1" office:value-type="string">
            <text:p text:style-name="P3"><text:span text:style-name="T8">☐</text:span></text:p>
          </table:table-cell>
          <table:table-cell table:style-name="Table2.A1" office:value-type="string">
            <text:list xml:id="list131420580679574" text:continue-list="list131419970932448" text:style-name="WWNum6">
              <text:list-item>
                <text:h text:style-name="P5" text:outline-level="1">Interface Language and Translations</text:h>
              </text:list-item>
            </text:list>
            <text:p text:style-name="P2" loext:marker-style-name="T6"><text:span text:style-name="T7">Look at the language used for the interface menu items and search screen, e.g. “Search”, “About”, “Match whole words”, etc.:</text:span><text:span text:style-name="T10"/></text:p>
            <text:list xml:id="list131421772801515" text:continue-list="list131421793690819" text:style-name="WWNum1">
              <text:list-item>
                <text:p text:style-name="P11" loext:marker-style-name="T7"><text:span text:style-name="T7">Is a choice of appropriate interface languages provided for typical users? What is the default interface language when users first install the app? Is it best to default to using English, French, Chinese, a local language, etc.? </text:span><text:span text:style-name="T7"/></text:p>
              </text:list-item>
              <text:list-item>
                <text:p text:style-name="P8" loext:marker-style-name="T7"><text:span text:style-name="T7">If the interface elements have been translated into a local language, have they been checked for comprehension?</text:span><text:span text:style-name="T7"/></text:p>
              </text:list-item>
            </text:list>
          </table:table-cell>
        </table:table-row>
        <table:table-row table:style-name="Table2.1">
          <table:table-cell table:style-name="Table2.A1" office:value-type="string">
            <text:p text:style-name="P3"><text:span text:style-name="T8">☐</text:span></text:p>
          </table:table-cell>
          <table:table-cell table:style-name="Table2.A1" office:value-type="string">
            <text:list xml:id="list131421140433509" text:continue-list="list131420580679574" text:style-name="WWNum6">
              <text:list-item>
                <text:h text:style-name="P5" text:outline-level="1">Verse on Image</text:h>
              </text:list-item>
            </text:list>
            <text:p text:style-name="P2" loext:marker-style-name="T13"><text:span text:style-name="T13">If the Verse on Image editor is included in the app:</text:span><text:span text:style-name="T13"/></text:p>
            <text:list xml:id="list3809797888" text:style-name="WWNum4">
              <text:list-item>
                <text:p text:style-name="P30" loext:marker-style-name="T13"><text:span text:style-name="T13">Is there a good set of background images, appropriate for the context?</text:span><text:span text:style-name="T13"/></text:p>
              </text:list-item>
            </text:list>
            <text:list xml:id="list4152205235" text:style-name="WWNum8">
              <text:list-item>
                <text:p text:style-name="P31" loext:marker-style-name="T13"><text:span text:style-name="T13">Is the text </text:span><text:span text:style-name="T7">appearing</text:span><text:span text:style-name="T13"> correctly on the image? (If the user can choose between different fonts, check that each of these fonts can display the text well.)</text:span></text:p>
              </text:list-item>
            </text:list>
          </table:table-cell>
        </table:table-row>
        <table:table-row table:style-name="Table2.1">
          <table:table-cell table:style-name="Table2.A1" office:value-type="string">
            <text:p text:style-name="P3"><text:span text:style-name="T8">☐</text:span></text:p>
          </table:table-cell>
          <table:table-cell table:style-name="Table2.A1" office:value-type="string">
            <text:list xml:id="list131420615195772" text:continue-list="list131421140433509" text:style-name="WWNum6">
              <text:list-item>
                <text:h text:style-name="P5" text:outline-level="1">Verse of the Day, Daily Reminder</text:h>
              </text:list-item>
            </text:list>
            <text:p text:style-name="P2" loext:marker-style-name="T19"><text:span text:style-name="T13">If Verse of the Day and/or Daily Reminder are included in the app:</text:span><text:span text:style-name="T19"/></text:p>
            <text:list xml:id="list131420189483774" text:continue-list="list3809797888" text:style-name="WWNum4">
              <text:list-item>
                <text:p text:style-name="P30"><text:span text:style-name="T13">Has the defaut time for the notifications been set at an appropriate time? Can the user change this time in the settings?</text:span></text:p>
              </text:list-item>
            </text:list>
            <text:list xml:id="list131420032819204" text:continue-list="list4152205235" text:style-name="WWNum8">
              <text:list-item>
                <text:p text:style-name="P31"><text:span text:style-name="T13">Are verses being displayed correctly in the notifications? (e.g. if the system font has been chosen, are special characters showing correctly?)</text:span></text:p>
              </text:list-item>
            </text:list>
          </table:table-cell>
        </table:table-row>
        <table:table-row table:style-name="Table2.1">
          <table:table-cell table:style-name="Table2.A1" office:value-type="string">
            <text:p text:style-name="P3"><text:span text:style-name="T8">☐</text:span></text:p>
          </table:table-cell>
          <table:table-cell table:style-name="Table2.A1" office:value-type="string">
            <text:list xml:id="list131419892494599" text:continue-list="list131420615195772" text:style-name="WWNum6">
              <text:list-item>
                <text:h text:style-name="P5" text:outline-level="1">KeyStore for App Signing</text:h>
              </text:list-item>
            </text:list>
            <text:p text:style-name="P26" loext:marker-style-name="T7"><text:span text:style-name="T7">All Android apps are signed with a keystore key. You can use the same keystore for multiple apps, or a different keystore for each app.</text:span><text:span text:style-name="T7"/></text:p>
            <text:list text:continue-list="list131420189483774" text:style-name="WWNum4">
              <text:list-item>
                <text:p text:style-name="P30" loext:marker-style-name="T7"><text:span text:style-name="T7">Has the app been signed with a Keystore that you have generated for publishing? i.e. does the keystore contain some of your organisational details rather than being just a temporary keystore that you created quickly for in-house testing?</text:span><text:span text:style-name="T7"/></text:p>
              </text:list-item>
              <text:list-item>
                <text:p text:style-name="P32" loext:marker-style-name="T7"><text:span text:style-name="T10">IMPORTANT:</text:span><text:span text:style-name="T7"> Is the keystore file being kept safe somewhere? When you update your app, you will need to use the same keystore file.</text:span></text:p>
              </text:list-item>
            </text:list>
          </table:table-cell>
        </table:table-row>
        <table:table-row table:style-name="Table2.1">
          <table:table-cell table:style-name="Table2.A1" office:value-type="string">
            <text:p text:style-name="P3"><text:span text:style-name="T8">☐</text:span></text:p>
          </table:table-cell>
          <table:table-cell table:style-name="Table2.A1" office:value-type="string">
            <text:list text:continue-list="list131419892494599" text:style-name="WWNum6">
              <text:list-item>
                <text:h text:style-name="P5" text:outline-level="1">Audio-Text Synchronization</text:h>
              </text:list-item>
            </text:list>
            <text:p text:style-name="P2" loext:marker-style-name="T7"><text:span text:style-name="T7">If you are using audio-text synchronization to highlight the text phrase-by-phrase or verse-by-verse as the audio is playing, is the highlighting working accurately?</text:span><text:span text:style-name="T7"/></text:p>
          </table:table-cell>
        </table:table-row>
        <table:table-row table:style-name="Table2.1">
          <table:table-cell table:style-name="Table2.A1" office:value-type="string">
            <text:p text:style-name="P3"><text:span text:style-name="T8">☐</text:span></text:p>
          </table:table-cell>
          <table:table-cell table:style-name="Table2.A1" office:value-type="string">
            <text:list xml:id="list131420092429416" text:continue-numbering="true" text:style-name="WWNum6">
              <text:list-item>
                <text:h text:style-name="P5" text:outline-level="1">Audio File Distribution</text:h>
              </text:list-item>
            </text:list>
            <text:p text:style-name="P2" loext:marker-style-name="T7"><text:span text:style-name="T7">If your app uses audio, how have you decided to distribute the audio files?</text:span><text:span text:style-name="T7"/></text:p>
            <text:list xml:id="list131420117463371" text:continue-list="list131420032819204" text:style-name="WWNum8">
              <text:list-item>
                <text:p text:style-name="P33" loext:marker-style-name="T20"><text:span text:style-name="T20">Package inside the app: </text:span><text:span text:style-name="T7">Check that the app size is not too large. The limit for publishing an app on Google Play is 100 MB. If you want users to be able to share the app via Bluetooth, it would be better if it was much smaller than this.</text:span></text:p>
              </text:list-item>
              <text:list-item>
                <text:p text:style-name="P34" loext:marker-style-name="T20"><text:span text:style-name="T20">Distribute in an external folder: </text:span><text:span text:style-name="T7">Do you have a good distributation strategy for making the audio files available to people?</text:span></text:p>
              </text:list-item>
              <text:list-item>
                <text:p text:style-name="P34" loext:marker-style-name="T20"><text:span text:style-name="T20">Download from the internet: </text:span><text:span text:style-name="T7">Are you hosting the audio files on a reliable server? Test that this download works when you try to play an audio file in the app.</text:span></text:p>
              </text:list-item>
              <text:list-item>
                <text:p text:style-name="P34" loext:marker-style-name="T20"><text:span text:style-name="T20">Download from the FCBH Digital Bible Platform: </text:span><text:span text:style-name="T7">Are you using a DBT key that has been issued to you by FCBH for this purpose? Test that the download works when you try to play an audio file in the app.</text:span></text:p>
              </text:list-item>
            </text:list>
          </table:table-cell>
        </table:table-row>
        <table:table-row table:style-name="Table2.1">
          <table:table-cell table:style-name="Table2.A1" office:value-type="string">
            <text:p text:style-name="P3"><text:span text:style-name="T8">☐</text:span></text:p>
          </table:table-cell>
          <table:table-cell table:style-name="Table2.A1" office:value-type="string">
            <text:list xml:id="list131420066782553" text:continue-list="list131420092429416" text:style-name="WWNum6">
              <text:list-item>
                <text:h text:style-name="P5" text:outline-level="1">Expiry Date or Limited Device Distribution</text:h>
              </text:list-item>
            </text:list>
            <text:p text:style-name="P26" loext:marker-style-name="T7"><text:span text:style-name="T7">If you want to limit the lifetime of the app, e.g. it is a trial version:</text:span><text:span text:style-name="T7"/></text:p>
            <text:list text:continue-list="list131420117463371" text:style-name="WWNum8">
              <text:list-item>
                <text:p text:style-name="P35" loext:marker-style-name="T7"><text:span text:style-name="T7">Has an expiry date been specified? </text:span><text:span text:style-name="T7"/></text:p>
              </text:list-item>
              <text:list-item>
                <text:p text:style-name="P31" loext:marker-style-name="T7"><text:span text:style-name="T7">What message will be displayed to the user when the expiry date is reached?</text:span><text:span text:style-name="T7"/></text:p>
              </text:list-item>
              <text:list-item>
                <text:p text:style-name="P31" loext:marker-style-name="T7"><text:span text:style-name="T7">Will users continue to be able to use the app after seeing the expiry message?</text:span><text:span text:style-name="T7"/></text:p>
              </text:list-item>
            </text:list>
            <text:p text:style-name="P6" loext:marker-style-name="T7"><text:span text:style-name="T7">If you want to limit the devices that can install the app, e.g. you want a restricted team to be able to use it:</text:span><text:span text:style-name="T7"/></text:p>
            <text:list text:continue-numbering="true" text:style-name="WWNum8">
              <text:list-item>
                <text:p text:style-name="P33" loext:marker-style-name="T7"><text:span text:style-name="T7">Have you specified a list of approved device IMEI numbers or Android IDs in the app?</text:span><text:span text:style-name="T7"/></text:p>
              </text:list-item>
              <text:list-item>
                <text:p text:style-name="P31" loext:marker-style-name="T7"><text:span text:style-name="T7">If you try to run the app on a device which is not included in this list, does it show an error message?</text:span><text:span text:style-name="T7"/></text:p>
              </text:list-item>
            </text:list>
          </table:table-cell>
        </table:table-row>
        <table:table-row table:style-name="Table2.1">
          <table:table-cell table:style-name="Table2.A1" office:value-type="string">
            <text:p text:style-name="P3"><text:span text:style-name="T8">☐</text:span></text:p>
          </table:table-cell>
          <table:table-cell table:style-name="Table2.A1" office:value-type="string">
            <text:list xml:id="list131421857304715" text:continue-list="list131420066782553" text:style-name="WWNum6">
              <text:list-item>
                <text:h text:style-name="P5" text:outline-level="1">Archiving and Submission to Digital Bible Library</text:h>
              </text:list-item>
            </text:list>
            <text:p text:style-name="P26" loext:marker-style-name="T7"><text:span text:style-name="T7">If you are the rights holder of the app content, have you followed your organisation’s guidelines, if any, regarding:</text:span><text:span text:style-name="T7"/></text:p>
            <text:list xml:id="list131420226347987" text:continue-list="list131421772801515" text:style-name="WWNum1">
              <text:list-item>
                <text:p text:style-name="P11"><text:span text:style-name="T7">Archiving the translated text and recorded audio</text:span></text:p>
              </text:list-item>
              <text:list-item>
                <text:p text:style-name="P11"><text:span text:style-name="T7">Submitting the text to the Digital Bible Library (DBL).</text:span></text:p>
              </text:list-item>
            </text:list>
          </table:table-cell>
        </table:table-row>
        <table:table-row table:style-name="Table2.1">
          <table:table-cell table:style-name="Table2.A1" office:value-type="string">
            <text:p text:style-name="P3"><text:span text:style-name="T8">☐</text:span></text:p>
          </table:table-cell>
          <table:table-cell table:style-name="Table2.A1" office:value-type="string">
            <text:list xml:id="list131420431998356" text:continue-list="list131421857304715" text:style-name="WWNum6">
              <text:list-item>
                <text:h text:style-name="P5" text:outline-level="1">Publishing, Distribution and Marketing Strategy</text:h>
              </text:list-item>
            </text:list>
            <text:p text:style-name="P1" loext:marker-style-name="T7"><text:span text:style-name="T7">Where are you going to make your app available? Which app store developer account would be the most strategic? </text:span><text:span text:style-name="T7"/></text:p>
            <text:list xml:id="list131420607871240" text:continue-list="list131420226347987" text:style-name="WWNum1">
              <text:list-item>
                <text:p text:style-name="P11" loext:marker-style-name="T7"><text:span text:style-name="T7">Will you publish your app on a store page together with other Scripture apps from around the world? </text:span><text:span text:style-name="T7"/></text:p>
              </text:list-item>
              <text:list-item>
                <text:p text:style-name="P11" loext:marker-style-name="T7"><text:span text:style-name="T7">Or on an app store page together with apps from your country or region? </text:span><text:span text:style-name="T7"/></text:p>
              </text:list-item>
              <text:list-item>
                <text:p text:style-name="P11" loext:marker-style-name="T7"><text:span text:style-name="T7">Or a store page together with other kinds of apps for the same language (e.g. dictionary and reading apps)? </text:span><text:span text:style-name="T7"/></text:p>
              </text:list-item>
            </text:list>
            <text:p text:style-name="P2" loext:marker-style-name="T7"><text:span text:style-name="T7">Do you need to create a new developer account?</text:span><text:span text:style-name="T7"/></text:p>
            <text:p text:style-name="P2" loext:marker-style-name="T7"><text:span text:style-name="T7">For partner organisations of SIL: Are you able to use Scriptoria (app publishing service) to build, publish and keep your app updated for you?</text:span><text:span text:style-name="T7"/></text:p>
            <text:p text:style-name="P2" loext:marker-style-name="T7"><text:span text:style-name="T7">Will you also distribute your apps offline, e.g. using a BibleBox or LightStream, or via memory cards?</text:span><text:span text:style-name="T7"/></text:p>
            <text:p text:style-name="P2"><text:span text:style-name="T7">How are you going to let people know about your app? Will you use social media (e.g. Facebook) marketing? Do you have a budget for paid advertising, e.g. using Google Ads or Facebook Ads?</text:span></text:p>
            <text:p text:style-name="P6" loext:marker-style-name="T7"><text:span text:style-name="T10">IMPORTANT:</text:span><text:span text:style-name="T7"> Please take this subject of app marketing strategy seriously. It is not enough to create and publish an app: we want to see it used!</text:span></text:p>
          </table:table-cell>
        </table:table-row>
        <table:table-row table:style-name="Table2.1">
          <table:table-cell table:style-name="Table2.A1" office:value-type="string">
            <text:p text:style-name="P3"><text:span text:style-name="T8">☐</text:span></text:p>
          </table:table-cell>
          <table:table-cell table:style-name="Table2.A1" office:value-type="string">
            <text:list xml:id="list131421006335570" text:continue-list="list131420431998356" text:style-name="WWNum6">
              <text:list-item>
                <text:h text:style-name="P5" text:outline-level="1">Google Play Store Details</text:h>
              </text:list-item>
            </text:list>
            <text:p text:style-name="P2" loext:marker-style-name="T7"><text:span text:style-name="T7">If the app will be published on the Google Play store, check the following store details:</text:span><text:span text:style-name="T7"/></text:p>
            <text:list text:continue-list="list131420607871240" text:style-name="WWNum1">
              <text:list-item>
                <text:p text:style-name="P36" loext:marker-style-name="T20"><text:span text:style-name="T20">App title</text:span><text:span text:style-name="T20"/></text:p>
              </text:list-item>
              <text:list-item>
                <text:p text:style-name="P36" loext:marker-style-name="T7"><text:span text:style-name="T20">Short and full descriptions:</text:span><text:span text:style-name="T7"> These should describe the app clearly to the target audience in the most appropriate language(s). Mention the country and alternative language names to increase the chance of users finding the app when they search on Google Play. </text:span></text:p>
              </text:list-item>
            </text:list>
            <text:p text:style-name="P37" loext:marker-style-name="T7"><text:span text:style-name="T7">Google encourages you to “highlight what's great about your app. Share interesting and exciting facts about your app to help users understand what makes your app special.” You must not include user testimonials, excessive details or long lists of keywords. See </text:span><text:a xlink:type="simple" xlink:href="https://play.google.com/about/storelisting-promotional/metadata/" text:style-name="Internet_20_link" text:visited-style-name="Visited_20_Internet_20_Link"><text:span text:style-name="Internet_20_link"><text:span text:style-name="T7">https://play.google.com/about/storelisting-promotional/metadata/</text:span></text:span></text:a><text:span text:style-name="T7"> for more details.</text:span></text:p>
            <text:list text:continue-numbering="true" text:style-name="WWNum1">
              <text:list-item>
                <text:p text:style-name="P36" loext:marker-style-name="T7"><text:span text:style-name="T20">High-res app icon:</text:span><text:span text:style-name="T7"> This should be the same as the app icon but a higher resolution 512x512 version. Ensure it is clear and not blurred, i.e. it might not work well to take a 144x144 icon and stretch it to 512x512.</text:span></text:p>
              </text:list-item>
              <text:list-item>
                <text:p text:style-name="P38" loext:marker-style-name="T20"><text:span text:style-name="T20">Feature graphic: </text:span><text:span text:style-name="T7">The feature graphic is displayed at the top of your store listing page in the Play Store app. Do not include any copy or important visual information near the borders of the image - specifically near the bottom third of the frame. Try to center align any logo or information in the vertical and horizontal center of the frame.</text:span></text:p>
              </text:list-item>
              <text:list-item>
                <text:p text:style-name="P38" loext:marker-style-name="T20"><text:span text:style-name="T20">Screenshots: </text:span><text:span text:style-name="T7">You need to specify at least 2 screenshots of the app running on a smartphone. You can add up to 8 screenshots for each device type: phone, 7-inch tablet and 10-inch tablet. Have the screenshots been chosen well to demonstrate the app’s features?</text:span></text:p>
              </text:list-item>
              <text:list-item>
                <text:p text:style-name="P19" loext:marker-style-name="T20"><text:span text:style-name="T20">Support email address: </text:span><text:span text:style-name="T7">Do you have an appropriate email address to publish on the app’s store page for support questions and feedback?</text:span></text:p>
              </text:list-item>
            </text:list>
            <text:p text:style-name="P39" loext:marker-style-name="T7"><text:span text:style-name="T7">Avoid using a personal email address such as john.smith@gmail.com, or a work email account that is unrelated to the publishing of Scripture apps. It might be best to create a new email address for this purpose.</text:span><text:span text:style-name="T7"/></text:p>
          </table:table-cell>
        </table:table-row>
        <table:table-row table:style-name="Table2.1">
          <table:table-cell table:style-name="Table2.A1" office:value-type="string">
            <text:p text:style-name="P3" loext:marker-style-name="T21"><text:span text:style-name="T8">☐</text:span><text:span text:style-name="T8"/></text:p>
          </table:table-cell>
          <table:table-cell table:style-name="Table2.A1" office:value-type="string">
            <text:list text:continue-list="list131421006335570" text:style-name="WWNum6">
              <text:list-item>
                <text:h text:style-name="P5" text:outline-level="1">User Testing</text:h>
              </text:list-item>
            </text:list>
            <text:p text:style-name="P2" loext:marker-style-name="T13"><text:span text:style-name="T13">Ask a few people to install trial versions of the app and give you their feedback.</text:span><text:span text:style-name="T13"/></text:p>
          </table:table-cell>
        </table:table-row>
      </table:table>
      <text:p text:style-name="P40" loext:marker-style-name="T22"/>
      <text:p text:style-name="P40" loext:marker-style-name="T22"/>
      <table:table table:name="Table3" table:style-name="Table3">
        <table:table-column table:style-name="Table3.A"/>
        <table:table-column table:style-name="Table3.B"/>
        <table:table-row table:style-name="Table3.1">
          <table:table-cell table:style-name="Table3.A1" office:value-type="string">
            <text:p text:style-name="P41" loext:marker-style-name="T21"><text:span text:style-name="T8">☐</text:span><text:span text:style-name="T8"/></text:p>
          </table:table-cell>
          <table:table-cell table:style-name="Table3.A1" office:value-type="string">
            <text:list text:continue-numbering="true" text:style-name="WWNum6">
              <text:list-item>
                <text:h text:style-name="P5" text:outline-level="1">Final Approval</text:h>
              </text:list-item>
            </text:list>
            <text:p text:style-name="P42" loext:marker-style-name="T13"><text:span text:style-name="T13">After completing this checklist, have you been given the go ahead to publish the app by the person responsible for approving digital publications in your organisation?</text:span><text:span text:style-name="T13"/></text:p>
          </table:table-cell>
        </table:table-row>
      </table:table>
      <text:p text:style-name="P43" loext:marker-style-name="T7"/>
      <text:p text:style-name="P43" loext:marker-style-name="T7"/>
      <text:p text:style-name="P43" loext:marker-style-name="T7"/>
      <text:p text:style-name="P43" loext:marker-style-name="T7"/>
      <text:p text:style-name="P44" loext:marker-style-name="T7"><text:span text:style-name="T7">Last updated: 09 March 2021</text:span><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GB" style:letter-kerning="false" style:font-name-asian="Calibri2"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libri" fo:font-size="11pt" fo:language="en" fo:country="GB" style:letter-kerning="false" style:font-name-asian="Calibri2"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lef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WWNum6" style:class="chapter">
      <style:paragraph-properties fo:margin-left="0in" fo:margin-top="0in" fo:margin-bottom="0in" style:contextual-spacing="false" fo:line-height="100%" fo:keep-together="always" fo:text-indent="0in" style:auto-text-indent="false" fo:keep-with-next="always">
        <style:tab-stops>
          <style:tab-stop style:position="0.2362in"/>
        </style:tab-stops>
      </style:paragraph-properties>
      <style:text-properties style:font-name="Calibri1" fo:font-family="Calibri" style:font-family-generic="swiss" style:font-pitch="variable" fo:font-weight="bold" style:font-name-asian="F" style:font-family-generic-asian="system" style:font-pitch-asian="variable" style:font-weight-asian="bold" style:font-name-complex="Times New Roman" style:font-family-complex="'Times New Roman'" style:font-family-generic-complex="system" style:font-pitch-complex="variable" style:font-size-complex="16pt"/>
    </style:style>
    <style:style style:name="List_20_Paragraph" style:display-name="List Paragraph" style:family="paragraph" style:parent-style-name="Standard">
      <style:paragraph-properties fo:margin-left="0.5in" fo:margin-top="0in" fo:margin-bottom="0.111in"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Marginalia" style:family="paragraph" style:parent-style-name="Standard" loext:linked-style-name="Comment_20_Text_20_Char" style:class="text">
      <style:paragraph-properties fo:line-height="100%"/>
      <style:text-properties fo:font-size="10pt" style:font-size-asian="10pt" style:font-size-complex="10pt"/>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1_20_Char" style:display-name="Heading 1 Char" style:family="text" style:parent-style-name="Default_20_Paragraph_20_Font" loext:linked-style-name="Heading_20_1">
      <style:text-properties style:font-name="Calibri1" fo:font-family="Calibri" style:font-family-generic="swiss" style:font-pitch="variable" fo:font-weight="bold" style:font-name-asian="F" style:font-family-generic-asian="system" style:font-pitch-asian="variable" style:font-weight-asian="bold" style:font-name-complex="Times New Roman" style:font-family-complex="'Times New Roman'"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Balloon_20_Text_20_Char" style:display-name="Balloon Text Char" style:family="text" style:parent-style-name="Default_20_Paragraph_20_Font" loext:linked-style-name="Balloon_20_Text">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Calibri" fo:font-family="Calibri" style:font-family-generic="roman" style:font-pitch="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tyle="normal" fo:font-weight="bold" style:font-style-asian="normal" style:font-weight-asian="bold"/>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alibri" fo:font-family="Calibri" style:font-family-generic="roman" style:font-pitch="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Calibri" fo:font-family="Calibri" style:font-family-generic="roman" style:font-pitch="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Calibri" fo:font-family="Calibri" style:font-family-generic="roman" style:font-pitch="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Calibri" fo:font-family="Calibri" style:font-family-generic="roman" style:font-pitch="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Calibri" fo:font-family="Calibri"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Calibri" fo:font-family="Calibri"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 fo:font-family="Calibri" style:font-family-generic="roman" style:font-pitch="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6228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1228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6228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1228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6228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1228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6228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1228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6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font-size="10pt" style:font-size-asian="10pt"/>
    </style:style>
    <style:page-layout style:name="Mpm1">
      <style:page-layout-properties fo:page-width="8.2681in" fo:page-height="11.6929in" style:num-format="1" style:print-orientation="portrait" fo:margin-top="1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span text:style-name="MT1"><text:page-number text:select-page="current">1</text:page-number></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Scripture App Builder - App Publishing Checklist</dc:title>
    <meta:initial-creator>Richard Margetts</meta:initial-creator>
    <dc:creator>Richard Margetts</dc:creator>
    <meta:editing-cycles>162</meta:editing-cycles>
    <meta:creation-date>2016-08-09T15:51:00</meta:creation-date>
    <dc:date>2021-03-09T09:00:00</dc:date>
    <meta:editing-duration>P1DT8H46M</meta:editing-duration>
    <meta:generator>LibreOffice/26.2.3.2$Linux_X86_64 LibreOffice_project/620$Build-2</meta:generator>
    <meta:document-statistic meta:table-count="3" meta:image-count="1" meta:object-count="0" meta:page-count="1" meta:paragraph-count="201" meta:word-count="3307" meta:character-count="18678" meta:non-whitespace-character-count="15657"/>
    <meta:user-defined meta:name="AppVersion">16.0000</meta:user-defined>
    <meta:template xlink:type="simple" xlink:actuate="onRequest" xlink:title="Normal.dotm" xlink:href=""/>
  </office:meta>
</office:document-meta>
</file>