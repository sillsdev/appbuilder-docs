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D00000332F3620DD0.png" manifest:media-type="image/png"/>
  <manifest:file-entry manifest:full-path="Pictures/100000000000039D0000025B099C1A0A.png" manifest:media-type="image/png"/>
  <manifest:file-entry manifest:full-path="Pictures/10000000000003C80000030A5E05DBCB.png" manifest:media-type="image/png"/>
  <manifest:file-entry manifest:full-path="Pictures/1000000000000341000001669EAD01FA.png" manifest:media-type="image/png"/>
  <manifest:file-entry manifest:full-path="Pictures/10000000000002BB000001A78F1FDA3E.png" manifest:media-type="image/png"/>
  <manifest:file-entry manifest:full-path="Pictures/10000000000002B9000001A52EA4AA35.png" manifest:media-type="image/png"/>
  <manifest:file-entry manifest:full-path="Pictures/100000010000042C000004B0826D13D2.png" manifest:media-type="image/png"/>
  <manifest:file-entry manifest:full-path="Pictures/10000001000002EC000000855EAA607A.png" manifest:media-type="image/png"/>
  <manifest:file-entry manifest:full-path="Pictures/10000000000002B9000001A7FBB3E86E.png" manifest:media-type="image/png"/>
  <manifest:file-entry manifest:full-path="Pictures/10000001000002B70000008BD57A2983.png" manifest:media-type="image/png"/>
  <manifest:file-entry manifest:full-path="Pictures/10000000000002BD000001A99CE23DA5.png" manifest:media-type="image/png"/>
  <manifest:file-entry manifest:full-path="Pictures/10000000000002BB000001A96367941C.png" manifest:media-type="image/png"/>
  <manifest:file-entry manifest:full-path="Pictures/1000000000000246000001DC71ABC918.png" manifest:media-type="image/png"/>
  <manifest:file-entry manifest:full-path="Pictures/1000000000000246000001DC0E031CCF.png" manifest:media-type="image/png"/>
  <manifest:file-entry manifest:full-path="Pictures/10000000000002BD000001A726BF82F7.png" manifest:media-type="image/png"/>
  <manifest:file-entry manifest:full-path="Pictures/10000000000002930000014EBAE60B85.png" manifest:media-type="image/png"/>
  <manifest:file-entry manifest:full-path="Pictures/10000000000002BB000001A71B54DEEB.png" manifest:media-type="image/png"/>
  <manifest:file-entry manifest:full-path="Pictures/10000000000002B9000001A7033A09FB.png" manifest:media-type="image/png"/>
  <manifest:file-entry manifest:full-path="Pictures/1000000100000846000002729EF3B20B.png" manifest:media-type="image/png"/>
  <manifest:file-entry manifest:full-path="Pictures/10000000000002BB000001ABA1774D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542in" fo:margin-left="0.0035in" fo:margin-top="0in" fo:margin-bottom="0in" table:align="left" style:writing-mode="lr-tb"/>
    </style:style>
    <style:style style:name="Table1.A" style:family="table-column">
      <style:table-column-properties style:column-width="0.6292in"/>
    </style:style>
    <style:style style:name="Table1.B" style:family="table-column">
      <style:table-column-properties style:column-width="4.925in"/>
    </style:style>
    <style:style style:name="Table1.1" style:family="table-row">
      <style:table-row-properties style:min-row-height="0.5257in" fo:keep-together="auto"/>
    </style:style>
    <style:style style:name="Table1.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1.B1" style:family="table-cell">
      <style:table-cell-properties fo:padding-left="0.0799in" fo:padding-right="0.0799in" fo:padding-top="0.0799in" fo:padding-bottom="0.0201in" fo:border="0.5pt solid #000000" style:writing-mode="lr-tb"/>
    </style:style>
    <style:style style:name="Table2" style:family="table">
      <style:table-properties style:width="5.9778in" fo:margin-left="0.0035in" fo:margin-top="0in" fo:margin-bottom="0in" table:align="left" style:writing-mode="lr-tb"/>
    </style:style>
    <style:style style:name="Table2.A" style:family="table-column">
      <style:table-column-properties style:column-width="0.6215in"/>
    </style:style>
    <style:style style:name="Table2.B" style:family="table-column">
      <style:table-column-properties style:column-width="5.3563in"/>
    </style:style>
    <style:style style:name="Table2.1" style:family="table-row">
      <style:table-row-properties style:min-row-height="0.5257in" fo:keep-together="auto"/>
    </style:style>
    <style:style style:name="Table2.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2.B1" style:family="table-cell">
      <style:table-cell-properties fo:padding="0.0799in" fo:border="0.5pt solid #000000" style:writing-mode="lr-tb"/>
    </style:style>
    <style:style style:name="Table3" style:family="table">
      <style:table-properties style:width="5.4375in" fo:margin-left="-0.187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4.8083in"/>
    </style:style>
    <style:style style:name="Table3.1" style:family="table-row">
      <style:table-row-properties style:min-row-height="0.5257in" fo:keep-together="auto"/>
    </style:style>
    <style:style style:name="Table3.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3.B1" style:family="table-cell">
      <style:table-cell-properties fo:padding-left="0.0799in" fo:padding-right="0.0799in" fo:padding-top="0.0799in" fo:padding-bottom="0.0201in" fo:border="0.5pt solid #000000" style:writing-mode="lr-tb"/>
    </style:style>
    <style:style style:name="Table4" style:family="table">
      <style:table-properties style:width="5.9778in" fo:margin-left="0.0035in" fo:margin-top="0in" fo:margin-bottom="0in" table:align="left" style:writing-mode="lr-tb"/>
    </style:style>
    <style:style style:name="Table4.A" style:family="table-column">
      <style:table-column-properties style:column-width="0.6215in"/>
    </style:style>
    <style:style style:name="Table4.B" style:family="table-column">
      <style:table-column-properties style:column-width="5.3563in"/>
    </style:style>
    <style:style style:name="Table4.1" style:family="table-row">
      <style:table-row-properties style:min-row-height="0.5257in" fo:keep-together="auto"/>
    </style:style>
    <style:style style:name="Table4.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4.B1" style:family="table-cell">
      <style:table-cell-properties fo:padding="0.0799in" fo:border="0.5pt solid #000000" style:writing-mode="lr-tb"/>
    </style:style>
    <style:style style:name="Table5" style:family="table">
      <style:table-properties style:width="5.4375in" fo:margin-left="0.562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4.8083in"/>
    </style:style>
    <style:style style:name="Table5.1" style:family="table-row">
      <style:table-row-properties style:min-row-height="0.5257in" fo:keep-together="auto"/>
    </style:style>
    <style:style style:name="Table5.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5.B1" style:family="table-cell">
      <style:table-cell-properties fo:padding-left="0.0799in" fo:padding-right="0.0799in" fo:padding-top="0.0799in" fo:padding-bottom="0.0201in" fo:border="0.5pt solid #000000" style:writing-mode="lr-tb"/>
    </style:style>
    <style:style style:name="Table6" style:family="table">
      <style:table-properties style:width="5.9778in" fo:margin-left="0.0035in" fo:margin-top="0in" fo:margin-bottom="0in" table:align="left" style:writing-mode="lr-tb"/>
    </style:style>
    <style:style style:name="Table6.A" style:family="table-column">
      <style:table-column-properties style:column-width="0.6215in"/>
    </style:style>
    <style:style style:name="Table6.B" style:family="table-column">
      <style:table-column-properties style:column-width="5.3563in"/>
    </style:style>
    <style:style style:name="Table6.1" style:family="table-row">
      <style:table-row-properties style:min-row-height="0.5257in" fo:keep-together="auto"/>
    </style:style>
    <style:style style:name="Table6.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6.B1" style:family="table-cell">
      <style:table-cell-properties fo:padding="0.0799in" fo:border="0.5pt solid #000000" style:writing-mode="lr-tb"/>
    </style:style>
    <style:style style:name="Table7" style:family="table">
      <style:table-properties style:width="5.3125in" fo:margin-left="0.5in" fo:margin-top="0in" fo:margin-bottom="0in" table:align="left" style:writing-mode="lr-tb"/>
    </style:style>
    <style:style style:name="Table7.A" style:family="table-column">
      <style:table-column-properties style:column-width="0.6215in"/>
    </style:style>
    <style:style style:name="Table7.B" style:family="table-column">
      <style:table-column-properties style:column-width="4.691in"/>
    </style:style>
    <style:style style:name="Table7.1" style:family="table-row">
      <style:table-row-properties style:min-row-height="0.5257in" fo:keep-together="auto"/>
    </style:style>
    <style:style style:name="Table7.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7.B1" style:family="table-cell">
      <style:table-cell-properties fo:padding="0.0799in" fo:border="0.5pt solid #000000" style:writing-mode="lr-tb"/>
    </style:style>
    <style:style style:name="Table8" style:family="table">
      <style:table-properties style:width="5.6875in" fo:margin-left="0.25in" fo:margin-top="0in" fo:margin-bottom="0in" table:align="left" style:writing-mode="lr-tb"/>
    </style:style>
    <style:style style:name="Table8.A" style:family="table-column">
      <style:table-column-properties style:column-width="0.6292in"/>
    </style:style>
    <style:style style:name="Table8.B" style:family="table-column">
      <style:table-column-properties style:column-width="5.0583in"/>
    </style:style>
    <style:style style:name="Table8.1" style:family="table-row">
      <style:table-row-properties style:min-row-height="0.5257in" fo:keep-together="auto"/>
    </style:style>
    <style:style style:name="Table8.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8.B1" style:family="table-cell">
      <style:table-cell-properties fo:padding-left="0.0799in" fo:padding-right="0.0799in" fo:padding-top="0.0799in" fo:padding-bottom="0.0201in" fo:border="0.5pt solid #000000" style:writing-mode="lr-tb"/>
    </style:style>
    <style:style style:name="Table9" style:family="table">
      <style:table-properties style:width="5.6875in" fo:margin-left="0.25in" fo:margin-top="0in" fo:margin-bottom="0in" table:align="left" style:writing-mode="lr-tb"/>
    </style:style>
    <style:style style:name="Table9.A" style:family="table-column">
      <style:table-column-properties style:column-width="0.6292in"/>
    </style:style>
    <style:style style:name="Table9.B" style:family="table-column">
      <style:table-column-properties style:column-width="5.0583in"/>
    </style:style>
    <style:style style:name="Table9.1" style:family="table-row">
      <style:table-row-properties style:min-row-height="0.5257in" fo:keep-together="auto"/>
    </style:style>
    <style:style style:name="Table9.A1" style:family="table-cell">
      <style:table-cell-properties fo:background-color="#00b050" fo:padding-left="0.0799in" fo:padding-right="0.1201in" fo:padding-top="0.0799in" fo:padding-bottom="0.0201in" fo:border="0.5pt solid #000000" style:writing-mode="lr-tb">
        <style:background-image/>
      </style:table-cell-properties>
    </style:style>
    <style:style style:name="Table9.B1" style:family="table-cell">
      <style:table-cell-properties fo:padding-left="0.0799in" fo:padding-right="0.0799in" fo:padding-top="0.0799in" fo:padding-bottom="0.0201in" fo:border="0.5pt solid #000000" style:writing-mode="lr-tb"/>
    </style:style>
    <style:style style:name="Table10" style:family="table">
      <style:table-properties style:width="4.9965in" fo:margin-top="0in" fo:margin-bottom="0in" table:align="center" style:writing-mode="lr-tb"/>
    </style:style>
    <style:style style:name="Table10.A" style:family="table-column">
      <style:table-column-properties style:column-width="1.0826in"/>
    </style:style>
    <style:style style:name="Table10.B" style:family="table-column">
      <style:table-column-properties style:column-width="3.9139in"/>
    </style:style>
    <style:style style:name="Table10.1" style:family="table-row">
      <style:table-row-properties fo:keep-together="auto"/>
    </style:style>
    <style:style style:name="Table10.A1" style:family="table-cell">
      <style:table-cell-properties style:vertical-align="middle" fo:background-color="#dbe5f1" fo:padding-left="0.075in" fo:padding-right="0.075in" fo:padding-top="0.0396in" fo:padding-bottom="0.0396in" fo:border="0.5pt solid #000000" style:writing-mode="lr-tb">
        <style:background-image/>
      </style:table-cell-properties>
    </style:style>
    <style:style style:name="Table10.A2" style:family="table-cell">
      <style:table-cell-properties style:vertical-align="middle" fo:padding-left="0.075in" fo:padding-right="0.075in" fo:padding-top="0.0396in" fo:padding-bottom="0.0396in" fo:border="0.5pt solid #000000" style:writing-mode="lr-tb"/>
    </style:style>
    <style:style style:name="Table10.B2" style:family="table-cell">
      <style:table-cell-properties style:vertical-align="middle" fo:padding-left="0.075in" fo:padding-right="0.075in" fo:padding-top="0.0396in" fo:padding-bottom="0.0396in" fo:border="0.5pt solid #000000" style:writing-mode="lr-tb"/>
    </style:style>
    <style:style style:name="Table10.A3" style:family="table-cell">
      <style:table-cell-properties style:vertical-align="middle" fo:padding-left="0.075in" fo:padding-right="0.075in" fo:padding-top="0.0396in" fo:padding-bottom="0.0396in" fo:border="0.5pt solid #000000" style:writing-mode="lr-tb"/>
    </style:style>
    <style:style style:name="Table10.B3" style:family="table-cell">
      <style:table-cell-properties style:vertical-align="middle" fo:padding-left="0.075in" fo:padding-right="0.075in" fo:padding-top="0.0396in" fo:padding-bottom="0.0396in" fo:border="0.5pt solid #000000" style:writing-mode="lr-tb"/>
    </style:style>
    <style:style style:name="Table10.A4" style:family="table-cell">
      <style:table-cell-properties style:vertical-align="middle" fo:padding-left="0.075in" fo:padding-right="0.075in" fo:padding-top="0.0396in" fo:padding-bottom="0.0396in" fo:border="0.5pt solid #000000" style:writing-mode="lr-tb"/>
    </style:style>
    <style:style style:name="Table10.B4" style:family="table-cell">
      <style:table-cell-properties style:vertical-align="middle" fo:padding-left="0.075in" fo:padding-right="0.075in" fo:padding-top="0.0396in" fo:padding-bottom="0.0396in" fo:border="0.5pt solid #000000" style:writing-mode="lr-tb"/>
    </style:style>
    <style:style style:name="Table10.A5" style:family="table-cell">
      <style:table-cell-properties style:vertical-align="middle" fo:padding-left="0.075in" fo:padding-right="0.075in" fo:padding-top="0.0396in" fo:padding-bottom="0.0396in" fo:border="0.5pt solid #000000" style:writing-mode="lr-tb"/>
    </style:style>
    <style:style style:name="Table10.B5" style:family="table-cell">
      <style:table-cell-properties style:vertical-align="middle" fo:padding-left="0.075in" fo:padding-right="0.075in" fo:padding-top="0.0396in" fo:padding-bottom="0.0396in" fo:border="0.5pt solid #000000" style:writing-mode="lr-tb"/>
    </style:style>
    <style:style style:name="Table10.A6" style:family="table-cell">
      <style:table-cell-properties style:vertical-align="middle" fo:padding-left="0.075in" fo:padding-right="0.075in" fo:padding-top="0.0396in" fo:padding-bottom="0.0396in" fo:border="0.5pt solid #000000" style:writing-mode="lr-tb"/>
    </style:style>
    <style:style style:name="Table10.B6" style:family="table-cell">
      <style:table-cell-properties style:vertical-align="middle" fo:padding-left="0.075in" fo:padding-right="0.075in" fo:padding-top="0.0396in" fo:padding-bottom="0.0396in" fo:border="0.5pt solid #000000" style:writing-mode="lr-tb"/>
    </style:style>
    <style:style style:name="Table10.A7" style:family="table-cell">
      <style:table-cell-properties style:vertical-align="middle" fo:padding-left="0.075in" fo:padding-right="0.075in" fo:padding-top="0.0396in" fo:padding-bottom="0.0396in" fo:border="0.5pt solid #000000" style:writing-mode="lr-tb"/>
    </style:style>
    <style:style style:name="Table10.B7" style:family="table-cell">
      <style:table-cell-properties style:vertical-align="middle" fo:padding-left="0.075in" fo:padding-right="0.075in" fo:padding-top="0.0396in" fo:padding-bottom="0.0396in" fo:border="0.5pt solid #000000" style:writing-mode="lr-tb"/>
    </style:style>
    <style:style style:name="Table10.A8" style:family="table-cell">
      <style:table-cell-properties style:vertical-align="middle" fo:padding-left="0.075in" fo:padding-right="0.075in" fo:padding-top="0.0396in" fo:padding-bottom="0.0396in" fo:border="0.5pt solid #000000" style:writing-mode="lr-tb"/>
    </style:style>
    <style:style style:name="Table10.B8" style:family="table-cell">
      <style:table-cell-properties style:vertical-align="middle" fo:padding-left="0.075in" fo:padding-right="0.075in" fo:padding-top="0.0396in" fo:padding-bottom="0.0396in" fo:border="0.5pt solid #000000" style:writing-mode="lr-tb"/>
    </style:style>
    <style:style style:name="Table10.A9" style:family="table-cell">
      <style:table-cell-properties style:vertical-align="middle" fo:padding-left="0.075in" fo:padding-right="0.075in" fo:padding-top="0.0396in" fo:padding-bottom="0.0396in" fo:border="0.5pt solid #000000" style:writing-mode="lr-tb"/>
    </style:style>
    <style:style style:name="Table10.B9" style:family="table-cell">
      <style:table-cell-properties style:vertical-align="middle" fo:padding-left="0.075in" fo:padding-right="0.075in" fo:padding-top="0.0396in" fo:padding-bottom="0.0396in" fo:border="0.5pt solid #000000" style:writing-mode="lr-tb"/>
    </style:style>
    <style:style style:name="Table10.A10" style:family="table-cell">
      <style:table-cell-properties style:vertical-align="middle" fo:padding-left="0.075in" fo:padding-right="0.075in" fo:padding-top="0.0396in" fo:padding-bottom="0.0396in" fo:border="0.5pt solid #000000" style:writing-mode="lr-tb"/>
    </style:style>
    <style:style style:name="Table10.B10" style:family="table-cell">
      <style:table-cell-properties style:vertical-align="middle" fo:padding-left="0.075in" fo:padding-right="0.075in" fo:padding-top="0.0396in" fo:padding-bottom="0.0396in" fo:border="0.5pt solid #000000" style:writing-mode="lr-tb"/>
    </style:style>
    <style:style style:name="Table11" style:family="table">
      <style:table-properties style:width="5.3125in" fo:margin-left="0.5in" fo:margin-top="0in" fo:margin-bottom="0in" table:align="left" style:writing-mode="lr-tb"/>
    </style:style>
    <style:style style:name="Table11.A" style:family="table-column">
      <style:table-column-properties style:column-width="0.6215in"/>
    </style:style>
    <style:style style:name="Table11.B" style:family="table-column">
      <style:table-column-properties style:column-width="4.691in"/>
    </style:style>
    <style:style style:name="Table11.1" style:family="table-row">
      <style:table-row-properties style:min-row-height="0.5257in" fo:keep-together="auto"/>
    </style:style>
    <style:style style:name="Table11.A1" style:family="table-cell">
      <style:table-cell-properties fo:background-color="#ffff00" fo:padding-left="0.1201in" fo:padding-right="0.1201in" fo:padding-top="0.1201in" fo:padding-bottom="0.0799in" fo:border="0.5pt solid #000000" style:writing-mode="lr-tb">
        <style:background-image/>
      </style:table-cell-properties>
    </style:style>
    <style:style style:name="Table11.B1" style:family="table-cell">
      <style:table-cell-properties fo:padding="0.0799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style:font-name="Calibri1" fo:language="en" fo:country="GB"/>
    </style:style>
    <style:style style:name="P5" style:family="paragraph" style:parent-style-name="Standard">
      <style:paragraph-properties fo:margin-top="0in" fo:margin-bottom="0in" style:contextual-spacing="false" fo:break-before="pag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margin-top="0in" fo:margin-bottom="0in" style:contextual-spacing="false" fo:text-align="center" style:justify-single-word="false" fo:break-before="page"/>
    </style:style>
    <style:style style:name="P10" style:family="paragraph" style:parent-style-name="Standard">
      <style:paragraph-properties fo:text-align="center" style:justify-single-word="false"/>
      <style:text-properties style:font-name="Calibri1" fo:font-size="16pt" fo:language="en" fo:country="GB" fo:font-weight="bold" style:font-size-asian="16pt" style:font-weight-asian="bold" style:font-size-complex="16pt"/>
    </style:style>
    <style:style style:name="P11" style:family="paragraph" style:parent-style-name="Standard">
      <style:text-properties style:font-name="Calibri1" fo:font-size="16pt" fo:language="en" fo:country="GB" fo:font-weight="bold" style:font-size-asian="16pt" style:font-weight-asian="bold" style:font-size-complex="16pt"/>
    </style:style>
    <style:style style:name="P12" style:family="paragraph" style:parent-style-name="Standard">
      <style:paragraph-properties fo:margin-top="0.0835in" fo:margin-bottom="0in" style:contextual-spacing="false"/>
    </style:style>
    <style:style style:name="P13" style:family="paragraph" style:parent-style-name="Standard">
      <style:paragraph-properties fo:margin-top="0.1665in" fo:margin-bottom="0in" style:contextual-spacing="false"/>
    </style:style>
    <style:style style:name="P14" style:family="paragraph" style:parent-style-name="Standard">
      <style:text-properties fo:font-size="16pt" fo:language="en" fo:country="US" fo:font-weight="bold" style:letter-kerning="true" style:font-size-asian="16pt" style:font-weight-asian="bold" style:font-name-complex="Arial1" style:font-size-complex="16pt" style:font-weight-complex="bold"/>
    </style:style>
    <style:style style:name="P15" style:family="paragraph" style:parent-style-name="Standard">
      <style:paragraph-properties fo:keep-with-next="always"/>
      <style:text-properties fo:language="en" fo:country="US" style:font-name-complex="Calibri2"/>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font-size="8pt" fo:language="en" fo:country="US" style:font-size-asian="8pt" style:font-name-complex="Calibri2" style:font-size-complex="8pt"/>
    </style:style>
    <style:style style:name="P18" style:family="paragraph" style:parent-style-name="Standard">
      <style:paragraph-properties>
        <style:tab-stops>
          <style:tab-stop style:position="3.4063in"/>
        </style:tab-stops>
      </style:paragraph-properties>
    </style:style>
    <style:style style:name="P19" style:family="paragraph" style:parent-style-name="Standard">
      <style:paragraph-properties>
        <style:tab-stops>
          <style:tab-stop style:position="3.4063in"/>
        </style:tab-stops>
      </style:paragraph-properties>
      <style:text-properties fo:font-size="4pt" style:font-size-asian="4pt" style:font-name-complex="Calibri2" style:font-size-complex="4pt"/>
    </style:style>
    <style:style style:name="P20" style:family="paragraph" style:parent-style-name="Standard">
      <style:paragraph-properties fo:margin-top="0in" fo:margin-bottom="0in" style:contextual-spacing="false" fo:text-align="left" style:justify-single-word="false" fo:orphans="2" fo:widows="2">
        <style:tab-stops>
          <style:tab-stop style:position="3.4063in"/>
        </style:tab-stops>
      </style:paragraph-properties>
      <style:text-properties style:letter-kerning="false" style:font-name-asian="Times New Roman1" style:font-name-complex="Times New Roman1" style:language-complex="ar" style:country-complex="SA"/>
    </style:style>
    <style:style style:name="P21" style:family="paragraph" style:parent-style-name="Standard">
      <style:paragraph-properties>
        <style:tab-stops>
          <style:tab-stop style:position="3.4063in"/>
        </style:tab-stops>
      </style:paragraph-properties>
      <style:text-properties fo:font-size="2pt" fo:language="en" fo:country="US" style:font-size-asian="2pt" style:font-name-complex="Calibri2" style:font-size-complex="2pt"/>
    </style:style>
    <style:style style:name="P22" style:family="paragraph" style:parent-style-name="Standard">
      <style:paragraph-properties>
        <style:tab-stops>
          <style:tab-stop style:position="3.4063in"/>
        </style:tab-stops>
      </style:paragraph-properties>
      <style:text-properties fo:font-size="4pt" fo:font-weight="bold" style:font-size-asian="4pt" style:font-weight-asian="bold" style:font-name-complex="Calibri2" style:font-size-complex="4pt"/>
    </style:style>
    <style:style style:name="P23" style:family="paragraph" style:parent-style-name="Standard">
      <style:paragraph-properties>
        <style:tab-stops>
          <style:tab-stop style:position="4.8126in"/>
        </style:tab-stops>
      </style:paragraph-properties>
      <style:text-properties fo:font-size="2pt" fo:language="en" fo:country="US" fo:font-weight="bold" style:font-size-asian="2pt" style:font-weight-asian="bold" style:font-name-complex="Calibri2" style:font-size-complex="2pt"/>
    </style:style>
    <style:style style:name="P24" style:family="paragraph" style:parent-style-name="Heading_20_1">
      <style:paragraph-properties fo:text-indent="-0.248in" style:auto-text-indent="false" fo:break-before="page"/>
    </style:style>
    <style:style style:name="P25" style:family="paragraph" style:parent-style-name="Standard">
      <style:paragraph-properties fo:margin-left="0.4917in" fo:margin-right="0.3736in"/>
    </style:style>
    <style:style style:name="P26" style:family="paragraph" style:parent-style-name="Footnote">
      <style:paragraph-properties fo:margin-top="0.0835in" fo:margin-bottom="0in" style:contextual-spacing="false"/>
    </style:style>
    <style:style style:name="P27" style:family="paragraph">
      <loext:graphic-properties draw:fill="none"/>
      <style:paragraph-properties fo:text-align="center"/>
    </style:style>
    <style:style style:name="P28" style:family="paragraph">
      <loext:graphic-properties draw:fill="solid" draw:fill-color="#ffffff"/>
      <style:paragraph-properties fo:text-align="left"/>
      <style:text-properties fo:font-size="18pt"/>
    </style:style>
    <style:style style:name="P29" style:family="paragraph" style:parent-style-name="Standard">
      <style:paragraph-properties fo:margin-top="0.0835in" fo:margin-bottom="0in" style:contextual-spacing="false"/>
      <style:text-properties style:font-name="Calibri1" fo:language="en" fo:country="GB"/>
    </style:style>
    <style:style style:name="P30" style:family="paragraph" style:parent-style-name="List_20_Paragraph" style:list-style-name="WWNum11">
      <style:paragraph-properties fo:margin-top="0.0835in" fo:margin-bottom="0in" style:contextual-spacing="true"/>
    </style:style>
    <style:style style:name="P31" style:family="paragraph" style:parent-style-name="Heading_20_2">
      <style:paragraph-properties fo:margin-left="0.0984in" fo:text-indent="-0.3484in" style:auto-text-indent="false">
        <style:tab-stops>
          <style:tab-stop style:position="0.1972in"/>
        </style:tab-stops>
      </style:paragraph-properties>
    </style:style>
    <style:style style:name="P32" style:family="paragraph" style:parent-style-name="Standard">
      <style:paragraph-properties fo:text-indent="0.4917in" style:auto-text-indent="false"/>
    </style:style>
    <style:style style:name="P33" style:family="paragraph" style:parent-style-name="Standard">
      <style:paragraph-properties fo:margin-top="0.0835in" fo:margin-bottom="0.25in" style:contextual-spacing="false"/>
    </style:style>
    <style:style style:name="P34" style:family="paragraph" style:parent-style-name="List_20_Paragraph" style:list-style-name="WWNum20">
      <style:paragraph-properties fo:keep-with-next="always"/>
    </style:style>
    <style:style style:name="P35" style:family="paragraph" style:parent-style-name="List_20_Paragraph" style:list-style-name="WWNum20">
      <style:paragraph-properties fo:margin-top="0.0835in" fo:margin-bottom="0in" style:contextual-spacing="false" fo:keep-with-next="always"/>
    </style:style>
    <style:style style:name="P36" style:family="paragraph" style:parent-style-name="List_20_Paragraph">
      <style:paragraph-properties fo:margin-left="0.25in" fo:keep-with-next="always"/>
      <style:text-properties style:font-name="Calibri1" fo:language="en" fo:country="GB"/>
    </style:style>
    <style:style style:name="P37" style:family="paragraph" style:parent-style-name="List_20_Paragraph">
      <style:text-properties style:font-name="Calibri1" fo:language="en" fo:country="GB"/>
    </style:style>
    <style:style style:name="P38" style:family="paragraph" style:parent-style-name="List_20_Paragraph" style:list-style-name="WWNum20">
      <style:paragraph-properties fo:margin-left="0.248in" fo:text-indent="-0.248in" style:auto-text-indent="false"/>
    </style:style>
    <style:style style:name="P39" style:family="paragraph" style:parent-style-name="List_20_Paragraph" style:list-style-name="WWNum20"/>
    <style:style style:name="P40" style:family="paragraph" style:parent-style-name="Standard">
      <style:paragraph-properties fo:margin-left="0.25in"/>
    </style:style>
    <style:style style:name="P41" style:family="paragraph" style:parent-style-name="Standard">
      <style:paragraph-properties fo:margin-left="0.25in"/>
      <style:text-properties fo:language="en" fo:country="GB"/>
    </style:style>
    <style:style style:name="P42" style:family="paragraph" style:parent-style-name="Standard">
      <style:paragraph-properties fo:margin-left="0.25in" fo:text-align="center" style:justify-single-word="false"/>
    </style:style>
    <style:style style:name="P43" style:family="paragraph" style:parent-style-name="Standard">
      <loext:graphic-properties draw:fill="solid" draw:fill-color="#f2f2f2"/>
      <style:paragraph-properties fo:background-color="#f2f2f2" fo:padding="0.0835in" fo:border="0.51pt solid #ffffff" style:shadow="none"/>
    </style:style>
    <style:style style:name="P44" style:family="paragraph" style:parent-style-name="Heading_20_1">
      <style:paragraph-properties fo:keep-together="always"/>
    </style:style>
    <style:style style:name="P45" style:family="paragraph" style:parent-style-name="Standard">
      <style:paragraph-properties fo:keep-with-next="always"/>
      <style:text-properties fo:language="en" fo:country="GB"/>
    </style:style>
    <style:style style:name="P46" style:family="paragraph" style:parent-style-name="List_20_Paragraph" style:list-style-name="WWNum12">
      <style:paragraph-properties fo:margin-top="0.1665in" fo:margin-bottom="0.1945in" style:contextual-spacing="false"/>
    </style:style>
    <style:style style:name="P47" style:family="paragraph" style:parent-style-name="List_20_Paragraph">
      <style:paragraph-properties fo:margin-left="0.4957in" fo:margin-top="0.0835in" fo:margin-bottom="0in" style:contextual-spacing="false"/>
      <style:text-properties fo:font-size="4pt" fo:language="en" fo:country="GB" style:font-size-asian="4pt" style:font-size-complex="4pt"/>
    </style:style>
    <style:style style:name="P48" style:family="paragraph" style:parent-style-name="List_20_Paragraph" style:list-style-name="WWNum12">
      <style:paragraph-properties fo:margin-left="0.4957in" fo:margin-top="0.0835in" fo:margin-bottom="0in" style:contextual-spacing="false" fo:text-indent="-0.248in" style:auto-text-indent="false"/>
    </style:style>
    <style:style style:name="P49" style:family="paragraph" style:parent-style-name="List_20_Paragraph">
      <style:paragraph-properties fo:margin-left="0.4957in" fo:margin-top="0.0835in" fo:margin-bottom="0in" style:contextual-spacing="false"/>
      <style:text-properties fo:language="en" fo:country="GB"/>
    </style:style>
    <style:style style:name="P50" style:family="paragraph" style:parent-style-name="Standard">
      <style:paragraph-properties fo:margin-top="0.0835in" fo:margin-bottom="0.1945in" style:contextual-spacing="false"/>
    </style:style>
    <style:style style:name="P51" style:family="paragraph" style:parent-style-name="Standard">
      <style:paragraph-properties fo:margin-top="0.0835in" fo:margin-bottom="0in" style:contextual-spacing="false"/>
      <style:text-properties fo:language="en" fo:country="GB"/>
    </style:style>
    <style:style style:name="P52" style:family="paragraph" style:parent-style-name="List_20_Paragraph" style:list-style-name="WWNum40"/>
    <style:style style:name="P53" style:family="paragraph" style:parent-style-name="List_20_Paragraph">
      <style:text-properties fo:language="en" fo:country="GB"/>
    </style:style>
    <style:style style:name="P54" style:family="paragraph" style:parent-style-name="List_20_Paragraph">
      <style:text-properties fo:language="en" fo:country="GB" fo:font-weight="bold" style:font-weight-asian="bold"/>
    </style:style>
    <style:style style:name="P55" style:family="paragraph" style:parent-style-name="Standard">
      <style:text-properties fo:language="en" fo:country="GB" fo:font-weight="bold" style:font-weight-asian="bold"/>
    </style:style>
    <style:style style:name="P56" style:family="paragraph" style:parent-style-name="Standard">
      <style:paragraph-properties fo:margin-left="0.4917in"/>
    </style:style>
    <style:style style:name="P57" style:family="paragraph" style:parent-style-name="Standard">
      <style:paragraph-properties>
        <style:tab-stops>
          <style:tab-stop style:position="4.2083in"/>
        </style:tab-stops>
      </style:paragraph-properties>
    </style:style>
    <style:style style:name="P58" style:family="paragraph" style:parent-style-name="List_20_Paragraph">
      <style:text-properties fo:font-size="4pt" fo:language="en" fo:country="GB" style:font-size-asian="4pt" style:font-size-complex="4pt"/>
    </style:style>
    <style:style style:name="P59" style:family="paragraph" style:parent-style-name="List_20_Paragraph">
      <style:paragraph-properties fo:text-align="center" style:justify-single-word="false"/>
    </style:style>
    <style:style style:name="P60" style:family="paragraph" style:parent-style-name="List_20_Paragraph">
      <style:text-properties fo:language="en" fo:country="US"/>
    </style:style>
    <style:style style:name="P61" style:family="paragraph" style:parent-style-name="Standard">
      <style:paragraph-properties fo:margin-top="0.1665in" fo:margin-bottom="0in" style:contextual-spacing="false" fo:keep-with-next="always"/>
    </style:style>
    <style:style style:name="P62" style:family="paragraph" style:parent-style-name="Standard">
      <style:paragraph-properties fo:margin-top="0.25in" fo:margin-bottom="0in" style:contextual-spacing="false"/>
    </style:style>
    <style:style style:name="P63" style:family="paragraph" style:parent-style-name="Standard">
      <style:paragraph-properties fo:margin-top="0.0835in" fo:margin-bottom="0in" style:contextual-spacing="false" fo:keep-with-next="always"/>
    </style:style>
    <style:style style:name="P64" style:family="paragraph" style:parent-style-name="List_20_Paragraph">
      <style:paragraph-properties fo:margin-top="0.0835in" fo:margin-bottom="0in" style:contextual-spacing="false"/>
      <style:text-properties fo:language="en" fo:country="GB"/>
    </style:style>
    <style:style style:name="P65" style:family="paragraph" style:parent-style-name="Standard">
      <style:text-properties fo:language="en" fo:country="US"/>
    </style:style>
    <style:style style:name="P66" style:family="paragraph">
      <loext:graphic-properties draw:fill="none"/>
      <style:paragraph-properties fo:text-align="left"/>
      <style:text-properties fo:font-size="18pt"/>
    </style:style>
    <style:style style:name="P67" style:family="paragraph" style:parent-style-name="List_20_Paragraph" style:list-style-name="WWNum23">
      <style:paragraph-properties fo:margin-left="0.248in" fo:margin-top="0.25in" fo:margin-bottom="0in" style:contextual-spacing="true" fo:text-indent="-0.248in" style:auto-text-indent="false"/>
    </style:style>
    <style:style style:name="P68" style:family="paragraph" style:parent-style-name="Standard">
      <style:paragraph-properties fo:margin-top="0.1665in" fo:margin-bottom="0in" style:contextual-spacing="false" fo:text-indent="0.25in" style:auto-text-indent="false"/>
    </style:style>
    <style:style style:name="P69" style:family="paragraph" style:parent-style-name="Standard">
      <style:paragraph-properties fo:margin-top="0.1665in" fo:margin-bottom="0in" style:contextual-spacing="false" fo:text-align="center" style:justify-single-word="false"/>
    </style:style>
    <style:style style:name="P70" style:family="paragraph" style:parent-style-name="List_20_Paragraph" style:list-style-name="WWNum23">
      <style:paragraph-properties fo:margin-top="0.1665in" fo:margin-bottom="0in" style:contextual-spacing="true"/>
    </style:style>
    <style:style style:name="P71" style:family="paragraph" style:parent-style-name="List_20_Paragraph">
      <style:paragraph-properties fo:margin-left="0.25in" fo:margin-top="0.1665in" fo:margin-bottom="0in" style:contextual-spacing="true"/>
      <style:text-properties fo:language="en" fo:country="GB"/>
    </style:style>
    <style:style style:name="P72" style:family="paragraph" style:parent-style-name="List_20_Paragraph">
      <style:paragraph-properties fo:margin-left="0.25in" fo:margin-top="0.1665in" fo:margin-bottom="0in" style:contextual-spacing="true"/>
    </style:style>
    <style:style style:name="P73" style:family="paragraph" style:parent-style-name="List_20_Paragraph" style:list-style-name="WWNum41">
      <style:paragraph-properties fo:margin-top="0.1665in" fo:margin-bottom="0in" style:contextual-spacing="true"/>
    </style:style>
    <style:style style:name="P74" style:family="paragraph" style:parent-style-name="List_20_Paragraph">
      <style:paragraph-properties fo:margin-left="0.25in" fo:text-align="justify" style:justify-single-word="false" loext:word-spacing-minimum="75%" loext:word-spacing-maximum="133%"/>
    </style:style>
    <style:style style:name="P75" style:family="paragraph" style:parent-style-name="List_20_Paragraph" style:list-style-name="WWNum23"/>
    <style:style style:name="P76" style:family="paragraph" style:parent-style-name="Standard">
      <style:paragraph-properties fo:margin-top="0.0835in" fo:margin-bottom="0in" style:contextual-spacing="false" fo:keep-with-next="always"/>
      <style:text-properties fo:language="en" fo:country="GB"/>
    </style:style>
    <style:style style:name="P77" style:family="paragraph" style:parent-style-name="Standard">
      <style:paragraph-properties fo:margin-top="0in" fo:margin-bottom="0in" style:contextual-spacing="false" fo:text-align="center" style:justify-single-word="false" fo:orphans="2" fo:widows="2" fo:keep-with-next="always"/>
      <style:text-properties style:letter-kerning="false" style:font-name-asian="Times New Roman1" style:font-name-complex="Times New Roman1" style:language-complex="ar" style:country-complex="SA"/>
    </style:style>
    <style:style style:name="P78" style:family="paragraph" style:parent-style-name="Standard">
      <style:paragraph-properties fo:margin-top="0in" fo:margin-bottom="0in" style:contextual-spacing="false" fo:text-align="left" style:justify-single-word="false" fo:orphans="2" fo:widows="2" fo:keep-with-next="always"/>
      <style:text-properties style:letter-kerning="false" style:font-name-asian="Times New Roman1" style:font-name-complex="Times New Roman1"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ext-properties style:letter-kerning="false" style:font-name-asian="Times New Roman1" style:font-name-complex="Times New Roman1" style:language-complex="ar" style:country-complex="SA"/>
    </style:style>
    <style:style style:name="P80"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81" style:family="paragraph" style:parent-style-name="Standard">
      <style:paragraph-properties fo:margin-top="0.1665in" fo:margin-bottom="0in" style:contextual-spacing="false"/>
      <style:text-properties fo:language="en" fo:country="GB"/>
    </style:style>
    <style:style style:name="P82" style:family="paragraph" style:parent-style-name="List_20_Paragraph" style:list-style-name="WWNum35">
      <style:paragraph-properties fo:margin-top="0.1665in" fo:margin-bottom="0in" style:contextual-spacing="true"/>
    </style:style>
    <style:style style:name="P83" style:family="paragraph" style:parent-style-name="List_20_Paragraph" style:list-style-name="WWNum35">
      <style:paragraph-properties fo:margin-top="0.0835in" fo:margin-bottom="0in" style:contextual-spacing="false"/>
    </style:style>
    <style:style style:name="P84" style:family="paragraph" style:parent-style-name="Standard">
      <style:paragraph-properties fo:margin-top="0.1665in" fo:margin-bottom="0in" style:contextual-spacing="false"/>
      <style:text-properties fo:language="en" fo:country="US"/>
    </style:style>
    <style:style style:name="P85" style:family="paragraph" style:parent-style-name="List_20_Paragraph" style:list-style-name="WWNum37">
      <style:paragraph-properties fo:margin-top="0.1665in" fo:margin-bottom="0in" style:contextual-spacing="true"/>
    </style:style>
    <style:style style:name="P86" style:family="paragraph" style:parent-style-name="List_20_Paragraph" style:list-style-name="WWNum37">
      <style:paragraph-properties fo:margin-top="0.0835in" fo:margin-bottom="0in" style:contextual-spacing="false"/>
    </style:style>
    <style:style style:name="P87"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2pt" fo:language="en" fo:country="GB" fo:font-weight="bold" style:font-size-asian="32pt" style:font-weight-asian="bold" style:font-size-complex="32pt"/>
    </style:style>
    <style:style style:name="T3" style:family="text">
      <style:text-properties fo:font-size="32pt" fo:language="en" fo:country="US" style:font-size-asian="32pt" style:font-size-complex="32pt"/>
    </style:style>
    <style:style style:name="T4" style:family="text">
      <style:text-properties fo:language="en" fo:country="GB" fo:font-style="italic" style:font-style-asian="italic"/>
    </style:style>
    <style:style style:name="T5" style:family="text">
      <style:text-properties style:font-name="Calibri1" fo:language="en" fo:country="GB"/>
    </style:style>
    <style:style style:name="T6" style:family="text">
      <style:text-properties fo:language="en" fo:country="GB"/>
    </style:style>
    <style:style style:name="T7" style:family="text">
      <style:text-properties fo:font-size="16pt" fo:language="en" fo:country="GB" style:font-size-asian="16pt"/>
    </style:style>
    <style:style style:name="T8" style:family="text">
      <style:text-properties fo:font-size="11pt" fo:language="en" fo:country="GB" fo:font-style="italic" style:font-size-asian="11pt" style:font-style-asian="italic"/>
    </style:style>
    <style:style style:name="T9" style:family="text">
      <style:text-properties fo:language="en" fo:country="US"/>
    </style:style>
    <style:style style:name="T10" style:family="text">
      <style:text-properties style:font-name="Calibri1" fo:font-size="16pt" fo:language="en" fo:country="GB" fo:font-weight="bold" style:font-size-asian="16pt" style:font-weight-asian="bold" style:font-size-complex="16pt"/>
    </style:style>
    <style:style style:name="T11" style:family="text">
      <style:text-properties style:font-name="Calibri1" fo:font-size="20pt" fo:language="en" fo:country="GB" fo:font-weight="bold" style:font-size-asian="20pt" style:font-weight-asian="bold" style:font-size-complex="16pt"/>
    </style:style>
    <style:style style:name="T12" style:family="text">
      <style:text-properties style:font-name="Calibri"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3" style:family="text">
      <style:text-properties style:font-name="Calibri1" fo:language="en" fo:country="GB" fo:font-weight="normal" style:letter-kerning="true" style:font-family-asian="'ＭＳ 明朝'" style:font-family-generic-asian="system" style:font-pitch-asian="variable" style:language-asian="en" style:country-asian="GB" style:font-weight-asian="normal" style:font-name-complex="Arial1"/>
    </style:style>
    <style:style style:name="T14" style:family="text">
      <style:text-properties text:display="true"/>
    </style:style>
    <style:style style:name="T15" style:family="text">
      <style:text-properties style:font-name="Calibri"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6" style:family="text">
      <style:text-properties style:font-name="Calibri1" fo:language="en" fo:country="GB" fo:font-style="normal" style:letter-kerning="true" style:font-family-asian="'ＭＳ 明朝'" style:font-family-generic-asian="system" style:font-pitch-asian="variable" style:language-asian="en" style:country-asian="GB" style:font-style-asian="normal" style:font-name-complex="Arial1"/>
    </style:style>
    <style:style style:name="T17" style:family="text">
      <style:text-properties style:font-name="Calibri"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8" style:family="text">
      <style:text-properties style:font-name="Calibri1" fo:font-size="12pt" fo:language="en" fo:country="GB" style:letter-kerning="true" style:font-family-asian="'ＭＳ 明朝'" style:font-family-generic-asian="system" style:font-pitch-asian="variable" style:font-size-asian="12pt" style:language-asian="en" style:country-asian="GB" style:font-name-complex="Arial1"/>
    </style:style>
    <style:style style:name="T19" style:family="text">
      <style:text-properties style:font-name="Calibri1" fo:language="en" fo:country="GB" fo:font-weight="bold" style:font-weight-asian="bold"/>
    </style:style>
    <style:style style:name="T20" style:family="text">
      <style:text-properties style:font-name="Calibri1" fo:language="en" fo:country="GB" fo:font-weight="bold" style:font-weight-asian="bold" style:font-weight-complex="bold"/>
    </style:style>
    <style:style style:name="T21" style:family="text">
      <style:text-properties fo:font-size="16pt" fo:language="en" fo:country="US" fo:font-weight="bold" style:letter-kerning="true" style:font-size-asian="16pt" style:font-weight-asian="bold" style:font-name-complex="Arial1" style:font-size-complex="16pt" style:font-weight-complex="bold"/>
    </style:style>
    <style:style style:name="T22" style:family="text">
      <style:text-properties fo:font-size="20pt" fo:language="en" fo:country="US" fo:font-weight="bold" style:font-size-asian="20pt" style:font-weight-asian="bold" style:font-name-complex="Calibri2" style:font-size-complex="20pt"/>
    </style:style>
    <style:style style:name="T23" style:family="text">
      <style:text-properties fo:language="en" fo:country="US" style:font-name-complex="Calibri2"/>
    </style:style>
    <style:style style:name="T24" style:family="text">
      <style:text-properties fo:font-size="8pt" fo:language="en" fo:country="US" style:font-size-asian="8pt" style:font-name-complex="Calibri2" style:font-size-complex="8pt"/>
    </style:style>
    <style:style style:name="T25" style:family="text">
      <style:text-properties fo:font-weight="bold" style:font-weight-asian="bold" style:font-name-complex="Calibri2"/>
    </style:style>
    <style:style style:name="T26" style:family="text">
      <style:text-properties fo:font-size="4pt" style:font-size-asian="4pt" style:font-name-complex="Calibri2" style:font-size-complex="4pt"/>
    </style:style>
    <style:style style:name="T27" style:family="text">
      <style:text-properties fo:font-size="30pt" fo:font-weight="bold" style:font-size-asian="30pt" style:font-weight-asian="bold" style:font-name-complex="Calibri2" style:font-size-complex="30pt"/>
    </style:style>
    <style:style style:name="T28" style:family="text">
      <style:text-properties fo:font-family="Wingdings" style:font-family-generic="swiss" style:font-pitch="variable" style:font-charset="x-symbol" fo:font-size="30pt" fo:font-weight="bold" style:font-family-asian="Wingdings" style:font-family-generic-asian="system" style:font-pitch-asian="variable" style:font-size-asian="30pt" style:font-weight-asian="bold" style:font-family-complex="Wingdings" style:font-family-generic-complex="system" style:font-pitch-complex="variable" style:font-size-complex="30pt"/>
    </style:style>
    <style:style style:name="T29" style:family="text">
      <style:text-properties fo:language="en" fo:country="US" fo:font-style="italic" style:font-style-asian="italic" style:font-name-complex="Calibri2"/>
    </style:style>
    <style:style style:name="T30" style:family="text">
      <style:text-properties fo:font-size="2pt" fo:language="en" fo:country="US" style:font-size-asian="2pt" style:font-name-complex="Calibri2" style:font-size-complex="2pt"/>
    </style:style>
    <style:style style:name="T31" style:family="text">
      <style:text-properties fo:font-size="4pt" fo:font-weight="bold" style:font-size-asian="4pt" style:font-weight-asian="bold" style:font-name-complex="Calibri2" style:font-size-complex="4pt"/>
    </style:style>
    <style:style style:name="T32" style:family="text">
      <style:text-properties fo:font-size="36pt" fo:font-weight="bold" style:font-size-asian="36pt" style:font-weight-asian="bold" style:font-name-complex="Calibri2" style:font-size-complex="36pt"/>
    </style:style>
    <style:style style:name="T33" style:family="text">
      <style:text-properties fo:font-family="Wingdings" style:font-family-generic="swiss" style:font-pitch="variable" style:font-charset="x-symbol" fo:font-size="36pt" fo:font-weight="bold" style:font-family-asian="Wingdings" style:font-family-generic-asian="system" style:font-pitch-asian="variable" style:font-size-asian="36pt" style:font-weight-asian="bold" style:font-family-complex="Wingdings" style:font-family-generic-complex="system" style:font-pitch-complex="variable" style:font-size-complex="36pt"/>
    </style:style>
    <style:style style:name="T34" style:family="text">
      <style:text-properties fo:font-size="2pt" fo:language="en" fo:country="US" fo:font-weight="bold" style:font-size-asian="2pt" style:font-weight-asian="bold" style:font-name-complex="Calibri2" style:font-size-complex="2pt"/>
    </style:style>
    <style:style style:name="T35" style:family="text">
      <style:text-properties style:font-name="Calibri1" fo:font-size="11pt" fo:language="en" fo:country="GB" style:font-size-asian="11pt"/>
    </style:style>
    <style:style style:name="T36" style:family="text">
      <style:text-properties fo:font-size="11pt" fo:language="en" fo:country="GB" style:font-size-asian="11pt"/>
    </style:style>
    <style:style style:name="T37"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tyle>
    <style:style style:name="T38" style:family="text">
      <style:text-properties fo:font-family="'Arial Unicode MS'" style:font-family-generic="swiss" style:font-pitch="variable" fo:font-size="11pt" fo:language="en" fo:country="GB"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39"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asian"/>
    </style:style>
    <style:style style:name="T40" style:family="text">
      <style:text-properties fo:font-family="'Arial Unicode MS'" style:font-family-generic="swiss" style:font-pitch="variable" fo:font-size="11pt" style:font-family-asian="'Arial Unicode MS'" style:font-family-generic-asian="system" style:font-pitch-asian="variable" style:font-size-asian="11pt" style:font-family-complex="'Arial Unicode MS'" style:font-family-generic-complex="system" style:font-pitch-complex="variable" style:font-size-complex="11pt" style:language-complex="hi" style:country-complex="IN" style:script-type="complex"/>
    </style:style>
    <style:style style:name="T41" style:family="text">
      <style:text-properties style:font-name="Calibri1" fo:language="en" fo:country="GB" style:font-name-complex="Tahoma"/>
    </style:style>
    <style:style style:name="T42" style:family="text">
      <style:text-properties style:font-name="Calibri1" fo:language="en" fo:country="GB" fo:font-weight="bold" style:font-weight-asian="bold" style:font-name-complex="Tahoma"/>
    </style:style>
    <style:style style:name="T43" style:family="text">
      <style:text-properties fo:language="en" fo:country="GB" style:text-underline-style="solid" style:text-underline-width="auto" style:text-underline-color="font-color" fo:font-weight="bold" style:font-weight-asian="bold" style:font-weight-complex="bold"/>
    </style:style>
    <style:style style:name="T44" style:family="text">
      <style:text-properties style:font-name="Calibri1" fo:font-size="4pt" fo:language="en" fo:country="GB" style:font-size-asian="4pt" style:font-size-complex="4pt"/>
    </style:style>
    <style:style style:name="T45" style:family="text">
      <style:text-properties fo:language="en" fo:country="GB" fo:font-style="italic" fo:font-weight="bold" style:font-style-asian="italic" style:font-weight-asian="bold"/>
    </style:style>
    <style:style style:name="T46" style:family="text">
      <style:text-properties fo:language="en" fo:country="GB" fo:font-weight="bold" style:font-weight-asian="bold" style:font-weight-complex="bold"/>
    </style:style>
    <style:style style:name="T47" style:family="text">
      <style:text-properties fo:language="en" fo:country="GB" fo:font-weight="bold" style:font-weight-asian="bold"/>
    </style:style>
    <style:style style:name="T48" style:family="text">
      <style:text-properties fo:font-size="4pt" fo:language="en" fo:country="GB" style:font-size-asian="4pt" style:font-size-complex="4pt"/>
    </style:style>
    <style:style style:name="T49"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50" style:family="text">
      <style:text-properties style:font-name="Calibri1" fo:language="en" fo:country="US" style:font-name-complex="Tahoma"/>
    </style:style>
    <style:style style:name="T51" style:family="text">
      <style:text-properties fo:font-family="Wingdings" style:font-family-generic="swiss" style:font-pitch="variable" style:font-charset="x-symbol" fo:language="en" fo:country="GB" fo:font-weight="bold" style:font-family-asian="Wingdings" style:font-family-generic-asian="system" style:font-pitch-asian="variable" style:font-weight-asian="bold" style:font-family-complex="Wingdings" style:font-family-generic-complex="system" style:font-pitch-complex="variable"/>
    </style:style>
    <style:style style:name="T52" style:family="text">
      <style:text-properties fo:language="en" fo:country="US" fo:font-weight="bold" style:font-weight-asian="bold"/>
    </style:style>
    <style:style style:name="T53" style:family="text">
      <style:text-properties fo:language="en" fo:country="GB" style:font-name-complex="Calibri2"/>
    </style:style>
    <style:style style:name="T54" style:family="text">
      <style:text-properties fo:font-style="italic" style:font-style-asian="italic" style:font-name-complex="Calibri2"/>
    </style:style>
    <style:style style:name="T55" style:family="text">
      <style:text-properties fo:font-style="italic" fo:font-weight="bold" style:font-style-asian="italic" style:font-weight-asian="bold" style:font-name-complex="Calibri2" style:font-weight-complex="bold"/>
    </style:style>
    <style:style style:name="T56" style:family="text">
      <style:text-properties fo:language="en" fo:country="US" fo:font-style="italic" fo:font-weight="bold" style:font-style-asian="italic" style:font-weight-asian="bold" style:font-name-complex="Calibri2"/>
    </style:style>
    <style:style style:name="T57" style:family="text">
      <style:text-properties fo:language="en" fo:country="GB"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4154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4.5902in, 0in, 3.7673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5.7783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1681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6.6217in, 0in, 0in)" draw:image-opacity="100%" style:mirror="none"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1453in" fo:margin-right="0.1453in" fo:margin-top="0in" fo:margin-bottom="0.031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1" loext:color-type="theme"/>
        <loext:fill-complex-color loext:theme-type="light1" loext:color-type="theme"/>
      </style:graphic-properties>
    </style:style>
    <style:style style:name="gr4" style:family="graphic">
      <style:graphic-properties draw:stroke="solid" svg:stroke-width="0.028in" svg:stroke-color="#3a5f8b" svg:stroke-linecap="butt" draw:fill="solid" draw:fill-color="#ffffff" draw:textarea-vertical-align="top" draw:auto-grow-height="false" fo:min-height="0.3028in" fo:min-width="0in" fo:padding-top="0.0492in" fo:padding-bottom="0.0492in" fo:padding-left="0.0984in" fo:padding-right="0.0984in" fo:wrap-option="wrap" loext:decorative="false" fo:margin-left="0.0209in" fo:margin-right="0.0417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5" style:family="graphic">
      <style:graphic-properties draw:stroke="solid" svg:stroke-width="0.028in" svg:stroke-color="#3a5f8b" svg:stroke-linecap="butt" draw:fill="solid" draw:fill-color="#ffffff" draw:textarea-vertical-align="top" draw:auto-grow-height="false" fo:min-height="0.6417in" fo:min-width="0in" fo:padding-top="0.0492in" fo:padding-bottom="0.0492in" fo:padding-left="0.0984in" fo:padding-right="0.0984in" fo:wrap-option="wrap" loext:decorative="false" fo:margin-left="0in" fo:margin-right="0.0134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6" style:family="graphic">
      <style:graphic-properties draw:stroke="solid" svg:stroke-width="0.0102in" svg:stroke-color="#000000" draw:stroke-linejoin="miter" draw:fill="solid" draw:fill-color="#ffffff" draw:textarea-vertical-align="top" draw:auto-grow-height="false" fo:min-height="0.0209in" fo:min-width="0.8118in" fo:padding-top="0.0492in" fo:padding-bottom="0.0492in" fo:padding-left="0.0984in" fo:padding-right="0.0984in" fo:wrap-option="wrap" loext:decorative="false" fo:margin-left="0.2528in" fo:margin-right="0.26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style:style style:name="gr8"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9" style:family="graphic">
      <style:graphic-properties draw:stroke="solid" svg:stroke-width="0.0102in" svg:stroke-color="#000000" draw:stroke-linejoin="miter" draw:fill="solid" draw:fill-color="#ffffff" draw:textarea-vertical-align="top" draw:auto-grow-height="false" fo:min-height="0.0362in" fo:min-width="1.6047in" fo:padding-top="0.0492in" fo:padding-bottom="0.0492in" fo:padding-left="0.0984in" fo:padding-right="0.0984in" fo:wrap-option="wrap" loext:decorative="false" fo:margin-left="0.2035in" fo:margin-right="0.1752in" fo:margin-top="0.0047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000000" draw:stroke-linejoin="miter" draw:fill="solid" draw:fill-color="#ffffff" draw:textarea-vertical-align="top" draw:auto-grow-height="false" fo:min-height="0.0362in" fo:min-width="2.3717in" fo:padding-top="0.0492in" fo:padding-bottom="0.0492in" fo:padding-left="0.0984in" fo:padding-right="0.0984in" fo:wrap-option="wrap" loext:decorative="false" fo:margin-left="0.2535in" fo:margin-right="0.270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228in" fo:margin-top="0in" fo:margin-bottom="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loext:stroke-complex-color loext:theme-type="light1" loext:color-type="theme"/>
      </style:graphic-properties>
    </style:style>
    <style:style style:name="gr12" style:family="graphic">
      <style:graphic-properties draw:stroke="solid" svg:stroke-width="0.0102in" svg:stroke-color="#000000" draw:stroke-linejoin="miter" draw:fill="solid" draw:fill-color="#ffffff" draw:textarea-vertical-align="top" draw:auto-grow-height="false" fo:min-height="0.0201in" fo:min-width="0.5063in" fo:padding-top="0.0492in" fo:padding-bottom="0.0492in" fo:padding-left="0.0984in" fo:padding-right="0.0984in" fo:wrap-option="wrap" loext:decorative="false" fo:margin-left="0in" fo:margin-right="0in" fo:margin-top="0.1874in" fo:margin-bottom="0.2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102in" svg:stroke-color="#ffffff"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0311in" fo:margin-top="0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2" text:anchor-type="as-char" svg:width="5.8063in" svg:height="1.7764in" draw:z-index="65"><draw:image xlink:href="Pictures/1000000100000846000002729EF3B20B.png" xlink:type="simple" xlink:show="embed" xlink:actuate="onLoad" draw:mime-type="image/png"/><svg:desc>C:\Users\Richard\AppData\Local\Microsoft\Windows\INetCache\Content.Word\SAB-logo.png</svg:desc></draw:frame></text:p>
      <text:p text:style-name="P1" loext:marker-style-name="T1"/>
      <text:p text:style-name="P1" loext:marker-style-name="T1"/>
      <text:p text:style-name="P1" loext:marker-style-name="T1"/>
      <text:p text:style-name="P2" loext:marker-style-name="T2"><text:span text:style-name="T3"><text:s/></text:span><text:span text:style-name="T2">Using aeneas for <text:line-break/>Audio-Text Synchronization</text:span></text:p>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2" loext:marker-style-name="T4"><draw:frame draw:style-name="fr2" draw:name="Image 13" text:anchor-type="as-char" svg:width="0.6772in" svg:height="0.7598in" draw:z-index="66"><draw:image xlink:href="Pictures/100000010000042C000004B0826D13D2.png" xlink:type="simple" xlink:show="embed" xlink:actuate="onLoad" draw:mime-type="image/png"/></draw:frame></text:p>
      <text:p text:style-name="P3" loext:marker-style-name="T4"/>
      <text:p text:style-name="P3" loext:marker-style-name="T4"/>
      <text:p text:style-name="P4" loext:marker-style-name="T5"/>
      <text:p text:style-name="P5"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7" loext:marker-style-name="T6"/>
      <text:p text:style-name="P2" loext:marker-style-name="T7"><text:span text:style-name="T7">Scripture App Builder: Using aeneas for </text:span><text:span text:style-name="T7"/></text:p>
      <text:p text:style-name="P2" loext:marker-style-name="T7"><text:span text:style-name="T7">Audio-Text Synchronization</text:span><text:span text:style-name="T7"/></text:p>
      <text:p text:style-name="P7" loext:marker-style-name="T6"/>
      <text:p text:style-name="P2" loext:marker-style-name="T6"><text:span text:style-name="T6">© 2025, SIL Global</text:span><text:span text:style-name="T6"/></text:p>
      <text:p text:style-name="P7" loext:marker-style-name="T6"/>
      <text:p text:style-name="P2" loext:marker-style-name="T8"><text:span text:style-name="T8">Last updated: 19 December 2025</text:span><text:span text:style-name="T8"/></text:p>
      <text:p text:style-name="P2" loext:marker-style-name="T8"><text:span text:style-name="T8">SAB version 13.3.2</text:span><text:span text:style-name="T8"/></text:p>
      <text:p text:style-name="P7" loext:marker-style-name="T6"/>
      <text:p text:style-name="P7" loext:marker-style-name="T6"/>
      <text:p text:style-name="P7" loext:marker-style-name="T6"/>
      <text:p text:style-name="P7" loext:marker-style-name="T6"/>
      <text:p text:style-name="P7" loext:marker-style-name="T6"/>
      <text:p text:style-name="P2" loext:marker-style-name="T9"><text:span text:style-name="T9">You are free to print this manual for personal use and for training workshops.</text:span><text:span text:style-name="T9"/></text:p>
      <text:p text:style-name="P8" loext:marker-style-name="T9"/>
      <text:p text:style-name="P2" loext:marker-style-name="T9"><text:span text:style-name="T9">The latest version is available at</text:span><text:span text:style-name="T9"/></text:p>
      <text:p text:style-name="P2" loext:marker-style-name="T6"><text:a xlink:type="simple" xlink:href="http://software.sil.org/scriptureappbuilder/resources/" text:style-name="Internet_20_link" text:visited-style-name="Visited_20_Internet_20_Link"><text:span text:style-name="Internet_20_link"><text:span text:style-name="T6">http://software.sil.org/scriptureappbuilder/resources/</text:span></text:span></text:a><text:span text:style-name="T6"> <text:s/></text:span></text:p>
      <text:p text:style-name="P7" loext:marker-style-name="T6"/>
      <text:p text:style-name="P2" loext:marker-style-name="T6"><text:span text:style-name="T6">and on the Help menu of Scripture App Builder.</text:span><text:span text:style-name="T6"/></text:p>
      <text:p text:style-name="P6" loext:marker-style-name="T6"/>
      <text:p text:style-name="P9" loext:marker-style-name="T10"><text:span text:style-name="T11">Contents</text:span><text:span text:style-name="T10"/></text:p>
      <text:p text:style-name="P10"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2"><text:a xlink:type="simple" xlink:href="#_Toc217376494" text:style-name="Index_20_Link" text:visited-style-name="Index_20_Link"><text:span text:style-name="T6">1.</text:span><text:span text:style-name="T13"><text:tab/></text:span>Introduction<text:span text:style-name="T14"><text:tab/>6</text:span></text:a></text:p>
          <text:p text:style-name="Contents_20_2" loext:marker-style-name="T15"><text:a xlink:type="simple" xlink:href="#_Toc217376495" text:style-name="Index_20_Link" text:visited-style-name="Index_20_Link">1.1.<text:span text:style-name="T16"><text:tab/></text:span>What is aeneas?<text:span text:style-name="T14"><text:tab/>6</text:span></text:a></text:p>
          <text:p text:style-name="Contents_20_2" loext:marker-style-name="T15"><text:a xlink:type="simple" xlink:href="#_Toc217376496" text:style-name="Index_20_Link" text:visited-style-name="Index_20_Link">1.2.<text:span text:style-name="T16"><text:tab/></text:span>Will it work with our language?<text:span text:style-name="T14"><text:tab/>7</text:span></text:a></text:p>
          <text:p text:style-name="Contents_20_2" loext:marker-style-name="T15"><text:a xlink:type="simple" xlink:href="#_Toc217376497" text:style-name="Index_20_Link" text:visited-style-name="Index_20_Link">1.3.<text:span text:style-name="T16"><text:tab/></text:span>How long does it take?<text:span text:style-name="T14"><text:tab/>7</text:span></text:a></text:p>
          <text:p text:style-name="Contents_20_2" loext:marker-style-name="T15"><text:a xlink:type="simple" xlink:href="#_Toc217376498" text:style-name="Index_20_Link" text:visited-style-name="Index_20_Link">1.4.<text:span text:style-name="T16"><text:tab/></text:span>How do we run aeneas?<text:span text:style-name="T14"><text:tab/>7</text:span></text:a></text:p>
          <text:p text:style-name="Contents_20_1" loext:marker-style-name="T12"><text:a xlink:type="simple" xlink:href="#_Toc217376499" text:style-name="Index_20_Link" text:visited-style-name="Index_20_Link"><text:span text:style-name="T6">2.</text:span><text:span text:style-name="T13"><text:tab/></text:span>Windows<text:span text:style-name="T6"> Installation</text:span><text:span text:style-name="T14"><text:tab/>7</text:span></text:a></text:p>
          <text:p text:style-name="Contents_20_1" loext:marker-style-name="T12"><text:a xlink:type="simple" xlink:href="#_Toc217376500" text:style-name="Index_20_Link" text:visited-style-name="Index_20_Link"><text:span text:style-name="T6">3.</text:span><text:span text:style-name="T13"><text:tab/></text:span>Linux<text:span text:style-name="T6"> Installation</text:span><text:span text:style-name="T14"><text:tab/>10</text:span></text:a></text:p>
          <text:p text:style-name="Contents_20_1" loext:marker-style-name="T12"><text:a xlink:type="simple" xlink:href="#_Toc217376501" text:style-name="Index_20_Link" text:visited-style-name="Index_20_Link"><text:span text:style-name="T6">4.</text:span><text:span text:style-name="T13"><text:tab/></text:span><text:span text:style-name="T6">Using aeneas within Scripture App Builder</text:span><text:span text:style-name="T14"><text:tab/>10</text:span></text:a></text:p>
          <text:p text:style-name="Contents_20_2" loext:marker-style-name="T15"><text:a xlink:type="simple" xlink:href="#_Toc217376502" text:style-name="Index_20_Link" text:visited-style-name="Index_20_Link">4.1.<text:span text:style-name="T16"><text:tab/></text:span>Preparing Your Audio Files<text:span text:style-name="T14"><text:tab/>10</text:span></text:a></text:p>
          <text:p text:style-name="Contents_20_2" loext:marker-style-name="T15"><text:a xlink:type="simple" xlink:href="#_Toc217376503" text:style-name="Index_20_Link" text:visited-style-name="Index_20_Link">4.2.<text:span text:style-name="T16"><text:tab/></text:span>Performing the Audio Synchronization<text:span text:style-name="T14"><text:tab/>10</text:span></text:a></text:p>
          <text:p text:style-name="Contents_20_3" loext:marker-style-name="T17"><text:a xlink:type="simple" xlink:href="#_Toc217376504" text:style-name="Index_20_Link" text:visited-style-name="Index_20_Link"><text:span text:style-name="T6">4.2.1.</text:span><text:span text:style-name="T18"><text:tab/></text:span><text:span text:style-name="T6">Where to launch the synchronization process</text:span><text:span text:style-name="T14"><text:tab/>10</text:span></text:a></text:p>
          <text:p text:style-name="Contents_20_3" loext:marker-style-name="T17"><text:a xlink:type="simple" xlink:href="#_Toc217376505" text:style-name="Index_20_Link" text:visited-style-name="Index_20_Link"><text:span text:style-name="T6">4.2.2.</text:span><text:span text:style-name="T18"><text:tab/></text:span><text:span text:style-name="T6">Stepping Through the Synchronization Wizard</text:span><text:span text:style-name="T14"><text:tab/>11</text:span></text:a></text:p>
          <text:p text:style-name="Contents_20_2" loext:marker-style-name="T15"><text:a xlink:type="simple" xlink:href="#_Toc217376506" text:style-name="Index_20_Link" text:visited-style-name="Index_20_Link">4.3.<text:span text:style-name="T16"><text:tab/></text:span>Troubleshooting<text:span text:style-name="T14"><text:tab/>16</text:span></text:a></text:p>
          <text:p text:style-name="Contents_20_2" loext:marker-style-name="T15"><text:a xlink:type="simple" xlink:href="#_Toc217376507" text:style-name="Index_20_Link" text:visited-style-name="Index_20_Link">4.4.<text:span text:style-name="T16"><text:tab/></text:span>Viewing and testing the timing files created by aeneas<text:span text:style-name="T14"><text:tab/>17</text:span></text:a></text:p>
          <text:p text:style-name="Contents_20_2" loext:marker-style-name="T15"><text:a xlink:type="simple" xlink:href="#_Toc217376508" text:style-name="Index_20_Link" text:visited-style-name="Index_20_Link">4.5.<text:span text:style-name="T16"><text:tab/></text:span>Fine tune timing files using the Preview Audio feature<text:span text:style-name="T14"><text:tab/>17</text:span></text:a></text:p>
          <text:p text:style-name="Contents_20_2" loext:marker-style-name="T15"><text:a xlink:type="simple" xlink:href="#_Toc217376509" text:style-name="Index_20_Link" text:visited-style-name="Index_20_Link">4.6.<text:span text:style-name="T16"><text:tab/></text:span>Fine tune timing files using the Fine Tune Timings viewer<text:span text:style-name="T14"><text:tab/>17</text:span></text:a></text:p>
          <text:p text:style-name="Contents_20_2" loext:marker-style-name="T15"><text:a xlink:type="simple" xlink:href="#_Toc217376510" text:style-name="Index_20_Link" text:visited-style-name="Index_20_Link">4.7.<text:span text:style-name="T16"><text:tab/></text:span>Keyboard shortcuts when doing fine tuning in your browser<text:span text:style-name="T14"><text:tab/>20</text:span></text:a></text:p>
          <text:p text:style-name="Contents_20_2" loext:marker-style-name="T15"><text:a xlink:type="simple" xlink:href="#_Toc217376511" text:style-name="Index_20_Link" text:visited-style-name="Index_20_Link">4.8.<text:span text:style-name="T16"><text:tab/></text:span>Sending Fine Tuning files to others<text:span text:style-name="T14"><text:tab/>21</text:span></text:a></text:p>
          <text:p text:style-name="Contents_20_2" loext:marker-style-name="T15"><text:a xlink:type="simple" xlink:href="#_Toc217376512" text:style-name="Index_20_Link" text:visited-style-name="Index_20_Link">4.9.<text:span text:style-name="T16"><text:tab/></text:span>Fine tune timing files using Audacity<text:span text:style-name="T14"><text:tab/>21</text:span></text:a></text:p>
          <text:p text:style-name="Contents_20_1" loext:marker-style-name="T12"><text:a xlink:type="simple" xlink:href="#_Toc217376513" text:style-name="Index_20_Link" text:visited-style-name="Index_20_Link"><text:span text:style-name="T6">5.</text:span><text:span text:style-name="T13"><text:tab/></text:span><text:span text:style-name="T6">Adding voices to eSpeak</text:span><text:span text:style-name="T14"><text:tab/>22</text:span></text:a></text:p>
        </text:index-body>
      </text:table-of-content>
      <text:p text:style-name="P4" loext:marker-style-name="T5"/>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11" loext:marker-style-name="T10"/>
      <text:p text:style-name="P9" loext:marker-style-name="T5"><text:span text:style-name="T10">Acknowledgements</text:span><text:span text:style-name="T10"/></text:p>
      <text:p text:style-name="P4" loext:marker-style-name="T5"/>
      <text:p text:style-name="P4" loext:marker-style-name="T5"/>
      <text:p text:style-name="P4" loext:marker-style-name="T5"/>
      <text:p text:style-name="P4" loext:marker-style-name="T5"/>
      <text:p text:style-name="Standard" loext:marker-style-name="T5"><text:span text:style-name="T5">Thank you very much to Alberto Pettarin, Italy, for all his work developing </text:span><text:span text:style-name="T19">aeneas</text:span><text:span text:style-name="T5"> and for making it freely available for use in synchronising text and audio around the world.</text:span></text:p>
      <text:p text:style-name="P12" loext:marker-style-name="T5"><text:span text:style-name="T5">Website: </text:span><text:a xlink:type="simple" xlink:href="https://github.com/readbeyond/aeneas/#aeneas" text:style-name="Internet_20_link" text:visited-style-name="Visited_20_Internet_20_Link"><text:span text:style-name="Internet_20_link"><text:span text:style-name="T5">https://github.com/readbeyond/aeneas/#aeneas</text:span></text:span></text:a><text:span text:style-name="T5"> </text:span></text:p>
      <text:p text:style-name="P4" loext:marker-style-name="T5"/>
      <text:p text:style-name="Standard" loext:marker-style-name="T5"><text:span text:style-name="T5">These instructions were written using aeneas 1.7.2, released 09 mars 2017.</text:span><text:span text:style-name="T5"/></text:p>
      <text:p text:style-name="P4" loext:marker-style-name="T5"/>
      <text:p text:style-name="P4" loext:marker-style-name="T5"/>
      <text:p text:style-name="P13" loext:marker-style-name="T5"><text:span text:style-name="T5">Thank you to Firat Özdemir for inventing the </text:span><text:span text:style-name="T20">Fine Tuning</text:span><text:span text:style-name="T5"> feature, a modified version of which is built into Scripture App Builder. </text:span></text:p>
      <text:p text:style-name="P12" loext:marker-style-name="T5"><text:span text:style-name="T5">Website: </text:span><text:a xlink:type="simple" xlink:href="https://github.com/ozdefir/finetuneas" text:style-name="Internet_20_link" text:visited-style-name="Visited_20_Internet_20_Link"><text:span text:style-name="Internet_20_link"><text:span text:style-name="T5">https://github.com/ozdefir/finetuneas</text:span></text:span></text:a><text:span text:style-name="T5"> </text:span></text:p>
      <text:p text:style-name="P4" loext:marker-style-name="T5"/>
      <text:p text:style-name="P4" loext:marker-style-name="T5"/>
      <text:p text:style-name="P13" loext:marker-style-name="T5"><text:span text:style-name="T5">Thank you to Daniel Bair for his work on the Windows installer for </text:span><text:span text:style-name="T19">aeneas</text:span><text:span text:style-name="T5">.</text:span></text:p>
      <text:p text:style-name="P12" loext:marker-style-name="T5"><text:span text:style-name="T5">Website: </text:span><text:a xlink:type="simple" xlink:href="https://github.com/sillsdev/aeneas-installer" text:style-name="Internet_20_link" text:visited-style-name="Visited_20_Internet_20_Link"><text:span text:style-name="Internet_20_link"><text:span text:style-name="T5">https://github.com/sillsdev/aeneas-installer</text:span></text:span></text:a><text:span text:style-name="T5"> <text:s/></text:span></text:p>
      <text:p text:style-name="P14" loext:marker-style-name="T21"/>
      <text:p text:style-name="P9" loext:marker-style-name="T22"><text:span text:style-name="T22">How to Use This Manual</text:span><text:span text:style-name="T22"/></text:p>
      <text:p text:style-name="P15" loext:marker-style-name="T23"/>
      <text:p text:style-name="P16" loext:marker-style-name="T23"><text:span text:style-name="T23">This guide includes notes and tips to help you get the most out of the software. Notes and tips will appear like this:</text:span><text:span text:style-name="T23"/></text:p>
      <text:p text:style-name="P17" loext:marker-style-name="T24"/>
      <text:p text:style-name="P18" loext:marker-style-name="T25"><text:span text:style-name="T25">Notes:</text:span><text:span text:style-name="T25"/></text:p>
      <text:p text:style-name="P19" loext:marker-style-name="T26"/>
      <table:table table:name="Table1" table:style-name="Table1">
        <table:table-column table:style-name="Table1.A"/>
        <table:table-column table:style-name="Table1.B"/>
        <table:table-row table:style-name="Table1.1">
          <table:table-cell table:style-name="Table1.A1" office:value-type="string">
            <text:p text:style-name="P20" loext:marker-style-name="T27"><text:span text:style-name="T28"></text:span><text:span text:style-name="T27"> </text:span></text:p>
          </table:table-cell>
          <table:table-cell table:style-name="Table1.B1" office:value-type="string">
            <text:p text:style-name="P20" loext:marker-style-name="T29"><text:span text:style-name="T29">Make sure your audio file names do not include any special characters.</text:span><text:span text:style-name="T29"/></text:p>
          </table:table-cell>
        </table:table-row>
      </table:table>
      <text:p text:style-name="P21" loext:marker-style-name="T30"/>
      <text:p text:style-name="P18" loext:marker-style-name="T25"><text:span text:style-name="T25">Tips:</text:span><text:span text:style-name="T25"/></text:p>
      <text:p text:style-name="P22" loext:marker-style-name="T31"/>
      <table:table table:name="Table2" table:style-name="Table2">
        <table:table-column table:style-name="Table2.A"/>
        <table:table-column table:style-name="Table2.B"/>
        <table:table-row table:style-name="Table2.1">
          <table:table-cell table:style-name="Table2.A1" office:value-type="string">
            <text:p text:style-name="P20" loext:marker-style-name="T32"><text:span text:style-name="T33"></text:span><text:span text:style-name="T32"> </text:span></text:p>
          </table:table-cell>
          <table:table-cell table:style-name="Table2.B1" office:value-type="string">
            <text:p text:style-name="P20" loext:marker-style-name="T29"><text:span text:style-name="T29">Before synchronizing an audio file, try listening to it to determine how long the introduction is.</text:span><text:span text:style-name="T29"/></text:p>
          </table:table-cell>
        </table:table-row>
      </table:table>
      <text:p text:style-name="P23" loext:marker-style-name="T34"/>
      <text:h text:style-name="P24" text:outline-level="1" loext:marker-style-name="T6"><text:bookmark-start text:name="_Toc217376494"/>Introduction<text:bookmark-end text:name="_Toc217376494"/><text:span text:style-name="T6"/></text:h>
      <text:h text:style-name="Heading_20_2" text:outline-level="2"><text:bookmark-start text:name="_Toc217376495"/>What is aeneas?<text:bookmark-end text:name="_Toc217376495"/></text:h>
      <text:p text:style-name="Standard" loext:marker-style-name="T5"><text:span text:style-name="T19">aeneas</text:span><text:span text:style-name="T5"> is a tool designed to “automagically synchronize audio and text”.</text:span><text:span text:style-name="T5"><text:note text:id="ftn1" text:note-class="footnote"><text:note-citation>1</text:note-citation><text:note-body><text:p text:style-name="Footnote"><text:s/>https://github.com/readbeyond/aeneas/#aeneas</text:p></text:note-body></text:note></text:span><text:span text:style-name="T5"> It takes an audio file and a list of phrases as inputs. Its output is a synchronization timing file, i.e. the same kind of labels file you would create manually in Audacity.</text:span></text:p>
      <text:p text:style-name="P4" loext:marker-style-name="T5"/>
      <text:p text:style-name="Standard" loext:marker-style-name="T5"><text:span text:style-name="T5">The way </text:span><text:span text:style-name="T19">aeneas</text:span><text:span text:style-name="T5"> works is to synthesize each phrase using a text-to-speech engine, and then compare the synthesized audio files against the input audio file to find the phrase breaks. To do this, a lot of clever mathematical computation goes on behind the scenes:</text:span></text:p>
      <text:p text:style-name="P4" loext:marker-style-name="T5"/>
      <text:p text:style-name="P25" loext:marker-style-name="T35"><text:span text:style-name="T36">Using the Sakoe-Chiba Band Dynamic Time Warping (DTW) algorithm to align the Mel-frequency cepstral coefficients (MFCCs) representation of the given (real) audio wave and the audio wave obtained by synthesizing the text fragments with a TTS engine, eventually mapping the computed alignment back onto the (real) time domain.</text:span><text:span text:style-name="T36"><text:note text:id="ftn2" text:note-class="footnote"><text:note-citation>2</text:note-citation><text:note-body><text:p text:style-name="P26"><text:s/>https://github.com/readbeyond/aeneas/blob/master/wiki/HOWITWORKS.md</text:p></text:note-body></text:note></text:span></text:p>
      <text:p text:style-name="P4" loext:marker-style-name="T5"/>
      <text:p text:style-name="P4" loext:marker-style-name="T5"/>
      <text:p text:style-name="Standard" loext:marker-style-name="T5"><text:span text:style-name="T5">Or to illustrate it more simply, the synthesized phrases…</text:span><text:span text:style-name="T5"/></text:p>
      <text:p text:style-name="P4" loext:marker-style-name="T5"><draw:frame draw:style-name="fr3" draw:name="Picture 4" text:anchor-type="char" svg:x="2.4209in" svg:y="0.2016in" svg:width="0.9272in" svg:height="1.0626in" draw:z-index="0"><draw:image xlink:href="Pictures/10000001000002EC000000855EAA607A.png" xlink:type="simple" xlink:show="embed" xlink:actuate="onLoad" draw:mime-type="image/png"/><svg:desc>C:\Users\Richard\AppData\Local\Microsoft\Windows\INetCache\Content.Word\org2.png</svg:desc></draw:frame><draw:frame text:anchor-type="char" draw:z-index="21" draw:name="Shape1" draw:style-name="gr1" draw:text-style-name="P27" svg:width="2.0205in" svg:height="1.063in" svg:x="0.202in" svg:y="0.2035in"><draw:image xlink:href="Pictures/10000001000002EC000000855EAA607A.png" xlink:type="simple" xlink:show="embed" xlink:actuate="onLoad" draw:mime-type="image/png"><text:p/></draw:image></draw:frame></text:p>
      <text:p text:style-name="P4" loext:marker-style-name="T5"><draw:custom-shape text:anchor-type="char" draw:z-index="3" draw:name="Down Arrow 6" draw:style-name="gr2" draw:text-style-name="P28" svg:width="0.3543in" svg:height="0.4898in" svg:x="1.1398in" svg:y="0.99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frame draw:style-name="fr4" draw:name="Picture 5" text:anchor-type="char" svg:y="0.0083in" svg:width="2.4791in" svg:height="1.0626in" draw:z-index="1"><draw:image xlink:href="Pictures/10000001000002EC000000855EAA607A.png" xlink:type="simple" xlink:show="embed" xlink:actuate="onLoad" draw:mime-type="image/png"/><svg:desc>C:\Users\Richard\AppData\Local\Microsoft\Windows\INetCache\Content.Word\org2.png</svg:desc></draw:frame><draw:custom-shape text:anchor-type="char" draw:z-index="4" draw:name="Down Arrow 7" draw:style-name="gr3" draw:text-style-name="P28" svg:width="0.3543in" svg:height="0.4898in" svg:x="2.6484in" svg:y="1.0028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draw:custom-shape text:anchor-type="char" draw:z-index="5" draw:name="Down Arrow 8" draw:style-name="gr4" draw:text-style-name="P28" svg:width="0.3543in" svg:height="0.4898in" svg:x="4.3854in" svg:y="1.0035in"><text:p/><draw:enhanced-geometry draw:mirror-horizontal="false" draw:mirror-vertical="false" svg:viewBox="0 0 0 0" draw:glue-points="?f7 0 0 ?f5 ?f7 ?f13 ?f14 ?f5"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aximum="100000" draw:handle-range-x-minimum="0" draw:handle-position="?f8 0" draw:handle-position-x="?f8" draw:handle-position-y="0"/><draw:handle draw:handle-range-y-maximum="?f1" draw:handle-range-y-minimum="0" draw:handle-position="0 ?f5" draw:handle-position-x="0" draw:handle-position-y="?f5"/></draw:enhanced-geometry></draw:custom-shape></text:p>
      <text:p text:style-name="P4" loext:marker-style-name="T5"/>
      <text:p text:style-name="P4" loext:marker-style-name="T5"/>
      <text:p text:style-name="P4" loext:marker-style-name="T5"/>
      <text:p text:style-name="P4" loext:marker-style-name="T5"/>
      <text:p text:style-name="P4" loext:marker-style-name="T5"/>
      <text:p text:style-name="P4" loext:marker-style-name="T5"><draw:custom-shape text:anchor-type="char" draw:z-index="6" draw:name="Rectangle 9" draw:style-name="gr5" draw:text-style-name="P28" svg:width="0.0496in" svg:height="0.7398in" svg:x="2.3063in" svg:y="0.2827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3" text:anchor-type="char" svg:x="0.1709in" svg:y="0.0173in" svg:width="5.8752in" svg:height="1.198in" draw:z-index="2"><draw:image xlink:href="Pictures/10000001000002B70000008BD57A2983.png" xlink:type="simple" xlink:show="embed" xlink:actuate="onLoad" draw:mime-type="image/png"/><svg:desc>C:\Users\Richard\AppData\Local\Microsoft\Windows\INetCache\Content.Word\org1.png</svg:desc></draw:frame><draw:custom-shape text:anchor-type="char" draw:z-index="7" draw:name="Rectangle 10" draw:style-name="gr5" draw:text-style-name="P28" svg:width="0.0496in" svg:height="0.7398in" svg:x="3.3752in" svg:y="0.27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5"/>
      <text:p text:style-name="P4" loext:marker-style-name="T5"/>
      <text:p text:style-name="P4" loext:marker-style-name="T5"/>
      <text:p text:style-name="P4" loext:marker-style-name="T5"/>
      <text:p text:style-name="P4" loext:marker-style-name="T5"/>
      <text:p text:style-name="P4" loext:marker-style-name="T5"/>
      <text:p text:style-name="Standard" loext:marker-style-name="T5"><text:span text:style-name="T5"><text:s text:c="3"/>…are mapped against the input audio file to find phrase breaks.</text:span><text:span text:style-name="T5"/></text:p>
      <text:p text:style-name="P29" loext:marker-style-name="T5"/>
      <text:p text:style-name="P12" loext:marker-style-name="T5"><text:span text:style-name="T5">Best results are obtained:</text:span><text:span text:style-name="T5"/></text:p>
      <text:list xml:id="list3023676855" text:style-name="WWNum11">
        <text:list-item>
          <text:p text:style-name="P30" loext:marker-style-name="T5"><text:span text:style-name="T5">if you have a clearly spoken recording,</text:span><text:span text:style-name="T5"/></text:p>
        </text:list-item>
        <text:list-item>
          <text:p text:style-name="P30" loext:marker-style-name="T5"><text:span text:style-name="T5">if any background music is low enough in volume not to confuse the system,</text:span><text:span text:style-name="T5"/></text:p>
        </text:list-item>
        <text:list-item>
          <text:p text:style-name="P30" loext:marker-style-name="T5"><text:span text:style-name="T5">if there is a minimal amount of sounds effects or pauses in the audio</text:span><text:span text:style-name="T5"/></text:p>
        </text:list-item>
        <text:list-item>
          <text:p text:style-name="P30" loext:marker-style-name="T5"><text:span text:style-name="T5">if the synthesized phrases correspond well enough to how the language is pronounced.</text:span><text:span text:style-name="T5"/></text:p>
        </text:list-item>
      </text:list>
      <text:p text:style-name="P4" loext:marker-style-name="T5"/>
      <text:h text:style-name="P31" text:outline-level="2"><text:bookmark-start text:name="_Toc217376496"/><text:soft-page-break/>Will it work with our language?<text:bookmark-end text:name="_Toc217376496"/></text:h>
      <text:p text:style-name="Standard" loext:marker-style-name="T5"><text:span text:style-name="T20">aeneas</text:span><text:span text:style-name="T5"> is producing impressively accurate timing files for languages around the world. We would recommend you try it out and see how well it works for your text and audio files.</text:span></text:p>
      <text:p text:style-name="P4" loext:marker-style-name="T5"/>
      <text:p text:style-name="Standard" loext:marker-style-name="T5"><text:span text:style-name="T5">What about special characters or tone marks? Since the text-to-speech engine copes best with simple A-Z Roman scripts, the </text:span><text:span text:style-name="T20">Synchronize using</text:span><text:span text:style-name="T5"> </text:span><text:span text:style-name="T20">aeneas</text:span><text:span text:style-name="T5"> wizard in Scripture App Builder has a </text:span><text:span text:style-name="T20">Character Replacement</text:span><text:span text:style-name="T5"> page, designed to replace special characters with simple ones (ɓ to b, ɛ to e, etc.). It also strips out accents and tone marks. The comparison algorithms are tolerant enough to match up the phrases even though the pronunciation differs.</text:span></text:p>
      <text:p text:style-name="P4" loext:marker-style-name="T5"/>
      <text:p text:style-name="Standard" loext:marker-style-name="T5"><text:span text:style-name="T5">If you have a non-Roman script, you will need to define a set of character replacements, transliterating your non-Roman script into a simple A-Z Roman script (</text:span><text:span text:style-name="T37">अ to a, क to ka,</text:span><text:span text:style-name="T38"> </text:span><text:span text:style-name="T39">उ</text:span><text:span text:style-name="T40"> to u, etc.</text:span><text:span text:style-name="T5">). This approach has already been used successfully to synchronize text and audio for the whole of the Hebrew Bible. If you create a set of additional character replacements that work well for your script and language, please let us know so that we can add them to the default set of replacements.</text:span></text:p>
      <text:p text:style-name="P4" loext:marker-style-name="T5"/>
      <text:p text:style-name="Standard" loext:marker-style-name="T5"><text:span text:style-name="T5">You can find a selection of Romanization tables here:</text:span><text:span text:style-name="T5"/></text:p>
      <text:p text:style-name="P32" loext:marker-style-name="T5"><text:a xlink:type="simple" xlink:href="http://www.loc.gov/catdir/cpso/romansource.html" text:style-name="Internet_20_link" text:visited-style-name="Visited_20_Internet_20_Link"><text:span text:style-name="Internet_20_link"><text:span text:style-name="T5">http://www.loc.gov/catdir/cpso/romansource.html</text:span></text:span></text:a><text:span text:style-name="T5"> </text:span></text:p>
      <text:p text:style-name="P4" loext:marker-style-name="T5"/>
      <text:h text:style-name="P31" text:outline-level="2"><text:bookmark-start text:name="_Toc217376497"/>How long does it take?<text:bookmark-end text:name="_Toc217376497"/></text:h>
      <text:p text:style-name="Standard" loext:marker-style-name="T5"><text:span text:style-name="T5">For a typical phrase-by-phrase synchronisation, running </text:span><text:span text:style-name="T20">aeneas</text:span><text:span text:style-name="T5"> takes 1-2 minutes to process an hour of audio, and less than an hour for all 27 books of the New Testament. Actual times will depend on the speed of your computer.</text:span></text:p>
      <text:p text:style-name="P4" loext:marker-style-name="T5"/>
      <text:h text:style-name="P31" text:outline-level="2"><text:bookmark-start text:name="_Toc217376498"/>How do we run aeneas?<text:bookmark-end text:name="_Toc217376498"/></text:h>
      <text:p text:style-name="P12" loext:marker-style-name="T5"><text:bookmark-start text:name="_Hlk138058800"/><text:span text:style-name="T5">You need to Install aeneas on your computer and use the </text:span><text:span text:style-name="T19">Synchronize using aeneas wizard</text:span><text:span text:style-name="T5"> in SAB to launch the synchronization process.</text:span></text:p>
      <text:p text:style-name="P12" loext:marker-style-name="T5"><text:span text:style-name="T5">See section 2 for instructions on how to install </text:span><text:span text:style-name="T19">aeneas</text:span><text:span text:style-name="T5"> on Windows, and section 3 on how to install </text:span><text:span text:style-name="T19">aeneas</text:span><text:span text:style-name="T5"> on Linux. This is especially easy for Ubuntu users since </text:span><text:span text:style-name="T19">aeneas</text:span><text:span text:style-name="T5"> is included automatically in the SAB installation.</text:span><text:bookmark-end text:name="_Hlk138058800"/></text:p>
      <text:p text:style-name="Standard" loext:marker-style-name="T5"><text:span text:style-name="T5"><text:line-break/></text:span><text:span text:style-name="T5"/></text:p>
      <text:h text:style-name="Heading_20_1" text:outline-level="1" loext:marker-style-name="T6"><text:bookmark text:name="_Windows_Installation"/><text:bookmark-start text:name="_Toc217376499"/>Windows<text:span text:style-name="T6"> Installation</text:span><text:bookmark-end text:name="_Toc217376499"/><text:span text:style-name="T6"/></text:h>
      <text:p text:style-name="P33" loext:marker-style-name="T41"><text:span text:style-name="T41">To set up </text:span><text:span text:style-name="T42">aeneas</text:span><text:span text:style-name="T41"> on Windows, there are several programs and modules to download and install: FFmpeg, eSpeak, Python and aeneas. These can all be installed with a single setup program.</text:span></text:p>
      <text:list text:style-name="WWNum20">
        <text:list-item>
          <text:p text:style-name="P34" loext:marker-style-name="T5"><text:soft-page-break/><text:span text:style-name="T5">Go to the </text:span><text:span text:style-name="T19">Download</text:span><text:span text:style-name="T5"> page on the Scripture App Builder website </text:span><text:a xlink:type="simple" xlink:href="http://software.sil.org/scriptureappbuilder/download/" text:style-name="Internet_20_link" text:visited-style-name="Visited_20_Internet_20_Link"><text:span text:style-name="Internet_20_link"><text:span text:style-name="T5">http://software.sil.org/scriptureappbuilder/download/</text:span></text:span></text:a><text:span text:style-name="T5"> and download the latest aeneas setup program for Windows. You will find it under the heading </text:span><text:span text:style-name="T19">Audio Synchronization Tools</text:span><text:span text:style-name="T5">.</text:span></text:p>
        </text:list-item>
        <text:list-item>
          <text:p text:style-name="P35" loext:marker-style-name="T5"><text:span text:style-name="T5">The filename will be something like </text:span><text:span text:style-name="T19">aeneas-windows-setup-1.7.2.exe</text:span><text:span text:style-name="T5">.</text:span></text:p>
        </text:list-item>
      </text:list>
      <text:p text:style-name="P36" loext:marker-style-name="T5"/>
      <text:list text:continue-numbering="true" text:style-name="WWNum20">
        <text:list-item>
          <text:p text:style-name="P34" loext:marker-style-name="T5"><text:span text:style-name="T5">Double-click the file you have downloaded to start the installation wizard.</text:span><text:span text:style-name="T5"/></text:p>
        </text:list-item>
      </text:list>
      <text:p text:style-name="P37" loext:marker-style-name="T5"/>
      <text:p text:style-name="List_20_Paragraph" loext:marker-style-name="T5"><draw:frame draw:style-name="fr2" draw:name="Picture 11" text:anchor-type="as-char" svg:width="4.5756in" svg:height="3.7425in" draw:z-index="62"><draw:image xlink:href="Pictures/1000000000000246000001DC71ABC918.png" xlink:type="simple" xlink:show="embed" xlink:actuate="onLoad" draw:mime-type="image/png"/></draw:frame></text:p>
      <text:p text:style-name="P37" loext:marker-style-name="T5"/>
      <text:list text:continue-numbering="true" text:style-name="WWNum20">
        <text:list-item>
          <text:p text:style-name="P38" loext:marker-style-name="T5"><text:span text:style-name="T5">Follow the instructions in the wizard. You can accept all the defaults. </text:span><text:span text:style-name="T5"/></text:p>
        </text:list-item>
      </text:list>
      <text:p text:style-name="P36" loext:marker-style-name="T5"/>
      <text:list text:continue-numbering="true" text:style-name="WWNum20">
        <text:list-item>
          <text:p text:style-name="P34" loext:marker-style-name="T5"><text:span text:style-name="T5">On the </text:span><text:span text:style-name="T19">Select Components</text:span><text:span text:style-name="T5"> page, you need the </text:span><text:span text:style-name="T19">Full Installation</text:span><text:span text:style-name="T5"> which should be selected by default.</text:span></text:p>
        </text:list-item>
      </text:list>
      <text:p text:style-name="P6" loext:marker-style-name="T6"/>
      <text:p text:style-name="P2" loext:marker-style-name="T6"><text:soft-page-break/><draw:frame draw:style-name="fr2" draw:name="Picture 20" text:anchor-type="as-char" svg:width="4.3346in" svg:height="3.5453in" draw:z-index="64"><draw:image xlink:href="Pictures/1000000000000246000001DC0E031CCF.png" xlink:type="simple" xlink:show="embed" xlink:actuate="onLoad" draw:mime-type="image/png"/></draw:frame></text:p>
      <text:p text:style-name="P6" loext:marker-style-name="T6"/>
      <text:p text:style-name="P6" loext:marker-style-name="T6"/>
      <text:list text:continue-numbering="true" text:style-name="WWNum20">
        <text:list-item>
          <text:p text:style-name="P39" loext:marker-style-name="T5"><text:span text:style-name="T5">On the </text:span><text:span text:style-name="T19">Ready to Install</text:span><text:span text:style-name="T5"> page, click </text:span><text:span text:style-name="T19">Install</text:span><text:span text:style-name="T5">.</text:span></text:p>
        </text:list-item>
      </text:list>
      <text:p text:style-name="P6" loext:marker-style-name="T6"/>
      <text:p text:style-name="P40" loext:marker-style-name="T6"><text:span text:style-name="T6">You will see the wizard running several different installers: for FFmpeg, eSpeak, Python. It will also install three Python modules.</text:span><text:span text:style-name="T6"/></text:p>
      <text:p text:style-name="P41" loext:marker-style-name="T6"/>
      <text:p text:style-name="P40" loext:marker-style-name="T6"><text:span text:style-name="T6">Before the wizard completes, you should see a command box appear for a few seconds which verifies the aeneas installation. </text:span><text:span text:style-name="T6"/></text:p>
      <text:p text:style-name="P41" loext:marker-style-name="T6"/>
      <text:p text:style-name="P42" loext:marker-style-name="T6"><draw:frame draw:style-name="fr2" draw:name="Picture 12" text:anchor-type="as-char" svg:width="4.3335in" svg:height="2.1965in" draw:z-index="63"><draw:image xlink:href="Pictures/10000000000002930000014EBAE60B85.png" xlink:type="simple" xlink:show="embed" xlink:actuate="onLoad" draw:mime-type="image/png"/></draw:frame></text:p>
      <text:p text:style-name="P41" loext:marker-style-name="T6"/>
      <text:p text:style-name="P41" loext:marker-style-name="T6"/>
      <text:p text:style-name="P43" loext:marker-style-name="T6"><text:span text:style-name="T43">Important</text:span><text:span text:style-name="T6">: If Scripture App Builder was open while you installed aeneas, close it and start it again to ensure that it picks up the changes to your Path settings.</text:span></text:p>
      <text:h text:style-name="P44" text:outline-level="1" loext:marker-style-name="T6"><text:bookmark-start text:name="_Hlk44919138"/><text:bookmark-start text:name="_Toc217376500"/><text:soft-page-break/>Linux<text:span text:style-name="T6"> Installation</text:span><text:bookmark-end text:name="_Toc217376500"/><text:span text:style-name="T6"/></text:h>
      <text:p text:style-name="P45" loext:marker-style-name="T6"/>
      <text:p text:style-name="P16" loext:marker-style-name="T5"><text:span text:style-name="T5">If you are using Ubuntu, the </text:span><text:span text:style-name="T19">aeneas</text:span><text:span text:style-name="T5"> software is a required dependency of Scripture App Builder. This means that aeneas is automatically installed or updated along with Scripture App Builder and you do not have to install it manually.</text:span><text:bookmark-end text:name="_Hlk44919138"/></text:p>
      <text:p text:style-name="P6" loext:marker-style-name="T6"/>
      <text:h text:style-name="Heading_20_1" text:outline-level="1" loext:marker-style-name="T6"><text:bookmark text:name="_Using_aeneas_within"/><text:bookmark-start text:name="_Toc217376501"/><text:span text:style-name="T6">Using aeneas within Scripture App Builder</text:span><text:bookmark-end text:name="_Toc217376501"/><text:span text:style-name="T6"/></text:h>
      <text:p text:style-name="P6" loext:marker-style-name="T6"/>
      <table:table table:name="Table3" table:style-name="Table3">
        <table:table-column table:style-name="Table3.A"/>
        <table:table-column table:style-name="Table3.B"/>
        <table:table-row table:style-name="Table3.1">
          <table:table-cell table:style-name="Table3.A1" office:value-type="string">
            <text:p text:style-name="P20" loext:marker-style-name="T27"><text:span text:style-name="T28"></text:span><text:span text:style-name="T27"> </text:span></text:p>
          </table:table-cell>
          <table:table-cell table:style-name="Table3.B1" office:value-type="string">
            <text:p text:style-name="P20" loext:marker-style-name="T29"><text:span text:style-name="T29">Aeneas sometimes does not work with special characters in file names. If you receive an error when running aeneas, make sure your audio files names only include standard English letters from A to Z or a to z. This means that accented letters like à or é will not work. </text:span><text:span text:style-name="T29"/></text:p>
            <text:p text:style-name="P20" loext:marker-style-name="T29"><text:span text:style-name="T29">If the path to your audio files includes folder names with special characters, you may also encounter problems.</text:span><text:span text:style-name="T29"/></text:p>
          </table:table-cell>
        </table:table-row>
      </table:table>
      <text:h text:style-name="Heading_20_2" text:outline-level="2"><text:bookmark text:name="_Preparing_Your_Audio"/><text:bookmark-start text:name="_Toc217376502"/>Preparing Your Audio Files<text:bookmark-end text:name="_Toc217376502"/></text:h>
      <text:p text:style-name="P12" loext:marker-style-name="T5"><text:span text:style-name="T5">As mentioned above, the best results are obtained:</text:span><text:span text:style-name="T5"/></text:p>
      <text:list text:continue-list="list3023676855" text:style-name="WWNum11">
        <text:list-item>
          <text:p text:style-name="P30" loext:marker-style-name="T5"><text:span text:style-name="T5">if you have a clearly spoken recording,</text:span><text:span text:style-name="T5"/></text:p>
        </text:list-item>
        <text:list-item>
          <text:p text:style-name="P30" loext:marker-style-name="T5"><text:span text:style-name="T5">if any background music is low enough in volume not to confuse the system,</text:span><text:span text:style-name="T5"/></text:p>
        </text:list-item>
        <text:list-item>
          <text:p text:style-name="P30" loext:marker-style-name="T5"><text:span text:style-name="T5">if there is a minimal amount of sounds effects or pauses in the audio</text:span><text:span text:style-name="T5"/></text:p>
        </text:list-item>
        <text:list-item>
          <text:p text:style-name="P30" loext:marker-style-name="T5"><text:span text:style-name="T5">if the synthesized phrases correspond well enough to how the language is pronounced.</text:span><text:span text:style-name="T5"/></text:p>
        </text:list-item>
      </text:list>
      <text:p text:style-name="P12" loext:marker-style-name="T5"><text:span text:style-name="T5">You may not have control over these elements, but most of them can be corrected in the fine-tuning process.</text:span><text:span text:style-name="T5"/></text:p>
      <text:p text:style-name="P12" loext:marker-style-name="T5"><text:span text:style-name="T5">For recordings of Scripture texts, you will need one audio file per chapter. It is often the case that the recordings for the first chapter of a book have a longer introduction than subsequent chapters. These book introductions are normally not synchronized so you will have to tell aeneas how much time to ignore at the beginning of a chapter’s audio.</text:span><text:span text:style-name="T5"/></text:p>
      <text:p text:style-name="P12" loext:marker-style-name="T44"><text:span text:style-name="T5"><text:s/></text:span><text:span text:style-name="T44"/></text:p>
      <table:table table:name="Table4" table:style-name="Table4">
        <table:table-column table:style-name="Table4.A"/>
        <table:table-column table:style-name="Table4.B"/>
        <table:table-row table:style-name="Table4.1">
          <table:table-cell table:style-name="Table4.A1" office:value-type="string">
            <text:p text:style-name="P20" loext:marker-style-name="T32"><text:span text:style-name="T33"></text:span><text:span text:style-name="T32"> </text:span></text:p>
          </table:table-cell>
          <table:table-cell table:style-name="Table4.B1" office:value-type="string">
            <text:p text:style-name="P20" loext:marker-style-name="T29"><text:span text:style-name="T29">Before synchronizing a set of audio files, try listening to several books to determine how long the introductions are. Try to determine the approximate length of the introduction to the first chapter of a book, and the approximate length for subsequent chapter introductions.</text:span><text:span text:style-name="T29"/></text:p>
          </table:table-cell>
        </table:table-row>
      </table:table>
      <text:p text:style-name="P6" loext:marker-style-name="T6"/>
      <text:h text:style-name="Heading_20_2" text:outline-level="2"><text:bookmark-start text:name="_Toc217376503"/>Performing the Audio Synchronization<text:bookmark-end text:name="_Toc217376503"/></text:h>
      <text:h text:style-name="Heading_20_3" text:outline-level="3" loext:marker-style-name="T6"><text:bookmark-start text:name="_Toc217376504"/><text:span text:style-name="T6">Where to launch the synchronization process</text:span><text:bookmark-end text:name="_Toc217376504"/><text:span text:style-name="T6"/></text:h>
      <text:p text:style-name="P12" loext:marker-style-name="T6"><text:span text:style-name="T6">You can run the </text:span><text:span text:style-name="T45">Audio Synchronization using aeneas</text:span><text:span text:style-name="T6"> wizard from five places within Scripture App Builder:</text:span></text:p>
      <text:list text:style-name="WWNum12">
        <text:list-item>
          <text:p text:style-name="P46" loext:marker-style-name="T6"><text:soft-page-break/><text:span text:style-name="T6">The </text:span><text:span text:style-name="T46">Audio Files</text:span><text:span text:style-name="T6"> tab for a book or book collection. Select one or more rows in the table, right-click and select </text:span><text:span text:style-name="T47">Synchronize using aeneas</text:span><text:span text:style-name="T6">.</text:span></text:p>
        </text:list-item>
      </text:list>
      <table:table table:name="Table5" table:style-name="Table5">
        <table:table-column table:style-name="Table5.A"/>
        <table:table-column table:style-name="Table5.B"/>
        <table:table-row table:style-name="Table5.1">
          <table:table-cell table:style-name="Table5.A1" office:value-type="string">
            <text:p text:style-name="P20" loext:marker-style-name="T27"><text:span text:style-name="T28"></text:span><text:span text:style-name="T27"> </text:span></text:p>
          </table:table-cell>
          <table:table-cell table:style-name="Table5.B1" office:value-type="string">
            <text:p text:style-name="P20" loext:marker-style-name="T29"><text:span text:style-name="T29">To select more than one audio file, click on one file name, hold down the Ctrl key and click on any others you want to select. <text:s/>Alternatively, to select a range of files, click the first one, hold the Shift key down and click the last in the range. This should select the whole range. To select all the files, click on any file and then hit Cntrl-A.</text:span><text:span text:style-name="T29"/></text:p>
          </table:table-cell>
        </table:table-row>
      </table:table>
      <text:p text:style-name="P47" loext:marker-style-name="T48"/>
      <text:list text:continue-numbering="true" text:style-name="WWNum12">
        <text:list-item>
          <text:p text:style-name="P48" loext:marker-style-name="T6"><text:span text:style-name="T6">The </text:span><text:span text:style-name="T47">Audio Synchronization </text:span><text:span text:style-name="T6">tab for a book collection. Click on the button </text:span><text:span text:style-name="T47">Synchronize using aeneas..</text:span><text:span text:style-name="T6">.</text:span></text:p>
        </text:list-item>
        <text:list-item>
          <text:p text:style-name="P48" loext:marker-style-name="T6"><text:span text:style-name="T6">The </text:span><text:span text:style-name="T47">Audio Synchronization </text:span><text:span text:style-name="T6">tab for a book. Click on the button </text:span><text:span text:style-name="T47">Synchronize using aeneas..</text:span><text:span text:style-name="T6">.</text:span></text:p>
        </text:list-item>
        <text:list-item>
          <text:p text:style-name="P48" loext:marker-style-name="T6"><text:span text:style-name="T6">The </text:span><text:span text:style-name="T47">Book Collection</text:span><text:span text:style-name="T6"> tab for a book collection. Right-click on a book in the table and select </text:span><text:span text:style-name="T47">Synchronize using aeneas..</text:span><text:span text:style-name="T6">.</text:span></text:p>
        </text:list-item>
        <text:list-item>
          <text:p text:style-name="P48" loext:marker-style-name="T6"><text:span text:style-name="T6">The project’s tree view on the left of the screen. Right-click on a book or book collection and select </text:span><text:span text:style-name="T47">Synchronize using aeneas..</text:span><text:span text:style-name="T6">.</text:span></text:p>
        </text:list-item>
      </text:list>
      <text:p text:style-name="P49" loext:marker-style-name="T6"/>
      <text:p text:style-name="P50" loext:marker-style-name="T6"><text:span text:style-name="T6">All of these menu selections should launch the synchronization wizard and produce the same result. Follow the instructions in the wizard to configure the synchronization.</text:span><text:span text:style-name="T6"/></text:p>
      <table:table table:name="Table6" table:style-name="Table6">
        <table:table-column table:style-name="Table6.A"/>
        <table:table-column table:style-name="Table6.B"/>
        <table:table-row table:style-name="Table6.1">
          <table:table-cell table:style-name="Table6.A1" office:value-type="string">
            <text:p text:style-name="P20" loext:marker-style-name="T32"><text:span text:style-name="T33"></text:span><text:span text:style-name="T32"> </text:span></text:p>
          </table:table-cell>
          <table:table-cell table:style-name="Table6.B1" office:value-type="string">
            <text:p text:style-name="P20" loext:marker-style-name="T29"><text:span text:style-name="T29">To get the best initial results, it is important to know how much audio to skip at the beginning of the file (if any) before the Scripture text audio actually starts. <text:s/>Try just listening to the first chapter of a book and experimenting with the Start of Audio value. Then do the same with the second chapter. If the values seem correct, synchronize all of the rest of the chapters in one go, using the values you determined.</text:span><text:span text:style-name="T29"/></text:p>
          </table:table-cell>
        </table:table-row>
      </table:table>
      <text:p text:style-name="P12" loext:marker-style-name="T6"><text:span text:style-name="T6">For Windows users, if the wizard asks, “Where have you installed aeneas?”, please follow the </text:span><text:a xlink:type="simple" xlink:href="#_Windows_Installation" text:style-name="Internet_20_link" text:visited-style-name="Visited_20_Internet_20_Link"><text:span text:style-name="Internet_20_link"><text:span text:style-name="T6">installation instructions</text:span></text:span></text:a><text:span text:style-name="T6"> in this document.</text:span></text:p>
      <text:p text:style-name="P51" loext:marker-style-name="T6"/>
      <text:h text:style-name="Heading_20_3" text:outline-level="3" loext:marker-style-name="T6"><text:bookmark-start text:name="_Toc217376505"/><text:span text:style-name="T6">Stepping Through the Synchronization Wizard</text:span><text:bookmark-end text:name="_Toc217376505"/><text:span text:style-name="T6"/></text:h>
      <text:list text:style-name="WWNum40">
        <text:list-item>
          <text:p text:style-name="P52" loext:marker-style-name="T47"><text:span text:style-name="T47">Voice</text:span><text:span text:style-name="T47"/></text:p>
        </text:list-item>
      </text:list>
      <text:p text:style-name="List_20_Paragraph" loext:marker-style-name="T6"><text:span text:style-name="T6">This is the voice that eSpeak uses for the text-to-speech process. You should choose the Language code for the voice that most closely corresponds to your target language. The default choice is esperanto, which is a phonetic language and which works very well for many languages. If you don’t see any other language in the list that is closer to your language, try esperanto. </text:span><text:span text:style-name="T6"/></text:p>
      <text:p text:style-name="P53" loext:marker-style-name="T6"/>
      <text:p text:style-name="List_20_Paragraph" loext:marker-style-name="T6"><text:soft-page-break/><draw:frame draw:style-name="fr2" draw:name="Image2" text:anchor-type="as-char" svg:width="5.1146in" svg:height="3.0953in" draw:z-index="61"><draw:image xlink:href="Pictures/10000000000002BB000001A71B54DEEB.png" xlink:type="simple" xlink:show="embed" xlink:actuate="onLoad" draw:mime-type="image/png"/></draw:frame></text:p>
      <text:p text:style-name="P54" loext:marker-style-name="T47"/>
      <text:list text:continue-numbering="true" text:style-name="WWNum40">
        <text:list-item>
          <text:p text:style-name="P52" loext:marker-style-name="T47"><text:span text:style-name="T47">Character Replacements</text:span><text:span text:style-name="T47"/></text:p>
        </text:list-item>
      </text:list>
      <text:p text:style-name="List_20_Paragraph" loext:marker-style-name="T6"><text:span text:style-name="T6">If your language has non-alpha numeric characters (including characters with accents), you may achieve better results by giving aeneas a set of character replacements. Some default ones are provided, but through experimentation with the synchronization process, you may discover that you need to add or remove some. For non-roman languages, you can provide character replacements with roman letters, or temporarily transcribe your text into roman characters for the synchronization. Either way, the timings should still be correct.</text:span><text:span text:style-name="T6"/></text:p>
      <text:p text:style-name="P53" loext:marker-style-name="T6"/>
      <text:p text:style-name="List_20_Paragraph" loext:marker-style-name="T6"><draw:frame draw:style-name="fr2" draw:name="Picture 1" text:anchor-type="as-char" svg:width="5.4063in" svg:height="3.2654in" draw:z-index="60"><draw:image xlink:href="Pictures/10000000000002B9000001A52EA4AA35.png" xlink:type="simple" xlink:show="embed" xlink:actuate="onLoad" draw:mime-type="image/png"/></draw:frame></text:p>
      <text:p text:style-name="P55" loext:marker-style-name="T47"/>
      <text:list text:continue-numbering="true" text:style-name="WWNum40">
        <text:list-item>
          <text:p text:style-name="P52" loext:marker-style-name="T47"><text:span text:style-name="T47">Start of Audio</text:span><text:span text:style-name="T47"/></text:p>
        </text:list-item>
      </text:list>
      <text:p text:style-name="P56" loext:marker-style-name="T45"><text:span text:style-name="T6">Scripture book audio normally has the book name, chapter number and sometimes some introductory information before the actual Scripture text commences. It is normally not recommended for these parts of the text to be synchronized and highlighted, so you will need to tell aeneas how many seconds </text:span><text:soft-page-break/><text:span text:style-name="T6">of audio to skip at the start of the audio file. If there is no introductory audio, choose option 1: </text:span><text:span text:style-name="T45">No, there is no section to ignore in these files.</text:span></text:p>
      <text:p text:style-name="P56" loext:marker-style-name="T6"><text:span text:style-name="T6">Option 2 is a bit unreliable, so we recommend using option 3 if you have audio to skip. See </text:span><text:a xlink:type="simple" xlink:href="#_Preparing_Your_Audio" text:style-name="Internet_20_link" text:visited-style-name="Visited_20_Internet_20_Link"><text:span text:style-name="Internet_20_link"><text:span text:style-name="T6">Preparing Your Audio Files</text:span></text:span></text:a><text:span text:style-name="T6"> for tips on how to determine the </text:span><text:span text:style-name="T47">First Chapter</text:span><text:span text:style-name="T6"> and </text:span><text:span text:style-name="T47">Other Chapters</text:span><text:span text:style-name="T6"> amounts to skip. Alternatively, start with a value like 7 seconds for </text:span><text:span text:style-name="T47">First Chapter</text:span><text:span text:style-name="T6"> and 4 for </text:span><text:span text:style-name="T47">Other Chapters</text:span><text:span text:style-name="T6">. You can test several files to see how accurate that is before synchronizing a whole book or set of books.</text:span></text:p>
      <text:p text:style-name="P57" loext:marker-style-name="T6"><text:span text:style-name="T6"><text:tab/></text:span><text:span text:style-name="T6"/></text:p>
      <text:p text:style-name="List_20_Paragraph" loext:marker-style-name="T47"><draw:frame draw:style-name="fr2" draw:name="Image3" text:anchor-type="as-char" svg:width="5.2709in" svg:height="3.1984in" draw:z-index="49"><draw:image xlink:href="Pictures/10000000000002B9000001A7033A09FB.png" xlink:type="simple" xlink:show="embed" xlink:actuate="onLoad" draw:mime-type="image/png"/></draw:frame></text:p>
      <text:p text:style-name="P55" loext:marker-style-name="T47"/>
      <text:list text:continue-numbering="true" text:style-name="WWNum40">
        <text:list-item>
          <text:p text:style-name="P52" loext:marker-style-name="T47"><text:span text:style-name="T47">End of Audio</text:span><text:span text:style-name="T47"/></text:p>
        </text:list-item>
      </text:list>
      <text:p text:style-name="List_20_Paragraph" loext:marker-style-name="T47"><text:span text:style-name="T6">This is less common and refers to anything (like closing music) in the audio after the voicing of the last verse of Scripture text. Normally, you can just select Option 1: </text:span><text:span text:style-name="T47">No, there is no section to ignore in these files.</text:span></text:p>
      <text:p text:style-name="P58" loext:marker-style-name="T48"/>
      <text:p text:style-name="P59" loext:marker-style-name="T6"><draw:frame draw:style-name="fr2" draw:name="Image4" text:anchor-type="as-char" svg:width="5.2937in" svg:height="3.2189in" draw:z-index="59"><draw:image xlink:href="Pictures/10000000000002BB000001A96367941C.png" xlink:type="simple" xlink:show="embed" xlink:actuate="onLoad" draw:mime-type="image/png"/></draw:frame></text:p>
      <text:p text:style-name="P53" loext:marker-style-name="T6"/>
      <text:list text:continue-numbering="true" text:style-name="WWNum40">
        <text:list-item>
          <text:p text:style-name="P52" loext:marker-style-name="T47"><text:span text:style-name="T47">Phrase Boundaries</text:span><text:span text:style-name="T47"/></text:p>
        </text:list-item>
      </text:list>
      <text:p text:style-name="List_20_Paragraph" loext:marker-style-name="T6"><text:soft-page-break/><text:span text:style-name="T6">This screen allows you to select where between phrases the highlight moves. The default is usually the best: </text:span><text:span text:style-name="T47">In the middle of the silence…</text:span></text:p>
      <text:p text:style-name="P58" loext:marker-style-name="T48"/>
      <text:p text:style-name="List_20_Paragraph" loext:marker-style-name="T6"><draw:frame draw:style-name="fr2" draw:name="Image5" text:anchor-type="as-char" svg:width="5.3543in" svg:height="3.2307in" draw:z-index="50"><draw:image xlink:href="Pictures/10000000000002BD000001A726BF82F7.png" xlink:type="simple" xlink:show="embed" xlink:actuate="onLoad" draw:mime-type="image/png"/></draw:frame></text:p>
      <text:p text:style-name="P53" loext:marker-style-name="T6"/>
      <text:list text:continue-numbering="true" text:style-name="WWNum40">
        <text:list-item>
          <text:p text:style-name="P52" loext:marker-style-name="T47"><text:span text:style-name="T47">Synchronization Level</text:span><text:span text:style-name="T47"/></text:p>
        </text:list-item>
      </text:list>
      <text:p text:style-name="List_20_Paragraph" loext:marker-style-name="T6"><text:span text:style-name="T6">Synchronization level determines how the text is broken up into discreet pieces to highlight. </text:span><text:span text:style-name="T47">Phrase by phrase</text:span><text:span text:style-name="T6"> allows you to select a set of characters (usually punctuation) that tell aeneas how to split up the text, allowing for smaller sections of a verse to be highlighted at a time. </text:span></text:p>
      <text:p text:style-name="List_20_Paragraph" loext:marker-style-name="T6"><text:span text:style-name="T47">Verse by verse</text:span><text:span text:style-name="T6"> will highlight the whole verse at a time.</text:span></text:p>
      <text:p text:style-name="P58" loext:marker-style-name="T48"/>
      <text:p text:style-name="P58" loext:marker-style-name="T48"/>
      <text:p text:style-name="List_20_Paragraph" loext:marker-style-name="T6"><draw:frame draw:style-name="fr2" draw:name="Image6" text:anchor-type="as-char" svg:width="5.3543in" svg:height="3.2701in" draw:z-index="58"><draw:image xlink:href="Pictures/10000000000002BB000001ABA1774D35.png" xlink:type="simple" xlink:show="embed" xlink:actuate="onLoad" draw:mime-type="image/png"/></draw:frame></text:p>
      <text:p text:style-name="P53" loext:marker-style-name="T6"/>
      <table:table table:name="Table7" table:style-name="Table7">
        <table:table-column table:style-name="Table7.A"/>
        <table:table-column table:style-name="Table7.B"/>
        <table:table-row table:style-name="Table7.1">
          <table:table-cell table:style-name="Table7.A1" office:value-type="string">
            <text:p text:style-name="P20" loext:marker-style-name="T32"><text:span text:style-name="T33"></text:span><text:span text:style-name="T32"> </text:span></text:p>
          </table:table-cell>
          <table:table-cell table:style-name="Table7.B1" office:value-type="string">
            <text:p text:style-name="P20" loext:marker-style-name="T29"><text:span text:style-name="T29">Verse by verse is easier to sync, but it means that potentially large sections of text—even several sentences—are highlighted at once. In rare cases, an entire verse may not fit on the app screen. Phrase by phrase is normally more helpful for allowing people to follow </text:span><text:soft-page-break/><text:span text:style-name="T29">along.</text:span><text:span text:style-name="T29"/></text:p>
          </table:table-cell>
        </table:table-row>
      </table:table>
      <text:p text:style-name="P60" loext:marker-style-name="T9"/>
      <text:list text:continue-numbering="true" text:style-name="WWNum40">
        <text:list-item>
          <text:p text:style-name="P52" loext:marker-style-name="T47"><text:span text:style-name="T47">Phrases</text:span><text:span text:style-name="T47"/></text:p>
        </text:list-item>
      </text:list>
      <text:p text:style-name="List_20_Paragraph" loext:marker-style-name="T6"><text:span text:style-name="T6">If you are using the </text:span><text:span text:style-name="T47">Phrase by phrase</text:span><text:span text:style-name="T6"> synchronization level, you can specify here the phrase-breaking characters. SAB provides a default set that can be edited. You can use \u and a Unicode number to specify a specific Unicode character.</text:span></text:p>
      <text:p text:style-name="P58" loext:marker-style-name="T48"/>
      <text:p text:style-name="List_20_Paragraph" loext:marker-style-name="T47"><draw:frame draw:style-name="fr2" draw:name="Image7" text:anchor-type="as-char" svg:width="5.3134in" svg:height="3.2154in" draw:z-index="51"><draw:image xlink:href="Pictures/10000000000002BB000001A78F1FDA3E.png" xlink:type="simple" xlink:show="embed" xlink:actuate="onLoad" draw:mime-type="image/png"/></draw:frame></text:p>
      <text:p text:style-name="P54" loext:marker-style-name="T47"/>
      <text:list text:continue-numbering="true" text:style-name="WWNum40">
        <text:list-item>
          <text:p text:style-name="P52" loext:marker-style-name="T47"><text:span text:style-name="T47">Headings and Markers</text:span><text:span text:style-name="T47"/></text:p>
        </text:list-item>
      </text:list>
      <text:p text:style-name="List_20_Paragraph" loext:marker-style-name="T6"><text:span text:style-name="T6">If your recorded text includes chapter headings, select the Section Headings option.</text:span><text:span text:style-name="T6"/></text:p>
      <text:p text:style-name="List_20_Paragraph" loext:marker-style-name="T6"><draw:frame draw:style-name="fr2" draw:name="Image8" text:anchor-type="as-char" svg:width="5.4689in" svg:height="3.3189in" draw:z-index="56"><draw:image xlink:href="Pictures/10000000000002B9000001A7FBB3E86E.png" xlink:type="simple" xlink:show="embed" xlink:actuate="onLoad" draw:mime-type="image/png"/></draw:frame></text:p>
      <text:p text:style-name="P53" loext:marker-style-name="T6"/>
      <text:p text:style-name="P53" loext:marker-style-name="T6"/>
      <text:p text:style-name="P53" loext:marker-style-name="T6"/>
      <text:list text:continue-numbering="true" text:style-name="WWNum40">
        <text:list-item>
          <text:p text:style-name="P52" loext:marker-style-name="T47"><text:span text:style-name="T47">Output Folder</text:span><text:span text:style-name="T47"/></text:p>
        </text:list-item>
      </text:list>
      <text:p text:style-name="List_20_Paragraph" loext:marker-style-name="T6"><text:soft-page-break/><text:span text:style-name="T6">Specify the output folders for the phrase lists and timing files. The default locations are usually fine unless you have a specific need to save them elsewhere.</text:span><text:span text:style-name="T6"/></text:p>
      <text:p text:style-name="P58" loext:marker-style-name="T48"/>
      <text:p text:style-name="List_20_Paragraph" loext:marker-style-name="T6"><draw:frame draw:style-name="fr2" draw:name="Image9" text:anchor-type="as-char" svg:width="5.4634in" svg:height="3.3126in" draw:z-index="57"><draw:image xlink:href="Pictures/10000000000002BD000001A99CE23DA5.png" xlink:type="simple" xlink:show="embed" xlink:actuate="onLoad" draw:mime-type="image/png"/></draw:frame><text:span text:style-name="T9"><text:s/></text:span></text:p>
      <text:p text:style-name="P6" loext:marker-style-name="T6"/>
      <text:p text:style-name="P13" loext:marker-style-name="T6"><text:span text:style-name="T6">After the final page of the wizard, the synchronization process will start in a separate command Window. It runs a batch file (or bash script) which calls an </text:span><text:span text:style-name="T47">aeneas</text:span><text:span text:style-name="T6"> task for each chapter of each book.</text:span></text:p>
      <text:p text:style-name="P13" loext:marker-style-name="T6"><text:span text:style-name="T6">As timing files are generated you will see their filenames being added to the table on the </text:span><text:span text:style-name="T47">Audio Files</text:span><text:span text:style-name="T6"> page. </text:span></text:p>
      <text:h text:style-name="Heading_20_2" text:outline-level="2"><text:bookmark-start text:name="_Toc217376506"/>Troubleshooting<text:bookmark-end text:name="_Toc217376506"/></text:h>
      <text:p text:style-name="P61" loext:marker-style-name="T9"><text:span text:style-name="T6">If the synchronization fails, please ensure that aeneas has been installed correctly. You can check the installation by selecting </text:span><text:span text:style-name="T42">Tools</text:span><text:span text:style-name="T41"> </text:span><text:span text:style-name="T49"></text:span><text:span text:style-name="T41"> </text:span><text:span text:style-name="T42">Check aeneas installation… </text:span><text:span text:style-name="T41">from the Scripture App Builder main menu. </text:span><text:span text:style-name="T50">See also </text:span><text:a xlink:type="simple" xlink:href="#_Using_aeneas_within" text:style-name="Internet_20_link" text:visited-style-name="Visited_20_Internet_20_Link"><text:span text:style-name="Internet_20_link"><text:span text:style-name="T50">the warning note regarding file and folder names with special characters</text:span></text:span></text:a><text:span text:style-name="T50">.</text:span></text:p>
      <text:p text:style-name="P62" loext:marker-style-name="T6"><text:span text:style-name="T6">A common problem on Windows is that </text:span><text:span text:style-name="T46">eSpeak</text:span><text:span text:style-name="T6"> stops working after a while. To correct this, run the aeneas Windows setup program again.</text:span></text:p>
      <text:p text:style-name="P63" loext:marker-style-name="T6"><text:span text:style-name="T6">To verify that eSpeak has been installed correctly and is in your path, open a new Windows command prompt and type:</text:span><text:span text:style-name="T6"/></text:p>
      <text:p text:style-name="Command_20_Line"><text:s/>espeak hello</text:p>
      <text:p text:style-name="P13" loext:marker-style-name="T6"><text:span text:style-name="T6">If all is well, you should hear the word “hello” pronounced.</text:span><text:span text:style-name="T6"/></text:p>
      <text:p text:style-name="P64" loext:marker-style-name="T6"/>
      <text:h text:style-name="Heading_20_2" text:outline-level="2"><text:bookmark-start text:name="_Toc217376507"/><text:soft-page-break/>Viewing and testing the timing files created by aeneas<text:bookmark-end text:name="_Toc217376507"/></text:h>
      <text:p text:style-name="P13" loext:marker-style-name="T6"><text:span text:style-name="T6">To view a generated timing file, select a row on the </text:span><text:span text:style-name="T47">Audio Files</text:span><text:span text:style-name="T6"> page, right-click, and select </text:span><text:span text:style-name="T47">View Timing File</text:span><text:span text:style-name="T6">.</text:span></text:p>
      <text:p text:style-name="P13" loext:marker-style-name="T9"><text:span text:style-name="T6">To test the generated timing files with the text and audio, select a row in the </text:span><text:span text:style-name="T47">Audio Files</text:span><text:span text:style-name="T6"> page, right-click and select </text:span><text:span text:style-name="T47">Export to HTML</text:span><text:span text:style-name="T6">.</text:span><text:bookmark-start text:name="_Hlk44919204"/></text:p>
      <text:h text:style-name="Heading_20_2" text:outline-level="2"><text:bookmark-start text:name="_Toc217376508"/>Fine tune timing files using the Preview Audio feature<text:bookmark-end text:name="_Toc217376508"/></text:h>
      <text:p text:style-name="Standard" loext:marker-style-name="T6"><text:span text:style-name="T6">You can view a waveform preview of each audio file and adjust the timing positions from within. To do this, either right click on a single audio file (under </text:span><text:span text:style-name="T47">Books </text:span><text:span text:style-name="T51"></text:span><text:span text:style-name="T47"> </text:span><text:span text:style-name="T45">Collection name</text:span><text:span text:style-name="T47"> </text:span><text:span text:style-name="T51"></text:span><text:span text:style-name="T47"> </text:span><text:span text:style-name="T45">Book name</text:span><text:span text:style-name="T47"> </text:span><text:span text:style-name="T51"></text:span><text:span text:style-name="T47"> Audio Files</text:span><text:span text:style-name="T6">) or double-click on an audio file instead. The Preview Audio viewer screen will appear.</text:span></text:p>
      <text:p text:style-name="P6" loext:marker-style-name="T6"/>
      <text:p text:style-name="P6" loext:marker-style-name="T6"/>
      <text:p text:style-name="Standard" loext:marker-style-name="T6"><draw:custom-shape text:anchor-type="char" draw:z-index="17" draw:name="AutoShape 13" draw:style-name="gr6" draw:text-style-name="P28" svg:width="1.1177in" svg:height="0.2378in" draw:transform="rotate (-2.26299390813585) translate (5.63263888888889in 2.27986111111111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8" draw:name="AutoShape 13" draw:style-name="gr6" draw:text-style-name="P28" svg:width="1.1177in" svg:height="0.2378in" draw:transform="rotate (-0.890292451442307) translate (3.71666666666667in 2.08680555555556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6" draw:name="AutoShape 13" draw:style-name="gr6" draw:text-style-name="P28" svg:width="1.1177in" svg:height="0.2378in" draw:transform="rotate (-0.890292451442307) translate (2.99652777777778in 2.07361111111111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14" draw:name="AutoShape 13" draw:style-name="gr6" draw:text-style-name="P28" svg:width="1.1177in" svg:height="0.2378in" draw:transform="rotate (-0.890292451442307) translate (0.649305555555556in 2.11666666666667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frame draw:style-name="fr2" draw:name="Picture 14" text:anchor-type="as-char" svg:width="5.978in" svg:height="2.5673in" draw:z-index="52"><draw:image xlink:href="Pictures/1000000000000341000001669EAD01FA.png" xlink:type="simple" xlink:show="embed" xlink:actuate="onLoad" draw:mime-type="image/png"/></draw:frame></text:p>
      <text:p text:style-name="P6" loext:marker-style-name="T6"/>
      <text:p text:style-name="P65" loext:marker-style-name="T9"><draw:custom-shape text:anchor-type="char" style:rel-height="20%" draw:z-index="20" draw:name="Text Box 2" draw:style-name="gr7" draw:text-style-name="P66" svg:width="1.3732in" svg:height="0.7094in" svg:x="1.3508in" svg:y="0.028in"><text:p text:style-name="Frame_20_contents" loext:marker-style-name="T6"><text:span text:style-name="T6">Current position in the audio file during playba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15" draw:name="Text Box 2" draw:style-name="gr7" draw:text-style-name="P66" svg:width="1.3732in" svg:height="0.5059in" svg:x="1.352in" svg:y="0.028in"><text:p text:style-name="Frame_20_contents" loext:marker-style-name="T6"><text:span text:style-name="T6">Current position in the audio fi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loext:marker-style-name="T9"><draw:custom-shape text:anchor-type="char" style:rel-height="20%" draw:z-index="19" draw:name="Text Box 2" draw:style-name="gr7" draw:text-style-name="P66" svg:width="1.3732in" svg:height="0.5059in" svg:x="3.5752in" svg:y="0.0484in"><text:p text:style-name="Frame_20_contents" loext:marker-style-name="T6"><text:span text:style-name="T6">Phrase breaks in the timing fi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loext:marker-style-name="T9"/>
      <text:p text:style-name="P65" loext:marker-style-name="T9"/>
      <text:p text:style-name="P65" loext:marker-style-name="T9"/>
      <text:p text:style-name="Standard" loext:marker-style-name="T9"><text:span text:style-name="T9">From the </text:span><text:span text:style-name="T52">Preview Audio</text:span><text:span text:style-name="T9"> viewer, you can play, pause or stop the audio. A moving, vertical bar will show the current position in the audio file. Synchronized text will be displayed at the bottom of the viewer as each phrase is read. Vertical green lines show the phrase breaks, each one labeled with the verse and phrase number (e.g. 1a, 1b).</text:span></text:p>
      <text:p text:style-name="Standard" loext:marker-style-name="T9"><text:span text:style-name="T9">You can click and drag a phrase break line to adjust its position. Use the zoom controls for more accurate positioning. When you are satisfied, close the viewer window using the close box (X) in the upper right corner. You will be prompted to save the changes to the underlying timing file.</text:span><text:span text:style-name="T9"/></text:p>
      <text:h text:style-name="Heading_20_2" text:outline-level="2"><text:bookmark-start text:name="_Toc217376509"/>Fine tune timing files using the Fine Tune Timings viewer<text:bookmark-end text:name="_Toc217376509"/></text:h>
      <text:p text:style-name="P12" loext:marker-style-name="T6"><text:span text:style-name="T6">To fine tune a generated timing file using the browser-based timings viewer:</text:span><text:span text:style-name="T6"/></text:p>
      <text:list text:style-name="WWNum23">
        <text:list-item>
          <text:p text:style-name="P67" loext:marker-style-name="T6"><text:span text:style-name="T6">Select a row on the </text:span><text:span text:style-name="T46">Audio Files</text:span><text:span text:style-name="T6"> page, right-click, and select </text:span><text:span text:style-name="T47">Fine Tune Timings</text:span><text:span text:style-name="T6">.</text:span></text:p>
        </text:list-item>
      </text:list>
      <text:p text:style-name="P68" loext:marker-style-name="T6"><text:soft-page-break/><text:span text:style-name="T6">A page should open in your default browser, looking something like this:</text:span><text:span text:style-name="T6"/></text:p>
      <text:p text:style-name="P69" loext:marker-style-name="T6"><draw:frame draw:style-name="fr2" draw:name="Image 1" text:anchor-type="as-char" svg:width="5.4957in" svg:height="4.4165in" draw:z-index="55"><draw:image xlink:href="Pictures/10000000000003C80000030A5E05DBCB.png" xlink:type="simple" xlink:show="embed" xlink:actuate="onLoad" draw:mime-type="image/png"/></draw:frame><text:span text:style-name="T6"><text:line-break/></text:span></text:p>
      <text:list text:continue-numbering="true" text:style-name="WWNum23">
        <text:list-item>
          <text:p text:style-name="P70" loext:marker-style-name="T6"><text:span text:style-name="T6">Click on the first row of the table to start the audio playing. The row will highlight in yellow. See if the audio matches the text in the highlighted phrase.</text:span><text:span text:style-name="T6"/></text:p>
        </text:list-item>
      </text:list>
      <text:p text:style-name="P71" loext:marker-style-name="T6"/>
      <text:list text:continue-numbering="true" text:style-name="WWNum23">
        <text:list-item>
          <text:p text:style-name="P70" loext:marker-style-name="T6"><text:span text:style-name="T6">As soon as you hear the first word or two from the selected row and it seems that the text and audio match exactly, click on the next row.</text:span><text:span text:style-name="T6"/></text:p>
        </text:list-item>
      </text:list>
      <text:p text:style-name="P60" loext:marker-style-name="T9"/>
      <text:list text:continue-numbering="true" text:style-name="WWNum23">
        <text:list-item>
          <text:p text:style-name="P70" loext:marker-style-name="T6"><text:span text:style-name="T6">Continue clicking on each row to listen for enough time to determine whether the timing break has been placed in the right place, i.e. not too early and not too late.</text:span><text:span text:style-name="T6"/></text:p>
        </text:list-item>
      </text:list>
      <text:p text:style-name="P53" loext:marker-style-name="T6"/>
      <text:p text:style-name="P72" loext:marker-style-name="T6"><text:span text:style-name="T6">You can also use the </text:span><text:span text:style-name="T46">N</text:span><text:span text:style-name="T6"> keyboard shortcut to move to the next row.</text:span></text:p>
      <text:p text:style-name="P53" loext:marker-style-name="T6"/>
      <text:list xml:id="list132631101764889" text:continue-numbering="true" text:style-name="WWNum23">
        <text:list-item>
          <text:p text:style-name="P70" loext:marker-style-name="T6"><text:span text:style-name="T6">If you hear that the timing for a row needs to be fine-tuned, you can move it backwards or forwards by increments:</text:span><text:span text:style-name="T6"/></text:p>
        </text:list-item>
      </text:list>
      <text:list text:style-name="WWNum41">
        <text:list-item>
          <text:p text:style-name="P73" loext:marker-style-name="T6"><text:span text:style-name="T6">click the plus (+) button to move the start time forward by 0.1 seconds</text:span><text:span text:style-name="T6"/></text:p>
        </text:list-item>
        <text:list-item>
          <text:p text:style-name="P73" loext:marker-style-name="T6"><text:span text:style-name="T6">click the double-plus (++) to move forward by 1 second</text:span><text:span text:style-name="T6"/></text:p>
        </text:list-item>
        <text:list-item>
          <text:p text:style-name="P73" loext:marker-style-name="T6"><text:span text:style-name="T6">click the triple-plus (+++) to move forward by 10 seconds</text:span><text:span text:style-name="T6"/></text:p>
        </text:list-item>
        <text:list-item>
          <text:p text:style-name="P73" loext:marker-style-name="T6"><text:span text:style-name="T6">click the minus (–) button to move the start time backwards by 0.1 seconds</text:span><text:span text:style-name="T6"/></text:p>
        </text:list-item>
        <text:list-item>
          <text:p text:style-name="P73" loext:marker-style-name="T6"><text:span text:style-name="T6">click the double-minus (– –) to move back 1 second</text:span><text:span text:style-name="T6"/></text:p>
        </text:list-item>
        <text:list-item>
          <text:p text:style-name="P73" loext:marker-style-name="T6"><text:span text:style-name="T6">click the triple-minus (</text:span><text:span text:style-name="T53">– – –</text:span><text:span text:style-name="T6">) to move back 10 seconds</text:span></text:p>
        </text:list-item>
      </text:list>
      <text:p text:style-name="P74" loext:marker-style-name="T6"><draw:custom-shape text:anchor-type="char" style:rel-width="40%" style:rel-height="20%" draw:z-index="13" draw:name="Text Box 2" draw:style-name="gr8" draw:text-style-name="P28" svg:width="2.3823in" svg:height="0.7094in" svg:x="3.5736in" svg:y="4.0193in"><text:p text:style-name="Frame_20_contents" loext:marker-style-name="T6"><text:span text:style-name="T6">Adjust the start time of the currently selected timing using the plus and minus button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AutoShape 13" draw:style-name="gr9" draw:text-style-name="P28" svg:width="1.9248in" svg:height="0.2685in" draw:transform="rotate (-1.83451557677124) translate (2.01111111111111in 2.27708333333333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custom-shape text:anchor-type="char" draw:z-index="8" draw:name="AutoShape 13" draw:style-name="gr10" draw:text-style-name="P28" svg:width="2.6913in" svg:height="0.2689in" draw:transform="rotate (-1.82683612806247) translate (5.10069444444445in 1.10069444444444in)"><text:p/><draw:enhanced-geometry draw:mirror-horizontal="false" draw:mirror-vertical="fals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text:soft-page-break/><text:span text:style-name="T9"><text:s/></text:span><draw:frame draw:style-name="fr2" draw:name="Picture 30" text:anchor-type="as-char" svg:width="6in" svg:height="3.9in" draw:z-index="54"><draw:image xlink:href="Pictures/100000000000039D0000025B099C1A0A.png" xlink:type="simple" xlink:show="embed" xlink:actuate="onLoad" draw:mime-type="image/png"/></draw:frame></text:p>
      <text:p text:style-name="P53" loext:marker-style-name="T6"><draw:custom-shape text:anchor-type="char" style:rel-width="40%" style:rel-height="20%" draw:z-index="10" draw:name="Text Box 2" draw:style-name="gr11" draw:text-style-name="P66" svg:width="2.3823in" svg:height="0.7094in" svg:x="0.7799in" svg:y="0.1165in"><text:p text:style-name="Frame_20_contents" loext:marker-style-name="T6"><text:span text:style-name="T6">Click on each row for enough time to check if the audio starts at the right plac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loext:marker-style-name="T6"/>
      <text:p text:style-name="P53" loext:marker-style-name="T6"/>
      <text:p text:style-name="P53" loext:marker-style-name="T6"/>
      <text:p text:style-name="P53" loext:marker-style-name="T6"/>
      <table:table table:name="Table8" table:style-name="Table8">
        <table:table-column table:style-name="Table8.A"/>
        <table:table-column table:style-name="Table8.B"/>
        <table:table-row table:style-name="Table8.1">
          <table:table-cell table:style-name="Table8.A1" office:value-type="string">
            <text:p text:style-name="P20" loext:marker-style-name="T27"><text:span text:style-name="T28"></text:span><text:span text:style-name="T27"> </text:span></text:p>
          </table:table-cell>
          <table:table-cell table:style-name="Table8.B1" office:value-type="string">
            <text:p text:style-name="P20" loext:marker-style-name="T54"><text:span text:style-name="T54">When you click on a phrase, it is highlighted and the audio plays from the point specified in </text:span><text:span text:style-name="T55">Start Time</text:span><text:span text:style-name="T54">. If the audio that plays corresponds to a phrase further on in the text, you need to adjust the start time by moving it earlier, and vice versa.</text:span></text:p>
          </table:table-cell>
        </table:table-row>
      </table:table>
      <text:p text:style-name="List_20_Paragraph"/>
      <text:list text:continue-list="list132631101764889" text:style-name="WWNum23">
        <text:list-item>
          <text:p text:style-name="P70" loext:marker-style-name="T6"><text:span text:style-name="T6">When you are happy with the current row, continue clicking on the subsequent rows in the same way, fine tuning those that need adjusting.</text:span><text:span text:style-name="T6"/></text:p>
        </text:list-item>
      </text:list>
      <text:p text:style-name="P53" loext:marker-style-name="T6"/>
      <text:list text:continue-numbering="true" text:style-name="WWNum23">
        <text:list-item>
          <text:p text:style-name="P70" loext:marker-style-name="T6"><text:span text:style-name="T47">IMPORTANT!</text:span><text:span text:style-name="T6"> When you have reached the last row of the table, save your changes by clicking on the button </text:span><text:span text:style-name="T46">Save Changes to Timing File </text:span><text:span text:style-name="T6">at the bottom of the page (or by using the keyboard shortcut </text:span><text:span text:style-name="T46">T</text:span><text:span text:style-name="T6">).</text:span></text:p>
        </text:list-item>
      </text:list>
      <text:p text:style-name="P71" loext:marker-style-name="T6"/>
      <table:table table:name="Table9" table:style-name="Table9">
        <table:table-column table:style-name="Table9.A"/>
        <table:table-column table:style-name="Table9.B"/>
        <table:table-row table:style-name="Table9.1">
          <table:table-cell table:style-name="Table9.A1" office:value-type="string">
            <text:p text:style-name="P20" loext:marker-style-name="T27"><text:span text:style-name="T28"></text:span><text:span text:style-name="T27"> </text:span></text:p>
          </table:table-cell>
          <table:table-cell table:style-name="Table9.B1" office:value-type="string">
            <text:p text:style-name="P20" loext:marker-style-name="T29"><text:span text:style-name="T56">NOTE:</text:span><text:span text:style-name="T29"> <text:s/></text:span><text:span text:style-name="T57">For security reasons, your browser does not have permission to save the modified timing file in its original location. It will be saved to your default Downloads folder. Scripture App Builder can watch this folder for modified files and move them back to your project data folder. Specify the Downloads folder to watch in </text:span><text:span text:style-name="T46">Settings</text:span><text:span text:style-name="T57"> </text:span><text:span text:style-name="T49"></text:span><text:span text:style-name="T57"> </text:span><text:span text:style-name="T46">Files</text:span><text:span text:style-name="T57">. Otherwise, you will need to move the modified files back to your project manually, e.g. using the </text:span><text:span text:style-name="T46">Add Timing Files</text:span><text:span text:style-name="T57"> button</text:span><text:span text:style-name="T29">.</text:span></text:p>
          </table:table-cell>
        </table:table-row>
      </table:table>
      <text:p text:style-name="P60" loext:marker-style-name="T9"/>
      <text:p text:style-name="P53" loext:marker-style-name="T6"/>
      <text:list text:continue-numbering="true" text:style-name="WWNum23">
        <text:list-item>
          <text:p text:style-name="P75" loext:marker-style-name="T9"><text:soft-page-break/><text:span text:style-name="T9">Changing audio speed when doing fine tuning</text:span><text:span text:style-name="T9"/></text:p>
        </text:list-item>
      </text:list>
      <text:p text:style-name="P12" loext:marker-style-name="T6"><text:span text:style-name="T6">If the audio is playing too quickly for you to fine tune accurately, you can slow down the playback speed using the speed selector at the bottom of the screen.</text:span><text:span text:style-name="T6"/></text:p>
      <text:p text:style-name="P12" loext:marker-style-name="T6"><draw:custom-shape text:anchor-type="char" draw:z-index="11" draw:name="AutoShape 13" draw:style-name="gr12" draw:text-style-name="P28" svg:width="0.8114in" svg:height="0.2378in" draw:transform="rotate (2.38534148870065) translate (1.64305555555556in 4.54652777777778in)"><text:p/><draw:enhanced-geometry draw:mirror-horizontal="false" draw:mirror-vertical="true" svg:viewBox="0 0 0 0" draw:glue-points="?f5 0 0 ?f7 ?f5 ?f14 ?f13 ?f7" draw:text-areas="?f12 ?f8 ?f13 ?f9" draw:type="ooxml-leftArrow" draw:modifiers="50000 916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range-y-maximum="100000" draw:handle-range-y-minimum="0" draw:handle-position="?f13 ?f8" draw:handle-position-x="?f13" draw:handle-position-y="?f8"/><draw:handle draw:handle-range-x-maximum="?f1" draw:handle-range-x-minimum="0" draw:handle-position="?f5 0" draw:handle-position-x="?f5" draw:handle-position-y="0"/></draw:enhanced-geometry></draw:custom-shape><draw:frame draw:style-name="fr2" draw:name="Image 15" text:anchor-type="as-char" svg:width="5.3228in" svg:height="4.2654in" draw:z-index="53"><draw:image xlink:href="Pictures/10000000000003FD00000332F3620DD0.png" xlink:type="simple" xlink:show="embed" xlink:actuate="onLoad" draw:mime-type="image/png"/></draw:frame></text:p>
      <text:p text:style-name="P76" loext:marker-style-name="T6"><draw:custom-shape text:anchor-type="char" style:rel-height="20%" draw:z-index="12" draw:name="Text Box 2" draw:style-name="gr13" draw:text-style-name="P66" svg:width="2.5524in" svg:height="0.3024in" svg:x="0.0555in" svg:y="0.2201in"><text:p text:style-name="Frame_20_contents" loext:marker-style-name="T6"><text:span text:style-name="T6">Change the playback speed he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 loext:marker-style-name="T6"/>
      <text:h text:style-name="Heading_20_2" text:outline-level="2"><text:bookmark-start text:name="_Toc217376510"/>Keyboard shortcuts when doing fine tuning in your browser<text:bookmark-end text:name="_Toc217376510"/></text:h>
      <text:p text:style-name="P63" loext:marker-style-name="T6"><text:span text:style-name="T6">The following keyboard shortcuts are available in the Fine Tuning interface:</text:span><text:span text:style-name="T6"/></text:p>
      <text:p text:style-name="P76" loext:marker-style-name="T6"/>
      <table:table table:name="Table10" table:style-name="Table10">
        <table:table-column table:style-name="Table10.A"/>
        <table:table-column table:style-name="Table10.B"/>
        <table:table-row table:style-name="Table10.1">
          <table:table-cell table:style-name="Table10.A1" office:value-type="string">
            <text:p text:style-name="P77" loext:marker-style-name="T46"><text:span text:style-name="T46">Key</text:span><text:span text:style-name="T46"/></text:p>
          </table:table-cell>
          <table:table-cell table:style-name="Table10.A1" office:value-type="string">
            <text:p text:style-name="P78" loext:marker-style-name="T46"><text:span text:style-name="T46">Action</text:span><text:span text:style-name="T46"/></text:p>
          </table:table-cell>
        </table:table-row>
        <table:table-row table:style-name="Table10.1">
          <table:table-cell table:style-name="Table10.A2" office:value-type="string">
            <text:p text:style-name="P79" loext:marker-style-name="T6"><text:span text:style-name="T6">Spacebar</text:span><text:span text:style-name="T6"/></text:p>
          </table:table-cell>
          <table:table-cell table:style-name="Table10.B2" office:value-type="string">
            <text:p text:style-name="P80" loext:marker-style-name="T6"><text:span text:style-name="T6">Start/Pause audio</text:span><text:span text:style-name="T6"/></text:p>
          </table:table-cell>
        </table:table-row>
        <table:table-row table:style-name="Table10.1">
          <table:table-cell table:style-name="Table10.A3" office:value-type="string">
            <text:p text:style-name="P79" loext:marker-style-name="T6"><text:span text:style-name="T6">T</text:span><text:span text:style-name="T6"/></text:p>
          </table:table-cell>
          <table:table-cell table:style-name="Table10.B3" office:value-type="string">
            <text:p text:style-name="P80" loext:marker-style-name="T6"><text:span text:style-name="T6">Save timing file</text:span><text:span text:style-name="T6"/></text:p>
          </table:table-cell>
        </table:table-row>
        <table:table-row table:style-name="Table10.1">
          <table:table-cell table:style-name="Table10.A4" office:value-type="string">
            <text:p text:style-name="P79" loext:marker-style-name="T6"><text:span text:style-name="T6">N</text:span><text:span text:style-name="T6"/></text:p>
          </table:table-cell>
          <table:table-cell table:style-name="Table10.B4" office:value-type="string">
            <text:p text:style-name="P80" loext:marker-style-name="T6"><text:span text:style-name="T6">Start playing from the next row</text:span><text:span text:style-name="T6"/></text:p>
          </table:table-cell>
        </table:table-row>
        <table:table-row table:style-name="Table10.1">
          <table:table-cell table:style-name="Table10.A5" office:value-type="string">
            <text:p text:style-name="P79" loext:marker-style-name="T6"><text:span text:style-name="T6">P</text:span><text:span text:style-name="T6"/></text:p>
          </table:table-cell>
          <table:table-cell table:style-name="Table10.B5" office:value-type="string">
            <text:p text:style-name="P80" loext:marker-style-name="T6"><text:span text:style-name="T6">Start playing from the previous row</text:span><text:span text:style-name="T6"/></text:p>
          </table:table-cell>
        </table:table-row>
        <table:table-row table:style-name="Table10.1">
          <table:table-cell table:style-name="Table10.A6" office:value-type="string">
            <text:p text:style-name="P79" loext:marker-style-name="T6"><text:span text:style-name="T6">B</text:span><text:span text:style-name="T6"/></text:p>
          </table:table-cell>
          <table:table-cell table:style-name="Table10.B6" office:value-type="string">
            <text:p text:style-name="P80" loext:marker-style-name="T6"><text:span text:style-name="T6">Set the phrase start time to be at the current audio position</text:span><text:span text:style-name="T6"/></text:p>
          </table:table-cell>
        </table:table-row>
        <table:table-row table:style-name="Table10.1">
          <table:table-cell table:style-name="Table10.A7" office:value-type="string">
            <text:p text:style-name="P79" loext:marker-style-name="T6"><text:span text:style-name="T6">A (or Q)</text:span><text:span text:style-name="T6"/></text:p>
          </table:table-cell>
          <table:table-cell table:style-name="Table10.B7" office:value-type="string">
            <text:p text:style-name="P80" loext:marker-style-name="T6"><text:span text:style-name="T6">Move the start time of the current row back 1 sec</text:span><text:span text:style-name="T6"/></text:p>
          </table:table-cell>
        </table:table-row>
        <table:table-row table:style-name="Table10.1">
          <table:table-cell table:style-name="Table10.A8" office:value-type="string">
            <text:p text:style-name="P79" loext:marker-style-name="T6"><text:span text:style-name="T6">S</text:span><text:span text:style-name="T6"/></text:p>
          </table:table-cell>
          <table:table-cell table:style-name="Table10.B8" office:value-type="string">
            <text:p text:style-name="P80" loext:marker-style-name="T6"><text:span text:style-name="T6">Move the start time of the current row back 0.1 secs</text:span><text:span text:style-name="T6"/></text:p>
          </table:table-cell>
        </table:table-row>
        <table:table-row table:style-name="Table10.1">
          <table:table-cell table:style-name="Table10.A9" office:value-type="string">
            <text:p text:style-name="P79" loext:marker-style-name="T6"><text:span text:style-name="T6">D</text:span><text:span text:style-name="T6"/></text:p>
          </table:table-cell>
          <table:table-cell table:style-name="Table10.B9" office:value-type="string">
            <text:p text:style-name="P80" loext:marker-style-name="T6"><text:span text:style-name="T6">Move the start time of the current row forward 0.1 secs</text:span><text:span text:style-name="T6"/></text:p>
          </table:table-cell>
        </table:table-row>
        <text:soft-page-break/>
        <table:table-row table:style-name="Table10.1">
          <table:table-cell table:style-name="Table10.A10" office:value-type="string">
            <text:p text:style-name="P79" loext:marker-style-name="T6"><text:span text:style-name="T6">F</text:span><text:span text:style-name="T6"/></text:p>
          </table:table-cell>
          <table:table-cell table:style-name="Table10.B10" office:value-type="string">
            <text:p text:style-name="P80" loext:marker-style-name="T6"><text:span text:style-name="T6">Move the start time of the current row forward 1 sec</text:span><text:span text:style-name="T6"/></text:p>
          </table:table-cell>
        </table:table-row>
      </table:table>
      <text:p text:style-name="P81" loext:marker-style-name="T6"/>
      <text:h text:style-name="Heading_20_2" text:outline-level="2"><text:bookmark-start text:name="_Toc217376511"/>Sending Fine Tuning files to others<text:bookmark-end text:name="_Toc217376511"/></text:h>
      <text:p text:style-name="P13" loext:marker-style-name="T6"><text:span text:style-name="T6">If you want to do fine tuning well, it can take a lot of time of concentrated listening. You might have friends and colleagues who are willing to help with this. It is possible to send them the Fine Tuning files to work on without them needing to install Scripture App Builder.</text:span><text:span text:style-name="T6"/></text:p>
      <text:p text:style-name="P13" loext:marker-style-name="T6"><text:span text:style-name="T6">To do this:</text:span><text:span text:style-name="T6"/></text:p>
      <text:list text:style-name="WWNum35">
        <text:list-item>
          <text:p text:style-name="P82" loext:marker-style-name="T6"><text:span text:style-name="T6">Select one or more books, or a book collection, in the left-side project menu. Right-click, and select </text:span><text:span text:style-name="T47">Fine Tune Timings</text:span><text:span text:style-name="T6">.</text:span></text:p>
        </text:list-item>
        <text:list-item>
          <text:p text:style-name="P83" loext:marker-style-name="T6"><text:span text:style-name="T6">In the Fine Tuning wizard, choose </text:span><text:span text:style-name="T46">The files will be sent to others to help with the fine tuning</text:span><text:span text:style-name="T6">.</text:span></text:p>
        </text:list-item>
        <text:list-item>
          <text:p text:style-name="P83" loext:marker-style-name="T6"><text:span text:style-name="T6">On the next page, </text:span><text:span text:style-name="T46">Audio Files</text:span><text:span text:style-name="T6">, choose to copy the audio files (if you have a good internet connection) or choose not to copy them (if your internet connection is limited and you will tell your friends where they can download the audio files).</text:span></text:p>
        </text:list-item>
        <text:list-item>
          <text:p text:style-name="P83" loext:marker-style-name="T6"><text:span text:style-name="T6">On the next page, </text:span><text:span text:style-name="T46">Zip Files</text:span><text:span text:style-name="T6">, choose to zip the fine tuning files together to send to your friends.</text:span></text:p>
        </text:list-item>
        <text:list-item>
          <text:p text:style-name="P83" loext:marker-style-name="T6"><text:span text:style-name="T6">On the next page, </text:span><text:span text:style-name="T46">Output Folder</text:span><text:span text:style-name="T6">, choose where you would like the files to be created, then click </text:span><text:span text:style-name="T46">Create Files</text:span><text:span text:style-name="T6">.</text:span></text:p>
        </text:list-item>
        <text:list-item>
          <text:p text:style-name="P83" loext:marker-style-name="T6"><text:span text:style-name="T6">Send the files to your friends, ask them to unzip them on their computer, and explain to them how they can work on the timings. They can open the html file for each chapter and that will load the Fine Tune Timings page in their browser. They do not need to have SAB or RAB installed. When done, they should save the timings and send the modified timing files back to you.</text:span><text:span text:style-name="T6"/></text:p>
        </text:list-item>
      </text:list>
      <text:p text:style-name="P64" loext:marker-style-name="T6"><text:bookmark-end text:name="_Hlk44919204"/></text:p>
      <table:table table:name="Table11" table:style-name="Table11">
        <table:table-column table:style-name="Table11.A"/>
        <table:table-column table:style-name="Table11.B"/>
        <table:table-row table:style-name="Table11.1">
          <table:table-cell table:style-name="Table11.A1" office:value-type="string">
            <text:p text:style-name="P20" loext:marker-style-name="T32"><text:span text:style-name="T33"></text:span><text:span text:style-name="T32"> </text:span></text:p>
          </table:table-cell>
          <table:table-cell table:style-name="Table11.B1" office:value-type="string">
            <text:p text:style-name="P20" loext:marker-style-name="T29"><text:span text:style-name="T29">There is currently a group of volunteers called SAB Assist who can crowd-source the fine-tuning of projects—even whole Bibles. Contact </text:span><text:a xlink:type="simple" xlink:href="mailto:andrew_shafe@sil.org" text:style-name="Internet_20_link" text:visited-style-name="Visited_20_Internet_20_Link"><text:span text:style-name="Internet_20_link"><text:span text:style-name="T29">andrew_shafe@sil.org</text:span></text:span></text:a><text:span text:style-name="T29"> for more details.</text:span></text:p>
          </table:table-cell>
        </table:table-row>
      </table:table>
      <text:p text:style-name="P84" loext:marker-style-name="T9"/>
      <text:h text:style-name="Heading_20_2" text:outline-level="2"><text:bookmark-start text:name="_Toc217376512"/>Fine tune timing files using Audacity<text:bookmark-end text:name="_Toc217376512"/></text:h>
      <text:p text:style-name="P12" loext:marker-style-name="T6"><text:span text:style-name="T6">Instead of using the Fine Tune Timings viewer, you can make corrections in Audacity. To do this:</text:span><text:span text:style-name="T6"/></text:p>
      <text:list text:style-name="WWNum37">
        <text:list-item>
          <text:p text:style-name="P85" loext:marker-style-name="T6"><text:span text:style-name="T6">Open the audio MP3 file in Audacity.</text:span><text:span text:style-name="T6"/></text:p>
        </text:list-item>
        <text:list-item>
          <text:p text:style-name="P86" loext:marker-style-name="T6"><text:span text:style-name="T6">Import the timing file, by selecting </text:span><text:span text:style-name="T47">File</text:span><text:span text:style-name="T6"> </text:span><text:span text:style-name="T49"></text:span><text:span text:style-name="T41"> </text:span><text:span text:style-name="T47">Import</text:span><text:span text:style-name="T6"> </text:span><text:span text:style-name="T49"></text:span><text:span text:style-name="T41"> </text:span><text:span text:style-name="T42">Labels…</text:span></text:p>
        </text:list-item>
        <text:list-item>
          <text:p text:style-name="P86" loext:marker-style-name="T6"><text:span text:style-name="T41">Zoom into the waveform.</text:span><text:span text:style-name="T41"/></text:p>
        </text:list-item>
        <text:list-item>
          <text:p text:style-name="P86" loext:marker-style-name="T6"><text:soft-page-break/><text:span text:style-name="T41">Adjust the position of any labels that are not in the right place.</text:span><text:span text:style-name="T41"/></text:p>
        </text:list-item>
        <text:list-item>
          <text:p text:style-name="P86" loext:marker-style-name="T6"><text:span text:style-name="T41">Export the modified labels track, using </text:span><text:span text:style-name="T42">File</text:span><text:span text:style-name="T41"> &gt; </text:span><text:span text:style-name="T42">Export Labels…</text:span></text:p>
        </text:list-item>
        <text:list-item>
          <text:p text:style-name="P86" loext:marker-style-name="T6"><text:span text:style-name="T41">Test the synchronisation again within Scripture App Builder using the </text:span><text:span text:style-name="T42">Export to HTML</text:span><text:span text:style-name="T41"> utility (see above) to see if the timing problems have been resolved.</text:span></text:p>
        </text:list-item>
      </text:list>
      <text:p text:style-name="P51" loext:marker-style-name="T6"/>
      <text:p text:style-name="P6" loext:marker-style-name="T6"/>
      <text:h text:style-name="Heading_20_1" text:outline-level="1" loext:marker-style-name="T6"><text:bookmark-start text:name="_Toc217376513"/><text:span text:style-name="T6">Adding voices to eSpeak</text:span><text:bookmark-end text:name="_Toc217376513"/><text:span text:style-name="T6"/></text:h>
      <text:p text:style-name="Standard" loext:marker-style-name="T6"><text:span text:style-name="T6">By using character replacements in the </text:span><text:span text:style-name="T46">Synchronize using aeneas</text:span><text:span text:style-name="T6"> wizard, you will find that you can get good synchronization results for many languages using the existing eSpeak voices.</text:span></text:p>
      <text:p text:style-name="P6" loext:marker-style-name="T6"/>
      <text:p text:style-name="Standard" loext:marker-style-name="T6"><text:span text:style-name="T6">Adding a new voice in eSpeak is not easy, but if you would like to try, please follow the instructions here: </text:span><text:a xlink:type="simple" xlink:href="http://espeak.sourceforge.net/add_language.html" text:style-name="Internet_20_link" text:visited-style-name="Visited_20_Internet_20_Link"><text:span text:style-name="Internet_20_link"><text:span text:style-name="T6">http://espeak.sourceforge.net/add_language.html</text:span></text:span></text:a><text:span text:style-name="T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1972in"/>
        </style:tab-stops>
      </style:paragraph-properties>
      <style:text-properties fo:font-size="13pt" fo:language="en" fo:country="GB" fo:font-weight="bold" style:font-size-asian="13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1">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39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style:font-name="Courier New1" fo:font-family="'Courier New'" style:font-family-generic="swiss" style:font-pitch="variable" fo:font-size="10pt" fo:language="en" fo:country="GB" fo:font-weight="bold" style:font-size-asian="10pt" style:font-weight-asian="bold" style:font-name-complex="Courier New2"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fo:font-size="10pt" fo:language="en" fo:country="GB" style:font-size-asian="10pt" style:language-asian="en" style:country-asian="GB" style:font-name-complex="Courier New2" style:font-family-complex="'Courier New'" style:font-family-generic-complex="system" style:font-pitch-complex="variable" style:font-size-complex="10pt" style:language-complex="he" style:country-complex="IL"/>
    </style:style>
    <style:style style:name="No_20_Spacing" style:display-name="No Spacing" style:family="paragraph">
      <style:paragraph-properties fo:margin-top="0in" fo:margin-bottom="0in" style:contextual-spacing="false" fo:text-align="left" style:justify-single-word="false" fo:orphans="2" fo:widows="2" style:writing-mode="lr-tb"/>
      <style:text-properties style:font-name="Calibri1" fo:font-family="Calibri" style:font-family-generic="swiss" style:font-pitch="variable" fo:font-size="12pt" fo:language="fr" fo:country="FR" style:font-size-asian="12pt" style:language-asian="fr" style:country-asian="FR"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Calibri1" fo:font-family="Calibri" style:font-family-generic="swiss" style:font-pitch="variable" fo:font-size="16pt" fo:language="fr" fo:country="FR" fo:font-weight="bold" style:letter-kerning="true" style:font-size-asian="16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libri1" fo:font-family="Calibri" style:font-family-generic="swiss" style:font-pitch="variable" fo:font-size="13pt" fo:font-weight="bold" style:font-size-asian="13pt" style:language-asian="fr" style:country-asian="FR"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libri1" fo:font-family="Calibri" style:font-family-generic="swiss" style:font-pitch="variable" fo:font-size="12pt" fo:language="fr" fo:country="FR" fo:font-weight="bold" style:font-size-asian="12pt" style:language-asian="fr" style:country-asian="FR" style:font-weight-asian="bold" style:font-name-complex="Arial1" style:font-family-complex="Arial"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1"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1"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Text_20_Char" style:display-name="Footnote Text Char" style:family="text" style:parent-style-name="Default_20_Paragraph_20_Font" loext:linked-style-name="Footnote">
      <style:text-properties style:font-name="Calibri1" fo:font-family="Calibri" style:font-family-generic="swiss" style:font-pitch="variable" fo:language="fr" fo:country="FR" style:language-asian="fr" style:country-asian="F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2" style:font-family-complex="'Courier New'" style:font-family-generic-complex="system" style:font-pitch-complex="variable" style:language-complex="he" style:country-complex="IL"/>
    </style:style>
    <style:style style:name="Unresolved_20_Mention1" style:display-name="Unresolved Mention1" style:family="text" style:parent-style-name="Default_20_Paragraph_20_Font">
      <style:text-properties fo:color="#808080" loext:opacity="100%" fo:background-color="#e6e6e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2"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2"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2"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language="en" fo:country="GB"/>
    </style:style>
    <style:style style:name="ListLabel_20_389" style:display-name="ListLabel 389" style:family="text">
      <style:text-properties style:font-name="Calibri" fo:font-family="Calibri" style:font-family-generic="roman" style:font-pitch="variable" fo:language="en" fo:country="GB"/>
    </style:style>
    <style:style style:name="ListLabel_20_390" style:display-name="ListLabel 390" style:family="text">
      <style:text-properties style:font-name="Calibri" fo:font-family="Calibri" style:font-family-generic="roman" style:font-pitch="variable" fo:language="en" fo:country="US" style:font-name-complex="Tahoma" style:font-family-complex="Tahoma" style:font-family-generic-complex="system" style:font-pitch-complex="variable"/>
    </style:style>
    <style:style style:name="ListLabel_20_391" style:display-name="ListLabel 391" style:family="text">
      <style:text-properties fo:language="en" fo:country="US" fo:font-style="italic" style:font-style-asian="italic" style:font-name-complex="Calibri2" style:font-family-complex="Calibr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0"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5in" fo:margin-left="0.59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811in" fo:margin-left="-0.21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253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0.75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75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25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75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253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3.7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78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78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78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78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78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78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78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78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7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811in" fo:margin-left="0.529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744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244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744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244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744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24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74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2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28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28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28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28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28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28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28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28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8" text:anchor-type="paragraph" svg:y="0.0008in" draw:z-index="48"><draw:text-box fo:min-height="0.0161in" fo:min-width="0.0161in"><text:p text:style-name="MP1"><text:span text:style-name="Page_20_Number"><text:page-number text:select-page="current">22</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cripture App Builder - Using aeneas for Audio-Text Synchronization</dc:title>
    <meta:initial-creator>Richard Margetts</meta:initial-creator>
    <meta:editing-cycles>5</meta:editing-cycles>
    <meta:print-date>2025-12-22T23:02:00</meta:print-date>
    <meta:creation-date>2015-08-15T09:35:00</meta:creation-date>
    <dc:date>2026-06-03T13:25:49.427442375</dc:date>
    <meta:editing-duration>PT3M12S</meta:editing-duration>
    <meta:generator>LibreOffice/26.2.3.2$Linux_X86_64 LibreOffice_project/620$Build-2</meta:generator>
    <meta:document-statistic meta:table-count="11" meta:image-count="21" meta:object-count="0" meta:page-count="22" meta:paragraph-count="246" meta:word-count="3765" meta:character-count="21816" meta:non-whitespace-character-count="18310"/>
    <meta:user-defined meta:name="AppVersion">16.0000</meta:user-defined>
    <meta:template xlink:type="simple" xlink:actuate="onRequest" xlink:title="Normal.dotm" xlink:href=""/>
  </office:meta>
</office:document-meta>
</file>