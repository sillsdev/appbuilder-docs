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D00000332F3620DD0.png" manifest:media-type="image/png"/>
  <manifest:file-entry manifest:full-path="Pictures/100000000000039D0000025B099C1A0A.png" manifest:media-type="image/png"/>
  <manifest:file-entry manifest:full-path="Pictures/10000000000003C80000030A5E05DBCB.png" manifest:media-type="image/png"/>
  <manifest:file-entry manifest:full-path="Pictures/10000000000002B9000001A3E37BEC03.png" manifest:media-type="image/png"/>
  <manifest:file-entry manifest:full-path="Pictures/100000010000042C000004B0826D13D2.png" manifest:media-type="image/png"/>
  <manifest:file-entry manifest:full-path="Pictures/10000001000002B70000008BD57A2983.png" manifest:media-type="image/png"/>
  <manifest:file-entry manifest:full-path="Pictures/10000000000002BD000001A7AB22AE2A.png" manifest:media-type="image/png"/>
  <manifest:file-entry manifest:full-path="Pictures/1000000100000846000002729EF3B20B.png" manifest:media-type="image/png"/>
  <manifest:file-entry manifest:full-path="Pictures/10000000000002BB000001A7CE967816.png" manifest:media-type="image/png"/>
  <manifest:file-entry manifest:full-path="Pictures/10000000000002B9000001A7BA59436E.png" manifest:media-type="image/png"/>
  <manifest:file-entry manifest:full-path="Pictures/1000000000000246000001DC71ABC918.png" manifest:media-type="image/png"/>
  <manifest:file-entry manifest:full-path="Pictures/1000000000000246000001DC0E031CCF.png" manifest:media-type="image/png"/>
  <manifest:file-entry manifest:full-path="Pictures/10000000000002B9000001A9A6759DB9.png" manifest:media-type="image/png"/>
  <manifest:file-entry manifest:full-path="Pictures/10000000000002BB000001A7C08F989D.png" manifest:media-type="image/png"/>
  <manifest:file-entry manifest:full-path="Pictures/10000000000002930000014EBAE60B85.png" manifest:media-type="image/png"/>
  <manifest:file-entry manifest:full-path="Pictures/100000000000034300000164CC2F3B28.png" manifest:media-type="image/png"/>
  <manifest:file-entry manifest:full-path="Pictures/10000001000002EC000000855EAA607A.png" manifest:media-type="image/png"/>
  <manifest:file-entry manifest:full-path="Pictures/10000000000002BB000001A7AC0B98ED.png" manifest:media-type="image/png"/>
  <manifest:file-entry manifest:full-path="Pictures/10000000000002B9000001AB1E5A81EC.png" manifest:media-type="image/png"/>
  <manifest:file-entry manifest:full-path="Pictures/10000000000002B9000001A59D76BB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9778in" fo:margin-left="0.0035in" fo:margin-top="0in" fo:margin-bottom="0in" table:align="left" style:writing-mode="lr-tb"/>
    </style:style>
    <style:style style:name="Table1.A" style:family="table-column">
      <style:table-column-properties style:column-width="0.584in"/>
    </style:style>
    <style:style style:name="Table1.B" style:family="table-column">
      <style:table-column-properties style:column-width="5.3938in"/>
    </style:style>
    <style:style style:name="Table1.1" style:family="table-row">
      <style:table-row-properties style:min-row-height="0.5257in" fo:keep-together="auto"/>
    </style:style>
    <style:style style:name="Table1.A1" style:family="table-cell">
      <style:table-cell-properties fo:background-color="#00b050" fo:padding-left="0.0799in" fo:padding-right="0.075in" fo:padding-top="0.0799in" fo:padding-bottom="0.0201in" fo:border="0.5pt solid #000000" style:writing-mode="lr-tb">
        <style:background-image/>
      </style:table-cell-properties>
    </style:style>
    <style:style style:name="Table1.B1" style:family="table-cell">
      <style:table-cell-properties fo:padding-left="0.0799in" fo:padding-right="0.0799in" fo:padding-top="0.0799in" fo:padding-bottom="0.0201in" fo:border="0.5pt solid #000000" style:writing-mode="lr-tb"/>
    </style:style>
    <style:style style:name="Table2" style:family="table">
      <style:table-properties style:width="5.9778in" fo:margin-left="0.0035in" fo:margin-top="0in" fo:margin-bottom="0in" table:align="left" style:writing-mode="lr-tb"/>
    </style:style>
    <style:style style:name="Table2.A" style:family="table-column">
      <style:table-column-properties style:column-width="0.6215in"/>
    </style:style>
    <style:style style:name="Table2.B" style:family="table-column">
      <style:table-column-properties style:column-width="5.3563in"/>
    </style:style>
    <style:style style:name="Table2.1" style:family="table-row">
      <style:table-row-properties style:min-row-height="0.5257in" fo:keep-together="auto"/>
    </style:style>
    <style:style style:name="Table2.A1" style:family="table-cell">
      <style:table-cell-properties fo:background-color="#ffff00" fo:padding-left="0.075in" fo:padding-right="0.075in" fo:padding-top="0in" fo:padding-bottom="0in" fo:border="0.5pt solid #000000" style:writing-mode="lr-tb">
        <style:background-image/>
      </style:table-cell-properties>
    </style:style>
    <style:style style:name="Table2.B1" style:family="table-cell">
      <style:table-cell-properties fo:padding-left="0.0799in" fo:padding-right="0.0799in" fo:padding-top="0.0799in" fo:padding-bottom="0in" fo:border="0.5pt solid #000000" style:writing-mode="lr-tb"/>
    </style:style>
    <style:style style:name="Table3" style:family="table">
      <style:table-properties style:width="5.4375in" fo:margin-left="0.0625in" fo:margin-top="0in" fo:margin-bottom="0in" table:align="left" style:writing-mode="lr-tb"/>
    </style:style>
    <style:style style:name="Table3.A" style:family="table-column">
      <style:table-column-properties style:column-width="0.6292in"/>
    </style:style>
    <style:style style:name="Table3.B" style:family="table-column">
      <style:table-column-properties style:column-width="4.8083in"/>
    </style:style>
    <style:style style:name="Table3.1" style:family="table-row">
      <style:table-row-properties style:min-row-height="0.5257in" fo:keep-together="auto"/>
    </style:style>
    <style:style style:name="Table3.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3.B1" style:family="table-cell">
      <style:table-cell-properties fo:padding-left="0.0799in" fo:padding-right="0.0799in" fo:padding-top="0.0799in" fo:padding-bottom="0.0201in" fo:border="0.5pt solid #000000" style:writing-mode="lr-tb"/>
    </style:style>
    <style:style style:name="Table4" style:family="table">
      <style:table-properties style:width="5.9778in" fo:margin-left="0.0035in" fo:margin-top="0in" fo:margin-bottom="0in" table:align="left" style:writing-mode="lr-tb"/>
    </style:style>
    <style:style style:name="Table4.A" style:family="table-column">
      <style:table-column-properties style:column-width="0.6215in"/>
    </style:style>
    <style:style style:name="Table4.B" style:family="table-column">
      <style:table-column-properties style:column-width="5.3563in"/>
    </style:style>
    <style:style style:name="Table4.1" style:family="table-row">
      <style:table-row-properties style:min-row-height="0.5257in" fo:keep-together="auto"/>
    </style:style>
    <style:style style:name="Table4.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4.B1" style:family="table-cell">
      <style:table-cell-properties fo:padding="0.0799in" fo:border="0.5pt solid #000000" style:writing-mode="lr-tb"/>
    </style:style>
    <style:style style:name="Table5" style:family="table">
      <style:table-properties style:width="5.4375in" fo:margin-left="0.5625in" fo:margin-top="0in" fo:margin-bottom="0in" table:align="left" style:writing-mode="lr-tb"/>
    </style:style>
    <style:style style:name="Table5.A" style:family="table-column">
      <style:table-column-properties style:column-width="0.6292in"/>
    </style:style>
    <style:style style:name="Table5.B" style:family="table-column">
      <style:table-column-properties style:column-width="4.8083in"/>
    </style:style>
    <style:style style:name="Table5.1" style:family="table-row">
      <style:table-row-properties style:min-row-height="0.5257in" fo:keep-together="auto"/>
    </style:style>
    <style:style style:name="Table5.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5.B1" style:family="table-cell">
      <style:table-cell-properties fo:padding-left="0.0799in" fo:padding-right="0.0799in" fo:padding-top="0.0799in" fo:padding-bottom="0.0201in" fo:border="0.5pt solid #000000" style:writing-mode="lr-tb"/>
    </style:style>
    <style:style style:name="Table6" style:family="table">
      <style:table-properties style:width="5.9778in" fo:margin-left="0.0035in" fo:margin-top="0in" fo:margin-bottom="0in" table:align="left" style:writing-mode="lr-tb"/>
    </style:style>
    <style:style style:name="Table6.A" style:family="table-column">
      <style:table-column-properties style:column-width="0.6215in"/>
    </style:style>
    <style:style style:name="Table6.B" style:family="table-column">
      <style:table-column-properties style:column-width="5.3563in"/>
    </style:style>
    <style:style style:name="Table6.1" style:family="table-row">
      <style:table-row-properties style:min-row-height="0.5257in" fo:keep-together="auto"/>
    </style:style>
    <style:style style:name="Table6.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6.B1" style:family="table-cell">
      <style:table-cell-properties fo:padding="0.0799in" fo:border="0.5pt solid #000000" style:writing-mode="lr-tb"/>
    </style:style>
    <style:style style:name="Table7" style:family="table">
      <style:table-properties style:width="5.3125in" fo:margin-left="0.5in" fo:margin-top="0in" fo:margin-bottom="0in" table:align="left" style:writing-mode="lr-tb"/>
    </style:style>
    <style:style style:name="Table7.A" style:family="table-column">
      <style:table-column-properties style:column-width="0.6215in"/>
    </style:style>
    <style:style style:name="Table7.B" style:family="table-column">
      <style:table-column-properties style:column-width="4.691in"/>
    </style:style>
    <style:style style:name="Table7.1" style:family="table-row">
      <style:table-row-properties style:min-row-height="0.5257in" fo:keep-together="auto"/>
    </style:style>
    <style:style style:name="Table7.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7.B1" style:family="table-cell">
      <style:table-cell-properties fo:padding="0.0799in" fo:border="0.5pt solid #000000" style:writing-mode="lr-tb"/>
    </style:style>
    <style:style style:name="Table8" style:family="table">
      <style:table-properties style:width="5.4375in" fo:margin-left="0.25in" fo:margin-top="0in" fo:margin-bottom="0in" table:align="left" style:writing-mode="lr-tb"/>
    </style:style>
    <style:style style:name="Table8.A" style:family="table-column">
      <style:table-column-properties style:column-width="0.6292in"/>
    </style:style>
    <style:style style:name="Table8.B" style:family="table-column">
      <style:table-column-properties style:column-width="4.8083in"/>
    </style:style>
    <style:style style:name="Table8.1" style:family="table-row">
      <style:table-row-properties style:min-row-height="0.5257in" fo:keep-together="auto"/>
    </style:style>
    <style:style style:name="Table8.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8.B1" style:family="table-cell">
      <style:table-cell-properties fo:padding-left="0.0799in" fo:padding-right="0.0799in" fo:padding-top="0.0799in" fo:padding-bottom="0.0201in" fo:border="0.5pt solid #000000" style:writing-mode="lr-tb"/>
    </style:style>
    <style:style style:name="Table9" style:family="table">
      <style:table-properties style:width="5.6875in" fo:margin-left="0.25in" fo:margin-top="0in" fo:margin-bottom="0in" table:align="left" style:writing-mode="lr-tb"/>
    </style:style>
    <style:style style:name="Table9.A" style:family="table-column">
      <style:table-column-properties style:column-width="0.6292in"/>
    </style:style>
    <style:style style:name="Table9.B" style:family="table-column">
      <style:table-column-properties style:column-width="5.0583in"/>
    </style:style>
    <style:style style:name="Table9.1" style:family="table-row">
      <style:table-row-properties style:min-row-height="0.5257in" fo:keep-together="auto"/>
    </style:style>
    <style:style style:name="Table9.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9.B1" style:family="table-cell">
      <style:table-cell-properties fo:padding-left="0.0799in" fo:padding-right="0.0799in" fo:padding-top="0.0799in" fo:padding-bottom="0.0201in" fo:border="0.5pt solid #000000" style:writing-mode="lr-tb"/>
    </style:style>
    <style:style style:name="Table10" style:family="table">
      <style:table-properties style:width="4.9965in" fo:margin-top="0in" fo:margin-bottom="0in" table:align="center" style:writing-mode="lr-tb"/>
    </style:style>
    <style:style style:name="Table10.A" style:family="table-column">
      <style:table-column-properties style:column-width="1.0826in"/>
    </style:style>
    <style:style style:name="Table10.B" style:family="table-column">
      <style:table-column-properties style:column-width="3.9139in"/>
    </style:style>
    <style:style style:name="Table10.1" style:family="table-row">
      <style:table-row-properties fo:keep-together="auto"/>
    </style:style>
    <style:style style:name="Table10.A1" style:family="table-cell">
      <style:table-cell-properties style:vertical-align="middle" fo:background-color="#dbe5f1" fo:padding-left="0.075in" fo:padding-right="0.075in" fo:padding-top="0.0396in" fo:padding-bottom="0.0396in" fo:border="0.5pt solid #000000" style:writing-mode="lr-tb">
        <style:background-image/>
      </style:table-cell-properties>
    </style:style>
    <style:style style:name="Table10.A2" style:family="table-cell">
      <style:table-cell-properties style:vertical-align="middle" fo:padding-left="0.075in" fo:padding-right="0.075in" fo:padding-top="0.0396in" fo:padding-bottom="0.0396in" fo:border="0.5pt solid #000000" style:writing-mode="lr-tb"/>
    </style:style>
    <style:style style:name="Table10.B2" style:family="table-cell">
      <style:table-cell-properties style:vertical-align="middle" fo:padding-left="0.075in" fo:padding-right="0.075in" fo:padding-top="0.0396in" fo:padding-bottom="0.0396in" fo:border="0.5pt solid #000000" style:writing-mode="lr-tb"/>
    </style:style>
    <style:style style:name="Table10.A3" style:family="table-cell">
      <style:table-cell-properties style:vertical-align="middle" fo:padding-left="0.075in" fo:padding-right="0.075in" fo:padding-top="0.0396in" fo:padding-bottom="0.0396in" fo:border="0.5pt solid #000000" style:writing-mode="lr-tb"/>
    </style:style>
    <style:style style:name="Table10.B3" style:family="table-cell">
      <style:table-cell-properties style:vertical-align="middle" fo:padding-left="0.075in" fo:padding-right="0.075in" fo:padding-top="0.0396in" fo:padding-bottom="0.0396in" fo:border="0.5pt solid #000000" style:writing-mode="lr-tb"/>
    </style:style>
    <style:style style:name="Table10.A4" style:family="table-cell">
      <style:table-cell-properties style:vertical-align="middle" fo:padding-left="0.075in" fo:padding-right="0.075in" fo:padding-top="0.0396in" fo:padding-bottom="0.0396in" fo:border="0.5pt solid #000000" style:writing-mode="lr-tb"/>
    </style:style>
    <style:style style:name="Table10.B4" style:family="table-cell">
      <style:table-cell-properties style:vertical-align="middle" fo:padding-left="0.075in" fo:padding-right="0.075in" fo:padding-top="0.0396in" fo:padding-bottom="0.0396in" fo:border="0.5pt solid #000000" style:writing-mode="lr-tb"/>
    </style:style>
    <style:style style:name="Table10.A5" style:family="table-cell">
      <style:table-cell-properties style:vertical-align="middle" fo:padding-left="0.075in" fo:padding-right="0.075in" fo:padding-top="0.0396in" fo:padding-bottom="0.0396in" fo:border="0.5pt solid #000000" style:writing-mode="lr-tb"/>
    </style:style>
    <style:style style:name="Table10.B5" style:family="table-cell">
      <style:table-cell-properties style:vertical-align="middle" fo:padding-left="0.075in" fo:padding-right="0.075in" fo:padding-top="0.0396in" fo:padding-bottom="0.0396in" fo:border="0.5pt solid #000000" style:writing-mode="lr-tb"/>
    </style:style>
    <style:style style:name="Table10.A6" style:family="table-cell">
      <style:table-cell-properties style:vertical-align="middle" fo:padding-left="0.075in" fo:padding-right="0.075in" fo:padding-top="0.0396in" fo:padding-bottom="0.0396in" fo:border="0.5pt solid #000000" style:writing-mode="lr-tb"/>
    </style:style>
    <style:style style:name="Table10.B6" style:family="table-cell">
      <style:table-cell-properties style:vertical-align="middle" fo:padding-left="0.075in" fo:padding-right="0.075in" fo:padding-top="0.0396in" fo:padding-bottom="0.0396in" fo:border="0.5pt solid #000000" style:writing-mode="lr-tb"/>
    </style:style>
    <style:style style:name="Table10.A7" style:family="table-cell">
      <style:table-cell-properties style:vertical-align="middle" fo:padding-left="0.075in" fo:padding-right="0.075in" fo:padding-top="0.0396in" fo:padding-bottom="0.0396in" fo:border="0.5pt solid #000000" style:writing-mode="lr-tb"/>
    </style:style>
    <style:style style:name="Table10.B7" style:family="table-cell">
      <style:table-cell-properties style:vertical-align="middle" fo:padding-left="0.075in" fo:padding-right="0.075in" fo:padding-top="0.0396in" fo:padding-bottom="0.0396in" fo:border="0.5pt solid #000000" style:writing-mode="lr-tb"/>
    </style:style>
    <style:style style:name="Table10.A8" style:family="table-cell">
      <style:table-cell-properties style:vertical-align="middle" fo:padding-left="0.075in" fo:padding-right="0.075in" fo:padding-top="0.0396in" fo:padding-bottom="0.0396in" fo:border="0.5pt solid #000000" style:writing-mode="lr-tb"/>
    </style:style>
    <style:style style:name="Table10.B8" style:family="table-cell">
      <style:table-cell-properties style:vertical-align="middle" fo:padding-left="0.075in" fo:padding-right="0.075in" fo:padding-top="0.0396in" fo:padding-bottom="0.0396in" fo:border="0.5pt solid #000000" style:writing-mode="lr-tb"/>
    </style:style>
    <style:style style:name="Table10.A9" style:family="table-cell">
      <style:table-cell-properties style:vertical-align="middle" fo:padding-left="0.075in" fo:padding-right="0.075in" fo:padding-top="0.0396in" fo:padding-bottom="0.0396in" fo:border="0.5pt solid #000000" style:writing-mode="lr-tb"/>
    </style:style>
    <style:style style:name="Table10.B9" style:family="table-cell">
      <style:table-cell-properties style:vertical-align="middle" fo:padding-left="0.075in" fo:padding-right="0.075in" fo:padding-top="0.0396in" fo:padding-bottom="0.0396in" fo:border="0.5pt solid #000000" style:writing-mode="lr-tb"/>
    </style:style>
    <style:style style:name="Table10.A10" style:family="table-cell">
      <style:table-cell-properties style:vertical-align="middle" fo:padding-left="0.075in" fo:padding-right="0.075in" fo:padding-top="0.0396in" fo:padding-bottom="0.0396in" fo:border="0.5pt solid #000000" style:writing-mode="lr-tb"/>
    </style:style>
    <style:style style:name="Table10.B10" style:family="table-cell">
      <style:table-cell-properties style:vertical-align="middle" fo:padding-left="0.075in" fo:padding-right="0.075in" fo:padding-top="0.0396in" fo:padding-bottom="0.0396in" fo:border="0.5pt solid #000000" style:writing-mode="lr-tb"/>
    </style:style>
    <style:style style:name="Table11" style:family="table">
      <style:table-properties style:width="5.3125in" fo:margin-left="0.5in" fo:margin-top="0in" fo:margin-bottom="0in" table:align="left" style:writing-mode="lr-tb"/>
    </style:style>
    <style:style style:name="Table11.A" style:family="table-column">
      <style:table-column-properties style:column-width="0.6215in"/>
    </style:style>
    <style:style style:name="Table11.B" style:family="table-column">
      <style:table-column-properties style:column-width="4.691in"/>
    </style:style>
    <style:style style:name="Table11.1" style:family="table-row">
      <style:table-row-properties style:min-row-height="0.5257in" fo:keep-together="auto"/>
    </style:style>
    <style:style style:name="Table11.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11.B1" style:family="table-cell">
      <style:table-cell-properties fo:padding="0.0799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fo:text-align="center" style:justify-single-word="false"/>
      <style:text-properties fo:language="en" fo:country="GB" fo:font-style="italic" style:font-style-asian="italic"/>
    </style:style>
    <style:style style:name="P5" style:family="paragraph" style:parent-style-name="Standard">
      <style:text-properties style:font-name="Calibri1" fo:language="en" fo:country="GB"/>
    </style:style>
    <style:style style:name="P6" style:family="paragraph" style:parent-style-name="Standard">
      <style:paragraph-properties fo:margin-top="0in" fo:margin-bottom="0in" style:contextual-spacing="false" fo:break-before="page"/>
      <style:text-properties fo:language="en" fo:country="GB"/>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style>
    <style:style style:name="P9" style:family="paragraph" style:parent-style-name="Standard">
      <style:paragraph-properties fo:text-align="center" style:justify-single-word="false"/>
      <style:text-properties fo:font-size="16pt" style:font-size-asian="16pt"/>
    </style:style>
    <style:style style:name="P10" style:family="paragraph" style:parent-style-name="Standard">
      <style:paragraph-properties fo:text-align="center" style:justify-single-word="false"/>
      <style:text-properties fo:font-size="11pt" fo:font-style="italic" style:font-size-asian="11pt" style:font-style-asian="italic"/>
    </style:style>
    <style:style style:name="P11" style:family="paragraph" style:parent-style-name="Standard">
      <style:paragraph-properties fo:margin-top="0in" fo:margin-bottom="0in" style:contextual-spacing="false" fo:text-align="center" style:justify-single-word="false" fo:break-before="page"/>
    </style:style>
    <style:style style:name="P12" style:family="paragraph" style:parent-style-name="Standard">
      <style:paragraph-properties fo:text-align="center" style:justify-single-word="false"/>
      <style:text-properties style:font-name="Calibri1" fo:font-size="16pt" fo:language="en" fo:country="GB" fo:font-weight="bold" style:font-size-asian="16pt" style:font-weight-asian="bold" style:font-size-complex="16pt"/>
    </style:style>
    <style:style style:name="P13" style:family="paragraph" style:parent-style-name="Standard">
      <style:text-properties style:font-name="Calibri1" fo:font-size="16pt" fo:language="en" fo:country="GB" fo:font-weight="bold" style:font-size-asian="16pt" style:font-weight-asian="bold" style:font-size-complex="16pt"/>
    </style:style>
    <style:style style:name="P14" style:family="paragraph" style:parent-style-name="Standard">
      <style:text-properties style:font-name="Calibri1"/>
    </style:style>
    <style:style style:name="P15" style:family="paragraph" style:parent-style-name="Standard">
      <style:paragraph-properties fo:margin-top="0.0835in" fo:margin-bottom="0in" style:contextual-spacing="false">
        <style:tab-stops>
          <style:tab-stop style:position="5.3126in"/>
        </style:tab-stops>
      </style:paragraph-properties>
    </style:style>
    <style:style style:name="P16" style:family="paragraph" style:parent-style-name="Standard">
      <style:paragraph-properties fo:margin-top="0.1665in" fo:margin-bottom="0in" style:contextual-spacing="false"/>
    </style:style>
    <style:style style:name="P17" style:family="paragraph" style:parent-style-name="Standard">
      <style:paragraph-properties fo:margin-top="0.0835in" fo:margin-bottom="0in" style:contextual-spacing="false"/>
    </style:style>
    <style:style style:name="P18" style:family="paragraph" style:parent-style-name="Standard">
      <style:text-properties fo:font-size="16pt" fo:language="en" fo:country="US" fo:font-weight="bold" style:letter-kerning="true" style:font-size-asian="16pt" style:font-weight-asian="bold" style:font-name-complex="Arial1" style:font-size-complex="16pt" style:font-weight-complex="bold"/>
    </style:style>
    <style:style style:name="P19" style:family="paragraph" style:parent-style-name="Standard">
      <style:paragraph-properties fo:text-align="center" style:justify-single-word="false"/>
      <style:text-properties fo:font-size="20pt" fo:font-weight="bold" style:font-size-asian="20pt" style:font-weight-asian="bold" style:font-name-complex="Calibri2" style:font-size-complex="20pt"/>
    </style:style>
    <style:style style:name="P20" style:family="paragraph" style:parent-style-name="Standard">
      <style:text-properties fo:font-size="4pt" style:font-size-asian="4pt" style:font-name-complex="Calibri2" style:font-size-complex="4pt"/>
    </style:style>
    <style:style style:name="P21" style:family="paragraph" style:parent-style-name="Standard">
      <style:text-properties fo:font-size="2pt" style:font-size-asian="2pt" style:font-name-complex="Calibri2" style:font-size-complex="2pt"/>
    </style:style>
    <style:style style:name="P22" style:family="paragraph" style:parent-style-name="Standard">
      <style:paragraph-properties>
        <style:tab-stops>
          <style:tab-stop style:position="3.4063in"/>
        </style:tab-stops>
      </style:paragraph-properties>
    </style:style>
    <style:style style:name="P23" style:family="paragraph" style:parent-style-name="Standard">
      <style:paragraph-properties>
        <style:tab-stops>
          <style:tab-stop style:position="3.4063in"/>
        </style:tab-stops>
      </style:paragraph-properties>
      <style:text-properties fo:font-size="4pt" style:font-size-asian="4pt" style:font-name-complex="Calibri2" style:font-size-complex="4pt"/>
    </style:style>
    <style:style style:name="P24" style:family="paragraph" style:parent-style-name="Standard">
      <style:paragraph-properties fo:margin-top="0in" fo:margin-bottom="0in" style:contextual-spacing="false" fo:text-align="left" style:justify-single-word="false" fo:orphans="2" fo:widows="2">
        <style:tab-stops>
          <style:tab-stop style:position="3.4063in"/>
        </style:tab-stops>
      </style:paragraph-properties>
      <style:text-properties style:letter-kerning="false" style:font-name-asian="Times New Roman1" style:font-name-complex="Times New Roman1" style:language-complex="ar" style:country-complex="SA"/>
    </style:style>
    <style:style style:name="P25" style:family="paragraph" style:parent-style-name="Standard">
      <style:paragraph-properties>
        <style:tab-stops>
          <style:tab-stop style:position="3.4063in"/>
        </style:tab-stops>
      </style:paragraph-properties>
      <style:text-properties fo:font-size="1pt" style:font-size-asian="1pt" style:font-name-complex="Calibri2" style:font-size-complex="1pt"/>
    </style:style>
    <style:style style:name="P26" style:family="paragraph" style:parent-style-name="Standard">
      <style:paragraph-properties>
        <style:tab-stops>
          <style:tab-stop style:position="3.4063in"/>
        </style:tab-stops>
      </style:paragraph-properties>
      <style:text-properties fo:font-size="4pt" fo:font-weight="bold" style:font-size-asian="4pt" style:font-weight-asian="bold" style:font-name-complex="Calibri2" style:font-size-complex="4pt"/>
    </style:style>
    <style:style style:name="P27" style:family="paragraph" style:parent-style-name="Heading_20_1">
      <style:paragraph-properties fo:text-indent="-0.248in" style:auto-text-indent="false" fo:break-before="page"/>
    </style:style>
    <style:style style:name="P28" style:family="paragraph" style:parent-style-name="Standard">
      <style:paragraph-properties fo:margin-left="0.4917in" fo:margin-right="0.3736in"/>
    </style:style>
    <style:style style:name="P29" style:family="paragraph" style:parent-style-name="Footnote">
      <style:paragraph-properties fo:margin-top="0.0835in" fo:margin-bottom="0in" style:contextual-spacing="false"/>
    </style:style>
    <style:style style:name="P30" style:family="paragraph">
      <loext:graphic-properties draw:fill="none"/>
      <style:paragraph-properties fo:text-align="center"/>
    </style:style>
    <style:style style:name="P31" style:family="paragraph">
      <loext:graphic-properties draw:fill="solid" draw:fill-color="#ffffff"/>
      <style:paragraph-properties fo:text-align="left"/>
      <style:text-properties fo:font-size="18pt"/>
    </style:style>
    <style:style style:name="P32" style:family="paragraph" style:parent-style-name="Standard">
      <style:paragraph-properties fo:margin-top="0.0835in" fo:margin-bottom="0in" style:contextual-spacing="false"/>
      <style:text-properties style:font-name="Calibri1"/>
    </style:style>
    <style:style style:name="P33" style:family="paragraph" style:parent-style-name="List_20_Paragraph" style:list-style-name="WWNum11">
      <style:paragraph-properties fo:margin-top="0.0835in" fo:margin-bottom="0in" style:contextual-spacing="true"/>
    </style:style>
    <style:style style:name="P34" style:family="paragraph" style:parent-style-name="Heading_20_2">
      <style:paragraph-properties fo:margin-left="0.0984in" fo:text-indent="-0.3484in" style:auto-text-indent="false">
        <style:tab-stops>
          <style:tab-stop style:position="0.1972in"/>
        </style:tab-stops>
      </style:paragraph-properties>
    </style:style>
    <style:style style:name="P35" style:family="paragraph" style:parent-style-name="Standard">
      <style:paragraph-properties fo:text-indent="0.4917in" style:auto-text-indent="false"/>
    </style:style>
    <style:style style:name="P36" style:family="paragraph" style:parent-style-name="Standard">
      <style:paragraph-properties fo:margin-top="0.0835in" fo:margin-bottom="0.25in" style:contextual-spacing="false"/>
    </style:style>
    <style:style style:name="P37" style:family="paragraph" style:parent-style-name="List_20_Paragraph" style:list-style-name="WWNum20">
      <style:paragraph-properties fo:keep-with-next="always"/>
    </style:style>
    <style:style style:name="P38" style:family="paragraph" style:parent-style-name="List_20_Paragraph" style:list-style-name="WWNum20">
      <style:paragraph-properties fo:margin-top="0.0835in" fo:margin-bottom="0in" style:contextual-spacing="false" fo:keep-with-next="always"/>
    </style:style>
    <style:style style:name="P39" style:family="paragraph" style:parent-style-name="List_20_Paragraph">
      <style:paragraph-properties fo:margin-left="0.25in" fo:keep-with-next="always"/>
      <style:text-properties style:font-name="Calibri1"/>
    </style:style>
    <style:style style:name="P40" style:family="paragraph" style:parent-style-name="List_20_Paragraph">
      <style:text-properties style:font-name="Calibri1"/>
    </style:style>
    <style:style style:name="P41" style:family="paragraph" style:parent-style-name="List_20_Paragraph">
      <style:text-properties style:font-name="Calibri1" fo:language="en" fo:country="GB"/>
    </style:style>
    <style:style style:name="P42" style:family="paragraph" style:parent-style-name="List_20_Paragraph" style:list-style-name="WWNum20">
      <style:paragraph-properties fo:margin-left="0.248in" fo:text-indent="-0.248in" style:auto-text-indent="false"/>
    </style:style>
    <style:style style:name="P43" style:family="paragraph" style:parent-style-name="List_20_Paragraph" style:list-style-name="WWNum20"/>
    <style:style style:name="P44" style:family="paragraph" style:parent-style-name="Standard">
      <style:paragraph-properties fo:margin-left="0.25in"/>
    </style:style>
    <style:style style:name="P45" style:family="paragraph" style:parent-style-name="Standard">
      <style:paragraph-properties fo:margin-left="0.25in" fo:text-align="center" style:justify-single-word="false"/>
    </style:style>
    <style:style style:name="P46" style:family="paragraph" style:parent-style-name="Standard">
      <style:paragraph-properties fo:margin-left="0.25in"/>
      <style:text-properties fo:language="en" fo:country="GB"/>
    </style:style>
    <style:style style:name="P47" style:family="paragraph" style:parent-style-name="Standard">
      <loext:graphic-properties draw:fill="solid" draw:fill-color="#f2f2f2"/>
      <style:paragraph-properties fo:background-color="#f2f2f2" fo:padding="0.0835in" fo:border="0.51pt solid #ffffff" style:shadow="none"/>
    </style:style>
    <style:style style:name="P48" style:family="paragraph" style:parent-style-name="Heading_20_1">
      <style:paragraph-properties fo:keep-together="always"/>
    </style:style>
    <style:style style:name="P49" style:family="paragraph" style:parent-style-name="Standard">
      <style:paragraph-properties fo:keep-with-next="always"/>
      <style:text-properties fo:language="en" fo:country="GB"/>
    </style:style>
    <style:style style:name="P50" style:family="paragraph" style:parent-style-name="Standard">
      <style:paragraph-properties fo:keep-with-next="always"/>
    </style:style>
    <style:style style:name="P51" style:family="paragraph" style:parent-style-name="Standard">
      <style:paragraph-properties fo:margin-top="0in" fo:margin-bottom="0in" style:contextual-spacing="false" fo:text-align="left" style:justify-single-word="false" fo:orphans="2" fo:widows="2">
        <style:tab-stops>
          <style:tab-stop style:position="3.4063in"/>
        </style:tab-stops>
      </style:paragraph-properties>
      <style:text-properties fo:font-style="italic" style:letter-kerning="false" style:font-name-asian="Times New Roman1" style:font-style-asian="italic" style:font-name-complex="Calibri2" style:language-complex="ar" style:country-complex="SA"/>
    </style:style>
    <style:style style:name="P52" style:family="paragraph" style:parent-style-name="Standard">
      <style:paragraph-properties fo:margin-left="0.4917in" fo:margin-top="0.0835in" fo:margin-bottom="0in" style:contextual-spacing="false"/>
    </style:style>
    <style:style style:name="P53" style:family="paragraph" style:parent-style-name="List_20_Paragraph" style:list-style-name="WWNum12">
      <style:paragraph-properties fo:margin-left="0.4957in" fo:margin-top="0.1665in" fo:margin-bottom="0in" style:contextual-spacing="false" fo:text-indent="-0.248in" style:auto-text-indent="false"/>
    </style:style>
    <style:style style:name="P54" style:family="paragraph" style:parent-style-name="Standard">
      <style:paragraph-properties fo:margin-top="0.1665in" fo:margin-bottom="0in" style:contextual-spacing="false"/>
      <style:text-properties fo:font-size="8pt" style:font-size-asian="8pt" style:font-size-complex="8pt"/>
    </style:style>
    <style:style style:name="P55" style:family="paragraph" style:parent-style-name="List_20_Paragraph" style:list-style-name="WWNum12">
      <style:paragraph-properties fo:margin-left="0.4957in" fo:margin-top="0.0835in" fo:margin-bottom="0in" style:contextual-spacing="false" fo:text-indent="-0.248in" style:auto-text-indent="false"/>
    </style:style>
    <style:style style:name="P56" style:family="paragraph" style:parent-style-name="Standard">
      <style:paragraph-properties fo:margin-top="0.25in" fo:margin-bottom="0.1945in" style:contextual-spacing="false"/>
    </style:style>
    <style:style style:name="P57" style:family="paragraph" style:parent-style-name="Standard">
      <style:paragraph-properties fo:margin-top="0.25in" fo:margin-bottom="0in" style:contextual-spacing="false"/>
    </style:style>
    <style:style style:name="P58" style:family="paragraph" style:parent-style-name="Heading_20_3">
      <style:paragraph-properties fo:margin-left="0.3508in" fo:keep-together="always" fo:text-indent="-0.3508in" style:auto-text-indent="false"/>
    </style:style>
    <style:style style:name="P59" style:family="paragraph" style:parent-style-name="List_20_Paragraph" style:list-style-name="WWNum38">
      <style:paragraph-properties fo:keep-together="always" fo:keep-with-next="always"/>
    </style:style>
    <style:style style:name="P60" style:family="paragraph" style:parent-style-name="List_20_Paragraph">
      <style:paragraph-properties fo:keep-together="always" fo:keep-with-next="always"/>
    </style:style>
    <style:style style:name="P61" style:family="paragraph" style:parent-style-name="List_20_Paragraph">
      <style:text-properties fo:language="en" fo:country="GB" fo:font-weight="bold" style:font-weight-asian="bold"/>
    </style:style>
    <style:style style:name="P62" style:family="paragraph" style:parent-style-name="List_20_Paragraph" style:list-style-name="WWNum38"/>
    <style:style style:name="P63" style:family="paragraph" style:parent-style-name="Standard">
      <style:text-properties fo:language="en" fo:country="GB" fo:font-weight="bold" style:font-weight-asian="bold"/>
    </style:style>
    <style:style style:name="P64" style:family="paragraph" style:parent-style-name="Standard">
      <style:paragraph-properties fo:margin-left="0.4917in"/>
    </style:style>
    <style:style style:name="P65" style:family="paragraph" style:parent-style-name="Standard">
      <style:paragraph-properties>
        <style:tab-stops>
          <style:tab-stop style:position="4.2083in"/>
        </style:tab-stops>
      </style:paragraph-properties>
    </style:style>
    <style:style style:name="P66" style:family="paragraph" style:parent-style-name="List_20_Paragraph">
      <style:text-properties fo:font-size="4pt" style:font-size-asian="4pt" style:font-size-complex="4pt"/>
    </style:style>
    <style:style style:name="P67" style:family="paragraph" style:parent-style-name="List_20_Paragraph">
      <style:paragraph-properties fo:text-align="center" style:justify-single-word="false"/>
    </style:style>
    <style:style style:name="P68" style:family="paragraph" style:parent-style-name="List_20_Paragraph">
      <style:text-properties fo:language="en" fo:country="GB"/>
    </style:style>
    <style:style style:name="P69" style:family="paragraph" style:parent-style-name="Standard">
      <style:paragraph-properties fo:margin-top="0.1665in" fo:margin-bottom="0in" style:contextual-spacing="false" fo:keep-with-next="always"/>
    </style:style>
    <style:style style:name="P70" style:family="paragraph" style:parent-style-name="Standard">
      <style:paragraph-properties fo:margin-top="0.0835in" fo:margin-bottom="0in" style:contextual-spacing="false" fo:keep-with-next="always"/>
    </style:style>
    <style:style style:name="P71" style:family="paragraph" style:parent-style-name="List_20_Paragraph">
      <style:paragraph-properties fo:margin-top="0.0835in" fo:margin-bottom="0in" style:contextual-spacing="false"/>
    </style:style>
    <style:style style:name="P72" style:family="paragraph">
      <loext:graphic-properties draw:fill="none"/>
      <style:paragraph-properties fo:text-align="left"/>
      <style:text-properties fo:font-size="18pt"/>
    </style:style>
    <style:style style:name="P73" style:family="paragraph" style:parent-style-name="Standard">
      <style:paragraph-properties fo:margin-top="0.0835in" fo:margin-bottom="0.1945in" style:contextual-spacing="false"/>
    </style:style>
    <style:style style:name="P74" style:family="paragraph" style:parent-style-name="List_20_Paragraph" style:list-style-name="WWNum23">
      <style:paragraph-properties fo:margin-top="0.1945in" fo:margin-bottom="0in" style:contextual-spacing="true"/>
    </style:style>
    <style:style style:name="P75" style:family="paragraph" style:parent-style-name="Standard">
      <style:paragraph-properties fo:margin-top="0.1945in" fo:margin-bottom="0in" style:contextual-spacing="false" fo:text-indent="0.25in" style:auto-text-indent="false"/>
    </style:style>
    <style:style style:name="P76" style:family="paragraph" style:parent-style-name="Standard">
      <style:paragraph-properties fo:margin-top="0.1665in" fo:margin-bottom="0in" style:contextual-spacing="false" fo:text-align="center" style:justify-single-word="false"/>
    </style:style>
    <style:style style:name="P77" style:family="paragraph" style:parent-style-name="List_20_Paragraph" style:list-style-name="WWNum23">
      <style:paragraph-properties fo:margin-top="0.1665in" fo:margin-bottom="0in" style:contextual-spacing="true"/>
    </style:style>
    <style:style style:name="P78" style:family="paragraph" style:parent-style-name="List_20_Paragraph">
      <style:paragraph-properties fo:margin-left="0.25in" fo:margin-top="0.1665in" fo:margin-bottom="0in" style:contextual-spacing="true"/>
    </style:style>
    <style:style style:name="P79" style:family="paragraph" style:parent-style-name="List_20_Paragraph">
      <style:paragraph-properties fo:margin-left="0.25in" fo:margin-top="0.1665in" fo:margin-bottom="0in" style:contextual-spacing="true" fo:text-indent="-0.25in" style:auto-text-indent="false"/>
    </style:style>
    <style:style style:name="P80" style:family="paragraph" style:parent-style-name="List_20_Paragraph">
      <style:paragraph-properties fo:margin-left="0.4925in" fo:margin-top="0.0835in" fo:margin-bottom="0in" style:contextual-spacing="false"/>
    </style:style>
    <style:style style:name="P81" style:family="paragraph" style:parent-style-name="List_20_Paragraph">
      <style:paragraph-properties fo:margin-left="0.4917in" fo:margin-top="0.1665in" fo:margin-bottom="0in" style:contextual-spacing="true"/>
    </style:style>
    <style:style style:name="P82" style:family="paragraph" style:parent-style-name="List_20_Paragraph">
      <style:paragraph-properties fo:margin-left="0.25in" fo:text-align="justify" style:justify-single-word="false" loext:word-spacing-minimum="75%" loext:word-spacing-maximum="133%"/>
    </style:style>
    <style:style style:name="P83" style:family="paragraph" style:parent-style-name="List_20_Paragraph">
      <style:paragraph-properties fo:margin-left="0in" fo:margin-top="0.1665in" fo:margin-bottom="0in" style:contextual-spacing="true"/>
    </style:style>
    <style:style style:name="P84" style:family="paragraph" style:parent-style-name="Standard">
      <style:paragraph-properties fo:margin-top="0.0835in" fo:margin-bottom="0in" style:contextual-spacing="false" fo:keep-with-next="always"/>
      <style:text-properties fo:language="en" fo:country="GB"/>
    </style:style>
    <style:style style:name="P85" style:family="paragraph" style:parent-style-name="Standard">
      <style:paragraph-properties fo:margin-top="0.0835in" fo:margin-bottom="0in" style:contextual-spacing="false" fo:text-align="center" style:justify-single-word="false" fo:keep-with-next="always"/>
    </style:style>
    <style:style style:name="P86" style:family="paragraph" style:parent-style-name="Standard">
      <style:paragraph-properties fo:margin-top="0in" fo:margin-bottom="0in" style:contextual-spacing="false" fo:text-align="center" style:justify-single-word="false" fo:orphans="2" fo:widows="2" fo:keep-with-next="always"/>
      <style:text-properties style:letter-kerning="false" style:font-name-asian="Times New Roman1" style:font-name-complex="Times New Roman1" style:language-complex="ar" style:country-complex="SA"/>
    </style:style>
    <style:style style:name="P87" style:family="paragraph" style:parent-style-name="Standard">
      <style:paragraph-properties fo:margin-top="0in" fo:margin-bottom="0in" style:contextual-spacing="false" fo:text-align="left" style:justify-single-word="false" fo:orphans="2" fo:widows="2" fo:keep-with-next="always"/>
      <style:text-properties style:letter-kerning="false" style:font-name-asian="Times New Roman1" style:font-name-complex="Times New Roman1" style:language-complex="ar" style:country-complex="SA"/>
    </style:style>
    <style:style style:name="P88" style:family="paragraph" style:parent-style-name="Standard">
      <style:paragraph-properties fo:margin-top="0in" fo:margin-bottom="0in" style:contextual-spacing="false" fo:text-align="center" style:justify-single-word="false" fo:orphans="2" fo:widows="2"/>
      <style:text-properties style:letter-kerning="false" style:font-name-asian="Times New Roman1" style:font-name-complex="Times New Roman1" style:language-complex="ar" style:country-complex="SA"/>
    </style:style>
    <style:style style:name="P89"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90" style:family="paragraph" style:parent-style-name="List_20_Paragraph" style:list-style-name="WWNum35">
      <style:paragraph-properties fo:margin-top="0.1665in" fo:margin-bottom="0in" style:contextual-spacing="true"/>
    </style:style>
    <style:style style:name="P91" style:family="paragraph" style:parent-style-name="List_20_Paragraph" style:list-style-name="WWNum35">
      <style:paragraph-properties fo:margin-top="0.0835in" fo:margin-bottom="0in" style:contextual-spacing="false"/>
    </style:style>
    <style:style style:name="P92" style:family="paragraph" style:parent-style-name="List_20_Paragraph">
      <style:paragraph-properties fo:margin-top="0.0835in" fo:margin-bottom="0in" style:contextual-spacing="false"/>
      <style:text-properties fo:language="en" fo:country="GB"/>
    </style:style>
    <style:style style:name="P93" style:family="paragraph" style:parent-style-name="List_20_Paragraph" style:list-style-name="WWNum37">
      <style:paragraph-properties fo:margin-top="0.1665in" fo:margin-bottom="0in" style:contextual-spacing="true"/>
    </style:style>
    <style:style style:name="P94" style:family="paragraph" style:parent-style-name="List_20_Paragraph" style:list-style-name="WWNum37">
      <style:paragraph-properties fo:margin-top="0.0835in" fo:margin-bottom="0in" style:contextual-spacing="false"/>
    </style:style>
    <style:style style:name="P95"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2pt" fo:font-weight="bold" style:font-size-asian="32pt" style:font-weight-asian="bold" style:font-size-complex="32pt"/>
    </style:style>
    <style:style style:name="T3" style:family="text">
      <style:text-properties fo:font-size="32pt" style:font-size-asian="32pt" style:font-size-complex="32pt"/>
    </style:style>
    <style:style style:name="T4" style:family="text">
      <style:text-properties fo:font-style="italic" style:font-style-asian="italic"/>
    </style:style>
    <style:style style:name="T5" style:family="text">
      <style:text-properties fo:language="en" fo:country="GB" fo:font-style="italic" style:font-style-asian="italic"/>
    </style:style>
    <style:style style:name="T6" style:family="text">
      <style:text-properties style:font-name="Calibri1" fo:language="en" fo:country="GB"/>
    </style:style>
    <style:style style:name="T7" style:family="text">
      <style:text-properties fo:language="en" fo:country="GB"/>
    </style:style>
    <style:style style:name="T8" style:family="text">
      <style:text-properties fo:font-size="16pt" style:font-size-asian="16pt"/>
    </style:style>
    <style:style style:name="T9" style:family="text">
      <style:text-properties fo:font-size="11pt" fo:font-style="italic" style:font-size-asian="11pt" style:font-style-asian="italic"/>
    </style:style>
    <style:style style:name="T10" style:family="text">
      <style:text-properties style:font-name="Calibri1" fo:font-size="16pt" fo:language="en" fo:country="GB" fo:font-weight="bold" style:font-size-asian="16pt" style:font-weight-asian="bold" style:font-size-complex="16pt"/>
    </style:style>
    <style:style style:name="T11" style:family="text">
      <style:text-properties style:font-name="Calibri1" fo:font-size="20pt" fo:language="en" fo:country="GB" fo:font-weight="bold" style:font-size-asian="20pt" style:font-weight-asian="bold" style:font-size-complex="16pt"/>
    </style:style>
    <style:style style:name="T12" style:family="text">
      <style:text-properties style:font-name="Calibri"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13" style:family="text">
      <style:text-properties style:font-name="Calibri1"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14" style:family="text">
      <style:text-properties text:display="true"/>
    </style:style>
    <style:style style:name="T15" style:family="text">
      <style:text-properties style:font-name="Calibri"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16" style:family="text">
      <style:text-properties style:font-name="Calibri1"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17" style:family="text">
      <style:text-properties fo:language="fr" fo:country="FR"/>
    </style:style>
    <style:style style:name="T18" style:family="text">
      <style:text-properties style:font-name="Calibri"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19" style:family="text">
      <style:text-properties style:font-name="Calibri1"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20" style:family="text">
      <style:text-properties style:font-name="Calibri1"/>
    </style:style>
    <style:style style:name="T21" style:family="text">
      <style:text-properties style:font-name="Calibri1" fo:font-size="16pt" fo:font-weight="bold" style:font-size-asian="16pt" style:font-weight-asian="bold" style:font-size-complex="16pt"/>
    </style:style>
    <style:style style:name="T22" style:family="text">
      <style:text-properties style:font-name="Calibri1" fo:font-weight="bold" style:font-weight-asian="bold"/>
    </style:style>
    <style:style style:name="T23" style:family="text">
      <style:text-properties style:font-name="Calibri1" fo:language="en" fo:country="US"/>
    </style:style>
    <style:style style:name="T24" style:family="text">
      <style:text-properties fo:font-size="16pt" fo:language="en" fo:country="US" fo:font-weight="bold" style:letter-kerning="true" style:font-size-asian="16pt" style:font-weight-asian="bold" style:font-name-complex="Arial1" style:font-size-complex="16pt" style:font-weight-complex="bold"/>
    </style:style>
    <style:style style:name="T25" style:family="text">
      <style:text-properties fo:font-size="20pt" fo:font-weight="bold" style:font-size-asian="20pt" style:font-weight-asian="bold" style:font-name-complex="Calibri2" style:font-size-complex="20pt"/>
    </style:style>
    <style:style style:name="T26" style:family="text">
      <style:text-properties style:font-name-complex="Calibri2"/>
    </style:style>
    <style:style style:name="T27" style:family="text">
      <style:text-properties fo:font-size="4pt" style:font-size-asian="4pt" style:font-name-complex="Calibri2" style:font-size-complex="4pt"/>
    </style:style>
    <style:style style:name="T28" style:family="text">
      <style:text-properties fo:font-size="2pt" style:font-size-asian="2pt" style:font-name-complex="Calibri2" style:font-size-complex="2pt"/>
    </style:style>
    <style:style style:name="T29" style:family="text">
      <style:text-properties fo:font-weight="bold" style:font-weight-asian="bold" style:font-name-complex="Calibri2"/>
    </style:style>
    <style:style style:name="T30" style:family="text">
      <style:text-properties fo:font-size="30pt" fo:font-weight="bold" style:font-size-asian="30pt" style:font-weight-asian="bold" style:font-name-complex="Calibri2" style:font-size-complex="30pt"/>
    </style:style>
    <style:style style:name="T31" style:family="text">
      <style:text-properties fo:font-family="Wingdings" style:font-family-generic="swiss" style:font-pitch="variable" style:font-charset="x-symbol" fo:font-size="30pt" fo:font-weight="bold" style:font-family-asian="Wingdings" style:font-family-generic-asian="system" style:font-pitch-asian="variable" style:font-size-asian="30pt" style:font-weight-asian="bold" style:font-family-complex="Wingdings" style:font-family-generic-complex="system" style:font-pitch-complex="variable" style:font-size-complex="30pt"/>
    </style:style>
    <style:style style:name="T32" style:family="text">
      <style:text-properties fo:font-style="italic" style:font-style-asian="italic" style:font-name-complex="Calibri2"/>
    </style:style>
    <style:style style:name="T33" style:family="text">
      <style:text-properties fo:font-size="1pt" style:font-size-asian="1pt" style:font-name-complex="Calibri2" style:font-size-complex="1pt"/>
    </style:style>
    <style:style style:name="T34" style:family="text">
      <style:text-properties fo:font-size="4pt" fo:font-weight="bold" style:font-size-asian="4pt" style:font-weight-asian="bold" style:font-name-complex="Calibri2" style:font-size-complex="4pt"/>
    </style:style>
    <style:style style:name="T35" style:family="text">
      <style:text-properties fo:font-size="36pt" fo:font-weight="bold" style:font-size-asian="36pt" style:font-weight-asian="bold" style:font-name-complex="Calibri2" style:font-size-complex="36pt"/>
    </style:style>
    <style:style style:name="T36" style:family="text">
      <style:text-properties fo:font-family="Wingdings" style:font-family-generic="swiss" style:font-pitch="variable" style:font-charset="x-symbol" fo:font-size="36pt" fo:font-weight="bold" style:font-family-asian="Wingdings" style:font-family-generic-asian="system" style:font-pitch-asian="variable" style:font-size-asian="36pt" style:font-weight-asian="bold" style:font-family-complex="Wingdings" style:font-family-generic-complex="system" style:font-pitch-complex="variable" style:font-size-complex="36pt"/>
    </style:style>
    <style:style style:name="T37" style:family="text">
      <style:text-properties style:font-name="Calibri1" fo:font-size="11pt" style:font-size-asian="11pt"/>
    </style:style>
    <style:style style:name="T38" style:family="text">
      <style:text-properties fo:font-size="11pt" style:font-size-asian="11pt"/>
    </style:style>
    <style:style style:name="T39" style:family="text">
      <style:text-properties fo:font-size="11pt" fo:language="en" fo:country="GB" style:font-size-asian="11pt"/>
    </style:style>
    <style:style style:name="T40" style:family="text">
      <style:text-properties fo:font-family="'Nirmala UI'" style:font-family-generic="swiss" style:font-pitch="variable" fo:language="en" fo:country="GB" style:font-family-complex="'Nirmala UI'" style:font-family-generic-complex="system" style:font-pitch-complex="variable"/>
    </style:style>
    <style:style style:name="T41" style:family="text">
      <style:text-properties style:font-name="Calibri1" style:font-name-complex="Tahoma"/>
    </style:style>
    <style:style style:name="T42" style:family="text">
      <style:text-properties style:font-name="Calibri1" fo:font-weight="bold" style:font-weight-asian="bold" style:font-name-complex="Tahoma"/>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font-name="Calibri1" fo:font-size="4pt" style:font-size-asian="4pt" style:font-size-complex="4pt"/>
    </style:style>
    <style:style style:name="T45" style:family="text">
      <style:text-properties fo:font-weight="bold" style:font-weight-asian="bold"/>
    </style:style>
    <style:style style:name="T46" style:family="text">
      <style:text-properties fo:font-size="8pt" style:font-size-asian="8pt" style:font-size-complex="8pt"/>
    </style:style>
    <style:style style:name="T47" style:family="text">
      <style:text-properties fo:language="en" fo:country="GB" fo:font-weight="bold" style:font-weight-asian="bold"/>
    </style:style>
    <style:style style:name="T48" style:family="text">
      <style:text-properties fo:language="en" fo:country="US"/>
    </style:style>
    <style:style style:name="T49" style:family="text">
      <style:text-properties fo:font-size="4pt" style:font-size-asian="4pt" style:font-size-complex="4pt"/>
    </style:style>
    <style:style style:name="T50" style:family="text">
      <style:text-properties fo:font-style="italic" fo:font-weight="bold" style:font-style-asian="italic" style:font-weight-asian="bold" style:font-name-complex="Calibri2"/>
    </style:style>
    <style:style style:name="T51" style:family="text">
      <style:text-properties fo:font-family="Wingdings" style:font-family-generic="swiss" style:font-pitch="variable" style:font-charset="x-symbol" style:font-family-asian="Wingdings" style:font-family-generic-asian="system" style:font-pitch-asian="variable" style:font-family-complex="Wingdings" style:font-family-generic-complex="system" style:font-pitch-complex="variable"/>
    </style:style>
    <style:style style:name="T52"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T53" style:family="text">
      <style:text-properties fo:font-style="italic" fo:font-weight="bold" style:font-style-asian="italic" style:font-weight-asian="bold"/>
    </style:style>
    <style:style style:name="T54" style:family="text">
      <style:text-properties style:font-weight-complex="bold"/>
    </style:style>
    <style:style style:name="T55" style:family="text">
      <style:text-properties fo:font-weight="bold" style:font-weight-asian="bold" style:font-weight-complex="bold"/>
    </style:style>
    <style:style style:name="T56" style:family="text">
      <style:text-properties fo:font-family="Wingdings" style:font-family-generic="swiss" style:font-pitch="variable" style:font-charset="x-symbol" style:font-family-asian="Wingdings" style:font-family-generic-asian="system" style:font-pitch-asian="variable" style:font-family-complex="Wingdings" style:font-family-generic-complex="system" style:font-pitch-complex="variable" style:font-weight-complex="bold"/>
    </style:style>
    <style:style style:name="T57" style:family="text">
      <style:text-properties fo:language="en" fo:country="GB" fo:font-weight="bold" style:font-weight-asian="bold" style:font-weight-complex="bold"/>
    </style:style>
    <style:style style:name="T58" style:family="text">
      <style:text-properties fo:language="en" fo:country="US" fo:font-style="italic" style:font-style-asian="italic" style:font-name-complex="Calibri2"/>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4154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4.5902in, 0in, 3.7673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5.7783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1681in)"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6.6217in, 0in, 0in)" draw:image-opacity="100%" style:mirror="none"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1453in" fo:margin-right="0.1453in" fo:margin-top="0in" fo:margin-bottom="0.0311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3"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0209in" fo:margin-right="0.0417in" fo:margin-top="0in" fo:margin-bottom="0.052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accent1" loext:color-type="theme"/>
        <loext:fill-complex-color loext:theme-type="light1" loext:color-type="theme"/>
      </style:graphic-properties>
    </style:style>
    <style:style style:name="gr4"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0209in" fo:margin-right="0.0417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5" style:family="graphic">
      <style:graphic-properties draw:stroke="solid" svg:stroke-width="0.028in" svg:stroke-color="#3a5f8b" svg:stroke-linecap="butt" draw:fill="solid" draw:fill-color="#ffffff" draw:textarea-vertical-align="top" draw:auto-grow-height="false" fo:min-height="0.6417in" fo:min-width="0in" fo:padding-top="0.0492in" fo:padding-bottom="0.0492in" fo:padding-left="0.0984in" fo:padding-right="0.0984in" fo:wrap-option="wrap" loext:decorative="false" fo:margin-left="0in" fo:margin-right="0.0134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6" style:family="graphic">
      <style:graphic-properties draw:stroke="solid" svg:stroke-width="0.0102in" svg:stroke-color="#000000" draw:stroke-linejoin="miter" draw:fill="solid" draw:fill-color="#ffffff" draw:textarea-vertical-align="top" draw:auto-grow-height="false" fo:min-height="0.0193in" fo:min-width="0.7154in" fo:padding-top="0.0492in" fo:padding-bottom="0.0492in" fo:padding-left="0.0984in" fo:padding-right="0.0984in" fo:wrap-option="wrap" loext:decorative="false" fo:margin-left="0.2252in" fo:margin-right="0.2689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102in" svg:stroke-color="#000000" draw:stroke-linejoin="miter" draw:fill="solid" draw:fill-color="#ffffff" draw:textarea-vertical-align="top" draw:auto-grow-height="false" fo:min-height="0.0201in" fo:min-width="0.8126in" fo:padding-top="0.0492in" fo:padding-bottom="0.0492in" fo:padding-left="0.0984in" fo:padding-right="0.0984in" fo:wrap-option="wrap" loext:decorative="false" fo:margin-left="0.0236in" fo:margin-right="0.0311in" fo:margin-top="0.0181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102in" svg:stroke-color="#000000" draw:stroke-linejoin="miter" draw:fill="solid" draw:fill-color="#ffffff" draw:textarea-vertical-align="top" draw:auto-grow-height="false" fo:min-height="0.0201in" fo:min-width="0.8126in" fo:padding-top="0.0492in" fo:padding-bottom="0.0492in" fo:padding-left="0.0984in" fo:padding-right="0.0984in" fo:wrap-option="wrap" loext:decorative="false" fo:margin-left="0.0654in" fo:margin-right="0.0937in" fo:margin-top="0.0181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102in" svg:stroke-color="#000000" draw:stroke-linejoin="miter" draw:fill="solid" draw:fill-color="#ffffff" draw:textarea-vertical-align="top" draw:auto-grow-height="false" fo:min-height="0.0209in" fo:min-width="0.8118in" fo:padding-top="0.0492in" fo:padding-bottom="0.0492in" fo:padding-left="0.0984in" fo:padding-right="0.0984in" fo:wrap-option="wrap" loext:decorative="false" fo:margin-left="0.2528in" fo:margin-right="0.260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252in" fo:margin-top="0in" fo:margin-bottom="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loext:stroke-complex-color loext:theme-type="light1" loext:color-type="theme"/>
      </style:graphic-properties>
    </style:style>
    <style:style style:name="gr11"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228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loext:stroke-complex-color loext:theme-type="light1" loext:color-type="theme"/>
      </style:graphic-properties>
    </style:style>
    <style:style style:name="gr12" style:family="graphic">
      <style:graphic-properties draw:stroke="solid" svg:stroke-width="0.0102in" svg:stroke-color="#000000" draw:stroke-linejoin="miter" draw:fill="solid" draw:fill-color="#ffffff" draw:textarea-vertical-align="top" draw:auto-grow-height="false" fo:min-height="0.0362in" fo:min-width="1.8807in" fo:padding-top="0.0492in" fo:padding-bottom="0.0492in" fo:padding-left="0.0984in" fo:padding-right="0.0984in" fo:wrap-option="wrap" loext:decorative="false" fo:margin-left="0.2366in" fo:margin-right="0.2035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102in" svg:stroke-color="#000000" draw:stroke-linejoin="miter" draw:fill="solid" draw:fill-color="#ffffff" draw:textarea-vertical-align="top" draw:auto-grow-height="false" fo:min-height="0.0362in" fo:min-width="3.0118in" fo:padding-top="0.0492in" fo:padding-bottom="0.0492in" fo:padding-left="0.0984in" fo:padding-right="0.0984in" fo:wrap-option="wrap" loext:decorative="false" fo:margin-left="0.3646in" fo:margin-right="0.3465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102in" svg:stroke-color="#ffffff" draw:stroke-linejoin="miter" draw:fill="solid" draw:fill-color="#ffffff" draw:textarea-vertical-align="top" draw:auto-grow-height="false" fo:min-height="0.9071in" fo:min-width="2.3827in" fo:padding-top="0.05in" fo:padding-bottom="0.05in" fo:padding-left="0.1in" fo:padding-right="0.1in" fo:wrap-option="wrap" loext:decorative="false" fo:margin-left="0in" fo:margin-right="0.0228in" fo:margin-top="0in" fo:margin-bottom="0.0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stroke-complex-color loext:theme-type="light1" loext:color-type="theme"/>
      </style:graphic-properties>
    </style:style>
    <style:style style:name="gr15"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228in" fo:margin-top="0in" fo:margin-bottom="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loext:stroke-complex-color loext:theme-type="light1" loext:color-type="theme"/>
      </style:graphic-properties>
    </style:style>
    <style:style style:name="gr16" style:family="graphic">
      <style:graphic-properties draw:stroke="solid" svg:stroke-width="0.0102in" svg:stroke-color="#000000" draw:stroke-linejoin="miter" draw:fill="solid" draw:fill-color="#ffffff" draw:textarea-vertical-align="top" draw:auto-grow-height="false" fo:min-height="0.0201in" fo:min-width="0.5063in" fo:padding-top="0.0492in" fo:padding-bottom="0.0492in" fo:padding-left="0.0984in" fo:padding-right="0.0984in" fo:wrap-option="wrap" loext:decorative="false" fo:margin-left="0in" fo:margin-right="0in" fo:margin-top="0.1874in" fo:margin-bottom="0.2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311in" fo:margin-top="0in" fo:margin-bottom="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loext:stroke-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2" text:anchor-type="as-char" svg:width="5.8063in" svg:height="1.7764in"><draw:image xlink:href="Pictures/1000000100000846000002729EF3B20B.png" xlink:type="simple" xlink:show="embed" xlink:actuate="onLoad" draw:mime-type="image/png"/><svg:desc>C:\Users\Richard\AppData\Local\Microsoft\Windows\INetCache\Content.Word\SAB-logo.png</svg:desc></draw:frame></text:p>
      <text:p text:style-name="P1" loext:marker-style-name="T1"/>
      <text:p text:style-name="P1" loext:marker-style-name="T1"/>
      <text:p text:style-name="P1" loext:marker-style-name="T1"/>
      <text:p text:style-name="P2" loext:marker-style-name="T2"><text:span text:style-name="T3"><text:s/></text:span><text:span text:style-name="T2">Utilisation d’aeneas pour la synchronisation audio-texte</text:span></text:p>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2" loext:marker-style-name="T5"><draw:frame draw:style-name="fr2" draw:name="Image 13" text:anchor-type="as-char" svg:width="0.6772in" svg:height="0.7598in"><draw:image xlink:href="Pictures/100000010000042C000004B0826D13D2.png" xlink:type="simple" xlink:show="embed" xlink:actuate="onLoad" draw:mime-type="image/png"/></draw:frame></text:p>
      <text:p text:style-name="P4" loext:marker-style-name="T5"/>
      <text:p text:style-name="P4" loext:marker-style-name="T5"/>
      <text:p text:style-name="P5" loext:marker-style-name="T6"/>
      <text:p text:style-name="P6"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8" loext:marker-style-name="T7"/>
      <text:p text:style-name="P2" loext:marker-style-name="T8"><text:span text:style-name="T8">Scripture App Builder: Utilisation d’aeneas pour la synchronisation audio-texte</text:span><text:span text:style-name="T8"/></text:p>
      <text:p text:style-name="P9" loext:marker-style-name="T8"/>
      <text:p text:style-name="P2"/>
      <text:p text:style-name="P2">© 2025, SIL Global</text:p>
      <text:p text:style-name="P2"/>
      <text:p text:style-name="P2" loext:marker-style-name="T9"><text:span text:style-name="T9">Dernière mise à jour: 19 décembre 2025</text:span><text:span text:style-name="T9"/></text:p>
      <text:p text:style-name="P2" loext:marker-style-name="T9"><text:span text:style-name="T9">Version SAB 13.3.2</text:span><text:span text:style-name="T9"/></text:p>
      <text:p text:style-name="P10" loext:marker-style-name="T9"/>
      <text:p text:style-name="P2"/>
      <text:p text:style-name="P2"/>
      <text:p text:style-name="P2"/>
      <text:p text:style-name="P2"/>
      <text:p text:style-name="P2"/>
      <text:p text:style-name="P2">Vous êtes libre d’imprimer ce manuel pour un usage personnel et pour des ateliers de formation.</text:p>
      <text:p text:style-name="P2"/>
      <text:p text:style-name="P2">La dernière version est disponible à l’adresse</text:p>
      <text:p text:style-name="P2"><text:a xlink:type="simple" xlink:href="http://software.sil.org/scriptureappbuilder/resources/" text:style-name="Internet_20_link" text:visited-style-name="Visited_20_Internet_20_Link"><text:span text:style-name="Internet_20_link">http://software.sil.org/scriptureappbuilder/resources/</text:span></text:a> <text:s/></text:p>
      <text:p text:style-name="P2"/>
      <text:p text:style-name="P2">et dans le menu Aide de Scripture App Builder.</text:p>
      <text:p text:style-name="Standard"/>
      <text:p text:style-name="P11" loext:marker-style-name="T10"><text:span text:style-name="T11">Table des matières</text:span><text:span text:style-name="T10"/></text:p>
      <text:p text:style-name="P12" loext:marker-style-name="T1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2"><text:a xlink:type="simple" xlink:href="#_Toc217376178" text:style-name="Index_20_Link" text:visited-style-name="Index_20_Link"><text:span text:style-name="T7">1.</text:span><text:span text:style-name="T13"><text:tab/></text:span>Introduction<text:span text:style-name="T14"><text:tab/>6</text:span></text:a></text:p>
          <text:p text:style-name="Contents_20_2" loext:marker-style-name="T15"><text:a xlink:type="simple" xlink:href="#_Toc217376179" text:style-name="Index_20_Link" text:visited-style-name="Index_20_Link">1.1.<text:span text:style-name="T16"><text:tab/></text:span>Qu'est-ce qu'aeneas?<text:span text:style-name="T14"><text:tab/>6</text:span></text:a></text:p>
          <text:p text:style-name="Contents_20_2" loext:marker-style-name="T15"><text:a xlink:type="simple" xlink:href="#_Toc217376180" text:style-name="Index_20_Link" text:visited-style-name="Index_20_Link"><text:span text:style-name="T17">1.2.</text:span><text:span text:style-name="T16"><text:tab/></text:span><text:span text:style-name="T17">Cela fonctionnera-t-il avec notre langue ?</text:span><text:span text:style-name="T14"><text:tab/>7</text:span></text:a></text:p>
          <text:p text:style-name="Contents_20_2" loext:marker-style-name="T15"><text:a xlink:type="simple" xlink:href="#_Toc217376181" text:style-name="Index_20_Link" text:visited-style-name="Index_20_Link"><text:span text:style-name="T17">1.3.</text:span><text:span text:style-name="T16"><text:tab/></text:span><text:span text:style-name="T17">Combien de temps cela prend-il?</text:span><text:span text:style-name="T14"><text:tab/>7</text:span></text:a></text:p>
          <text:p text:style-name="Contents_20_2" loext:marker-style-name="T15"><text:a xlink:type="simple" xlink:href="#_Toc217376182" text:style-name="Index_20_Link" text:visited-style-name="Index_20_Link">1.4.<text:span text:style-name="T16"><text:tab/></text:span>Comment exécuter aeneas?<text:span text:style-name="T14"><text:tab/>7</text:span></text:a></text:p>
          <text:p text:style-name="Contents_20_1" loext:marker-style-name="T12"><text:a xlink:type="simple" xlink:href="#_Toc217376183" text:style-name="Index_20_Link" text:visited-style-name="Index_20_Link"><text:span text:style-name="T7">2.</text:span><text:span text:style-name="T13"><text:tab/></text:span>Installation sur Windows<text:span text:style-name="T14"><text:tab/>8</text:span></text:a></text:p>
          <text:p text:style-name="Contents_20_1" loext:marker-style-name="T12"><text:a xlink:type="simple" xlink:href="#_Toc217376184" text:style-name="Index_20_Link" text:visited-style-name="Index_20_Link"><text:span text:style-name="T7">3.</text:span><text:span text:style-name="T13"><text:tab/></text:span><text:span text:style-name="T7">Installation sur Linux</text:span><text:span text:style-name="T14"><text:tab/>10</text:span></text:a></text:p>
          <text:p text:style-name="Contents_20_1" loext:marker-style-name="T12"><text:a xlink:type="simple" xlink:href="#_Toc217376185" text:style-name="Index_20_Link" text:visited-style-name="Index_20_Link">4.<text:span text:style-name="T13"><text:tab/></text:span>Utilisation d’aeneas dans Scripture App Builder<text:span text:style-name="T14"><text:tab/>10</text:span></text:a></text:p>
          <text:p text:style-name="Contents_20_2" loext:marker-style-name="T15"><text:a xlink:type="simple" xlink:href="#_Toc217376186" text:style-name="Index_20_Link" text:visited-style-name="Index_20_Link"><text:span text:style-name="T17">4.1.</text:span><text:span text:style-name="T16"><text:tab/></text:span><text:span text:style-name="T17">Préparation de vos fichiers audio</text:span><text:span text:style-name="T14"><text:tab/>10</text:span></text:a></text:p>
          <text:p text:style-name="Contents_20_2" loext:marker-style-name="T15"><text:a xlink:type="simple" xlink:href="#_Toc217376187" text:style-name="Index_20_Link" text:visited-style-name="Index_20_Link"><text:span text:style-name="T17">4.2.</text:span><text:span text:style-name="T16"><text:tab/></text:span><text:span text:style-name="T17">Exécution de l’assistant de synchronisation audio</text:span><text:span text:style-name="T14"><text:tab/>11</text:span></text:a></text:p>
          <text:p text:style-name="Contents_20_3" loext:marker-style-name="T18"><text:a xlink:type="simple" xlink:href="#_Toc217376188" text:style-name="Index_20_Link" text:visited-style-name="Index_20_Link"><text:span text:style-name="T7">4.2.1.</text:span><text:span text:style-name="T19"><text:tab/></text:span><text:span text:style-name="T7">Parcourir l'assistant de synchronisation</text:span><text:span text:style-name="T14"><text:tab/>12</text:span></text:a></text:p>
          <text:p text:style-name="Contents_20_2" loext:marker-style-name="T15"><text:a xlink:type="simple" xlink:href="#_Toc217376189" text:style-name="Index_20_Link" text:visited-style-name="Index_20_Link">4.3.<text:span text:style-name="T16"><text:tab/></text:span>Dépannage<text:span text:style-name="T14"><text:tab/>17</text:span></text:a></text:p>
          <text:p text:style-name="Contents_20_2" loext:marker-style-name="T15"><text:a xlink:type="simple" xlink:href="#_Toc217376190" text:style-name="Index_20_Link" text:visited-style-name="Index_20_Link"><text:span text:style-name="T17">4.4.</text:span><text:span text:style-name="T16"><text:tab/></text:span><text:span text:style-name="T17">Visualisation et test des fichiers de synchronisation créés par aeneas</text:span><text:span text:style-name="T14"><text:tab/>17</text:span></text:a></text:p>
          <text:p text:style-name="Contents_20_2" loext:marker-style-name="T15"><text:a xlink:type="simple" xlink:href="#_Toc217376191" text:style-name="Index_20_Link" text:visited-style-name="Index_20_Link"><text:span text:style-name="T17">4.5.</text:span><text:span text:style-name="T16"><text:tab/></text:span><text:span text:style-name="T17">Ajustez les fichiers de synchronisation à l'aide de la fonction d'Aperçu audio.</text:span><text:span text:style-name="T14"><text:tab/>17</text:span></text:a></text:p>
          <text:p text:style-name="Contents_20_2" loext:marker-style-name="T15"><text:a xlink:type="simple" xlink:href="#_Toc217376192" text:style-name="Index_20_Link" text:visited-style-name="Index_20_Link"><text:span text:style-name="T17">4.6.</text:span><text:span text:style-name="T16"><text:tab/></text:span><text:span text:style-name="T17">Ajustez les fichiers de synchronisation à l’aide de la visionneuse Peaufiner les timings</text:span><text:span text:style-name="T14"><text:tab/>18</text:span></text:a></text:p>
          <text:p text:style-name="Contents_20_2" loext:marker-style-name="T15"><text:a xlink:type="simple" xlink:href="#_Toc217376193" text:style-name="Index_20_Link" text:visited-style-name="Index_20_Link"><text:span text:style-name="T17">4.7.</text:span><text:span text:style-name="T16"><text:tab/></text:span><text:span text:style-name="T17">Raccourcis clavier lors d’un peaufinage</text:span><text:span text:style-name="T14"><text:tab/>21</text:span></text:a></text:p>
          <text:p text:style-name="Contents_20_2" loext:marker-style-name="T15"><text:a xlink:type="simple" xlink:href="#_Toc217376194" text:style-name="Index_20_Link" text:visited-style-name="Index_20_Link"><text:span text:style-name="T17">4.8.</text:span><text:span text:style-name="T16"><text:tab/></text:span><text:span text:style-name="T17">Envoi de fichiers de synchronisation à d’autres personnes</text:span><text:span text:style-name="T14"><text:tab/>22</text:span></text:a></text:p>
          <text:p text:style-name="Contents_20_2" loext:marker-style-name="T15"><text:a xlink:type="simple" xlink:href="#_Toc217376195" text:style-name="Index_20_Link" text:visited-style-name="Index_20_Link"><text:span text:style-name="T17">4.9.</text:span><text:span text:style-name="T16"><text:tab/></text:span><text:span text:style-name="T17">Peaufinez les fichiers de synchronisation à l’aide d’Audacity</text:span><text:span text:style-name="T14"><text:tab/>23</text:span></text:a></text:p>
          <text:p text:style-name="Contents_20_1" loext:marker-style-name="T12"><text:a xlink:type="simple" xlink:href="#_Toc217376196" text:style-name="Index_20_Link" text:visited-style-name="Index_20_Link">5.<text:span text:style-name="T13"><text:tab/></text:span>Ajouter des voix à eSpeak<text:span text:style-name="T14"><text:tab/>23</text:span></text:a></text:p>
        </text:index-body>
      </text:table-of-content>
      <text:p text:style-name="P5" loext:marker-style-name="T6"/>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1" loext:marker-style-name="T20"><text:span text:style-name="T21">Remerciements</text:span><text:span text:style-name="T21"/></text:p>
      <text:p text:style-name="P14" loext:marker-style-name="T20"/>
      <text:p text:style-name="P14" loext:marker-style-name="T20"/>
      <text:p text:style-name="Standard" loext:marker-style-name="T20"><text:span text:style-name="T20">Merci beaucoup à Alberto Pettarin, Italie, pour tout son travail de développement d’aeneas et pour l’avoir rendu disponible gratuitement pour une utilisation dans la synchronisation du texte et de l’audio dans le monde entier.</text:span><text:span text:style-name="T20"/></text:p>
      <text:p text:style-name="P15" loext:marker-style-name="T6"><text:span text:style-name="T6">Site Web: </text:span><text:a xlink:type="simple" xlink:href="https://github.com/readbeyond/aeneas/#aeneas" text:style-name="Internet_20_link" text:visited-style-name="Visited_20_Internet_20_Link"><text:span text:style-name="Internet_20_link"><text:span text:style-name="T6">https://github.com/readbeyond/aeneas/#aeneas</text:span></text:span></text:a><text:span text:style-name="T6"> <text:tab/></text:span></text:p>
      <text:p text:style-name="P5" loext:marker-style-name="T6"/>
      <text:p text:style-name="Standard" loext:marker-style-name="T20"><text:span text:style-name="T20">Ces instructions ont été écrites à l’aide d’aeneas 1.7.2, publié le 09 mars 2017.</text:span><text:span text:style-name="T20"/></text:p>
      <text:p text:style-name="P14" loext:marker-style-name="T20"/>
      <text:p text:style-name="P14" loext:marker-style-name="T20"/>
      <text:p text:style-name="P16" loext:marker-style-name="T20"><text:span text:style-name="T20">Merci à Firat Özdemir d’avoir inventé la fonction </text:span><text:span text:style-name="T22">Fine Tuning</text:span><text:span text:style-name="T20">, dont une version modifiée est intégrée à Scripture App Builder. </text:span></text:p>
      <text:p text:style-name="P17" loext:marker-style-name="T6"><text:span text:style-name="T6">Site Web: </text:span><text:a xlink:type="simple" xlink:href="https://github.com/ozdefir/finetuneas" text:style-name="Internet_20_link" text:visited-style-name="Visited_20_Internet_20_Link"><text:span text:style-name="Internet_20_link"><text:span text:style-name="T6">https://github.com/ozdefir/finetuneas</text:span></text:span></text:a><text:span text:style-name="T6"> </text:span></text:p>
      <text:p text:style-name="P5" loext:marker-style-name="T6"/>
      <text:p text:style-name="P5" loext:marker-style-name="T6"/>
      <text:p text:style-name="P16" loext:marker-style-name="T20"><text:span text:style-name="T20">Merci à Daniel Bair pour son travail sur l’installateur Windows pour aeneas.</text:span><text:span text:style-name="T20"/></text:p>
      <text:p text:style-name="P17" loext:marker-style-name="T23"><text:span text:style-name="T23">Site Web: </text:span><text:a xlink:type="simple" xlink:href="https://github.com/sillsdev/aeneas-installer" text:style-name="Internet_20_link" text:visited-style-name="Visited_20_Internet_20_Link"><text:span text:style-name="Internet_20_link"><text:span text:style-name="T23">https://github.com/sillsdev/aeneas-installer</text:span></text:span></text:a><text:span text:style-name="T23"> <text:s/></text:span></text:p>
      <text:p text:style-name="P18" loext:marker-style-name="T24"/>
      <text:p text:style-name="P11" loext:marker-style-name="T25"><text:span text:style-name="T25">Comment utiliser ce manuel</text:span><text:span text:style-name="T25"/></text:p>
      <text:p text:style-name="P19" loext:marker-style-name="T25"/>
      <text:p text:style-name="Standard" loext:marker-style-name="T26"><text:span text:style-name="T26">Ce guide comprend des notes et des conseils pour vous aider à tirer le meilleur parti du logiciel. Les conseils et les notes apparaîtront comme suit :</text:span><text:span text:style-name="T26"/></text:p>
      <text:p text:style-name="P20" loext:marker-style-name="T27"/>
      <text:p text:style-name="P21" loext:marker-style-name="T28"/>
      <text:p text:style-name="P22" loext:marker-style-name="T29"><text:span text:style-name="T29">Notes:</text:span><text:span text:style-name="T29"/></text:p>
      <text:p text:style-name="P23" loext:marker-style-name="T27"/>
      <table:table table:name="Table1" table:style-name="Table1">
        <table:table-column table:style-name="Table1.A"/>
        <table:table-column table:style-name="Table1.B"/>
        <table:table-row table:style-name="Table1.1">
          <table:table-cell table:style-name="Table1.A1" office:value-type="string">
            <text:p text:style-name="P24" loext:marker-style-name="T30"><text:span text:style-name="T31"></text:span><text:span text:style-name="T30"> </text:span></text:p>
          </table:table-cell>
          <table:table-cell table:style-name="Table1.B1" office:value-type="string">
            <text:p text:style-name="P24" loext:marker-style-name="T32"><text:span text:style-name="T32">Chaque page de l’assistant comporte un texte explicatif pour vous aider à choisir les options.</text:span><text:span text:style-name="T32"/></text:p>
          </table:table-cell>
        </table:table-row>
      </table:table>
      <text:p text:style-name="P25" loext:marker-style-name="T33"/>
      <text:p text:style-name="P22" loext:marker-style-name="T29"><text:span text:style-name="T29">Conseils:</text:span><text:span text:style-name="T29"/></text:p>
      <text:p text:style-name="P26" loext:marker-style-name="T34"/>
      <table:table table:name="Table2" table:style-name="Table2">
        <table:table-column table:style-name="Table2.A"/>
        <table:table-column table:style-name="Table2.B"/>
        <table:table-row table:style-name="Table2.1">
          <table:table-cell table:style-name="Table2.A1" office:value-type="string">
            <text:p text:style-name="P24" loext:marker-style-name="T35"><text:span text:style-name="T36"></text:span><text:span text:style-name="T35"> </text:span></text:p>
          </table:table-cell>
          <table:table-cell table:style-name="Table2.B1" office:value-type="string">
            <text:p text:style-name="P24" loext:marker-style-name="T32"><text:span text:style-name="T32">Avant de synchroniser un fichier audio, essayez de l'écouter pour déterminer la durée de l'introduction.</text:span><text:span text:style-name="T32"/></text:p>
          </table:table-cell>
        </table:table-row>
      </table:table>
      <text:h text:style-name="P27" text:outline-level="1" loext:marker-style-name="T7"><text:bookmark-start text:name="_Toc217376178"/>Introduction<text:bookmark-end text:name="_Toc217376178"/><text:span text:style-name="T7"/></text:h>
      <text:h text:style-name="Heading_20_2" text:outline-level="2"><text:bookmark-start text:name="_Toc217376179"/>Qu'est-ce qu'aeneas?<text:bookmark-end text:name="_Toc217376179"/></text:h>
      <text:p text:style-name="Standard" loext:marker-style-name="T20"><text:span text:style-name="T22">Aeneas </text:span><text:span text:style-name="T20">est un outil conçu pour « synchroniser automagiquement l’audio et le texte ». <text:s/>Il prend un fichier audio et une liste de phrases comme entrées. Sa sortie est un fichier de synchronisation, c’est-à-dire le même type de fichier d’étiquettes que vous créeriez manuellement dans Audacity.</text:span></text:p>
      <text:p text:style-name="P14" loext:marker-style-name="T20"/>
      <text:p text:style-name="Standard" loext:marker-style-name="T20"><text:span text:style-name="T20">La façon dont Aeneas fonctionne consiste à synthétiser chaque phrase à l’aide d’un moteur de synthèse vocale, puis à comparer les fichiers audio synthétisés au fichier audio d’entrée pour trouver les sauts de phrase. Pour ce faire, beaucoup de calculs mathématiques intelligents se déroulent dans les coulisses:</text:span><text:span text:style-name="T20"/></text:p>
      <text:p text:style-name="P14" loext:marker-style-name="T20"/>
      <text:p text:style-name="P28" loext:marker-style-name="T37"><text:span text:style-name="T38">Utilisation de l’algorithme DTW (Dynamic Time Warping) de la bande Sakoe-Chiba pour aligner la représentation des coefficients cepstrals de fréquence Mel (MFCC) de l’onde audio (réelle) donnée et de l’onde audio obtenue en synthétisant les fragments de texte avec un moteur TTS, en remettant finalement l’alignement calculé sur le domaine temporel (réel).</text:span><text:span text:style-name="T39"><text:note text:id="ftn1" text:note-class="footnote"><text:note-citation>1</text:note-citation><text:note-body><text:p text:style-name="P29"><text:s/>https://github.com/readbeyond/aeneas/blob/master/wiki/HOWITWORKS.md</text:p></text:note-body></text:note></text:span></text:p>
      <text:p text:style-name="P14" loext:marker-style-name="T20"/>
      <text:p text:style-name="P14" loext:marker-style-name="T20"/>
      <text:p text:style-name="Standard" loext:marker-style-name="T20"><text:span text:style-name="T20">Ou pour l’illustrer plus simplement, les phrases synthétisées …</text:span><text:span text:style-name="T20"/></text:p>
      <text:p text:style-name="P14" loext:marker-style-name="T20"><draw:frame draw:style-name="fr3" draw:name="Picture 4" text:anchor-type="char" svg:x="2.4209in" svg:y="0.2016in" svg:width="0.9272in" svg:height="1.0626in" draw:z-index="0"><draw:image xlink:href="Pictures/10000001000002EC000000855EAA607A.png" xlink:type="simple" xlink:show="embed" xlink:actuate="onLoad" draw:mime-type="image/png"/><svg:desc>C:\Users\Richard\AppData\Local\Microsoft\Windows\INetCache\Content.Word\org2.png</svg:desc></draw:frame><draw:frame text:anchor-type="char" draw:z-index="20" draw:style-name="gr1" draw:text-style-name="P30" svg:width="2.0205in" svg:height="1.063in" svg:x="0.202in" svg:y="0.2035in"><draw:image xlink:href="Pictures/10000001000002EC000000855EAA607A.png" xlink:type="simple" xlink:show="embed" xlink:actuate="onLoad" draw:mime-type="image/png"><text:p/></draw:image></draw:frame></text:p>
      <text:p text:style-name="P14" loext:marker-style-name="T20"><draw:custom-shape text:anchor-type="char" draw:z-index="3" draw:name="Down Arrow 6" draw:style-name="gr2" draw:text-style-name="P31" svg:width="0.3543in" svg:height="0.4898in" svg:x="1.1398in" svg:y="0.998in"><text:p/><draw:enhanced-geometry draw:mirror-horizontal="false" draw:mirror-vertical="false" draw:glue-points="?f7 0 0 ?f5 ?f7 ?f13 ?f14 ?f5"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position-x="?f8" draw:handle-position-y="0" draw:handle-range-x-maximum="100000" draw:handle-range-x-minimum="0"/><draw:handle draw:handle-position="0 ?f5" draw:handle-position-x="0" draw:handle-position-y="?f5" draw:handle-range-y-maximum="?f1" draw:handle-range-y-minimum="0"/></draw:enhanced-geometry></draw:custom-shape><draw:frame draw:style-name="fr4" draw:name="Picture 5" text:anchor-type="char" svg:y="0.0083in" svg:width="2.4791in" svg:height="1.0626in" draw:z-index="1"><draw:image xlink:href="Pictures/10000001000002EC000000855EAA607A.png" xlink:type="simple" xlink:show="embed" xlink:actuate="onLoad" draw:mime-type="image/png"/><svg:desc>C:\Users\Richard\AppData\Local\Microsoft\Windows\INetCache\Content.Word\org2.png</svg:desc></draw:frame><draw:custom-shape text:anchor-type="char" draw:z-index="4" draw:name="Down Arrow 7" draw:style-name="gr3" draw:text-style-name="P31" svg:width="0.3543in" svg:height="0.4898in" svg:x="2.6484in" svg:y="1.0028in"><text:p/><draw:enhanced-geometry draw:mirror-horizontal="false" draw:mirror-vertical="false" draw:glue-points="?f7 0 0 ?f5 ?f7 ?f13 ?f14 ?f5"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position-x="?f8" draw:handle-position-y="0" draw:handle-range-x-maximum="100000" draw:handle-range-x-minimum="0"/><draw:handle draw:handle-position="0 ?f5" draw:handle-position-x="0" draw:handle-position-y="?f5" draw:handle-range-y-maximum="?f1" draw:handle-range-y-minimum="0"/></draw:enhanced-geometry></draw:custom-shape><draw:custom-shape text:anchor-type="char" draw:z-index="5" draw:name="Down Arrow 8" draw:style-name="gr4" draw:text-style-name="P31" svg:width="0.3543in" svg:height="0.4898in" svg:x="4.3854in" svg:y="1.0035in"><text:p/><draw:enhanced-geometry draw:mirror-horizontal="false" draw:mirror-vertical="false" draw:glue-points="?f7 0 0 ?f5 ?f7 ?f13 ?f14 ?f5"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position-x="?f8" draw:handle-position-y="0" draw:handle-range-x-maximum="100000" draw:handle-range-x-minimum="0"/><draw:handle draw:handle-position="0 ?f5" draw:handle-position-x="0" draw:handle-position-y="?f5" draw:handle-range-y-maximum="?f1" draw:handle-range-y-minimum="0"/></draw:enhanced-geometry></draw:custom-shape></text:p>
      <text:p text:style-name="P14" loext:marker-style-name="T20"/>
      <text:p text:style-name="P14" loext:marker-style-name="T20"/>
      <text:p text:style-name="P14" loext:marker-style-name="T20"/>
      <text:p text:style-name="P14" loext:marker-style-name="T20"/>
      <text:p text:style-name="P14" loext:marker-style-name="T20"/>
      <text:p text:style-name="P14" loext:marker-style-name="T20"><draw:custom-shape text:anchor-type="char" draw:z-index="6" draw:name="Rectangle 9" draw:style-name="gr5" draw:text-style-name="P31" svg:width="0.0496in" svg:height="0.7398in" svg:x="2.3063in" svg:y="0.2827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Picture 3" text:anchor-type="char" svg:x="0.1709in" svg:y="0.0173in" svg:width="5.8752in" svg:height="1.198in" draw:z-index="2"><draw:image xlink:href="Pictures/10000001000002B70000008BD57A2983.png" xlink:type="simple" xlink:show="embed" xlink:actuate="onLoad" draw:mime-type="image/png"/><svg:desc>C:\Users\Richard\AppData\Local\Microsoft\Windows\INetCache\Content.Word\org1.png</svg:desc></draw:frame><draw:custom-shape text:anchor-type="char" draw:z-index="7" draw:name="Rectangle 10" draw:style-name="gr5" draw:text-style-name="P31" svg:width="0.0496in" svg:height="0.7398in" svg:x="3.3752in" svg:y="0.272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loext:marker-style-name="T20"/>
      <text:p text:style-name="P14" loext:marker-style-name="T20"/>
      <text:p text:style-name="P14" loext:marker-style-name="T20"/>
      <text:p text:style-name="P14" loext:marker-style-name="T20"/>
      <text:p text:style-name="P14" loext:marker-style-name="T20"/>
      <text:p text:style-name="P14" loext:marker-style-name="T20"/>
      <text:p text:style-name="Standard" loext:marker-style-name="T20"><text:span text:style-name="T20"><text:s text:c="3"/>… sont mappés sur le fichier audio d’entrée pour trouver les sauts de phrase.</text:span><text:span text:style-name="T20"/></text:p>
      <text:p text:style-name="P32" loext:marker-style-name="T20"/>
      <text:p text:style-name="P17" loext:marker-style-name="T20"><text:span text:style-name="T20">Les meilleurs résultats sont obtenus:</text:span><text:span text:style-name="T20"/></text:p>
      <text:list text:style-name="WWNum11">
        <text:list-item>
          <text:p text:style-name="P33" loext:marker-style-name="T20"><text:span text:style-name="T20">si vous disposez d’un enregistrement clairement parlé,</text:span><text:span text:style-name="T20"/></text:p>
        </text:list-item>
        <text:list-item>
          <text:p text:style-name="P33" loext:marker-style-name="T20"><text:span text:style-name="T20">si une musique de fond est suffisamment faible pour ne pas confondre le système,</text:span><text:span text:style-name="T20"/></text:p>
        </text:list-item>
        <text:list-item>
          <text:p text:style-name="P33" loext:marker-style-name="T20"><text:span text:style-name="T20">s'il y a un minimum d'effets sonores ou de pauses dans l'audio,</text:span><text:span text:style-name="T20"/></text:p>
        </text:list-item>
        <text:list-item>
          <text:p text:style-name="P33" loext:marker-style-name="T20"><text:span text:style-name="T20">si les phrases synthétisées correspondent suffisamment à la façon dont la langue est prononcée.</text:span><text:span text:style-name="T20"/></text:p>
        </text:list-item>
      </text:list>
      <text:p text:style-name="P14" loext:marker-style-name="T20"/>
      <text:h text:style-name="P34" text:outline-level="2" loext:marker-style-name="T17"><text:bookmark-start text:name="_Toc217376180"/><text:span text:style-name="T17">Cela fonctionnera-t-il avec notre langue ?</text:span><text:bookmark-end text:name="_Toc217376180"/><text:span text:style-name="T17"/></text:h>
      <text:p text:style-name="Standard" loext:marker-style-name="T20"><text:span text:style-name="T22">Aeneas</text:span><text:span text:style-name="T20"> produit des fichiers de synchronisation (timing) d’une précision impressionnante pour les langues du monde entier. Nous vous recommandons de l’essayer et de voir à quel point il fonctionne bien pour vos fichiers texte et audio.</text:span></text:p>
      <text:p text:style-name="P14" loext:marker-style-name="T20"/>
      <text:p text:style-name="Standard" loext:marker-style-name="T20"><text:span text:style-name="T20">Qu’en est-il des caractères spéciaux ou des marques de ton ? Étant donné que le moteur de synthèse vocale s’adapte mieux aux écritures </text:span><text:span text:style-name="T22">romaines simples de A à Z</text:span><text:span text:style-name="T20">, l’assistant Synchroniser à l’aide d’</text:span><text:span text:style-name="T22">aeneas</text:span><text:span text:style-name="T20"> dans Scripture App Builder dispose d’une page de remplacement de caractères, conçue pour remplacer les caractères spéciaux par des caractères simples (ɓ à b, ɛ à e, etc.). Il supprime également les accents et les marques de ton. Les algorithmes de comparaison sont suffisamment tolérants pour faire correspondre les phrases même si la prononciation diffère.</text:span></text:p>
      <text:p text:style-name="P14" loext:marker-style-name="T20"/>
      <text:p text:style-name="Standard" loext:marker-style-name="T20"><text:span text:style-name="T20">Si vous avez une écriture non romaine, vous devrez définir un ensemble de remplacements de caractères, en translittérant votre écriture non romaine en une simple écriture romaine de A à Z (</text:span><text:span text:style-name="T40">अ</text:span><text:span text:style-name="T20"> à a, </text:span><text:span text:style-name="T40">क</text:span><text:span text:style-name="T20"> à ka, </text:span><text:span text:style-name="T40">उ</text:span><text:span text:style-name="T20"> à vous, etc.). Cette approche a déjà été utilisée avec succès pour synchroniser le texte et l’audio pour l’ensemble de la Bible hébraïque. Si vous créez un ensemble de remplacements de caractères supplémentaires qui fonctionnent bien pour votre script et votre langue, veuillez nous le faire savoir afin que nous puissions les ajouter à l’ensemble de remplacements par défaut</text:span></text:p>
      <text:p text:style-name="P14" loext:marker-style-name="T20"/>
      <text:p text:style-name="Standard" loext:marker-style-name="T20"><text:span text:style-name="T20">Vous pouvez trouver une sélection de tables de romanisation ici:</text:span><text:span text:style-name="T20"/></text:p>
      <text:p text:style-name="P35" loext:marker-style-name="T20"><text:a xlink:type="simple" xlink:href="http://www.loc.gov/catdir/cpso/romansource.html" text:style-name="Internet_20_link" text:visited-style-name="Visited_20_Internet_20_Link"><text:span text:style-name="Internet_20_link"><text:span text:style-name="T20">http://www.loc.gov/catdir/cpso/romansource.html</text:span></text:span></text:a><text:span text:style-name="T20"> </text:span></text:p>
      <text:p text:style-name="P14" loext:marker-style-name="T20"/>
      <text:h text:style-name="P34" text:outline-level="2" loext:marker-style-name="T17"><text:bookmark-start text:name="_Toc217376181"/><text:span text:style-name="T17">Combien de temps cela prend-il?</text:span><text:bookmark-end text:name="_Toc217376181"/><text:span text:style-name="T17"/></text:h>
      <text:p text:style-name="Standard" loext:marker-style-name="T20"><text:span text:style-name="T20">Pour une synchronisation typique phrase par phrase, l’exécution d’</text:span><text:span text:style-name="T22">aeneas</text:span><text:span text:style-name="T20"> prend 1 à 2 minutes pour traiter une heure d’audio, et moins d’une heure pour les 27 livres du Nouveau Testament. Les temps réels dépendront de la vitesse de votre ordinateur.</text:span></text:p>
      <text:p text:style-name="P14" loext:marker-style-name="T20"/>
      <text:h text:style-name="Heading_20_2" text:outline-level="2"><text:bookmark-start text:name="_Toc217376182"/>Comment exécuter aeneas?<text:bookmark-end text:name="_Toc217376182"/></text:h>
      <text:p text:style-name="P17" loext:marker-style-name="T20"><text:bookmark-start text:name="_Hlk138058800"/><text:span text:style-name="T20">Vous devez installer aeneas sur votre ordinateur et utiliser l’assistant </text:span><text:span text:style-name="T22">Synchroniser à l’aide d’aeneas</text:span><text:span text:style-name="T20"> dans SAB pour lancer le processus de synchronisation.</text:span></text:p>
      <text:p text:style-name="P17" loext:marker-style-name="T20"><text:span text:style-name="T20">Voir la section 2 pour les instructions sur l’installation d’aeneas sous Windows, et la section 3 sur l’installation d’aeneas sous Linux. C’est particulièrement facile pour les utilisateurs d’Ubuntu puisque aeneas est inclus automatiquement dans l’installation de SAB.</text:span><text:bookmark-end text:name="_Hlk138058800"/><text:span text:style-name="T20"/></text:p>
      <text:p text:style-name="Standard" loext:marker-style-name="T20"><text:span text:style-name="T20"><text:line-break/></text:span><text:span text:style-name="T20"/></text:p>
      <text:h text:style-name="Heading_20_1" text:outline-level="1" loext:marker-style-name="T7"><text:bookmark text:name="_Installation_sur_Windows"/><text:bookmark-start text:name="_Toc217376183"/>Installation sur Windows<text:bookmark-end text:name="_Toc217376183"/><text:span text:style-name="T7"/></text:h>
      <text:p text:style-name="P36" loext:marker-style-name="T41"><text:span text:style-name="T41">Pour configurer </text:span><text:span text:style-name="T42">aeneas</text:span><text:span text:style-name="T41"> sur Windows, il y a plusieurs programmes et modules à télécharger et à installer : FFmpeg, eSpeak, Python et aeneas. Ceux-ci peuvent tous être installés avec un seul programme d’installation.</text:span></text:p>
      <text:list text:style-name="WWNum20">
        <text:list-item>
          <text:p text:style-name="P37" loext:marker-style-name="T20"><text:span text:style-name="T20">Allez à la page de téléchargement sur le site Web de Scripture App Builder <text:s/></text:span><text:a xlink:type="simple" xlink:href="http://software.sil.org/scriptureappbuilder/download/" text:style-name="Internet_20_link" text:visited-style-name="Visited_20_Internet_20_Link"><text:span text:style-name="Internet_20_link"><text:span text:style-name="T20">http://software.sil.org/scriptureappbuilder/download/</text:span></text:span></text:a><text:span text:style-name="T20"> et téléchargez le dernier programme d’installation d’aeneas pour Windows. Vous le trouverez sous la rubrique Outils de synchronisation audio (</text:span><text:span text:style-name="T22">Audio Synchronization Tools</text:span><text:span text:style-name="T20">).</text:span></text:p>
        </text:list-item>
        <text:list-item>
          <text:p text:style-name="P38" loext:marker-style-name="T20"><text:span text:style-name="T20">Le nom du fichier sera quelque chose comme</text:span><text:span text:style-name="T22"> aeneas-windows-setup-1.7.2.exe</text:span><text:span text:style-name="T20">.</text:span></text:p>
        </text:list-item>
      </text:list>
      <text:p text:style-name="P39" loext:marker-style-name="T20"/>
      <text:list text:continue-numbering="true" text:style-name="WWNum20">
        <text:list-item>
          <text:p text:style-name="P37" loext:marker-style-name="T20"><text:span text:style-name="T20">Double-cliquez sur le fichier que vous avez téléchargé pour démarrer l’assistant d’installation.</text:span><text:span text:style-name="T20"/></text:p>
        </text:list-item>
      </text:list>
      <text:p text:style-name="P40" loext:marker-style-name="T20"/>
      <text:p text:style-name="List_20_Paragraph" loext:marker-style-name="T6"><draw:frame draw:style-name="fr2" draw:name="Picture 11" text:anchor-type="as-char" svg:width="4.5756in" svg:height="3.7425in"><draw:image xlink:href="Pictures/1000000000000246000001DC71ABC918.png" xlink:type="simple" xlink:show="embed" xlink:actuate="onLoad" draw:mime-type="image/png"/></draw:frame></text:p>
      <text:p text:style-name="P41" loext:marker-style-name="T6"/>
      <text:list text:continue-numbering="true" text:style-name="WWNum20">
        <text:list-item>
          <text:p text:style-name="P42" loext:marker-style-name="T20"><text:span text:style-name="T20">Suivez les instructions de l’assistant. Vous pouvez accepter toutes les valeurs par défaut. </text:span><text:span text:style-name="T20"/></text:p>
        </text:list-item>
      </text:list>
      <text:p text:style-name="P39" loext:marker-style-name="T20"/>
      <text:list text:continue-numbering="true" text:style-name="WWNum20">
        <text:list-item>
          <text:p text:style-name="P37" loext:marker-style-name="T20"><text:span text:style-name="T20">Sur la page </text:span><text:span text:style-name="T22">Select Components</text:span><text:span text:style-name="T20"> (Sélectionner les composants), vous avez besoin de </text:span><text:span text:style-name="T22">Full Installation</text:span><text:span text:style-name="T20"> (l’installation complète) qui doit être sélectionnée par défaut.</text:span></text:p>
        </text:list-item>
      </text:list>
      <text:p text:style-name="P39" loext:marker-style-name="T20"/>
      <text:p text:style-name="Standard"/>
      <text:p text:style-name="P2" loext:marker-style-name="T7"><draw:frame draw:style-name="fr2" draw:name="Picture 20" text:anchor-type="as-char" svg:width="4.3346in" svg:height="3.5453in"><draw:image xlink:href="Pictures/1000000000000246000001DC0E031CCF.png" xlink:type="simple" xlink:show="embed" xlink:actuate="onLoad" draw:mime-type="image/png"/></draw:frame></text:p>
      <text:p text:style-name="P7" loext:marker-style-name="T7"/>
      <text:p text:style-name="P7" loext:marker-style-name="T7"/>
      <text:list text:continue-numbering="true" text:style-name="WWNum20">
        <text:list-item>
          <text:p text:style-name="P43" loext:marker-style-name="T20"><text:span text:style-name="T20">Sur la page </text:span><text:span text:style-name="T22">Ready to Install</text:span><text:span text:style-name="T20"> <text:s/>(Prêt pour l’installation), cliquez sur </text:span><text:span text:style-name="T22">Install</text:span><text:span text:style-name="T20"> (Installer).</text:span></text:p>
        </text:list-item>
      </text:list>
      <text:p text:style-name="Standard"/>
      <text:p text:style-name="P44">Vous verrez l’assistant exécuter plusieurs installateurs différents : pour FFmpeg, eSpeak, Python. Il installera également trois modules Python.</text:p>
      <text:p text:style-name="P44"/>
      <text:p text:style-name="P44">Avant la fin de l’assistant, vous devriez voir apparaître une boîte de commande pendant quelques secondes qui vérifie l’installation d’aeneas. </text:p>
      <text:p text:style-name="P44"/>
      <text:p text:style-name="P45" loext:marker-style-name="T7"><draw:frame draw:style-name="fr2" draw:name="Picture 12" text:anchor-type="as-char" svg:width="4.3335in" svg:height="2.1965in"><draw:image xlink:href="Pictures/10000000000002930000014EBAE60B85.png" xlink:type="simple" xlink:show="embed" xlink:actuate="onLoad" draw:mime-type="image/png"/></draw:frame></text:p>
      <text:p text:style-name="P46" loext:marker-style-name="T7"/>
      <text:p text:style-name="P46" loext:marker-style-name="T7"/>
      <text:p text:style-name="P47"><text:span text:style-name="T43">Important</text:span>: Si Scripture App Builder était ouvert pendant que vous installiez aeneas, fermez-le et redémarrez-le pour vous assurer qu’il récupère les modifications apportées à vos paramètres de chemin.</text:p>
      <text:h text:style-name="P48" text:outline-level="1" loext:marker-style-name="T7"><text:bookmark-start text:name="_Toc217376184"/><text:bookmark-start text:name="_Hlk44919138"/><text:span text:style-name="T7">Installation sur Linux</text:span><text:bookmark-end text:name="_Toc217376184"/><text:span text:style-name="T7"/></text:h>
      <text:p text:style-name="P49" loext:marker-style-name="T7"/>
      <text:p text:style-name="P50" loext:marker-style-name="T20"><text:span text:style-name="T20">Si vous utilisez Ubuntu, le logiciel aeneas est une dépendance obligatoire de Scripture App Builder. Cela signifie qu’aeneas est automatiquement installé ou mis à jour avec Scripture App Builder et que vous n’avez pas besoin de l’installer manuellement.</text:span><text:bookmark-end text:name="_Hlk44919138"/><text:span text:style-name="T20"/></text:p>
      <text:p text:style-name="Standard"/>
      <text:p text:style-name="Standard"/>
      <text:h text:style-name="Heading_20_1" text:outline-level="1"><text:bookmark text:name="_Utilisation_d’aeneas_dans"/><text:bookmark-start text:name="_Toc217376185"/>Utilisation d’aeneas dans Scripture App Builder<text:bookmark-end text:name="_Toc217376185"/></text:h>
      <table:table table:name="Table3" table:style-name="Table3">
        <table:table-column table:style-name="Table3.A"/>
        <table:table-column table:style-name="Table3.B"/>
        <table:table-row table:style-name="Table3.1">
          <table:table-cell table:style-name="Table3.A1" office:value-type="string">
            <text:p text:style-name="P24" loext:marker-style-name="T30"><text:span text:style-name="T31"></text:span><text:span text:style-name="T30"> </text:span></text:p>
          </table:table-cell>
          <table:table-cell table:style-name="Table3.B1" office:value-type="string">
            <text:p text:style-name="P24" loext:marker-style-name="T32"><text:span text:style-name="T32">Aeneas ne gère parfois pas les caractères spéciaux dans les noms de fichiers. Si vous recevez une erreur lors de l'exécution d'Aeneas, assurez-vous que les noms de vos fichiers audio ne contiennent que des lettres anglaises standard de A à Z ou de a à z. Cela signifie que les lettres accentuées comme à ou é ne fonctionneront pas.</text:span><text:span text:style-name="T32"/></text:p>
            <text:p text:style-name="P51" loext:marker-style-name="T32"/>
            <text:p text:style-name="P24" loext:marker-style-name="T32"><text:span text:style-name="T32">Si le chemin d'accès à vos fichiers audio inclut des noms de dossiers contenant des caractères spéciaux, vous risquez également de rencontrer des problèmes.</text:span><text:span text:style-name="T32"/></text:p>
          </table:table-cell>
        </table:table-row>
      </table:table>
      <text:h text:style-name="Heading_20_2" text:outline-level="2" loext:marker-style-name="T17"><text:bookmark text:name="_Préparation_de_vos"/><text:bookmark-start text:name="_Toc217376186"/><text:span text:style-name="T17">Préparation de vos fichiers audio</text:span><text:bookmark-end text:name="_Toc217376186"/><text:span text:style-name="T17"/></text:h>
      <text:p text:style-name="P17" loext:marker-style-name="T20"><text:span text:style-name="T20">Comme mentionné précédemment, les meilleurs résultats sont obtenus :</text:span><text:span text:style-name="T20"/></text:p>
      <text:p text:style-name="P52" loext:marker-style-name="T20"><text:span text:style-name="T20">• avec un enregistrement clairement parlé ;</text:span><text:span text:style-name="T20"/></text:p>
      <text:p text:style-name="P52" loext:marker-style-name="T20"><text:span text:style-name="T20">• avec une musique de fond suffisamment basse pour ne pas perturber le système ;</text:span><text:span text:style-name="T20"/></text:p>
      <text:p text:style-name="P52" loext:marker-style-name="T20"><text:span text:style-name="T20">• avec un minimum d'effets sonores ou de pauses dans l'audio ;</text:span><text:span text:style-name="T20"/></text:p>
      <text:p text:style-name="P52" loext:marker-style-name="T20"><text:span text:style-name="T20">• avec des phrases synthétisées qui correspondent suffisamment à la prononciation de la langue.</text:span><text:span text:style-name="T20"/></text:p>
      <text:p text:style-name="P17" loext:marker-style-name="T20"><text:span text:style-name="T20">Vous n'avez peut-être pas le contrôle sur ces éléments, mais la plupart peuvent être corrigés lors du processus de peaufinage.</text:span><text:span text:style-name="T20"/></text:p>
      <text:p text:style-name="P17" loext:marker-style-name="T20"><text:span text:style-name="T20">Pour les enregistrements de textes bibliques, vous aurez besoin d'un fichier audio par chapitre. Il arrive souvent que les enregistrements du premier chapitre d'un livre comportent une introduction plus longue que les chapitres suivants. Ces introductions ne sont généralement pas synchronisées ; vous devrez donc indiquer à aeneas la durée à ignorer au début de l'audio d'un chapitre.</text:span><text:span text:style-name="T20"/></text:p>
      <text:p text:style-name="P17" loext:marker-style-name="T44"><text:span text:style-name="T20"><text:s/></text:span><text:span text:style-name="T44"/></text:p>
      <table:table table:name="Table4" table:style-name="Table4">
        <table:table-column table:style-name="Table4.A"/>
        <table:table-column table:style-name="Table4.B"/>
        <table:table-row table:style-name="Table4.1">
          <table:table-cell table:style-name="Table4.A1" office:value-type="string">
            <text:p text:style-name="P24" loext:marker-style-name="T35"><text:span text:style-name="T36"></text:span><text:span text:style-name="T35"> </text:span></text:p>
          </table:table-cell>
          <table:table-cell table:style-name="Table4.B1" office:value-type="string">
            <text:p text:style-name="P24" loext:marker-style-name="T32"><text:span text:style-name="T32">Avant de synchroniser un ensemble de fichiers audio, essayez d'écouter plusieurs livres pour déterminer la durée des introductions. Essayez de déterminer la durée approximative de l'introduction du premier chapitre d'un livre et celle des introductions des chapitres suivants.</text:span><text:span text:style-name="T32"/></text:p>
          </table:table-cell>
        </table:table-row>
      </table:table>
      <text:p text:style-name="Standard"/>
      <text:h text:style-name="Heading_20_2" text:outline-level="2" loext:marker-style-name="T17"><text:bookmark-start text:name="_Toc217376187"/><text:span text:style-name="T17">Exécution de l’assistant de synchronisation audio</text:span><text:bookmark-end text:name="_Toc217376187"/><text:span text:style-name="T17"/></text:h>
      <text:p text:style-name="P17">Vous pouvez exécuter l’assistant de <text:span text:style-name="T45">Synchroniser à l’aide d’aeneas</text:span> à partir de cinq endroits dans Scripture App Builder:</text:p>
      <text:list text:style-name="WWNum12">
        <text:list-item>
          <text:p text:style-name="P53">L’onglet <text:span text:style-name="T45">Fichiers audio</text:span> d’un livre ou d’une collection de livres. Sélectionnez une ou plusieurs lignes dans le tableau, cliquez avec le bouton droit de la souris et sélectionnez <text:span text:style-name="T45">Synchroniser à l’aide d’aeneas</text:span>.</text:p>
        </text:list-item>
      </text:list>
      <text:p text:style-name="P16"/>
      <table:table table:name="Table5" table:style-name="Table5">
        <table:table-column table:style-name="Table5.A"/>
        <table:table-column table:style-name="Table5.B"/>
        <table:table-row table:style-name="Table5.1">
          <table:table-cell table:style-name="Table5.A1" office:value-type="string">
            <text:p text:style-name="P24" loext:marker-style-name="T30"><text:span text:style-name="T31"></text:span><text:span text:style-name="T30"> </text:span></text:p>
          </table:table-cell>
          <table:table-cell table:style-name="Table5.B1" office:value-type="string">
            <text:p text:style-name="P24" loext:marker-style-name="T32"><text:span text:style-name="T32">Pour sélectionner plusieurs fichiers audio, cliquez sur le nom d'un fichier, maintenez la touche Ctrl enfoncée et cliquez sur les autres fichiers souhaités. Pour sélectionner plusieurs fichiers, cliquez sur le premier, maintenez la touche Maj enfoncée et cliquez sur le dernier. La sélection devrait être complète. Pour sélectionner tous les fichiers, cliquez sur n'importe quel fichier, puis appuyez sur Ctrl-A.</text:span><text:span text:style-name="T32"/></text:p>
          </table:table-cell>
        </table:table-row>
      </table:table>
      <text:p text:style-name="P54" loext:marker-style-name="T46"/>
      <text:list text:continue-numbering="true" text:style-name="WWNum12">
        <text:list-item>
          <text:p text:style-name="P55">L’onglet <text:span text:style-name="T45">Synchronisation audio</text:span> d’une collection de livres. Cliquez sur le bouton <text:span text:style-name="T45">Synchroniser à l’aide d’aeneas</text:span>.</text:p>
        </text:list-item>
        <text:list-item>
          <text:p text:style-name="P55">L’onglet <text:span text:style-name="T45">Synchronisation audio</text:span> d’un livre. Cliquez sur le bouton <text:span text:style-name="T45">Synchroniser à l’aide d’aeneas</text:span>.</text:p>
        </text:list-item>
        <text:list-item>
          <text:p text:style-name="P55">L’onglet <text:span text:style-name="T45">Collection de livres</text:span> d’une collection de livres. Sélectionnez une ou plusieurs lignes dans le tableau de livres, cliquez avec le bouton droit de la souris et sélectionnez <text:span text:style-name="T45">Synchroniser à l’aide d’aeneas</text:span>.</text:p>
        </text:list-item>
        <text:list-item>
          <text:p text:style-name="P55">L’arborescence du projet à gauche de l’écran. Faites un clic droit sur un livre ou une collection de livres et sélectionnez <text:span text:style-name="T45">Synchroniser à l’aide d’aeneas</text:span>.</text:p>
        </text:list-item>
      </text:list>
      <text:p text:style-name="P56">Toutes ces sélections de menu devraient lancer l'assistant de synchronisation et produire le même résultat. Suivez les instructions de l’assistant pour configurer la synchronisation.</text:p>
      <table:table table:name="Table6" table:style-name="Table6">
        <table:table-column table:style-name="Table6.A"/>
        <table:table-column table:style-name="Table6.B"/>
        <table:table-row table:style-name="Table6.1">
          <table:table-cell table:style-name="Table6.A1" office:value-type="string">
            <text:p text:style-name="P24" loext:marker-style-name="T35"><text:span text:style-name="T36"></text:span><text:span text:style-name="T35"> </text:span></text:p>
          </table:table-cell>
          <table:table-cell table:style-name="Table6.B1" office:value-type="string">
            <text:p text:style-name="P24" loext:marker-style-name="T32"><text:span text:style-name="T32">Pour obtenir les meilleurs résultats initiaux, il est important de savoir la quantité d'audio à sauter au début du fichier (le cas échéant) avant que l'audio du texte des Écritures ne démarre réellement. Essayez simplement d'écouter le premier chapitre d'un livre et expérimentez le début de la valeur audio. Faites ensuite de même avec le deuxième chapitre. Si les valeurs semblent correctes, synchronisez tous les autres chapitres en une seule fois, en utilisant les valeurs que vous avez déterminées.</text:span><text:span text:style-name="T32"/></text:p>
          </table:table-cell>
        </table:table-row>
      </table:table>
      <text:p text:style-name="P57">Pour les utilisateurs de Windows, si l’assistant demande « Où avez-vous installé aeneas ? », veuillez suivre les <text:a xlink:type="simple" xlink:href="#_Installation_sur_Windows" text:style-name="Internet_20_link" text:visited-style-name="Visited_20_Internet_20_Link"><text:span text:style-name="Internet_20_link">instructions d’installation</text:span></text:a>.</text:p>
      <text:h text:style-name="P58" text:outline-level="3" loext:marker-style-name="T7"><text:bookmark-start text:name="_Toc217376188"/><text:span text:style-name="T7">Parcourir l'assistant de synchronisation</text:span><text:bookmark-end text:name="_Toc217376188"/><text:span text:style-name="T7"/></text:h>
      <text:list text:style-name="WWNum38">
        <text:list-item>
          <text:p text:style-name="P59" loext:marker-style-name="T47"><text:span text:style-name="T47">Voix</text:span><text:span text:style-name="T47"/></text:p>
        </text:list-item>
      </text:list>
      <text:p text:style-name="P60">Il s'agit de la voix utilisée par eSpeak pour la synthèse vocale. Choisissez le code de langue correspondant le mieux à votre langue cible. L'espéranto est le choix par défaut, une langue phonétique qui fonctionne très bien avec de nombreuses langues. Si vous ne trouvez pas d'autre langue proche de la vôtre dans la liste, essayez l'espéranto. </text:p>
      <text:p text:style-name="List_20_Paragraph"/>
      <text:p text:style-name="List_20_Paragraph" loext:marker-style-name="T7"><draw:frame draw:style-name="fr2" draw:name="Picture 1" text:anchor-type="as-char" svg:width="4.8134in" svg:height="2.9043in"><draw:image xlink:href="Pictures/10000000000002BD000001A7AB22AE2A.png" xlink:type="simple" xlink:show="embed" xlink:actuate="onLoad" draw:mime-type="image/png"/></draw:frame><text:span text:style-name="T48"><text:s/></text:span></text:p>
      <text:p text:style-name="P61" loext:marker-style-name="T47"/>
      <text:list text:continue-numbering="true" text:style-name="WWNum38">
        <text:list-item>
          <text:p text:style-name="P62" loext:marker-style-name="T45"><text:span text:style-name="T45">Remplacements de caractères</text:span><text:span text:style-name="T45"/></text:p>
        </text:list-item>
      </text:list>
      <text:p text:style-name="List_20_Paragraph">Si votre langue comporte des caractères non alphanumériques (y compris des caractères accentués), vous obtiendrez de meilleurs résultats en fournissant à aeneas un ensemble de remplacements de caractères. Certains remplacements sont fournis par défaut, mais en expérimentant avec le processus de synchronisation, vous constaterez peut-être qu'il est nécessaire d'en ajouter ou d'en supprimer. Pour les langues non romains, vous pouvez remplacer les caractères par des lettres romains ou transcrire temporairement votre texte en caractères romains pour la synchronisation. Dans tous les cas, la synchronisation devrait rester correcte.</text:p>
      <text:p text:style-name="List_20_Paragraph"/>
      <text:p text:style-name="List_20_Paragraph" loext:marker-style-name="T7"><draw:frame draw:style-name="fr2" draw:name="Image2" text:anchor-type="as-char" svg:width="4.8508in" svg:height="2.9354in"><draw:image xlink:href="Pictures/10000000000002BB000001A7CE967816.png" xlink:type="simple" xlink:show="embed" xlink:actuate="onLoad" draw:mime-type="image/png"/></draw:frame></text:p>
      <text:p text:style-name="P63" loext:marker-style-name="T47"/>
      <text:list text:continue-numbering="true" text:style-name="WWNum38">
        <text:list-item>
          <text:p text:style-name="P62" loext:marker-style-name="T47"><text:span text:style-name="T47">Début de l’audio</text:span><text:span text:style-name="T47"/></text:p>
        </text:list-item>
      </text:list>
      <text:p text:style-name="P64">Les fichiers audio des Écritures contiennent généralement le nom du livre, le numéro du chapitre et parfois quelques informations d'introduction avant le début du texte biblique. Il est généralement déconseillé de synchroniser et de surligner ces parties du texte. Vous devrez donc indiquer à aeneas le nombre de secondes d'audio à ignorer au début du fichier audio. S'il n'y a pas d'introduction audio, choisissez l'option 1 : <text:span text:style-name="T45">Non, il n'y a aucune section à ignorer dans ces fichiers</text:span>.</text:p>
      <text:p text:style-name="P64">L'option 2 est peu fiable, nous vous recommandons donc d'utiliser l'option 3 si vous avez de l'audio à ignorer. Consultez la section « <text:a xlink:type="simple" xlink:href="#_Préparation_de_vos" text:style-name="Internet_20_link" text:visited-style-name="Visited_20_Internet_20_Link"><text:span text:style-name="Internet_20_link">Préparation de vos fichiers audio </text:span></text:a>» pour savoir comment déterminer la durée du premier chapitre et des autres chapitres à ignorer. Vous pouvez également commencer par une valeur de 7 secondes pour le premier chapitre et de 4 secondes pour les autres chapitres. Vous pouvez tester plusieurs fichiers pour vérifier la précision de cette valeur avant de synchroniser un livre ou un ensemble de livres.</text:p>
      <text:p text:style-name="P65"><text:tab/></text:p>
      <text:p text:style-name="List_20_Paragraph" loext:marker-style-name="T47"><draw:frame draw:style-name="fr2" draw:name="Image3" text:anchor-type="as-char" svg:width="5.0752in" svg:height="3.0945in"><draw:image xlink:href="Pictures/10000000000002B9000001A9A6759DB9.png" xlink:type="simple" xlink:show="embed" xlink:actuate="onLoad" draw:mime-type="image/png"/></draw:frame></text:p>
      <text:p text:style-name="P63" loext:marker-style-name="T47"/>
      <text:list text:continue-numbering="true" text:style-name="WWNum38">
        <text:list-item>
          <text:p text:style-name="P62" loext:marker-style-name="T47"><text:span text:style-name="T47">Fin de l’audio</text:span><text:span text:style-name="T47"/></text:p>
        </text:list-item>
      </text:list>
      <text:p text:style-name="List_20_Paragraph" loext:marker-style-name="T45">Ceci est moins courant et désigne tout élément (comme la musique de fin) dans l'audio après la prononciation du dernier verset du texte biblique. Normalement, vous pouvez simplement sélectionner l'option 1 : <text:span text:style-name="T45">Non, il n'y a pas de partie à ignorer dans ces fichiers</text:span>.<text:span text:style-name="T45">.</text:span></text:p>
      <text:p text:style-name="P66" loext:marker-style-name="T49"/>
      <text:p text:style-name="P67" loext:marker-style-name="T7"><draw:frame draw:style-name="fr2" draw:name="Image4" text:anchor-type="as-char" svg:width="5.1118in" svg:height="3.0929in"><draw:image xlink:href="Pictures/10000000000002BB000001A7AC0B98ED.png" xlink:type="simple" xlink:show="embed" xlink:actuate="onLoad" draw:mime-type="image/png"/></draw:frame></text:p>
      <text:p text:style-name="P68" loext:marker-style-name="T7"/>
      <text:list text:continue-numbering="true" text:style-name="WWNum38">
        <text:list-item>
          <text:p text:style-name="P62" loext:marker-style-name="T47"><text:span text:style-name="T47">Entre les phrases</text:span><text:span text:style-name="T47"/></text:p>
        </text:list-item>
      </text:list>
      <text:p text:style-name="List_20_Paragraph">Cet écran vous permet de sélectionner l'emplacement de surbrillance entre les phrases. La valeur par défaut est généralement optimale : <text:span text:style-name="T45">au milieu du silence</text:span>…</text:p>
      <text:p text:style-name="P66" loext:marker-style-name="T49"/>
      <text:p text:style-name="P66" loext:marker-style-name="T49"/>
      <text:p text:style-name="List_20_Paragraph" loext:marker-style-name="T7"><draw:frame draw:style-name="fr2" draw:name="Image5" text:anchor-type="as-char" svg:width="5.022in" svg:height="3.0398in"><draw:image xlink:href="Pictures/10000000000002BB000001A7C08F989D.png" xlink:type="simple" xlink:show="embed" xlink:actuate="onLoad" draw:mime-type="image/png"/></draw:frame></text:p>
      <text:p text:style-name="P68" loext:marker-style-name="T7"/>
      <text:list text:continue-numbering="true" text:style-name="WWNum38">
        <text:list-item>
          <text:p text:style-name="P62" loext:marker-style-name="T47"><text:span text:style-name="T47">Niveau de Synchronisation</text:span><text:span text:style-name="T47"/></text:p>
        </text:list-item>
      </text:list>
      <text:p text:style-name="List_20_Paragraph">Le niveau de synchronisation détermine la manière dont le texte est découpé en fragments distincts à mettre en évidence. L'option « <text:span text:style-name="T45">Phrase par phrase</text:span> » vous permet de sélectionner un ensemble de caractères (généralement des signes de ponctuation) qui indiquent à aeneas comment découper le texte, permettant ainsi de surligner des sections plus petites d'un verset à la fois.</text:p>
      <text:p text:style-name="List_20_Paragraph">L'option « <text:span text:style-name="T45">Verset par verset</text:span> » met en évidence le verset entier à la fois.</text:p>
      <text:p text:style-name="P66" loext:marker-style-name="T49"/>
      <text:p text:style-name="List_20_Paragraph" loext:marker-style-name="T7"><draw:frame draw:style-name="fr2" draw:name="Image6" text:anchor-type="as-char" svg:width="5.2272in" svg:height="3.1571in"><draw:image xlink:href="Pictures/10000000000002B9000001A59D76BB60.png" xlink:type="simple" xlink:show="embed" xlink:actuate="onLoad" draw:mime-type="image/png"/></draw:frame></text:p>
      <text:p text:style-name="P68" loext:marker-style-name="T7"/>
      <table:table table:name="Table7" table:style-name="Table7">
        <table:table-column table:style-name="Table7.A"/>
        <table:table-column table:style-name="Table7.B"/>
        <table:table-row table:style-name="Table7.1">
          <table:table-cell table:style-name="Table7.A1" office:value-type="string">
            <text:p text:style-name="P24" loext:marker-style-name="T35"><text:span text:style-name="T36"></text:span><text:span text:style-name="T35"> </text:span></text:p>
          </table:table-cell>
          <table:table-cell table:style-name="Table7.B1" office:value-type="string">
            <text:p text:style-name="P24" loext:marker-style-name="T32"><text:span text:style-name="T32">La synchronisation </text:span><text:span text:style-name="T50">verset par verset</text:span><text:span text:style-name="T32"> est plus facile, mais elle implique que des sections de texte potentiellement volumineuses, voire plusieurs phrases, sont mises en évidence simultanément. Dans de rares cas, un verset entier peut ne pas tenir sur l'écran de l'application. La synchronisation phrase par phrase est généralement plus pratique pour permettre aux utilisateurs de suivre le texte.</text:span></text:p>
          </table:table-cell>
        </table:table-row>
      </table:table>
      <text:p text:style-name="List_20_Paragraph"/>
      <text:list text:continue-numbering="true" text:style-name="WWNum38">
        <text:list-item>
          <text:p text:style-name="P62" loext:marker-style-name="T47"><text:span text:style-name="T47">Phrases</text:span><text:span text:style-name="T47"/></text:p>
        </text:list-item>
      </text:list>
      <text:p text:style-name="List_20_Paragraph">Si vous utilisez le niveau de synchronisation phrase par phrase, vous pouvez spécifier ici les caractères de coupure de phrase. SAB fournit un ensemble par défaut modifiable. Vous pouvez utiliser \u et un numéro Unicode pour spécifier un caractère Unicode spécifique.</text:p>
      <text:p text:style-name="P66" loext:marker-style-name="T49"/>
      <text:p text:style-name="P66" loext:marker-style-name="T49"/>
      <text:p text:style-name="List_20_Paragraph" loext:marker-style-name="T47"><draw:frame draw:style-name="fr2" draw:name="Image7" text:anchor-type="as-char" svg:width="5.2756in" svg:height="3.172in"><draw:image xlink:href="Pictures/10000000000002B9000001A3E37BEC03.png" xlink:type="simple" xlink:show="embed" xlink:actuate="onLoad" draw:mime-type="image/png"/></draw:frame></text:p>
      <text:p text:style-name="P61" loext:marker-style-name="T47"/>
      <text:list text:continue-numbering="true" text:style-name="WWNum38">
        <text:list-item>
          <text:p text:style-name="P62" loext:marker-style-name="T47"><text:span text:style-name="T47">Titres et Marqueurs</text:span><text:span text:style-name="T47"/></text:p>
        </text:list-item>
      </text:list>
      <text:p text:style-name="List_20_Paragraph">Si votre texte enregistré comprend des titres de chapitre, sélectionnez l'option Titres de section.</text:p>
      <text:p text:style-name="P66" loext:marker-style-name="T49"/>
      <text:p text:style-name="List_20_Paragraph" loext:marker-style-name="T7"><draw:frame draw:style-name="fr2" draw:name="Image8" text:anchor-type="as-char" svg:width="5.9846in" svg:height="3.6319in"><draw:image xlink:href="Pictures/10000000000002B9000001A7BA59436E.png" xlink:type="simple" xlink:show="embed" xlink:actuate="onLoad" draw:mime-type="image/png"/></draw:frame></text:p>
      <text:p text:style-name="P68" loext:marker-style-name="T7"/>
      <text:list text:continue-numbering="true" text:style-name="WWNum38">
        <text:list-item>
          <text:p text:style-name="P62" loext:marker-style-name="T47"><text:span text:style-name="T47">Dossier de sortie</text:span><text:span text:style-name="T47"/></text:p>
        </text:list-item>
      </text:list>
      <text:p text:style-name="List_20_Paragraph">Spécifiez les dossiers de sortie pour les listes de phrases et les fichiers de timing. Les emplacements par défaut conviennent généralement, sauf si vous avez besoin de les enregistrer ailleurs.</text:p>
      <text:p text:style-name="P66" loext:marker-style-name="T49"/>
      <text:p text:style-name="P66" loext:marker-style-name="T49"/>
      <text:p text:style-name="List_20_Paragraph"><draw:frame draw:style-name="fr2" draw:name="Image9" text:anchor-type="as-char" svg:width="5.5299in" svg:height="3.3882in"><draw:image xlink:href="Pictures/10000000000002B9000001AB1E5A81EC.png" xlink:type="simple" xlink:show="embed" xlink:actuate="onLoad" draw:mime-type="image/png"/></draw:frame><text:s/></text:p>
      <text:p text:style-name="Standard"/>
      <text:p text:style-name="P16">Après la dernière page de l’assistant, le processus de synchronisation démarre dans une fenêtre de commande distincte. Il exécute un fichier batch (ou <text:span text:style-name="T4">bash script</text:span>) qui appelle une tâche aeneas pour chaque chapitre de chaque livre.</text:p>
      <text:p text:style-name="P16">Au fur et à mesure que des fichiers de minutage sont générés, leurs noms de fichiers sont ajoutés au tableau sur la page <text:span text:style-name="T45">Fichiers audio</text:span>. </text:p>
      <text:p text:style-name="P16"/>
      <text:h text:style-name="Heading_20_2" text:outline-level="2"><text:bookmark-start text:name="_Toc217376189"/>Dépannage<text:bookmark-end text:name="_Toc217376189"/></text:h>
      <text:p text:style-name="P69"><text:span text:style-name="T41">Si la synchronisation échoue, assurez-vous qu’aeneas a été correctement installé. Vous pouvez vérifier l’installation en sélectionnant </text:span><text:span text:style-name="T42">Outils</text:span><text:span text:style-name="T41"> </text:span><text:span text:style-name="T51"></text:span><text:span text:style-name="T41"> </text:span><text:span text:style-name="T42">Vérifier installation d’aeneas...</text:span><text:span text:style-name="T41"> à partir de la barre de menu du Scripture App Builder. Voir également </text:span><text:a xlink:type="simple" xlink:href="#_Utilisation_d’aeneas_dans" text:style-name="Internet_20_link" text:visited-style-name="Visited_20_Internet_20_Link"><text:span text:style-name="Internet_20_link"><text:span text:style-name="T41">la note sur les noms de fichiers et de dossiers</text:span></text:span></text:a><text:span text:style-name="T41">.</text:span></text:p>
      <text:p text:style-name="P57">Un problème courant sous Windows est qu’<text:span text:style-name="T45">eSpeak</text:span> cesse de fonctionner après un certain temps. Pour corriger cela, exécutez à nouveau le programme d’installation d’aeneas Windows.</text:p>
      <text:p text:style-name="P70">Pour vérifier qu’<text:span text:style-name="T45">eSpeak</text:span> a été correctement installé et qu’il se trouve dans votre chemin, ouvrez une nouvelle invite de commande Windows et tapez:</text:p>
      <text:p text:style-name="Command_20_Line" loext:marker-style-name="T17"><text:span text:style-name="T17"><text:s/>espeak bonjour</text:span><text:span text:style-name="T17"/></text:p>
      <text:p text:style-name="P16">Si tout va bien, vous devriez entendre prononcer le mot « bonjour ».</text:p>
      <text:p text:style-name="P71"/>
      <text:h text:style-name="Heading_20_2" text:outline-level="2" loext:marker-style-name="T17"><text:bookmark-start text:name="_Toc217376190"/><text:span text:style-name="T17">Visualisation et test des fichiers de synchronisation créés par aeneas</text:span><text:bookmark-end text:name="_Toc217376190"/><text:span text:style-name="T17"/></text:h>
      <text:p text:style-name="P16">Pour afficher un fichier de synchronisation généré, sélectionnez une ligne sur la page <text:span text:style-name="T45">Fichiers audio</text:span>, cliquez avec le bouton droit et sélectionnez <text:span text:style-name="T45">Voir fichier de synchronisation</text:span>.</text:p>
      <text:p text:style-name="P16">Pour tester les fichiers de synchronisation générés avec le texte et l’audio, sélectionnez une ligne dans la page <text:span text:style-name="T45">Fichiers audio</text:span>, cliquez avec le bouton droit de la souris et sélectionnez <text:span text:style-name="T45">Exporter comme HTML</text:span>.</text:p>
      <text:h text:style-name="Heading_20_2" text:outline-level="2" loext:marker-style-name="T17"><text:bookmark-start text:name="_Toc217376191"/><text:bookmark-start text:name="_Hlk44919204"/><text:span text:style-name="T17">Ajustez les fichiers de synchronisation à l'aide de la fonction d'Aperçu audio.</text:span><text:bookmark-end text:name="_Toc217376191"/><text:span text:style-name="T17"/></text:h>
      <text:p text:style-name="Standard"/>
      <text:p text:style-name="Standard">Vous pouvez visualiser un aperçu de la forme d'onde de chaque fichier audio et ajuster les points de synchronisation directement depuis l'interface. Pour ce faire, faites un clic droit sur un fichier audio (dans <text:span text:style-name="T45">Livres</text:span> <text:span text:style-name="T52"></text:span> <text:span text:style-name="T53">Nom de la collection</text:span> <text:span text:style-name="T52"></text:span> <text:span text:style-name="T53">Nom du livre</text:span> <text:span text:style-name="T52"></text:span> <text:span text:style-name="T45">Fichiers audio</text:span>) ou double-cliquez sur le fichier audio. L'écran d'aperçu audio s'affichera.</text:p>
      <text:p text:style-name="Standard"><draw:custom-shape text:anchor-type="char" draw:z-index="15" draw:name="AutoShape 13" draw:style-name="gr6" draw:text-style-name="P31" svg:width="1.0205in" svg:height="0.2362in" draw:transform="rotate (-0.890292451442307) translate (3.16317257217848in 2.47011701662292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draw:z-index="16" draw:name="AutoShape 13" draw:style-name="gr7" draw:text-style-name="P31" svg:width="1.1177in" svg:height="0.237in" draw:transform="rotate (-1.45490646446247) translate (3.90079833770779in 2.36666666666667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draw:z-index="17" draw:name="AutoShape 13" draw:style-name="gr8" draw:text-style-name="P31" svg:width="1.1177in" svg:height="0.237in" draw:transform="rotate (-1.32627569859049) translate (3.61821412948381in 2.35891294838145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draw:z-index="14" draw:name="AutoShape 13" draw:style-name="gr9" draw:text-style-name="P31" svg:width="1.1177in" svg:height="0.2378in" draw:transform="rotate (-0.890292451442307) translate (0.527192694663167in 2.46624562554681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2" draw:name="Picture 204" text:anchor-type="as-char" svg:width="5.978in" svg:height="2.5445in"><draw:image xlink:href="Pictures/100000000000034300000164CC2F3B28.png" xlink:type="simple" xlink:show="embed" xlink:actuate="onLoad" draw:mime-type="image/png"/></draw:frame></text:p>
      <text:p text:style-name="Standard"/>
      <text:p text:style-name="Standard"/>
      <text:p text:style-name="Standard"><draw:custom-shape text:anchor-type="char" style:rel-height="20%" draw:z-index="19" draw:name="Text Box 2" draw:style-name="gr10" draw:text-style-name="P72" svg:width="1.6421in" svg:height="1.5362in" svg:x="0.9398in" svg:y="0.0673in"><text:p text:style-name="Frame_20_contents">Position actuelle dans le fichier audio pendant la lecture.</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18" draw:name="Text Box 2" draw:style-name="gr11" draw:text-style-name="P72" svg:width="1.3732in" svg:height="1.5362in" svg:x="3.3772in" svg:y="0.0661in"><text:p text:style-name="Frame_20_contents">Sauts de phrase dans le fichier de synchronisatio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text:line-break/>Depuis la fenêtre d'<text:span text:style-name="T45">aperçu audio</text:span>, vous pouvez lire, mettre en pause ou arrêter l'audio. Une barre verticale mobile indique la position actuelle dans le fichier audio. Le texte synchronisé s'affiche en bas de la fenêtre au fur et à un mesure de la lecture de chaque phrase. Des lignes vertes verticales indiquent les séparations entre les phrases, chacune étant étiquetée avec le numéro du verset et de la phrase (par exemple, 1a, 1b).</text:p>
      <text:p text:style-name="Standard">Vous pouvez cliquer et faire glisser une ligne de séparation de phrase pour ajuster sa position. Utilisez les commandes de zoom pour un positionnement plus précis. Une fois satisfait, fermez la fenêtre d'aperçu en cliquant sur la croix (X) dans le coin supérieur droit. Il vous sera demandé d'enregistrer les modifications apportées au fichier de synchronisation.</text:p>
      <text:p text:style-name="Standard"/>
      <text:h text:style-name="Heading_20_2" text:outline-level="2" loext:marker-style-name="T17"><text:bookmark-start text:name="_Toc217376192"/><text:span text:style-name="T17">Ajustez les fichiers de synchronisation à l’aide de la visionneuse Peaufiner les timings</text:span><text:bookmark-end text:name="_Toc217376192"/><text:span text:style-name="T17"/></text:h>
      <text:p text:style-name="P73">Pour peaufiner un fichier de synchronisation généré:</text:p>
      <text:list text:style-name="WWNum23">
        <text:list-item>
          <text:p text:style-name="P74">Sélectionnez une ligne sur la page <text:span text:style-name="T45">Fichiers audio</text:span>, faites un clic droit, puis sélectionnez <text:span text:style-name="T45">Ajuster précisément les temps</text:span>...</text:p>
        </text:list-item>
      </text:list>
      <text:p text:style-name="P75">Une page devrait s’ouvrir dans votre navigateur par défaut, ressemblant à ceci:</text:p>
      <text:p text:style-name="P76" loext:marker-style-name="T7"><draw:frame draw:style-name="fr2" draw:name="Image 1" text:anchor-type="as-char" svg:width="5.1665in" svg:height="4.152in"><draw:image xlink:href="Pictures/10000000000003C80000030A5E05DBCB.png" xlink:type="simple" xlink:show="embed" xlink:actuate="onLoad" draw:mime-type="image/png"/></draw:frame><text:span text:style-name="T7"><text:line-break/></text:span></text:p>
      <text:list text:continue-numbering="true" text:style-name="WWNum23">
        <text:list-item>
          <text:p text:style-name="P77">Cliquez sur la première ligne du tableau pour lancer la lecture audio. La ligne sera surlignée en jaune. Vérifiez si l'audio correspond au texte de la phrase surlignée. </text:p>
        </text:list-item>
      </text:list>
      <text:p text:style-name="P78"/>
      <text:list text:continue-numbering="true" text:style-name="WWNum23">
        <text:list-item>
          <text:p text:style-name="P77">3. Dès que vous entendez le premier ou les deux premiers mots de la ligne sélectionnée et qu'il semble que le texte et l'audio correspondent exactement, cliquez sur la ligne suivante.</text:p>
        </text:list-item>
      </text:list>
      <text:p text:style-name="List_20_Paragraph"/>
      <text:list text:continue-numbering="true" text:style-name="WWNum23">
        <text:list-item>
          <text:p text:style-name="P77">Continuez à cliquer sur chaque ligne pour écouter suffisamment de temps pour déterminer si la pause a été placée au bon endroit, c’est-à-dire ni trop tôt ni trop tard.</text:p>
        </text:list-item>
      </text:list>
      <text:p text:style-name="List_20_Paragraph"/>
      <text:p text:style-name="P78">Vous pouvez également utiliser le raccourci clavier <text:span text:style-name="T45">N</text:span> pour passer à la rangée suivante.</text:p>
      <text:p text:style-name="List_20_Paragraph"/>
      <text:p text:style-name="P79">5. Si vous constatez que le minutage d'une ligne doit être ajusté, vous pouvez le décaler par incréments :</text:p>
      <text:p text:style-name="P80">• Cliquez sur le bouton plus (+) pour avancer l'heure de début de 0,1 seconde.</text:p>
      <text:p text:style-name="P81">• Cliquez sur le double plus (++) pour avancer d'une seconde.</text:p>
      <text:p text:style-name="P81">• Cliquez sur le triple plus (+++) pour avancer de 10 secondes.</text:p>
      <text:p text:style-name="P81">• Cliquez sur le bouton moins (–) pour reculer l'heure de début de 0,1 seconde.</text:p>
      <text:p text:style-name="P81">• Cliquez sur le double moins (– –) pour reculer d'une seconde.</text:p>
      <text:p text:style-name="P81">• Cliquez sur le triple moins (– – –) pour reculer de 10 secondes.</text:p>
      <text:p text:style-name="P81"/>
      <text:p text:style-name="P82" loext:marker-style-name="T7"><draw:custom-shape text:anchor-type="char" draw:z-index="9" draw:name="AutoShape 13" draw:style-name="gr12" draw:text-style-name="P31" svg:width="2.2004in" svg:height="0.2689in" draw:transform="rotate (-1.83451557677124) translate (1.75551727909011in 3.1382928696413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draw:z-index="8" draw:name="AutoShape 13" draw:style-name="gr13" draw:text-style-name="P31" svg:width="3.3315in" svg:height="0.2689in" draw:transform="rotate (-1.82683612806247) translate (4.31061898512686in 2.65685695538058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2" draw:name="Picture 205" text:anchor-type="as-char" svg:width="5.9846in" svg:height="3.8902in"><draw:image xlink:href="Pictures/100000000000039D0000025B099C1A0A.png" xlink:type="simple" xlink:show="embed" xlink:actuate="onLoad" draw:mime-type="image/png"/></draw:frame></text:p>
      <text:p text:style-name="P68" loext:marker-style-name="T7"/>
      <text:p text:style-name="P68" loext:marker-style-name="T7"/>
      <text:p text:style-name="P68" loext:marker-style-name="T7"><draw:custom-shape text:anchor-type="char" style:rel-width="40%" draw:z-index="13" draw:name="Text Box 2" draw:style-name="gr14" draw:text-style-name="P31" svg:width="2.5823in" svg:height="1.0067in" svg:x="3.6083in" svg:y="0.0965in"><text:p text:style-name="Frame_20_contents">Ajustez l’heure de début du timing actuellement sélectionné à l’aide des boutons plus et moins.</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0" draw:name="Text Box 2" draw:style-name="gr15" draw:text-style-name="P72" svg:width="2.5823in" svg:height="1.5362in" svg:x="0.8075in" svg:y="0.0953in"><text:p text:style-name="Frame_20_contents">Cliquez sur chaque ligne pendant suffisamment de temps pour vérifier si l’audio commence au bon endroit.</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8" loext:marker-style-name="T7"/>
      <text:p text:style-name="P68" loext:marker-style-name="T7"/>
      <text:p text:style-name="P68" loext:marker-style-name="T7"/>
      <text:p text:style-name="P68" loext:marker-style-name="T7"/>
      <text:p text:style-name="P68" loext:marker-style-name="T7"/>
      <text:p text:style-name="P68" loext:marker-style-name="T7"/>
      <table:table table:name="Table8" table:style-name="Table8">
        <table:table-column table:style-name="Table8.A"/>
        <table:table-column table:style-name="Table8.B"/>
        <table:table-row table:style-name="Table8.1">
          <table:table-cell table:style-name="Table8.A1" office:value-type="string">
            <text:p text:style-name="P24" loext:marker-style-name="T30"><text:span text:style-name="T31"></text:span><text:span text:style-name="T30"> </text:span></text:p>
          </table:table-cell>
          <table:table-cell table:style-name="Table8.B1" office:value-type="string">
            <text:p text:style-name="P24" loext:marker-style-name="T32"><text:span text:style-name="T32">Si l'audio joué correspond à une phrase plus éloignée du point actuel, vous devrez reculer l'heure de début.</text:span><text:span text:style-name="T32"/></text:p>
          </table:table-cell>
        </table:table-row>
      </table:table>
      <text:p text:style-name="P16">Lorsque vous êtes satisfait de la ligne actuelle, continuez à cliquer sur les lignes suivantes de la même manière, en affinant celles qui doivent être ajustées.</text:p>
      <text:p text:style-name="List_20_Paragraph"/>
      <text:p text:style-name="P83"><text:span text:style-name="T45">Attention !</text:span> Lorsque vous avez atteint la dernière ligne du tableau, enregistrez vos modifications en cliquant sur le bouton « <text:span text:style-name="T45">Save Changes to Timing File</text:span> » (Enregistrer les modifications dans le fichier de synchronisation) en bas de la page (ou en utilisant le raccourci clavier <text:span text:style-name="T45">T</text:span>).</text:p>
      <text:p text:style-name="List_20_Paragraph"/>
      <table:table table:name="Table9" table:style-name="Table9">
        <table:table-column table:style-name="Table9.A"/>
        <table:table-column table:style-name="Table9.B"/>
        <table:table-row table:style-name="Table9.1">
          <table:table-cell table:style-name="Table9.A1" office:value-type="string">
            <text:p text:style-name="P24" loext:marker-style-name="T30"><text:span text:style-name="T31"></text:span><text:span text:style-name="T30"> </text:span></text:p>
          </table:table-cell>
          <table:table-cell table:style-name="Table9.B1" office:value-type="string">
            <text:p text:style-name="P24" loext:marker-style-name="T32"><text:span text:style-name="T50">NOTER:</text:span><text:span text:style-name="T32"> <text:s/></text:span><text:span text:style-name="T54">Pour des raisons de sécurité, votre navigateur n’est pas autorisé à enregistrer le fichier de timing modifié à son emplacement d’origine. Il sera enregistré dans votre dossier Téléchargements par défaut. Scripture App Builder peut surveiller ce dossier à la recherche de fichiers modifiés et les déplacer vers le dossier de données de votre projet. Spécifiez le dossier Téléchargements à surveiller dans </text:span><text:span text:style-name="T55">Paramètres</text:span><text:span text:style-name="T54"> </text:span><text:span text:style-name="T56"></text:span><text:span text:style-name="T54"> </text:span><text:span text:style-name="T55">Fichiers</text:span><text:span text:style-name="T54">. Sinon, vous devrez déplacer manuellement les fichiers modifiés dans votre projet, par exemple en utilisant le bouton </text:span><text:span text:style-name="T55">Ajouter fichiers de synchronisation</text:span><text:span text:style-name="T32">.</text:span></text:p>
          </table:table-cell>
        </table:table-row>
      </table:table>
      <text:p text:style-name="Standard"/>
      <text:p text:style-name="Standard"/>
      <text:p text:style-name="Standard" loext:marker-style-name="T45"><text:span text:style-name="T45">Modification de la vitesse de l’audio lors d’un peaufinage</text:span><text:span text:style-name="T45"/></text:p>
      <text:p text:style-name="Standard">Si la lecture de l’audio est trop rapide pour que vous puissiez l’ajuster avec précision, vous pouvez ralentir la vitesse de lecture à l’aide du sélecteur de vitesse en bas de l’écran.</text:p>
      <text:p text:style-name="P70"/>
      <text:p text:style-name="P70" loext:marker-style-name="T7"><draw:custom-shape text:anchor-type="char" draw:z-index="11" draw:name="AutoShape 13" draw:style-name="gr16" draw:text-style-name="P31" svg:width="0.8114in" svg:height="0.237in" draw:transform="rotate (2.38534148870065) translate (1.48680555555556in 4.20208333333333in)"><text:p/><draw:enhanced-geometry draw:mirror-horizontal="false" draw:mirror-vertical="tru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2" draw:name="Image 15" text:anchor-type="as-char" svg:width="5.139in" svg:height="4.1181in"><draw:image xlink:href="Pictures/10000000000003FD00000332F3620DD0.png" xlink:type="simple" xlink:show="embed" xlink:actuate="onLoad" draw:mime-type="image/png"/></draw:frame></text:p>
      <text:p text:style-name="P84" loext:marker-style-name="T7"/>
      <text:p text:style-name="P84" loext:marker-style-name="T7"><draw:custom-shape text:anchor-type="char" style:rel-height="20%" draw:z-index="12" draw:name="Text Box 2" draw:style-name="gr17" draw:text-style-name="P72" svg:width="2.5524in" svg:height="1.5362in" svg:x="0.0555in" svg:y="0.0783in"><text:p text:style-name="Frame_20_contents">Modifiez la vitesse de lecture ici</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4" loext:marker-style-name="T7"/>
      <text:h text:style-name="Heading_20_2" text:outline-level="2" loext:marker-style-name="T17"><text:bookmark-start text:name="_Toc217376193"/><text:span text:style-name="T17">Raccourcis clavier lors d’un peaufinage</text:span><text:bookmark-end text:name="_Toc217376193"/><text:span text:style-name="T17"/></text:h>
      <text:p text:style-name="P70">Les raccourcis clavier suivants sont disponibles dans l’interface de peaufinage:</text:p>
      <text:p text:style-name="P85"/>
      <table:table table:name="Table10" table:style-name="Table10">
        <table:table-column table:style-name="Table10.A"/>
        <table:table-column table:style-name="Table10.B"/>
        <table:table-row table:style-name="Table10.1">
          <table:table-cell table:style-name="Table10.A1" office:value-type="string">
            <text:p text:style-name="P86" loext:marker-style-name="T57"><text:span text:style-name="T57">Touche</text:span><text:span text:style-name="T57"/></text:p>
          </table:table-cell>
          <table:table-cell table:style-name="Table10.A1" office:value-type="string">
            <text:p text:style-name="P87" loext:marker-style-name="T57"><text:span text:style-name="T57">Action</text:span><text:span text:style-name="T57"/></text:p>
          </table:table-cell>
        </table:table-row>
        <table:table-row table:style-name="Table10.1">
          <table:table-cell table:style-name="Table10.A2" office:value-type="string">
            <text:p text:style-name="P88" loext:marker-style-name="T7"><text:span text:style-name="T7">Barre d'espace</text:span><text:span text:style-name="T7"/></text:p>
          </table:table-cell>
          <table:table-cell table:style-name="Table10.B2" office:value-type="string">
            <text:p text:style-name="P89">Démarrer/mettre en pause l'audio</text:p>
          </table:table-cell>
        </table:table-row>
        <table:table-row table:style-name="Table10.1">
          <table:table-cell table:style-name="Table10.A3" office:value-type="string">
            <text:p text:style-name="P88" loext:marker-style-name="T7"><text:span text:style-name="T7">T</text:span><text:span text:style-name="T7"/></text:p>
          </table:table-cell>
          <table:table-cell table:style-name="Table10.B3" office:value-type="string">
            <text:p text:style-name="P89">Enregistrer le fichier de synchronisation</text:p>
          </table:table-cell>
        </table:table-row>
        <table:table-row table:style-name="Table10.1">
          <table:table-cell table:style-name="Table10.A4" office:value-type="string">
            <text:p text:style-name="P88" loext:marker-style-name="T7"><text:span text:style-name="T7">N</text:span><text:span text:style-name="T7"/></text:p>
          </table:table-cell>
          <table:table-cell table:style-name="Table10.B4" office:value-type="string">
            <text:p text:style-name="P89">Commencer à jouer à partir de la ligne suivante</text:p>
          </table:table-cell>
        </table:table-row>
        <table:table-row table:style-name="Table10.1">
          <table:table-cell table:style-name="Table10.A5" office:value-type="string">
            <text:p text:style-name="P88" loext:marker-style-name="T7"><text:span text:style-name="T7">P</text:span><text:span text:style-name="T7"/></text:p>
          </table:table-cell>
          <table:table-cell table:style-name="Table10.B5" office:value-type="string">
            <text:p text:style-name="P89">Commencer à jouer à partir de la ligne précédente</text:p>
          </table:table-cell>
        </table:table-row>
        <table:table-row table:style-name="Table10.1">
          <table:table-cell table:style-name="Table10.A6" office:value-type="string">
            <text:p text:style-name="P88" loext:marker-style-name="T7"><text:span text:style-name="T7">B</text:span><text:span text:style-name="T7"/></text:p>
          </table:table-cell>
          <table:table-cell table:style-name="Table10.B6" office:value-type="string">
            <text:p text:style-name="P89">Réglez l’heure de début de la phrase pour qu’elle soit à la position audio actuelle</text:p>
          </table:table-cell>
        </table:table-row>
        <table:table-row table:style-name="Table10.1">
          <table:table-cell table:style-name="Table10.A7" office:value-type="string">
            <text:p text:style-name="P88" loext:marker-style-name="T7"><text:span text:style-name="T7">A (ou Q)</text:span><text:span text:style-name="T7"/></text:p>
          </table:table-cell>
          <table:table-cell table:style-name="Table10.B7" office:value-type="string">
            <text:p text:style-name="P89">Reculer l’heure de début de la ligne actuelle de 1 seconde</text:p>
          </table:table-cell>
        </table:table-row>
        <table:table-row table:style-name="Table10.1">
          <table:table-cell table:style-name="Table10.A8" office:value-type="string">
            <text:p text:style-name="P88" loext:marker-style-name="T7"><text:span text:style-name="T7">S</text:span><text:span text:style-name="T7"/></text:p>
          </table:table-cell>
          <table:table-cell table:style-name="Table10.B8" office:value-type="string">
            <text:p text:style-name="P89">Reculez l’heure de début de la ligne actuelle de 0,1 seconde</text:p>
          </table:table-cell>
        </table:table-row>
        <table:table-row table:style-name="Table10.1">
          <table:table-cell table:style-name="Table10.A9" office:value-type="string">
            <text:p text:style-name="P88" loext:marker-style-name="T7"><text:span text:style-name="T7">D</text:span><text:span text:style-name="T7"/></text:p>
          </table:table-cell>
          <table:table-cell table:style-name="Table10.B9" office:value-type="string">
            <text:p text:style-name="P89">Avancer l’heure de début de la ligne actuelle de 0,1 seconde</text:p>
          </table:table-cell>
        </table:table-row>
        <table:table-row table:style-name="Table10.1">
          <table:table-cell table:style-name="Table10.A10" office:value-type="string">
            <text:p text:style-name="P88" loext:marker-style-name="T7"><text:span text:style-name="T7">F</text:span><text:span text:style-name="T7"/></text:p>
          </table:table-cell>
          <table:table-cell table:style-name="Table10.B10" office:value-type="string">
            <text:p text:style-name="P89">Avancer l’heure de début de la rangée actuelle de 1 seconde</text:p>
          </table:table-cell>
        </table:table-row>
      </table:table>
      <text:p text:style-name="P16"/>
      <text:h text:style-name="Heading_20_2" text:outline-level="2" loext:marker-style-name="T17"><text:bookmark-start text:name="_Toc217376194"/><text:span text:style-name="T17">Envoi de fichiers de synchronisation à d’autres personnes</text:span><text:bookmark-end text:name="_Toc217376194"/><text:span text:style-name="T17"/></text:h>
      <text:p text:style-name="P16">Si vous voulez bien faire le peaufinage, cela peut prendre beaucoup de temps d’écoute concentrée. Vous avez peut-être des amis et des collègues qui sont prêts à vous aider. Il est possible de leur envoyer les fichiers de réglage fin sur lesquels travailler sans qu’ils aient besoin d’installer Scripture App Builder.</text:p>
      <text:p text:style-name="P16">Pour faire cela:</text:p>
      <text:list text:style-name="WWNum35">
        <text:list-item>
          <text:p text:style-name="P90">Sélectionnez un ou plusieurs livres, ou une collection de livres, cliquez avec le bouton droit, puis sélectionnez <text:span text:style-name="T45">Gestionnaire de fichiers d’ajustement précis</text:span>…</text:p>
        </text:list-item>
        <text:list-item>
          <text:p text:style-name="P91"><text:span text:style-name="T54">Dans l’assistant, choisissez</text:span> <text:span text:style-name="T45">Les fichiers seront envoyés à d’autres personnes</text:span>.</text:p>
        </text:list-item>
        <text:list-item>
          <text:p text:style-name="P91">Sur la page suivante, <text:span text:style-name="T45">Fichiers audio</text:span>, choisissez de copier les fichiers audio (si vous disposez d’une bonne connexion Internet) ou choisissez de ne pas les copier (si votre connexion Internet est limitée et vous direz à vos amis où ils peuvent télécharger les fichiers audio).</text:p>
        </text:list-item>
        <text:list-item>
          <text:p text:style-name="P91">Sur la page suivante, <text:span text:style-name="T45">Fichiers Zip</text:span>, choisissez de compresser les fichiers de réglage fin ensemble pour les envoyer à vos amis.</text:p>
        </text:list-item>
        <text:list-item>
          <text:p text:style-name="P91">Sur la page suivante, <text:span text:style-name="T45">Dossier de sortie</text:span>, choisissez l’emplacement où vous souhaitez que les fichiers soient créés, puis cliquez sur <text:span text:style-name="T45">Créer fichiers</text:span>.</text:p>
        </text:list-item>
        <text:list-item>
          <text:p text:style-name="P91" loext:marker-style-name="T7">Envoyez les fichiers à vos amis, demandez-leur de les décompresser sur leur ordinateur et expliquez-leur comment ils peuvent travailler sur les timings. <text:span text:style-name="T7">Ils devraient vous renvoyer les fichiers de synchronisation modifiés.</text:span><text:span text:style-name="T7"/></text:p>
        </text:list-item>
      </text:list>
      <text:p text:style-name="P92" loext:marker-style-name="T7"><text:bookmark-end text:name="_Hlk44919204"/></text:p>
      <table:table table:name="Table11" table:style-name="Table11">
        <table:table-column table:style-name="Table11.A"/>
        <table:table-column table:style-name="Table11.B"/>
        <table:table-row table:style-name="Table11.1">
          <table:table-cell table:style-name="Table11.A1" office:value-type="string">
            <text:p text:style-name="P24" loext:marker-style-name="T35"><text:span text:style-name="T36"></text:span><text:span text:style-name="T35"> </text:span></text:p>
          </table:table-cell>
          <table:table-cell table:style-name="Table11.B1" office:value-type="string">
            <text:p text:style-name="P24" loext:marker-style-name="T58"><text:span text:style-name="T32">Il existe actuellement un groupe de bénévoles appelé SAB Assist, qui peut financer collectivement la mise au point de projets, y compris la création de Bibles entières. </text:span><text:span text:style-name="T58">Contactez </text:span><text:a xlink:type="simple" xlink:href="mailto:andrew_shafe@sil.org" text:style-name="Internet_20_link" text:visited-style-name="Visited_20_Internet_20_Link"><text:span text:style-name="Internet_20_link"><text:span text:style-name="T58">andrew_shafe@sil.org</text:span></text:span></text:a><text:span text:style-name="T58"> pour plus de détails..</text:span></text:p>
          </table:table-cell>
        </table:table-row>
      </table:table>
      <text:h text:style-name="Heading_20_2" text:outline-level="2" loext:marker-style-name="T17"><text:bookmark-start text:name="_Toc217376195"/><text:span text:style-name="T17">Peaufinez les fichiers de synchronisation à l’aide d’Audacity</text:span><text:bookmark-end text:name="_Toc217376195"/><text:span text:style-name="T17"/></text:h>
      <text:p text:style-name="P17">Au lieu d’utiliser le visualiseur <text:span text:style-name="T45">Peaufiner la synchronisation</text:span>, vous pouvez apporter des corrections dans Audacity. Pour ce faire:</text:p>
      <text:list text:style-name="WWNum37">
        <text:list-item>
          <text:p text:style-name="P93">Ouvrez le fichier audio MP3 dans Audacity.</text:p>
        </text:list-item>
        <text:list-item>
          <text:p text:style-name="P94"><text:span text:style-name="T41">Importez le fichier de synchronisation, en sélectionnant </text:span><text:span text:style-name="T42">Fichier</text:span><text:span text:style-name="T41"> </text:span><text:span text:style-name="T51"></text:span><text:span text:style-name="T41"> </text:span><text:span text:style-name="T42">Importer</text:span><text:span text:style-name="T41"> </text:span><text:span text:style-name="T51"></text:span><text:span text:style-name="T41"> </text:span><text:span text:style-name="T42">Étiquettes</text:span><text:span text:style-name="T41">... <text:s/>Zoom sur la forme d’onde.</text:span></text:p>
        </text:list-item>
        <text:list-item>
          <text:p text:style-name="P94"><text:span text:style-name="T41">Ajustez la position des étiquettes qui ne sont pas au bon endroit.</text:span></text:p>
        </text:list-item>
        <text:list-item>
          <text:p text:style-name="P94" loext:marker-style-name="T45">Exportez la piste d’étiquettes modifiées, à l’aide de <text:span text:style-name="T45">Fichier</text:span> <text:span text:style-name="T51"></text:span> <text:span text:style-name="T45">Exporter les étiquettes...</text:span></text:p>
        </text:list-item>
        <text:list-item>
          <text:p text:style-name="P94"><text:span text:style-name="T41">Testez à nouveau la synchronisation dans Scripture App Builder à l’aide de l’utilitaire </text:span><text:span text:style-name="T42">Exporter comme HTML</text:span><text:span text:style-name="T41"> (voir ci-dessus) pour voir si les problèmes de synchronisation ont été résolus.</text:span></text:p>
        </text:list-item>
      </text:list>
      <text:p text:style-name="P17"/>
      <text:p text:style-name="Standard"/>
      <text:h text:style-name="Heading_20_1" text:outline-level="1"><text:bookmark-start text:name="_Toc217376196"/>Ajouter des voix à eSpeak<text:bookmark-end text:name="_Toc217376196"/></text:h>
      <text:p text:style-name="Standard">En utilisant des remplacements de caractères dans l’assistant <text:span text:style-name="T45">Synchroniser à l’aide d’aeneas</text:span>, vous constaterez que vous pouvez obtenir de bons résultats de synchronisation pour de nombreuses langues en utilisant les voix eSpeak existantes.</text:p>
      <text:p text:style-name="Standard"/>
      <text:p text:style-name="Standard">Ajouter une nouvelle voix dans eSpeak n’est pas facile, mais si vous souhaitez essayer, veuillez suivre les instructions ici: <text:a xlink:type="simple" xlink:href="http://espeak.sourceforge.net/add_language.html" text:style-name="Internet_20_link" text:visited-style-name="Visited_20_Internet_20_Link"><text:span text:style-name="Internet_20_link">http://espeak.sourceforge.net/add_language.html</text:span></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1"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1972in"/>
        </style:tab-stops>
      </style:paragraph-properties>
      <style:text-properties fo:font-size="13pt" fo:language="en" fo:country="GB" fo:font-weight="bold" style:font-size-asian="13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39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style:font-name="Courier New1" fo:font-family="'Courier New'" style:font-family-generic="swiss" style:font-pitch="variable" fo:font-size="10pt" fo:language="en" fo:country="GB" fo:font-weight="bold" style:font-size-asian="10pt" style:font-weight-asian="bold" style:font-name-complex="Courier New2"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Footnote" style:family="paragraph" style:parent-style-name="Standard" loext:linked-style-name="Footnote_20_Text_20_Char" style:class="extra">
      <style:text-properties fo:font-size="10pt" style:font-size-asian="10pt" style:font-size-complex="10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fo:font-size="10pt" fo:language="en" fo:country="GB" style:font-size-asian="10pt" style:language-asian="en" style:country-asian="GB" style:font-name-complex="Courier New2" style:font-family-complex="'Courier New'" style:font-family-generic-complex="system" style:font-pitch-complex="variable" style:font-size-complex="10pt" style:language-complex="he" style:country-complex="IL"/>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1"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1" fo:font-family="Calibri" style:font-family-generic="swiss" style:font-pitch="variable" fo:font-size="13pt" fo:font-weight="bold" style:font-size-asian="13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1"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1"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1"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Text_20_Char" style:display-name="Footnote Text Char" style:family="text" style:parent-style-name="Default_20_Paragraph_20_Font" loext:linked-style-name="Footnote">
      <style:text-properties style:font-name="Calibri1" fo:font-family="Calibri" style:font-family-generic="swiss" style:font-pitch="variable" fo:language="fr" fo:country="FR" style:language-asian="fr" style:country-asian="F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2" style:font-family-complex="'Courier New'" style:font-family-generic-complex="system" style:font-pitch-complex="variable" style:language-complex="he" style:country-complex="IL"/>
    </style:style>
    <style:style style:name="Unresolved_20_Mention1" style:display-name="Unresolved Mention1" style:family="text" style:parent-style-name="Default_20_Paragraph_20_Font">
      <style:text-properties fo:color="#808080" loext:opacity="100%" fo:background-color="#e6e6e6"/>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style:style>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Times New Roman" fo:font-family="'Times New Roman'" style:font-family-generic="roman" style:font-pitch="variable"/>
    </style:style>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Times New Roman" fo:font-family="'Times New Roman'" style:font-family-generic="roman" style:font-pitch="variable"/>
    </style:style>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Times New Roman" fo:font-family="'Times New Roman'" style:font-family-generic="roman" style:font-pitch="variable"/>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Times New Roman" fo:font-family="'Times New Roman'" style:font-family-generic="roman" style:font-pitch="variable"/>
    </style:style>
    <style:style style:name="ListLabel_20_254" style:display-name="ListLabel 254" style:family="text">
      <style:text-properties style:font-name-complex="Courier New2"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Times New Roman" fo:font-family="'Times New Roman'" style:font-family-generic="roman" style:font-pitch="variable"/>
    </style:style>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Times New Roman" fo:font-family="'Times New Roman'" style:font-family-generic="roman" style:font-pitch="variable"/>
    </style:style>
    <style:style style:name="ListLabel_20_260" style:display-name="ListLabel 260" style:family="text">
      <style:text-properties style:font-name-complex="Courier New2"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style:style>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text-properties style:font-name-complex="Courier New2"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Times New Roman" fo:font-family="'Times New Roman'" style:font-family-generic="roman" style:font-pitch="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Times New Roman" fo:font-family="'Times New Roman'" style:font-family-generic="roman" style:font-pitch="variable"/>
    </style:style>
    <style:style style:name="ListLabel_20_344" style:display-name="ListLabel 344" style:family="text">
      <style:text-properties style:font-name-complex="Courier New2"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text-properties style:font-name="Times New Roman" fo:font-family="'Times New Roman'" style:font-family-generic="roman" style:font-pitch="variable"/>
    </style:style>
    <style:style style:name="ListLabel_20_347" style:display-name="ListLabel 347" style:family="text">
      <style:text-properties style:font-name-complex="Courier New2"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text-properties style:font-name="Times New Roman" fo:font-family="'Times New Roman'" style:font-family-generic="roman" style:font-pitch="variable"/>
    </style:style>
    <style:style style:name="ListLabel_20_350" style:display-name="ListLabel 350" style:family="text">
      <style:text-properties style:font-name-complex="Courier New2"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alibri" fo:font-family="Calibri" style:font-family-generic="roman" style:font-pitch="variable" fo:language="en" fo:country="GB"/>
    </style:style>
    <style:style style:name="ListLabel_20_354" style:display-name="ListLabel 354" style:family="text">
      <style:text-properties style:font-name="Calibri" fo:font-family="Calibri" style:font-family-generic="roman" style:font-pitch="variable" fo:language="en" fo:country="US"/>
    </style:style>
    <style:style style:name="ListLabel_20_355" style:display-name="ListLabel 355" style:family="text">
      <style:text-properties style:font-name="Calibri" fo:font-family="Calibri" style:font-family-generic="roman" style:font-pitch="variable"/>
    </style:style>
    <style:style style:name="ListLabel_20_356" style:display-name="ListLabel 356" style:family="text">
      <style:text-properties style:font-name="Calibri" fo:font-family="Calibri" style:font-family-generic="roman" style:font-pitch="variable" style:font-name-complex="Tahoma" style:font-family-complex="Tahoma" style:font-family-generic-complex="system" style:font-pitch-complex="variable"/>
    </style:style>
    <style:style style:name="ListLabel_20_357" style:display-name="ListLabel 357" style:family="text">
      <style:text-properties fo:language="en" fo:country="US" fo:font-style="italic" style:font-style-asian="italic" style:font-name-complex="Calibri2" style:font-family-complex="Calibri"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5in" fo:margin-left="0.59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811in" fo:margin-left="-0.215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253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0.75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253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753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25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2.75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253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3.75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78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78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78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78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78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78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78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78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7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811in" fo:margin-left="0.5291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744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244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744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244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744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244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74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2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417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0417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417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028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528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028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528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028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528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028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528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0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1.0311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531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2.0311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5311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3.0311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5311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4.0311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5311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5.0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1.0311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5311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2.0311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5311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3.0311in"/>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5311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4.0311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5311in"/>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5.0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7" text:anchor-type="paragraph" svg:y="0.0008in" draw:z-index="30"><draw:text-box fo:min-height="0in" fo:min-width="0.0161in"><text:p text:style-name="MP1" loext:marker-style-name="Page Number"><text:span text:style-name="Page_20_Number"><text:page-number text:select-page="current">6</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Using aeneas for Audio-Text Synchronization</dc:title>
    <meta:initial-creator>Richard Margetts</meta:initial-creator>
    <dc:creator>Richard Margetts</dc:creator>
    <meta:editing-cycles>395</meta:editing-cycles>
    <meta:print-date>2025-12-22T23:01:00</meta:print-date>
    <meta:creation-date>2015-08-15T09:35:00</meta:creation-date>
    <dc:date>2025-12-23T09:56:00</dc:date>
    <meta:editing-duration>P0D</meta:editing-duration>
    <meta:generator>LibreOffice/26.2.3.2$Linux_X86_64 LibreOffice_project/620$Build-2</meta:generator>
    <meta:document-statistic meta:table-count="11" meta:image-count="21" meta:object-count="0" meta:page-count="6" meta:paragraph-count="241" meta:word-count="3943" meta:character-count="25478" meta:non-whitespace-character-count="21770"/>
    <meta:user-defined meta:name="AppVersion">16.0000</meta:user-defined>
    <meta:template xlink:type="simple" xlink:actuate="onRequest" xlink:title="Normal.dotm" xlink:href=""/>
  </office:meta>
</office:document-meta>
</file>