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settings.xml" manifest:media-type="text/xml"/>
  <manifest:file-entry manifest:full-path="Pictures/1000000100000300000003000A4F1D58.png" manifest:media-type="image/png"/>
  <manifest:file-entry manifest:full-path="Pictures/100000010000040E000002A5F36C9AFF.png" manifest:media-type="image/png"/>
  <manifest:file-entry manifest:full-path="Pictures/10000001000000E3000000E845863480.png" manifest:media-type="image/png"/>
  <manifest:file-entry manifest:full-path="Pictures/10000000000002D6000001F7BE403E48.jpg" manifest:media-type="image/jpeg"/>
  <manifest:file-entry manifest:full-path="Pictures/1000000000000258000002582742E9A7.jpg" manifest:media-type="image/jpeg"/>
  <manifest:file-entry manifest:full-path="Pictures/10000001000000D3000000D6F63B3F30.png" manifest:media-type="image/png"/>
  <manifest:file-entry manifest:full-path="Pictures/10000001000004770000050079FEEEC3.png" manifest:media-type="image/png"/>
  <manifest:file-entry manifest:full-path="Pictures/10000001000004B0000004B00D994124.png" manifest:media-type="image/png"/>
  <manifest:file-entry manifest:full-path="Pictures/10000000000001F4000001F4ABAB9A73.jpg" manifest:media-type="image/jpeg"/>
  <manifest:file-entry manifest:full-path="Pictures/100000010000042C000004B0826D13D2.png" manifest:media-type="image/png"/>
  <manifest:file-entry manifest:full-path="Pictures/10000001000002BC000002BCBD18BEDC.png" manifest:media-type="image/png"/>
  <manifest:file-entry manifest:full-path="Pictures/1000000100000846000002729EF3B20B.png" manifest:media-type="image/png"/>
  <manifest:file-entry manifest:full-path="ObjectReplacements/Obj101" manifest:media-type=""/>
  <manifest:file-entry manifest:full-path="ObjectReplacements/Obj100"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7729in" fo:margin-left="0.0035in" fo:margin-top="0in" fo:margin-bottom="0in" table:align="left" style:writing-mode="lr-tb"/>
    </style:style>
    <style:style style:name="Table1.A" style:family="table-column">
      <style:table-column-properties style:column-width="0.6292in"/>
    </style:style>
    <style:style style:name="Table1.B" style:family="table-column">
      <style:table-column-properties style:column-width="5.1438in"/>
    </style:style>
    <style:style style:name="Table1.1" style:family="table-row">
      <style:table-row-properties style:min-row-height="0.5257in" fo:keep-together="auto"/>
    </style:style>
    <style:style style:name="Table1.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2.B1" style:family="table-cell">
      <style:table-cell-properties fo:padding="0.0799in" fo:border="0.5pt solid #000000" style:writing-mode="lr-tb"/>
    </style:style>
    <style:style style:name="Table3" style:family="table">
      <style:table-properties style:width="5.9778in" fo:margin-left="0.0035in" fo:margin-top="0in" fo:margin-bottom="0in" table:align="left" style:writing-mode="lr-tb"/>
    </style:style>
    <style:style style:name="Table3.A" style:family="table-column">
      <style:table-column-properties style:column-width="0.6299in"/>
    </style:style>
    <style:style style:name="Table3.B" style:family="table-column">
      <style:table-column-properties style:column-width="5.3479in"/>
    </style:style>
    <style:style style:name="Table3.1" style:family="table-row">
      <style:table-row-properties style:min-row-height="0.5257in" fo:keep-together="auto"/>
    </style:style>
    <style:style style:name="Table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3.B1" style:family="table-cell">
      <style:table-cell-properties fo:padding-left="0.0799in" fo:padding-right="0.0799in" fo:padding-top="0.0799in" fo:padding-bottom="0.0201in" fo:border="0.5pt solid #000000" style:writing-mode="lr-tb"/>
    </style:style>
    <style:style style:name="Table4" style:family="table">
      <style:table-properties style:width="5.9035in" fo:margin-left="0.0785in" fo:margin-top="0in" fo:margin-bottom="0in" table:align="left" style:writing-mode="page"/>
    </style:style>
    <style:style style:name="Table4.A" style:family="table-column">
      <style:table-column-properties style:column-width="1.3007in"/>
    </style:style>
    <style:style style:name="Table4.B" style:family="table-column">
      <style:table-column-properties style:column-width="1.466in"/>
    </style:style>
    <style:style style:name="Table4.C" style:family="table-column">
      <style:table-column-properties style:column-width="3.1368in"/>
    </style:style>
    <style:style style:name="Table4.1" style:family="table-row">
      <style:table-row-properties style:min-row-height="0.7201in" fo:keep-together="always"/>
    </style:style>
    <style:style style:name="Table4.A1" style:family="table-cell">
      <style:table-cell-properties fo:padding-left="0.075in" fo:padding-right="0.075in" fo:padding-top="0.0785in" fo:padding-bottom="0.0785in" fo:border="0.5pt solid #999999"/>
    </style:style>
    <style:style style:name="Table4.B1" style:family="table-cell">
      <style:table-cell-properties style:vertical-align="middle" fo:padding-left="0.075in" fo:padding-right="0.075in" fo:padding-top="0.0785in" fo:padding-bottom="0.0785in" fo:border="0.5pt solid #999999"/>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5" style:family="table">
      <style:table-properties style:width="5.9035in" fo:margin-left="0.0785in" fo:margin-top="0in" fo:margin-bottom="0in" table:align="left" style:writing-mode="page"/>
    </style:style>
    <style:style style:name="Table5.A" style:family="table-column">
      <style:table-column-properties style:column-width="1.3007in"/>
    </style:style>
    <style:style style:name="Table5.B" style:family="table-column">
      <style:table-column-properties style:column-width="1.466in"/>
    </style:style>
    <style:style style:name="Table5.C" style:family="table-column">
      <style:table-column-properties style:column-width="3.1368in"/>
    </style:style>
    <style:style style:name="Table5.1" style:family="table-row">
      <style:table-row-properties fo:keep-together="always"/>
    </style:style>
    <style:style style:name="Table5.A1" style:family="table-cell">
      <style:table-cell-properties fo:padding-left="0.075in" fo:padding-right="0.075in" fo:padding-top="0.0785in" fo:padding-bottom="0.0785in" fo:border="0.5pt solid #999999"/>
    </style:style>
    <style:style style:name="Table5.B1" style:family="table-cell">
      <style:table-cell-properties style:vertical-align="middle" fo:padding-left="0.075in" fo:padding-right="0.075in" fo:padding-top="0.0785in" fo:padding-bottom="0.0785in" fo:border="0.5pt solid #999999"/>
    </style:style>
    <style:style style:name="Table6" style:family="table">
      <style:table-properties style:width="5.9035in" fo:margin-left="0.0785in" fo:margin-top="0in" fo:margin-bottom="0in" table:align="left" style:may-break-between-rows="false" style:writing-mode="page"/>
    </style:style>
    <style:style style:name="Table6.A" style:family="table-column">
      <style:table-column-properties style:column-width="1.3007in"/>
    </style:style>
    <style:style style:name="Table6.B" style:family="table-column">
      <style:table-column-properties style:column-width="1.466in"/>
    </style:style>
    <style:style style:name="Table6.C" style:family="table-column">
      <style:table-column-properties style:column-width="3.1368in"/>
    </style:style>
    <style:style style:name="Table6.1" style:family="table-row">
      <style:table-row-properties style:min-row-height="0.7201in" fo:keep-together="always"/>
    </style:style>
    <style:style style:name="Table6.A1" style:family="table-cell">
      <style:table-cell-properties fo:padding-left="0.075in" fo:padding-right="0.075in" fo:padding-top="0.0785in" fo:padding-bottom="0.0785in" fo:border="0.5pt solid #999999"/>
    </style:style>
    <style:style style:name="Table6.B1" style:family="table-cell">
      <style:table-cell-properties style:vertical-align="middle" fo:padding-left="0.075in" fo:padding-right="0.075in" fo:padding-top="0.0785in" fo:padding-bottom="0.0785in" fo:border="0.5pt solid #999999"/>
    </style:style>
    <style:style style:name="Table7" style:family="table">
      <style:table-properties style:width="5.9778in" fo:margin-left="0.0035in" fo:margin-top="0in" fo:margin-bottom="0in" table:align="left" style:writing-mode="lr-tb"/>
    </style:style>
    <style:style style:name="Table7.A" style:family="table-column">
      <style:table-column-properties style:column-width="1.5715in"/>
    </style:style>
    <style:style style:name="Table7.B" style:family="table-column">
      <style:table-column-properties style:column-width="2.1653in"/>
    </style:style>
    <style:style style:name="Table7.C" style:family="table-column">
      <style:table-column-properties style:column-width="2.241in"/>
    </style:style>
    <style:style style:name="Table7.1" style:family="table-row">
      <style:table-row-properties fo:keep-together="always"/>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C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C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C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7.C8" style:family="table-cell">
      <style:table-cell-properties fo:padding-left="0.075in" fo:padding-right="0.075in" fo:padding-top="0in" fo:padding-bottom="0in" fo:border="0.5pt solid #000000" style:writing-mode="lr-tb"/>
    </style:style>
    <style:style style:name="Table7.A9" style:family="table-cell">
      <style:table-cell-properties fo:padding-left="0.075in" fo:padding-right="0.075in" fo:padding-top="0in" fo:padding-bottom="0in" fo:border="0.5pt solid #000000" style:writing-mode="lr-tb"/>
    </style:style>
    <style:style style:name="Table7.B9" style:family="table-cell">
      <style:table-cell-properties fo:padding-left="0.075in" fo:padding-right="0.075in" fo:padding-top="0in" fo:padding-bottom="0in" fo:border="0.5pt solid #000000" style:writing-mode="lr-tb"/>
    </style:style>
    <style:style style:name="Table7.C9" style:family="table-cell">
      <style:table-cell-properties fo:padding-left="0.075in" fo:padding-right="0.075in" fo:padding-top="0in" fo:padding-bottom="0in" fo:border="0.5pt solid #000000" style:writing-mode="lr-tb"/>
    </style:style>
    <style:style style:name="Table7.A10" style:family="table-cell">
      <style:table-cell-properties fo:padding-left="0.075in" fo:padding-right="0.075in" fo:padding-top="0in" fo:padding-bottom="0in" fo:border="0.5pt solid #000000" style:writing-mode="lr-tb"/>
    </style:style>
    <style:style style:name="Table7.B10" style:family="table-cell">
      <style:table-cell-properties fo:padding-left="0.075in" fo:padding-right="0.075in" fo:padding-top="0in" fo:padding-bottom="0in" fo:border="0.5pt solid #000000" style:writing-mode="lr-tb"/>
    </style:style>
    <style:style style:name="Table7.C10" style:family="table-cell">
      <style:table-cell-properties fo:padding-left="0.075in" fo:padding-right="0.075in" fo:padding-top="0in" fo:padding-bottom="0in" fo:border="0.5pt solid #000000" style:writing-mode="lr-tb"/>
    </style:style>
    <style:style style:name="Table7.A11" style:family="table-cell">
      <style:table-cell-properties fo:padding-left="0.075in" fo:padding-right="0.075in" fo:padding-top="0in" fo:padding-bottom="0in" fo:border="0.5pt solid #000000" style:writing-mode="lr-tb"/>
    </style:style>
    <style:style style:name="Table7.B11" style:family="table-cell">
      <style:table-cell-properties fo:padding-left="0.075in" fo:padding-right="0.075in" fo:padding-top="0in" fo:padding-bottom="0in" fo:border="0.5pt solid #000000" style:writing-mode="lr-tb"/>
    </style:style>
    <style:style style:name="Table7.C11" style:family="table-cell">
      <style:table-cell-properties fo:padding-left="0.075in" fo:padding-right="0.075in" fo:padding-top="0in" fo:padding-bottom="0in" fo:border="0.5pt solid #000000" style:writing-mode="lr-tb"/>
    </style:style>
    <style:style style:name="Table8" style:family="table">
      <style:table-properties style:width="5.9778in" fo:margin-left="0.0035in" fo:margin-top="0in" fo:margin-bottom="0in" table:align="left" style:writing-mode="lr-tb"/>
    </style:style>
    <style:style style:name="Table8.A" style:family="table-column">
      <style:table-column-properties style:column-width="0.6299in"/>
    </style:style>
    <style:style style:name="Table8.B" style:family="table-column">
      <style:table-column-properties style:column-width="5.3479in"/>
    </style:style>
    <style:style style:name="Table8.1" style:family="table-row">
      <style:table-row-properties style:min-row-height="0.5257in" fo:keep-together="auto"/>
    </style:style>
    <style:style style:name="Table8.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8.B1" style:family="table-cell">
      <style:table-cell-properties fo:padding-left="0.0799in" fo:padding-right="0.0799in" fo:padding-top="0.0799in" fo:padding-bottom="0.0201in" fo:border="0.5pt solid #000000" style:writing-mode="lr-tb"/>
    </style:style>
    <style:style style:name="Table9" style:family="table">
      <style:table-properties style:width="5.9778in" fo:margin-left="0.0035in" fo:margin-top="0in" fo:margin-bottom="0in" table:align="left" style:writing-mode="lr-tb"/>
    </style:style>
    <style:style style:name="Table9.A" style:family="table-column">
      <style:table-column-properties style:column-width="0.6215in"/>
    </style:style>
    <style:style style:name="Table9.B" style:family="table-column">
      <style:table-column-properties style:column-width="5.3563in"/>
    </style:style>
    <style:style style:name="Table9.1" style:family="table-row">
      <style:table-row-properties style:min-row-height="0.5257in" fo:keep-together="auto"/>
    </style:style>
    <style:style style:name="Table9.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9.B1" style:family="table-cell">
      <style:table-cell-properties fo:padding="0.0799in" fo:border="0.5pt solid #000000" style:writing-mode="lr-tb"/>
    </style:style>
    <style:style style:name="Table10" style:family="table">
      <style:table-properties style:width="5.9778in" fo:margin-left="0.0035in" fo:margin-top="0in" fo:margin-bottom="0in" table:align="left" style:writing-mode="lr-tb"/>
    </style:style>
    <style:style style:name="Table10.A" style:family="table-column">
      <style:table-column-properties style:column-width="0.6299in"/>
    </style:style>
    <style:style style:name="Table10.B" style:family="table-column">
      <style:table-column-properties style:column-width="5.3479in"/>
    </style:style>
    <style:style style:name="Table10.1" style:family="table-row">
      <style:table-row-properties style:min-row-height="0.5257in" fo:keep-together="auto"/>
    </style:style>
    <style:style style:name="Table10.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0.B1" style:family="table-cell">
      <style:table-cell-properties fo:padding-left="0.0799in" fo:padding-right="0.0799in" fo:padding-top="0.0799in" fo:padding-bottom="0.0201in" fo:border="0.5pt solid #000000" style:writing-mode="lr-tb"/>
    </style:style>
    <style:style style:name="Table11" style:family="table">
      <style:table-properties style:width="5.9778in" fo:margin-left="0.0035in" fo:margin-top="0in" fo:margin-bottom="0in" table:align="left" style:writing-mode="lr-tb"/>
    </style:style>
    <style:style style:name="Table11.A" style:family="table-column">
      <style:table-column-properties style:column-width="0.6215in"/>
    </style:style>
    <style:style style:name="Table11.B" style:family="table-column">
      <style:table-column-properties style:column-width="5.3563in"/>
    </style:style>
    <style:style style:name="Table11.1" style:family="table-row">
      <style:table-row-properties style:min-row-height="0.5257in" fo:keep-together="auto"/>
    </style:style>
    <style:style style:name="Table11.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1.B1" style:family="table-cell">
      <style:table-cell-properties fo:padding="0.0799in" fo:border="0.5pt solid #000000" style:writing-mode="lr-tb"/>
    </style:style>
    <style:style style:name="Table12" style:family="table">
      <style:table-properties style:width="5.9778in" fo:margin-left="0.0035in" fo:margin-top="0in" fo:margin-bottom="0in" table:align="left" style:writing-mode="lr-tb"/>
    </style:style>
    <style:style style:name="Table12.A" style:family="table-column">
      <style:table-column-properties style:column-width="0.6299in"/>
    </style:style>
    <style:style style:name="Table12.B" style:family="table-column">
      <style:table-column-properties style:column-width="5.3479in"/>
    </style:style>
    <style:style style:name="Table12.1" style:family="table-row">
      <style:table-row-properties style:min-row-height="0.5257in" fo:keep-together="auto"/>
    </style:style>
    <style:style style:name="Table12.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2.B1" style:family="table-cell">
      <style:table-cell-properties fo:padding-left="0.0799in" fo:padding-right="0.0799in" fo:padding-top="0.0799in" fo:padding-bottom="0.0201in" fo:border="0.5pt solid #000000" style:writing-mode="lr-tb"/>
    </style:style>
    <style:style style:name="Table13" style:family="table">
      <style:table-properties style:width="5.9778in" fo:margin-left="0.0035in" fo:margin-top="0in" fo:margin-bottom="0in" table:align="left" style:writing-mode="lr-tb"/>
    </style:style>
    <style:style style:name="Table13.A" style:family="table-column">
      <style:table-column-properties style:column-width="0.6215in"/>
    </style:style>
    <style:style style:name="Table13.B" style:family="table-column">
      <style:table-column-properties style:column-width="5.3563in"/>
    </style:style>
    <style:style style:name="Table13.1" style:family="table-row">
      <style:table-row-properties style:min-row-height="0.5257in" fo:keep-together="auto"/>
    </style:style>
    <style:style style:name="Table13.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3.B1" style:family="table-cell">
      <style:table-cell-properties fo:padding="0.0799in" fo:border="0.5pt solid #000000" style:writing-mode="lr-tb"/>
    </style:style>
    <style:style style:name="Table14" style:family="table">
      <style:table-properties style:width="5.9778in" fo:margin-left="0.0035in" fo:margin-top="0in" fo:margin-bottom="0in" table:align="left" style:writing-mode="lr-tb"/>
    </style:style>
    <style:style style:name="Table14.A" style:family="table-column">
      <style:table-column-properties style:column-width="0.6299in"/>
    </style:style>
    <style:style style:name="Table14.B" style:family="table-column">
      <style:table-column-properties style:column-width="5.3479in"/>
    </style:style>
    <style:style style:name="Table14.1" style:family="table-row">
      <style:table-row-properties style:min-row-height="0.5257in" fo:keep-together="auto"/>
    </style:style>
    <style:style style:name="Table14.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4.B1" style:family="table-cell">
      <style:table-cell-properties fo:padding-left="0.0799in" fo:padding-right="0.0799in" fo:padding-top="0.0799in" fo:padding-bottom="0.0201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style:font-name="Calibri" fo:language="en" fo:country="GB"/>
    </style:style>
    <style:style style:name="P8" style:family="paragraph" style:parent-style-name="Standard">
      <style:paragraph-properties fo:margin-top="0in" fo:margin-bottom="0in" style:contextual-spacing="false" fo:text-align="center" style:justify-single-word="false" fo:break-before="page"/>
      <style:text-properties fo:font-size="20pt" fo:language="en" fo:country="US" fo:font-weight="bold" style:font-size-asian="20pt" style:font-weight-asian="bold" style:font-name-complex="Calibri1" style:font-size-complex="20pt"/>
    </style:style>
    <style:style style:name="P9" style:family="paragraph" style:parent-style-name="Standard">
      <style:paragraph-properties fo:keep-with-next="always"/>
      <style:text-properties fo:language="en" fo:country="US" style:font-name-complex="Calibri1"/>
    </style:style>
    <style:style style:name="P10" style:family="paragraph" style:parent-style-name="Standard">
      <style:paragraph-properties fo:keep-with-next="always"/>
    </style:style>
    <style:style style:name="P11" style:family="paragraph" style:parent-style-name="Standard">
      <style:paragraph-properties fo:keep-with-next="always"/>
      <style:text-properties fo:font-size="8pt" fo:language="en" fo:country="US" style:font-size-asian="8pt" style:font-name-complex="Calibri1" style:font-size-complex="8pt"/>
    </style:style>
    <style:style style:name="P12" style:family="paragraph" style:parent-style-name="Standard">
      <style:paragraph-properties>
        <style:tab-stops>
          <style:tab-stop style:position="3.4063in"/>
        </style:tab-stops>
      </style:paragraph-properties>
    </style:style>
    <style:style style:name="P13" style:family="paragraph" style:parent-style-name="Standard">
      <style:paragraph-properties>
        <style:tab-stops>
          <style:tab-stop style:position="3.4063in"/>
        </style:tab-stops>
      </style:paragraph-properties>
      <style:text-properties fo:font-size="4pt" style:font-size-asian="4pt" style:font-name-complex="Calibri1" style:font-size-complex="4pt"/>
    </style:style>
    <style:style style:name="P14"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15" style:family="paragraph" style:parent-style-name="Standard">
      <style:paragraph-properties>
        <style:tab-stops>
          <style:tab-stop style:position="3.4063in"/>
        </style:tab-stops>
      </style:paragraph-properties>
      <style:text-properties fo:font-size="2pt" fo:language="en" fo:country="US" style:font-size-asian="2pt" style:font-name-complex="Calibri1" style:font-size-complex="2pt"/>
    </style:style>
    <style:style style:name="P16" style:family="paragraph" style:parent-style-name="Standard">
      <style:paragraph-properties>
        <style:tab-stops>
          <style:tab-stop style:position="3.4063in"/>
        </style:tab-stops>
      </style:paragraph-properties>
      <style:text-properties fo:font-weight="bold" style:font-weight-asian="bold" style:font-name-complex="Calibri1"/>
    </style:style>
    <style:style style:name="P17"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1" style:font-size-complex="4pt"/>
    </style:style>
    <style:style style:name="P18" style:family="paragraph" style:parent-style-name="Standard">
      <style:paragraph-properties>
        <style:tab-stops>
          <style:tab-stop style:position="4.8126in"/>
        </style:tab-stops>
      </style:paragraph-properties>
      <style:text-properties fo:font-size="2pt" fo:language="en" fo:country="US" fo:font-weight="bold" style:font-size-asian="2pt" style:font-weight-asian="bold" style:font-name-complex="Calibri1" style:font-size-complex="2pt"/>
    </style:style>
    <style:style style:name="P19" style:family="paragraph" style:parent-style-name="Standard">
      <style:paragraph-properties fo:margin-top="0in" fo:margin-bottom="0in" style:contextual-spacing="false" fo:text-align="center" style:justify-single-word="false" fo:break-before="page"/>
    </style:style>
    <style:style style:name="P20" style:family="paragraph" style:parent-style-name="Standard">
      <style:paragraph-properties fo:text-align="center" style:justify-single-word="false"/>
      <style:text-properties style:font-name="Calibri" fo:font-size="16pt" fo:language="en" fo:country="GB" fo:font-weight="bold" style:font-size-asian="16pt" style:font-weight-asian="bold" style:font-size-complex="16pt"/>
    </style:style>
    <style:style style:name="P21" style:family="paragraph" style:parent-style-name="Standard">
      <style:text-properties style:font-name="Calibri" fo:font-size="16pt" fo:language="en" fo:country="GB" fo:font-weight="bold" style:font-size-asian="16pt" style:font-weight-asian="bold" style:font-size-complex="16pt"/>
    </style:style>
    <style:style style:name="P22" style:family="paragraph" style:parent-style-name="Heading_20_1">
      <style:paragraph-properties fo:text-indent="-0.248in" style:auto-text-indent="false" fo:break-before="page"/>
    </style:style>
    <style:style style:name="P23" style:family="paragraph" style:parent-style-name="Standard">
      <style:text-properties fo:language="en" fo:country="US"/>
    </style:style>
    <style:style style:name="P24" style:family="paragraph" style:parent-style-name="Standard">
      <style:paragraph-properties fo:margin-top="0in" fo:margin-bottom="0.0835in" style:contextual-spacing="false"/>
    </style:style>
    <style:style style:name="P25" style:family="paragraph" style:parent-style-name="Standard">
      <style:paragraph-properties fo:margin-top="0.0555in" fo:margin-bottom="0in" style:contextual-spacing="false" fo:text-align="center" style:justify-single-word="false"/>
    </style:style>
    <style:style style:name="P26" style:family="paragraph" style:parent-style-name="Standard">
      <style:paragraph-properties fo:text-align="center" style:justify-single-word="false" fo:keep-with-next="always"/>
    </style:style>
    <style:style style:name="P27" style:family="paragraph" style:parent-style-name="Standard">
      <style:paragraph-properties fo:keep-with-next="always">
        <style:tab-stops>
          <style:tab-stop style:position="1.4543in"/>
          <style:tab-stop style:position="2.9201in"/>
        </style:tab-stops>
      </style:paragraph-properties>
      <style:text-properties fo:language="en" fo:country="GB" style:language-asian="en" style:country-asian="GB"/>
    </style:style>
    <style:style style:name="P28" style:family="paragraph" style:parent-style-name="Standard">
      <style:text-properties fo:language="en" fo:country="GB" fo:font-style="italic" fo:font-weight="bold" style:font-style-asian="italic" style:font-weight-asian="bold" style:font-style-complex="italic" style:font-weight-complex="bold"/>
    </style:style>
    <style:style style:name="P29" style:family="paragraph" style:parent-style-name="Standard">
      <style:paragraph-properties fo:margin-top="0in" fo:margin-bottom="0.0835in" style:contextual-spacing="false" fo:break-before="page"/>
    </style:style>
    <style:style style:name="P30" style:family="paragraph" style:parent-style-name="Standard">
      <style:paragraph-properties fo:margin-top="0.0835in" fo:margin-bottom="0in" style:contextual-spacing="false" fo:text-align="center" style:justify-single-word="false"/>
    </style:style>
    <style:style style:name="P31" style:family="paragraph" style:parent-style-name="Standard">
      <style:paragraph-properties fo:margin-top="0.0835in" fo:margin-bottom="0in" style:contextual-spacing="false"/>
    </style:style>
    <style:style style:name="P32" style:family="paragraph" style:parent-style-name="Standard">
      <style:paragraph-properties fo:keep-with-next="always"/>
      <style:text-properties fo:language="en" fo:country="GB"/>
    </style:style>
    <style:style style:name="P33" style:family="paragraph" style:parent-style-name="Standard">
      <style:paragraph-properties fo:margin-top="0.0835in" fo:margin-bottom="0.0835in" style:contextual-spacing="false" fo:text-align="left" style:justify-single-word="false" fo:orphans="2" fo:widows="2" fo:keep-with-next="always"/>
      <style:text-properties fo:language="en" fo:country="GB" fo:font-weight="bold" style:letter-kerning="false" style:font-name-asian="Times New Roman1" style:font-weight-asian="bold" style:font-name-complex="Times New Roman1" style:language-complex="ar" style:country-complex="SA"/>
    </style:style>
    <style:style style:name="P34" style:family="paragraph" style:parent-style-name="Standard">
      <style:paragraph-properties fo:margin-top="0.0835in" fo:margin-bottom="0.0835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35" style:family="paragraph" style:parent-style-name="Standard">
      <style:paragraph-properties fo:margin-top="0.0835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6" style:family="paragraph" style:parent-style-name="Standard">
      <style:paragraph-properties fo:margin-top="0.0835in" fo:margin-bottom="0.0835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7" style:family="paragraph" style:parent-style-name="Standard">
      <style:paragraph-properties fo:margin-top="0.0835in" fo:margin-bottom="0in" style:contextual-spacing="false" fo:text-align="left" style:justify-single-word="false" fo:orphans="2" fo:widows="2"/>
      <style:text-properties fo:language="en" fo:country="GB" style:letter-kerning="false" style:font-name-asian="Times New Roman1" style:font-name-complex="Times New Roman1" style:language-complex="ar" style:country-complex="SA"/>
    </style:style>
    <style:style style:name="P38"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9" style:family="paragraph" style:parent-style-name="Standard">
      <style:paragraph-properties fo:margin-top="0.0835in" fo:margin-bottom="0in" style:contextual-spacing="false" fo:text-align="left" style:justify-single-word="false" fo:orphans="2" fo:widows="2"/>
      <style:text-properties fo:language="en" fo:country="GB" fo:font-weight="bold" style:letter-kerning="false" style:font-name-asian="Times New Roman1" style:font-weight-asian="bold" style:font-name-complex="Times New Roman1" style:language-complex="ar" style:country-complex="SA"/>
    </style:style>
    <style:style style:name="P40" style:family="paragraph" style:parent-style-name="Heading_20_1">
      <style:paragraph-properties fo:text-indent="-0.248in" style:auto-text-indent="false"/>
    </style:style>
    <style:style style:name="P41"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fo:language="en" fo:country="US" fo:font-style="italic" style:letter-kerning="false" style:font-name-asian="Times New Roman1" style:font-style-asian="italic" style:font-name-complex="Calibri1" style:language-complex="ar" style:country-complex="SA"/>
    </style:style>
    <style:style style:name="P42" style:family="paragraph" style:parent-style-name="Standard">
      <style:paragraph-properties fo:margin-top="0in" fo:margin-bottom="0in" style:contextual-spacing="false" fo:text-align="center" style:justify-single-word="false" fo:orphans="2" fo:widows="2"/>
      <style:text-properties fo:language="en" fo:country="US" style:letter-kerning="false" style:font-name-asian="Times New Roman1" style:font-name-complex="Calibri1" style:language-complex="ar" style:country-complex="SA"/>
    </style:style>
    <style:style style:name="P43" style:family="paragraph" style:parent-style-name="List_20_Paragraph" style:list-style-name="WWNum26"/>
    <style:style style:name="P44" style:family="paragraph" style:parent-style-name="List_20_Paragraph">
      <style:paragraph-properties fo:margin-left="0.248in" fo:margin-top="0.0835in" fo:margin-bottom="0in" style:contextual-spacing="false"/>
    </style:style>
    <style:style style:name="P45" style:family="paragraph" style:parent-style-name="List_20_Paragraph">
      <style:paragraph-properties fo:margin-left="0.25in"/>
      <style:text-properties fo:language="en" fo:country="GB"/>
    </style:style>
    <style:style style:name="P46" style:family="paragraph" style:parent-style-name="Standard">
      <style:paragraph-properties fo:margin-top="0.0835in" fo:margin-bottom="0in" style:contextual-spacing="false" fo:text-indent="0.4925in" style:auto-text-indent="false"/>
    </style:style>
    <style:style style:name="P47" style:family="paragraph" style:parent-style-name="Standard">
      <style:paragraph-properties fo:margin-left="0.25in" fo:margin-top="0.0835in" fo:margin-bottom="0in" style:contextual-spacing="false"/>
    </style:style>
    <style:style style:name="P48" style:family="paragraph" style:parent-style-name="List_20_Paragraph">
      <style:paragraph-properties fo:margin-left="0.4925in" fo:margin-top="0.0835in" fo:margin-bottom="0in" style:contextual-spacing="false"/>
    </style:style>
    <style:style style:name="P49" style:family="paragraph" style:parent-style-name="List_20_Paragraph">
      <style:text-properties fo:language="en" fo:country="GB"/>
    </style:style>
    <style:style style:name="P50" style:family="paragraph" style:parent-style-name="List_20_Paragraph">
      <style:paragraph-properties fo:margin-left="0.25in"/>
    </style:style>
    <style:style style:name="P51" style:family="paragraph" style:parent-style-name="List_20_Paragraph" style:list-style-name="WWNum25">
      <style:paragraph-properties fo:margin-left="0.4957in" fo:margin-top="0.1665in" fo:margin-bottom="0in" style:contextual-spacing="false" fo:text-indent="-0.248in" style:auto-text-indent="false"/>
    </style:style>
    <style:style style:name="P52" style:family="paragraph" style:parent-style-name="List_20_Paragraph" style:list-style-name="WWNum25">
      <style:paragraph-properties fo:margin-left="0.4957in" fo:margin-top="0.0835in" fo:margin-bottom="0in" style:contextual-spacing="false" fo:text-indent="-0.248in" style:auto-text-indent="false"/>
    </style:style>
    <style:style style:name="P53" style:family="paragraph" style:parent-style-name="List_20_Paragraph" style:list-style-name="WWNum25">
      <style:paragraph-properties fo:margin-top="0.0835in" fo:margin-bottom="0in" style:contextual-spacing="false"/>
    </style:style>
    <style:style style:name="P54" style:family="paragraph" style:parent-style-name="List_20_Paragraph">
      <style:paragraph-properties fo:margin-left="1in" fo:margin-top="0.0835in" fo:margin-bottom="0in" style:contextual-spacing="false"/>
    </style:style>
    <style:style style:name="P55" style:family="paragraph" style:parent-style-name="List_20_Paragraph">
      <style:paragraph-properties fo:margin-left="0.9835in" fo:margin-top="0.0835in" fo:margin-bottom="0in" style:contextual-spacing="false"/>
      <style:text-properties fo:language="en" fo:country="GB"/>
    </style:style>
    <style:style style:name="P56" style:family="paragraph" style:parent-style-name="List_20_Paragraph" style:list-style-name="WWNum25">
      <style:paragraph-properties fo:margin-top="0.1665in" fo:margin-bottom="0in" style:contextual-spacing="false"/>
    </style:style>
    <style:style style:name="P57" style:family="paragraph" style:parent-style-name="List_20_Paragraph">
      <style:paragraph-properties fo:margin-left="0.9835in" fo:margin-top="0.0835in" fo:margin-bottom="0in" style:contextual-spacing="false"/>
    </style:style>
    <style:style style:name="P58" style:family="paragraph" style:parent-style-name="Standard">
      <style:paragraph-properties fo:margin-top="0.0835in" fo:margin-bottom="0in" style:contextual-spacing="false"/>
      <style:text-properties fo:language="en" fo:country="GB"/>
    </style:style>
    <style:style style:name="P59" style:family="paragraph" style:parent-style-name="Standard">
      <style:paragraph-properties fo:margin-left="0.25in"/>
    </style:style>
    <style:style style:name="P60" style:family="paragraph" style:parent-style-name="List_20_Paragraph" style:list-style-name="WWNum25">
      <style:paragraph-properties fo:margin-left="0.9957in" fo:margin-top="0.0835in" fo:margin-bottom="0in" style:contextual-spacing="false" fo:text-indent="-0.248in" style:auto-text-indent="false"/>
    </style:style>
    <style:style style:name="P61" style:family="paragraph" style:parent-style-name="List_20_Paragraph" style:list-style-name="WWNum25">
      <style:paragraph-properties fo:margin-left="1.4957in" fo:margin-top="0.0835in" fo:margin-bottom="0in" style:contextual-spacing="false" fo:text-indent="-0.248in" style:auto-text-indent="false"/>
    </style:style>
    <style:style style:name="P62" style:family="paragraph" style:parent-style-name="List_20_Paragraph" style:list-style-name="WWNum25">
      <style:paragraph-properties fo:margin-left="0.9957in" fo:margin-top="0.1665in" fo:margin-bottom="0in" style:contextual-spacing="false" fo:text-indent="-0.248in" style:auto-text-indent="false"/>
    </style:style>
    <style:style style:name="P63" style:family="paragraph" style:parent-style-name="List_20_Paragraph" style:list-style-name="WWNum33">
      <style:paragraph-properties fo:margin-left="0.748in" fo:margin-top="0.0835in" fo:margin-bottom="0in" style:contextual-spacing="false" fo:text-indent="-0.248in" style:auto-text-indent="false"/>
    </style:style>
    <style:style style:name="P64" style:family="paragraph" style:parent-style-name="List_20_Paragraph" style:list-style-name="WWNum33">
      <style:paragraph-properties fo:margin-left="0.748in" fo:margin-top="0.1665in" fo:margin-bottom="0in" style:contextual-spacing="false" fo:text-indent="-0.248in" style:auto-text-indent="false"/>
    </style:style>
    <style:style style:name="P65" style:family="paragraph" style:parent-style-name="List_20_Paragraph">
      <style:paragraph-properties fo:margin-top="0.1665in" fo:margin-bottom="0in" style:contextual-spacing="false"/>
      <style:text-properties fo:language="en" fo:country="GB"/>
    </style:style>
    <style:style style:name="P66" style:family="paragraph" style:parent-style-name="List_20_Paragraph">
      <style:paragraph-properties fo:margin-left="0.248in" fo:margin-top="0.0835in" fo:margin-bottom="0in" style:contextual-spacing="false"/>
      <style:text-properties fo:language="en" fo:country="GB"/>
    </style:style>
    <style:style style:name="P67" style:family="paragraph" style:parent-style-name="Standard">
      <style:paragraph-properties fo:margin-left="0.25in"/>
      <style:text-properties fo:language="en" fo:country="GB"/>
    </style:style>
    <style:style style:name="P68" style:family="paragraph" style:parent-style-name="Standard">
      <style:text-properties fo:language="en" fo:country="US" style:font-name-complex="Calibri1"/>
    </style:style>
    <style:style style:name="P69" style:family="paragraph" style:parent-style-name="Standard">
      <style:text-properties fo:language="en" fo:country="US" fo:font-weight="bold" style:font-weight-asian="bold" style:font-name-complex="Calibri1"/>
    </style:style>
    <style:style style:name="P70" style:family="paragraph" style:parent-style-name="List_20_Paragraph" style:list-style-name="WWNum35"/>
    <style:style style:name="P71" style:family="paragraph" style:parent-style-name="List_20_Paragraph" style:list-style-name="WWNum31"/>
    <style:style style:name="P72" style:family="paragraph" style:parent-style-name="Standard">
      <style:paragraph-properties fo:margin-left="0.4917in"/>
    </style:style>
    <style:style style:name="P73" style:family="paragraph" style:parent-style-name="Heading_20_1">
      <style:paragraph-properties fo:keep-together="always" fo:text-indent="-0.248in" style:auto-text-indent="false"/>
    </style:style>
    <style:style style:name="P74" style:family="paragraph" style:parent-style-name="Standard">
      <style:paragraph-properties fo:keep-together="always" fo:keep-with-next="always"/>
    </style:style>
    <style:style style:name="P75" style:family="paragraph" style:parent-style-name="Standard">
      <style:paragraph-properties fo:keep-together="always" fo:keep-with-next="always"/>
      <style:text-properties fo:language="en" fo:country="US"/>
    </style:style>
    <style:style style:name="P76" style:family="paragraph" style:parent-style-name="List_20_Paragraph" style:list-style-name="WWNum32"/>
    <style:style style:name="P77"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language="en" fo:country="US"/>
    </style:style>
    <style:style style:name="T8" style:family="text">
      <style:text-properties style:font-name="Calibri" fo:language="en" fo:country="GB"/>
    </style:style>
    <style:style style:name="T9" style:family="text">
      <style:text-properties fo:font-size="20pt" fo:language="en" fo:country="US" fo:font-weight="bold" style:font-size-asian="20pt" style:font-weight-asian="bold" style:font-name-complex="Calibri1" style:font-size-complex="20pt"/>
    </style:style>
    <style:style style:name="T10" style:family="text">
      <style:text-properties fo:language="en" fo:country="US" style:font-name-complex="Calibri1"/>
    </style:style>
    <style:style style:name="T11" style:family="text">
      <style:text-properties fo:font-size="8pt" fo:language="en" fo:country="US" style:font-size-asian="8pt" style:font-name-complex="Calibri1" style:font-size-complex="8pt"/>
    </style:style>
    <style:style style:name="T12" style:family="text">
      <style:text-properties fo:font-weight="bold" style:font-weight-asian="bold" style:font-name-complex="Calibri1"/>
    </style:style>
    <style:style style:name="T13" style:family="text">
      <style:text-properties fo:font-size="4pt" style:font-size-asian="4pt" style:font-name-complex="Calibri1" style:font-size-complex="4pt"/>
    </style:style>
    <style:style style:name="T14" style:family="text">
      <style:text-properties fo:font-size="30pt" fo:font-weight="bold" style:font-size-asian="30pt" style:font-weight-asian="bold" style:font-name-complex="Calibri1" style:font-size-complex="30pt"/>
    </style:style>
    <style:style style:name="T15"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16" style:family="text">
      <style:text-properties fo:language="en" fo:country="US" fo:font-style="italic" style:font-style-asian="italic" style:font-name-complex="Calibri1"/>
    </style:style>
    <style:style style:name="T17" style:family="text">
      <style:text-properties fo:font-size="2pt" fo:language="en" fo:country="US" style:font-size-asian="2pt" style:font-name-complex="Calibri1" style:font-size-complex="2pt"/>
    </style:style>
    <style:style style:name="T18" style:family="text">
      <style:text-properties fo:font-size="4pt" fo:font-weight="bold" style:font-size-asian="4pt" style:font-weight-asian="bold" style:font-name-complex="Calibri1" style:font-size-complex="4pt"/>
    </style:style>
    <style:style style:name="T19" style:family="text">
      <style:text-properties fo:font-size="36pt" fo:font-weight="bold" style:font-size-asian="36pt" style:font-weight-asian="bold" style:font-name-complex="Calibri1" style:font-size-complex="36pt"/>
    </style:style>
    <style:style style:name="T20"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21" style:family="text">
      <style:text-properties fo:font-size="2pt" fo:language="en" fo:country="US" fo:font-weight="bold" style:font-size-asian="2pt" style:font-weight-asian="bold" style:font-name-complex="Calibri1" style:font-size-complex="2pt"/>
    </style:style>
    <style:style style:name="T22" style:family="text">
      <style:text-properties style:font-name="Calibri" fo:font-size="16pt" fo:language="en" fo:country="GB" fo:font-weight="bold" style:font-size-asian="16pt" style:font-weight-asian="bold" style:font-size-complex="16pt"/>
    </style:style>
    <style:style style:name="T23" style:family="text">
      <style:text-properties fo:font-family="Calibri" style:font-family-generic="roman" style:font-pitch="variable" fo:font-size="11pt" fo:language="en" fo:country="US" fo:font-weight="normal" style:font-family-asian="'ＭＳ 明朝'" style:font-family-generic-asian="system" style:font-pitch-asian="variable" style:font-size-asian="11pt" style:language-asian="en" style:country-asian="US" style:font-weight-asian="normal" style:font-name-complex="Arial1" style:font-size-complex="11pt"/>
    </style:style>
    <style:style style:name="T24" style:family="text">
      <style:text-properties style:font-name="Calibri" fo:font-size="11pt" fo:language="en" fo:country="US" fo:font-weight="normal" style:font-family-asian="'ＭＳ 明朝'" style:font-family-generic-asian="system" style:font-pitch-asian="variable" style:font-size-asian="11pt" style:language-asian="en" style:country-asian="US" style:font-weight-asian="normal" style:font-name-complex="Arial1" style:font-size-complex="11pt"/>
    </style:style>
    <style:style style:name="T25" style:family="text">
      <style:text-properties text:display="true"/>
    </style:style>
    <style:style style:name="T26" style:family="text">
      <style:text-properties fo:font-family="Calibri" style:font-family-generic="roman" style:font-pitch="variable" fo:font-size="11pt" fo:font-style="normal" style:font-family-asian="'ＭＳ 明朝'" style:font-family-generic-asian="system" style:font-pitch-asian="variable" style:font-size-asian="11pt" style:language-asian="en" style:country-asian="US" style:font-style-asian="normal" style:font-name-complex="Arial1" style:font-size-complex="11pt"/>
    </style:style>
    <style:style style:name="T27" style:family="text">
      <style:text-properties style:font-name="Calibri" fo:font-size="11pt" fo:font-style="normal" style:font-family-asian="'ＭＳ 明朝'" style:font-family-generic-asian="system" style:font-pitch-asian="variable" style:font-size-asian="11pt" style:language-asian="en" style:country-asian="US" style:font-style-asian="normal" style:font-name-complex="Arial1" style:font-size-complex="11pt"/>
    </style:style>
    <style:style style:name="T28" style:family="text">
      <style:text-properties fo:font-family="Calibri" style:font-family-generic="roman" style:font-pitch="variable" style:font-family-asian="'ＭＳ 明朝'" style:font-family-generic-asian="system" style:font-pitch-asian="variable" style:language-asian="en" style:country-asian="US" style:font-name-complex="Arial1" style:font-size-complex="11pt"/>
    </style:style>
    <style:style style:name="T29" style:family="text">
      <style:text-properties style:font-name="Calibri" style:font-family-asian="'ＭＳ 明朝'" style:font-family-generic-asian="system" style:font-pitch-asian="variable" style:language-asian="en" style:country-asian="US" style:font-name-complex="Arial1" style:font-size-complex="11pt"/>
    </style:style>
    <style:style style:name="T30" style:family="text">
      <style:text-properties fo:language="en" fo:country="US" fo:font-style="italic" style:font-style-asian="italic"/>
    </style:style>
    <style:style style:name="T31" style:family="text">
      <style:text-properties fo:language="en" fo:country="GB" fo:font-style="italic" fo:font-weight="bold" style:font-style-asian="italic" style:font-weight-asian="bold" style:font-style-complex="italic" style:font-weight-complex="bold"/>
    </style:style>
    <style:style style:name="T32" style:family="text">
      <style:text-properties fo:language="en" fo:country="US" fo:font-weight="bold" style:font-weight-asian="bold"/>
    </style:style>
    <style:style style:name="T33" style:family="text">
      <style:text-properties fo:language="en" fo:country="US" style:language-asian="en" style:country-asian="US"/>
    </style:style>
    <style:style style:name="T34" style:family="text">
      <style:text-properties fo:language="en" fo:country="GB" style:language-asian="en" style:country-asian="GB"/>
    </style:style>
    <style:style style:name="T35" style:family="text">
      <style:text-properties fo:font-weight="bold" style:font-weight-asian="bold"/>
    </style:style>
    <style:style style:name="T36" style:family="text">
      <style:text-properties fo:language="en" fo:country="GB" fo:font-weight="bold" style:font-weight-asian="bold"/>
    </style:style>
    <style:style style:name="T37" style:family="text">
      <style:text-properties fo:language="en" fo:country="GB" style:font-weight-complex="bold"/>
    </style:style>
    <style:style style:name="T38" style:family="text">
      <style:text-properties fo:language="en" fo:country="GB" fo:font-style="italic" style:font-style-asian="italic" style:font-style-complex="italic"/>
    </style:style>
    <style:style style:name="T39" style:family="text">
      <style:text-properties fo:language="en" fo:country="US" fo:font-style="italic" fo:font-weight="bold" style:font-style-asian="italic" style:font-weight-asian="bold" style:font-name-complex="Calibri1"/>
    </style:style>
    <style:style style:name="T40" style:family="text">
      <style:text-properties fo:font-family="Wingdings" style:font-family-generic="swiss" style:font-pitch="variable" style:font-charset="x-symbol" fo:language="en" fo:country="US" fo:font-style="italic" fo:font-weight="bold" style:font-family-asian="Wingdings" style:font-family-generic-asian="system" style:font-pitch-asian="variable" style:font-style-asian="italic" style:font-weight-asian="bold" style:font-family-complex="Wingdings" style:font-family-generic-complex="system" style:font-pitch-complex="variable"/>
    </style:style>
    <style:style style:name="T41" style:family="text">
      <style:text-properties fo:language="en" fo:country="GB" fo:font-weight="bold" style:font-weight-asian="bold" style:font-weight-complex="bold"/>
    </style:style>
    <style:style style:name="T42"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43" style:family="text">
      <style:text-properties fo:color="#ff0000" loext:opacity="100%" fo:language="en" fo:country="GB"/>
    </style:style>
    <style:style style:name="T44" style:family="text">
      <style:text-properties fo:language="en" fo:country="US" fo:font-weight="bold" style:font-weight-asian="bold" style:font-name-complex="Calibri1"/>
    </style:style>
    <style:style style:name="T45" style:family="text">
      <style:text-properties fo:font-style="italic" style:font-style-asian="italic"/>
    </style:style>
    <style:style style:name="T46" style:family="text">
      <style:text-properties fo:language="en" fo:country="GB" fo:font-style="italic" fo:font-weight="bold" style:font-style-asian="italic" style:font-weight-asian="bold"/>
    </style:style>
    <style:style style:name="T47" style:family="text">
      <style:text-properties style:font-name="Times" fo:font-size="10pt" fo:language="en" fo:country="GB" style:font-size-asian="10pt" style:language-asian="en" style:country-asian="US"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4"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437in, 1.8874in, 1.0181in, 2.0547in)" draw:luminance="0%" draw:contrast="0%" draw:red="0%" draw:green="0%" draw:blue="0%" draw:gamma="100%" draw:color-inversion="false" draw:image-opacity="100%" draw:color-mode="standard" loext:decorative="false"/>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0" text:anchor-type="as-char" svg:width="5.8063in" svg:height="1.7764in"><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2">Distributing App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2" draw:name="Picture 9" text:anchor-type="as-char" svg:width="0.672in" svg:height="0.752in"><draw:image xlink:href="Pictures/100000010000042C000004B0826D13D2.png" xlink:type="simple" xlink:show="embed" xlink:actuate="onLoad" draw:mime-type="image/png"/><svg:desc>Logo

Description automatically generated</svg:desc></draw:frame></text:p>
      <text:p text:style-name="P3" loext:marker-style-name="T3"/>
      <text:p text:style-name="P3" loext:marker-style-name="T3"/>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5" loext:marker-style-name="T4"/>
      <text:p text:style-name="P2" loext:marker-style-name="T5"><text:span text:style-name="T5">Scripture App Builder: Distributing Apps</text:span><text:span text:style-name="T5"/></text:p>
      <text:p text:style-name="P5" loext:marker-style-name="T4"/>
      <text:p text:style-name="P2" loext:marker-style-name="T4"><text:span text:style-name="T4">© 2026, SIL Global</text:span><text:span text:style-name="T4"/></text:p>
      <text:p text:style-name="P5" loext:marker-style-name="T4"/>
      <text:p text:style-name="P2" loext:marker-style-name="T6"><text:span text:style-name="T6">Last updated: 30 January 2026</text:span><text:span text:style-name="T6"/></text:p>
      <text:p text:style-name="P5" loext:marker-style-name="T4"/>
      <text:p text:style-name="P5" loext:marker-style-name="T4"/>
      <text:p text:style-name="P5" loext:marker-style-name="T4"/>
      <text:p text:style-name="P5" loext:marker-style-name="T4"/>
      <text:p text:style-name="P5" loext:marker-style-name="T4"/>
      <text:p text:style-name="P2" loext:marker-style-name="T7"><text:span text:style-name="T7">You are free to print this manual for personal use and for training workshops.</text:span><text:span text:style-name="T7"/></text:p>
      <text:p text:style-name="P6" loext:marker-style-name="T7"/>
      <text:p text:style-name="P2" loext:marker-style-name="T7"><text:span text:style-name="T7">The latest version is available at</text:span><text:span text:style-name="T7"/></text:p>
      <text:p text:style-name="P2" loext:marker-style-name="T7"><text:a xlink:type="simple" xlink:href="http://software.sil.org/scriptureappbuilder/resources/" text:style-name="Internet_20_link" text:visited-style-name="Visited_20_Internet_20_Link"><text:span text:style-name="Internet_20_link"><text:span text:style-name="T7">http://software.sil.org/scriptureappbuilder/resources/</text:span></text:span></text:a><text:span text:style-name="T7"> <text:s/></text:span></text:p>
      <text:p text:style-name="P6" loext:marker-style-name="T7"/>
      <text:p text:style-name="P2" loext:marker-style-name="T4"><text:span text:style-name="T4">and on the Help menu of Scripture App Builder.</text:span><text:span text:style-name="T4"/></text:p>
      <text:p text:style-name="P4" loext:marker-style-name="T4"/>
      <text:p text:style-name="P4" loext:marker-style-name="T4"/>
      <text:p text:style-name="P4" loext:marker-style-name="T4"/>
      <text:p text:style-name="P7" loext:marker-style-name="T8"/>
      <text:p text:style-name="P7" loext:marker-style-name="T8"/>
      <text:p text:style-name="P7" loext:marker-style-name="T8"/>
      <text:p text:style-name="P8" loext:marker-style-name="T9"/>
      <text:p text:style-name="P2" loext:marker-style-name="T9"><text:span text:style-name="T9">How to Use This Manual</text:span><text:span text:style-name="T9"/></text:p>
      <text:p text:style-name="P9" loext:marker-style-name="T10"/>
      <text:p text:style-name="P10" loext:marker-style-name="T10"><text:span text:style-name="T10">This guide includes notes and tips to help you get the most out of the software. Notes and tips will appear like this:</text:span><text:span text:style-name="T10"/></text:p>
      <text:p text:style-name="P11" loext:marker-style-name="T11"/>
      <text:p text:style-name="P12" loext:marker-style-name="T12"><text:span text:style-name="T12">Notes:</text:span><text:span text:style-name="T12"/></text:p>
      <text:p text:style-name="P13" loext:marker-style-name="T13"/>
      <table:table table:name="Table1" table:style-name="Table1">
        <table:table-column table:style-name="Table1.A"/>
        <table:table-column table:style-name="Table1.B"/>
        <table:table-row table:style-name="Table1.1">
          <table:table-cell table:style-name="Table1.A1" office:value-type="string">
            <text:p text:style-name="P14" loext:marker-style-name="T14"><text:span text:style-name="T15"></text:span><text:span text:style-name="T14"> </text:span></text:p>
          </table:table-cell>
          <table:table-cell table:style-name="Table1.B1" office:value-type="string">
            <text:p text:style-name="P14" loext:marker-style-name="T16"><text:span text:style-name="T16">Users may have to click on a security message to permit the app to install.</text:span><text:span text:style-name="T16"/></text:p>
          </table:table-cell>
        </table:table-row>
      </table:table>
      <text:p text:style-name="P15" loext:marker-style-name="T17"/>
      <text:p text:style-name="P16" loext:marker-style-name="T12"/>
      <text:p text:style-name="P12" loext:marker-style-name="T12"><text:span text:style-name="T12">Tips:</text:span><text:span text:style-name="T12"/></text:p>
      <text:p text:style-name="P17" loext:marker-style-name="T18"/>
      <table:table table:name="Table2" table:style-name="Table2">
        <table:table-column table:style-name="Table2.A"/>
        <table:table-column table:style-name="Table2.B"/>
        <table:table-row table:style-name="Table2.1">
          <table:table-cell table:style-name="Table2.A1" office:value-type="string">
            <text:p text:style-name="P14" loext:marker-style-name="T19"><text:span text:style-name="T20"></text:span><text:span text:style-name="T19"> </text:span></text:p>
          </table:table-cell>
          <table:table-cell table:style-name="Table2.B1" office:value-type="string">
            <text:p text:style-name="P14" loext:marker-style-name="T16"><text:span text:style-name="T16">Provide a variety of options for users to find and install your apps based on the specific needs of the target groups.</text:span><text:span text:style-name="T16"/></text:p>
          </table:table-cell>
        </table:table-row>
      </table:table>
      <text:p text:style-name="P18" loext:marker-style-name="T21"/>
      <text:p text:style-name="P19" loext:marker-style-name="T22"><text:span text:style-name="T22">Contents</text:span><text:span text:style-name="T22"/></text:p>
      <text:p text:style-name="P20" loext:marker-style-name="T2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3"><text:a xlink:type="simple" xlink:href="#_Toc220666435" text:style-name="Index_20_Link" text:visited-style-name="Index_20_Link"><text:span text:style-name="T4">1.</text:span><text:span text:style-name="T24"><text:tab/></text:span><text:span text:style-name="T4">Introduction</text:span><text:span text:style-name="T25"><text:tab/>5</text:span></text:a></text:p>
          <text:p text:style-name="Contents_20_2" loext:marker-style-name="T26"><text:a xlink:type="simple" xlink:href="#_Toc220666436" text:style-name="Index_20_Link" text:visited-style-name="Index_20_Link">1.1.<text:span text:style-name="T27"><text:tab/></text:span>Checking that your app is ready to publish<text:span text:style-name="T25"><text:tab/>5</text:span></text:a></text:p>
          <text:p text:style-name="Contents_20_2" loext:marker-style-name="T26"><text:a xlink:type="simple" xlink:href="#_Toc220666437" text:style-name="Index_20_Link" text:visited-style-name="Index_20_Link">1.2.<text:span text:style-name="T27"><text:tab/></text:span>Distribution options for Android apps<text:span text:style-name="T25"><text:tab/>5</text:span></text:a></text:p>
          <text:p text:style-name="Contents_20_2" loext:marker-style-name="T26"><text:a xlink:type="simple" xlink:href="#_Toc220666438" text:style-name="Index_20_Link" text:visited-style-name="Index_20_Link">1.3.<text:span text:style-name="T27"><text:tab/></text:span>Distribution options for iOS apps<text:span text:style-name="T25"><text:tab/>6</text:span></text:a></text:p>
          <text:p text:style-name="Contents_20_2" loext:marker-style-name="T26"><text:a xlink:type="simple" xlink:href="#_Toc220666439" text:style-name="Index_20_Link" text:visited-style-name="Index_20_Link">1.4.<text:span text:style-name="T27"><text:tab/></text:span>Advantages and disadvantages of each distribution method<text:span text:style-name="T25"><text:tab/>7</text:span></text:a></text:p>
          <text:p text:style-name="Contents_20_1" loext:marker-style-name="T23"><text:a xlink:type="simple" xlink:href="#_Toc220666440" text:style-name="Index_20_Link" text:visited-style-name="Index_20_Link"><text:span text:style-name="T4">2.</text:span><text:span text:style-name="T24"><text:tab/></text:span><text:span text:style-name="T4">Publishing apps on Google Play (using the Play console)</text:span><text:span text:style-name="T25"><text:tab/>10</text:span></text:a></text:p>
          <text:p text:style-name="Contents_20_1" loext:marker-style-name="T23"><text:a xlink:type="simple" xlink:href="#_Toc220666441" text:style-name="Index_20_Link" text:visited-style-name="Index_20_Link"><text:span text:style-name="T4">3.</text:span><text:span text:style-name="T24"><text:tab/></text:span><text:span text:style-name="T4">Publishing Apps on the Google Play Store (using Scriptoria)</text:span><text:span text:style-name="T25"><text:tab/>14</text:span></text:a></text:p>
          <text:p text:style-name="Contents_20_2" loext:marker-style-name="T26"><text:a xlink:type="simple" xlink:href="#_Toc220666442" text:style-name="Index_20_Link" text:visited-style-name="Index_20_Link">3.1.<text:span text:style-name="T27"><text:tab/></text:span>The Scriptoria tab<text:span text:style-name="T25"><text:tab/>14</text:span></text:a></text:p>
          <text:p text:style-name="Contents_20_2" loext:marker-style-name="T26"><text:a xlink:type="simple" xlink:href="#_Toc220666443" text:style-name="Index_20_Link" text:visited-style-name="Index_20_Link">3.2.<text:span text:style-name="T27"><text:tab/></text:span>The Google Play Store Listing tab<text:span text:style-name="T25"><text:tab/>15</text:span></text:a></text:p>
          <text:p text:style-name="Contents_20_3" loext:marker-style-name="T28"><text:a xlink:type="simple" xlink:href="#_Toc220666444" text:style-name="Index_20_Link" text:visited-style-name="Index_20_Link"><text:span text:style-name="T4">3.2.1.</text:span><text:span text:style-name="T29"><text:tab/></text:span><text:span text:style-name="T4">Manage Translations</text:span><text:span text:style-name="T25"><text:tab/>15</text:span></text:a></text:p>
          <text:p text:style-name="Contents_20_3" loext:marker-style-name="T28"><text:a xlink:type="simple" xlink:href="#_Toc220666445" text:style-name="Index_20_Link" text:visited-style-name="Index_20_Link"><text:span text:style-name="T4">3.2.2.</text:span><text:span text:style-name="T29"><text:tab/></text:span><text:span text:style-name="T4">Import From Google Play…</text:span><text:span text:style-name="T25"><text:tab/>15</text:span></text:a></text:p>
          <text:p text:style-name="Contents_20_3" loext:marker-style-name="T28"><text:a xlink:type="simple" xlink:href="#_Toc220666446" text:style-name="Index_20_Link" text:visited-style-name="Index_20_Link"><text:span text:style-name="T4">3.2.3.</text:span><text:span text:style-name="T29"><text:tab/></text:span><text:span text:style-name="T4">The Product Details tab</text:span><text:span text:style-name="T25"><text:tab/>15</text:span></text:a></text:p>
          <text:p text:style-name="Contents_20_3" loext:marker-style-name="T28"><text:a xlink:type="simple" xlink:href="#_Toc220666447" text:style-name="Index_20_Link" text:visited-style-name="Index_20_Link"><text:span text:style-name="T4">3.2.4.</text:span><text:span text:style-name="T29"><text:tab/></text:span><text:span text:style-name="T4">The </text:span><text:span text:style-name="T3">What’s New</text:span><text:span text:style-name="T4"> tab</text:span><text:span text:style-name="T25"><text:tab/>16</text:span></text:a></text:p>
          <text:p text:style-name="Contents_20_3" loext:marker-style-name="T28"><text:a xlink:type="simple" xlink:href="#_Toc220666448" text:style-name="Index_20_Link" text:visited-style-name="Index_20_Link"><text:span text:style-name="T4">3.2.5.</text:span><text:span text:style-name="T29"><text:tab/></text:span><text:span text:style-name="T4">The Screenshots tab</text:span><text:span text:style-name="T25"><text:tab/>16</text:span></text:a></text:p>
          <text:p text:style-name="Contents_20_3" loext:marker-style-name="T28"><text:a xlink:type="simple" xlink:href="#_Toc220666449" text:style-name="Index_20_Link" text:visited-style-name="Index_20_Link"><text:span text:style-name="T4">3.2.6.</text:span><text:span text:style-name="T29"><text:tab/></text:span><text:span text:style-name="T4">High-res Icon</text:span><text:span text:style-name="T25"><text:tab/>16</text:span></text:a></text:p>
          <text:p text:style-name="Contents_20_3" loext:marker-style-name="T28"><text:a xlink:type="simple" xlink:href="#_Toc220666450" text:style-name="Index_20_Link" text:visited-style-name="Index_20_Link"><text:span text:style-name="T4">3.2.7.</text:span><text:span text:style-name="T29"><text:tab/></text:span><text:span text:style-name="T4">Feature Graphic</text:span><text:span text:style-name="T25"><text:tab/>16</text:span></text:a></text:p>
          <text:p text:style-name="Contents_20_2" loext:marker-style-name="T26"><text:a xlink:type="simple" xlink:href="#_Toc220666451" text:style-name="Index_20_Link" text:visited-style-name="Index_20_Link">3.3.<text:span text:style-name="T27"><text:tab/></text:span>The Scripture Earth tab<text:span text:style-name="T25"><text:tab/>17</text:span></text:a></text:p>
          <text:p text:style-name="Contents_20_2" loext:marker-style-name="T26"><text:a xlink:type="simple" xlink:href="#_Toc220666452" text:style-name="Index_20_Link" text:visited-style-name="Index_20_Link">3.4.<text:span text:style-name="T27"><text:tab/></text:span>The Publish Properties tab<text:span text:style-name="T25"><text:tab/>17</text:span></text:a></text:p>
          <text:p text:style-name="Contents_20_2" loext:marker-style-name="T26"><text:a xlink:type="simple" xlink:href="#_Toc220666453" text:style-name="Index_20_Link" text:visited-style-name="Index_20_Link">3.5.<text:span text:style-name="T27"><text:tab/></text:span>Republishing an App<text:span text:style-name="T25"><text:tab/>17</text:span></text:a></text:p>
          <text:p text:style-name="Contents_20_1" loext:marker-style-name="T23"><text:a xlink:type="simple" xlink:href="#_Toc220666454" text:style-name="Index_20_Link" text:visited-style-name="Index_20_Link"><text:span text:style-name="T4">4.</text:span><text:span text:style-name="T24"><text:tab/></text:span><text:span text:style-name="T4">Distributing apps by memory card</text:span><text:span text:style-name="T25"><text:tab/>17</text:span></text:a></text:p>
          <text:p text:style-name="Contents_20_1" loext:marker-style-name="T23"><text:a xlink:type="simple" xlink:href="#_Toc220666455" text:style-name="Index_20_Link" text:visited-style-name="Index_20_Link"><text:span text:style-name="T4">5.</text:span><text:span text:style-name="T24"><text:tab/></text:span><text:span text:style-name="T4">Sharing apps by Bluetooth</text:span><text:span text:style-name="T25"><text:tab/>18</text:span></text:a></text:p>
          <text:p text:style-name="Contents_20_1" loext:marker-style-name="T23"><text:a xlink:type="simple" xlink:href="#_Toc220666456" text:style-name="Index_20_Link" text:visited-style-name="Index_20_Link"><text:span text:style-name="T4">6.</text:span><text:span text:style-name="T24"><text:tab/></text:span><text:span text:style-name="T4">Sharing apps by Wi-Fi transfer</text:span><text:span text:style-name="T25"><text:tab/>18</text:span></text:a></text:p>
          <text:p text:style-name="Contents_20_1" loext:marker-style-name="T23"><text:a xlink:type="simple" xlink:href="#_Toc220666457" text:style-name="Index_20_Link" text:visited-style-name="Index_20_Link"><text:span text:style-name="T4">7.</text:span><text:span text:style-name="T24"><text:tab/></text:span><text:span text:style-name="T4">Other Ways to Share Your App Installer File</text:span><text:span text:style-name="T25"><text:tab/>19</text:span></text:a></text:p>
        </text:index-body>
      </text:table-of-content>
      <text:p text:style-name="P7" loext:marker-style-name="T8"/>
      <text:p text:style-name="P21" loext:marker-style-name="T22"/>
      <text:p text:style-name="P21" loext:marker-style-name="T22"/>
      <text:h text:style-name="P22" text:outline-level="1" loext:marker-style-name="T4"><text:bookmark-start text:name="_Toc220666435"/><text:span text:style-name="T4">Introduction</text:span><text:bookmark-end text:name="_Toc220666435"/><text:span text:style-name="T4"/></text:h>
      <text:h text:style-name="Heading_20_2" text:outline-level="2"><text:bookmark-start text:name="_Toc459723999"/><text:bookmark-start text:name="_Toc220666436"/>Checking that your app is ready to publish<text:bookmark-end text:name="_Toc459723999"/><text:bookmark-end text:name="_Toc220666436"/></text:h>
      <text:p text:style-name="Standard" loext:marker-style-name="T7"><text:span text:style-name="T7">Before you distribute your app, please use the </text:span><text:span text:style-name="T30">App Publishing Checklist</text:span><text:span text:style-name="T7"> (available via the Help menu in SAB or on the SAB website) to verify that it is ready to publish.</text:span></text:p>
      <text:p text:style-name="P23" loext:marker-style-name="T7"/>
      <text:h text:style-name="Heading_20_2" text:outline-level="2"><text:bookmark-start text:name="_Toc220666437"/>Distribution options for Android apps<text:bookmark-end text:name="_Toc220666437"/></text:h>
      <text:p text:style-name="Standard" loext:marker-style-name="T4"><text:span text:style-name="T4">There are several possible ways of transferring Android apps to a smartphone. These include both online and offline options: </text:span><text:span text:style-name="T4"/></text:p>
      <text:p text:style-name="P4" loext:marker-style-name="T4"/>
      <text:p text:style-name="P13" loext:marker-style-name="T13"/>
      <table:table table:name="Table3" table:style-name="Table3">
        <table:table-column table:style-name="Table3.A"/>
        <table:table-column table:style-name="Table3.B"/>
        <table:table-row table:style-name="Table3.1">
          <table:table-cell table:style-name="Table3.A1" office:value-type="string">
            <text:p text:style-name="P14" loext:marker-style-name="T14"><text:span text:style-name="T15"></text:span><text:span text:style-name="T14"> </text:span></text:p>
          </table:table-cell>
          <table:table-cell table:style-name="Table3.B1" office:value-type="string">
            <text:p text:style-name="P14" loext:marker-style-name="T16"><text:span text:style-name="T16">Copying an APK (app installer) file directly to a phone (rather than installing from the Play Store) is called side-loading and, though allowed on an Android phone, may cause a warning message to display, asking for the user’s permission to install the file. This warning may be concerning to many users, so you will have to assure them that it’s okay to install.</text:span><text:span text:style-name="T16"/></text:p>
          </table:table-cell>
        </table:table-row>
      </table:table>
      <text:p text:style-name="P4" loext:marker-style-name="T4"/>
      <text:p text:style-name="P4" loext:marker-style-name="T4"/>
      <text:p text:style-name="P24" loext:marker-style-name="T31"><text:span text:style-name="T31">Online distribution</text:span><text:span text:style-name="T31"/></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 loext:marker-style-name="T7"><draw:frame draw:style-name="fr2" draw:name="Picture 11" text:anchor-type="as-char" svg:width="0.5362in" svg:height="0.6in"><draw:image xlink:href="Pictures/10000001000004770000050079FEEEC3.png" xlink:type="simple" xlink:show="embed" xlink:actuate="onLoad" draw:mime-type="image/png"/><svg:desc>Google Play Icon - Free vector graphic on Pixabay</svg:desc></draw:frame></text:p>
          </table:table-cell>
          <table:table-cell table:style-name="Table4.B1" office:value-type="string">
            <text:p text:style-name="Standard" loext:marker-style-name="T32"><text:span text:style-name="T32">Google Play </text:span><text:span text:style-name="T32"/></text:p>
          </table:table-cell>
          <table:table-cell table:style-name="Table4.B1" office:value-type="string">
            <text:p text:style-name="Standard" loext:marker-style-name="T7"><text:span text:style-name="T7">Publish the app on </text:span><text:a xlink:type="simple" xlink:href="http://play.google.com/" text:style-name="Internet_20_link" text:visited-style-name="Visited_20_Internet_20_Link"><text:span text:style-name="Internet_20_link"><text:span text:style-name="T7">Google Play</text:span></text:span></text:a><text:span text:style-name="T7"> for people to find and download. This is where most Android apps are distributed.</text:span></text:p>
          </table:table-cell>
        </table:table-row>
        <table:table-row table:style-name="Table4.1">
          <table:table-cell table:style-name="Table4.B1" office:value-type="string">
            <text:p text:style-name="P25" loext:marker-style-name="T33"><draw:frame draw:style-name="fr2" draw:name="Picture 3" text:anchor-type="as-char" svg:width="0.7291in" svg:height="0.7291in"><draw:image xlink:href="Pictures/10000000000001F4000001F4ABAB9A73.jpg" xlink:type="simple" xlink:show="embed" xlink:actuate="onLoad" draw:mime-type="image/jpeg"/><svg:desc>Amazon.com: Amazon Appstore: Appstore for Android</svg:desc></draw:frame></text:p>
          </table:table-cell>
          <table:table-cell table:style-name="Table4.B1" office:value-type="string">
            <text:p text:style-name="Standard" loext:marker-style-name="T32"><text:span text:style-name="T32">Amazon Appstore</text:span><text:span text:style-name="T32"/></text:p>
          </table:table-cell>
          <table:table-cell table:style-name="Table4.B1" office:value-type="string">
            <text:p text:style-name="Standard" loext:marker-style-name="T7"><text:span text:style-name="T7">Publish the app on the </text:span><text:a xlink:type="simple" xlink:href="https://www.amazon.com/appstore" text:style-name="Internet_20_link" text:visited-style-name="Visited_20_Internet_20_Link"><text:span text:style-name="Internet_20_link"><text:span text:style-name="T7">Amazon Appstore</text:span></text:span></text:a><text:span text:style-name="T7"> for people to find and download.</text:span></text:p>
          </table:table-cell>
        </table:table-row>
        <table:table-row table:style-name="Table4.3">
          <table:table-cell table:style-name="Table4.B1" office:value-type="string">
            <text:p text:style-name="P26" loext:marker-style-name="T34"><draw:frame draw:style-name="fr2" draw:name="Picture 14" text:anchor-type="as-char" svg:width="0.5744in" svg:height="0.5744in"><draw:image xlink:href="Pictures/10000001000004B0000004B00D994124.png" xlink:type="simple" xlink:show="embed" xlink:actuate="onLoad" draw:mime-type="image/png"/></draw:frame></text:p>
          </table:table-cell>
          <table:table-cell table:style-name="Table4.B1" office:value-type="string">
            <text:p text:style-name="P10" loext:marker-style-name="T32"><text:span text:style-name="T32">Web Sites</text:span><text:span text:style-name="T32"/></text:p>
          </table:table-cell>
          <table:table-cell table:style-name="Table4.B1" office:value-type="string">
            <text:p text:style-name="P10" loext:marker-style-name="T7"><text:span text:style-name="T7">Post the app installation file (APK) on your website for people to find and download. Once people have downloaded the file, they tap on it to install it.</text:span><text:span text:style-name="T7"/></text:p>
          </table:table-cell>
        </table:table-row>
        <table:table-row table:style-name="Table4.4">
          <table:table-cell table:style-name="Table4.B1" office:value-type="string">
            <text:p text:style-name="P26"><draw:frame draw:style-name="fr2" draw:name="Picture 16" text:anchor-type="as-char" svg:width="0.7827in" svg:height="0.7937in"><draw:image xlink:href="Pictures/10000001000000D3000000D6F63B3F30.png" xlink:type="simple" xlink:show="embed" xlink:actuate="onLoad" draw:mime-type="image/png"/></draw:frame></text:p>
          </table:table-cell>
          <table:table-cell table:style-name="Table4.B1" office:value-type="string">
            <text:p text:style-name="P10" loext:marker-style-name="T35"><text:span text:style-name="T35">Cloud Storage (Dropbox, Google Drive, etc.)</text:span><text:span text:style-name="T35"/></text:p>
          </table:table-cell>
          <table:table-cell table:style-name="Table4.B1" office:value-type="string">
            <text:p text:style-name="P10" loext:marker-style-name="T7"><text:span text:style-name="T7">Upload the app installation file (APK) to a folder in a cloud storage service (such as Dropbox or Google Drive). Share the link with others. Once people have downloaded the file, they tap on it to install it.</text:span><text:span text:style-name="T7"/></text:p>
          </table:table-cell>
        </table:table-row>
        <table:table-row table:style-name="Table4.5">
          <table:table-cell table:style-name="Table4.B1" office:value-type="string">
            <text:p text:style-name="P26"><draw:frame draw:style-name="fr3" draw:name="Object1" text:anchor-type="as-char" svg:width="0.8335in" svg:height="0.6598in"><draw:object-ole xlink:href="./Obj100" xlink:type="simple" xlink:show="embed" xlink:actuate="onLoad"/><draw:image xlink:href="./ObjectReplacements/Obj100" xlink:type="simple" xlink:show="embed" xlink:actuate="onLoad"/></draw:frame></text:p>
          </table:table-cell>
          <table:table-cell table:style-name="Table4.B1" office:value-type="string">
            <text:p text:style-name="P10" loext:marker-style-name="T32"><text:span text:style-name="T32">Email</text:span><text:span text:style-name="T32"/></text:p>
          </table:table-cell>
          <table:table-cell table:style-name="Table4.B1" office:value-type="string">
            <text:p text:style-name="P10" loext:marker-style-name="T7"><text:span text:style-name="T7">Email the APK directly to one or more people. Save the attachment to their phone and tap to install the app.</text:span><text:span text:style-name="T7"/></text:p>
          </table:table-cell>
        </table:table-row>
        <table:table-row table:style-name="Table4.6">
          <table:table-cell table:style-name="Table4.B1" office:value-type="string">
            <text:p text:style-name="P26" loext:marker-style-name="T33"><draw:frame draw:style-name="fr3" draw:name="Object2" text:anchor-type="as-char" svg:width="0.722in" svg:height="0.7016in"><draw:object-ole xlink:href="./Obj101" xlink:type="simple" xlink:show="embed" xlink:actuate="onLoad"/><draw:image xlink:href="./ObjectReplacements/Obj101" xlink:type="simple" xlink:show="embed" xlink:actuate="onLoad"/></draw:frame></text:p>
          </table:table-cell>
          <table:table-cell table:style-name="Table4.B1" office:value-type="string">
            <text:p text:style-name="P10" loext:marker-style-name="T32"><text:span text:style-name="T32">Social Media messaging</text:span><text:span text:style-name="T32"/></text:p>
          </table:table-cell>
          <table:table-cell table:style-name="Table4.B1" office:value-type="string">
            <text:p text:style-name="P10" loext:marker-style-name="T7"><text:span text:style-name="T7">Send the APK directly to one or more people. They can tap the link to install the app.</text:span><text:span text:style-name="T7"/></text:p>
          </table:table-cell>
        </table:table-row>
      </table:table>
      <text:p text:style-name="P27" loext:marker-style-name="T34"/>
      <text:p text:style-name="P28" loext:marker-style-name="T31"/>
      <text:p text:style-name="P29" loext:marker-style-name="T31"><text:span text:style-name="T31">Offline distribution</text:span><text:span text:style-name="T31"/></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 loext:marker-style-name="T7"><draw:frame draw:style-name="fr2" draw:name="Picture 5" text:anchor-type="as-char" svg:width="0.7362in" svg:height="0.7362in"><draw:image xlink:href="Pictures/1000000000000258000002582742E9A7.jpg" xlink:type="simple" xlink:show="embed" xlink:actuate="onLoad" draw:mime-type="image/jpeg"/></draw:frame></text:p>
          </table:table-cell>
          <table:table-cell table:style-name="Table5.B1" office:value-type="string">
            <text:p text:style-name="P10" loext:marker-style-name="T32"><text:span text:style-name="T32">Memory cards</text:span><text:span text:style-name="T32"/></text:p>
          </table:table-cell>
          <table:table-cell table:style-name="Table5.B1" office:value-type="string">
            <text:p text:style-name="P10" loext:marker-style-name="T7"><text:span text:style-name="T7">Copy the app installation file (APK) onto microSD memory cards. People insert the card into their phone’s memory card slot, find the APK file using a file explorer app and tap on the file to install it.</text:span><text:span text:style-name="T7"/></text:p>
          </table:table-cell>
        </table:table-row>
        <table:table-row table:style-name="Table5.1">
          <table:table-cell table:style-name="Table5.B1" office:value-type="string">
            <text:p text:style-name="Standard" loext:marker-style-name="T7"><draw:frame draw:style-name="fr2" draw:name="Picture 4" text:anchor-type="as-char" svg:width="1.1508in" svg:height="0.7264in"><draw:image xlink:href="Pictures/10000000000002D6000001F7BE403E48.jpg" xlink:type="simple" xlink:show="embed" xlink:actuate="onLoad" draw:mime-type="image/jpeg"/></draw:frame></text:p>
          </table:table-cell>
          <table:table-cell table:style-name="Table5.B1" office:value-type="string">
            <text:p text:style-name="Standard" loext:marker-style-name="T32"><text:span text:style-name="T32">Bluetooth </text:span><text:span text:style-name="T32"/></text:p>
          </table:table-cell>
          <table:table-cell table:style-name="Table5.B1" office:value-type="string">
            <text:p text:style-name="Standard" loext:marker-style-name="T7"><text:span text:style-name="T7">Use Bluetooth to transfer the app from your phone to another phone. Once people receive the app installation file (APK) they tap on it to install it.</text:span><text:span text:style-name="T7"/></text:p>
          </table:table-cell>
        </table:table-row>
        <table:table-row table:style-name="Table5.1">
          <table:table-cell table:style-name="Table5.B1" office:value-type="string">
            <text:p text:style-name="P2" loext:marker-style-name="T34"><draw:frame draw:style-name="fr2" draw:name="Picture 12" text:anchor-type="as-char" svg:width="0.7134in" svg:height="0.7283in"><draw:image xlink:href="Pictures/10000001000000E3000000E845863480.png" xlink:type="simple" xlink:show="embed" xlink:actuate="onLoad" draw:mime-type="image/png"/></draw:frame></text:p>
          </table:table-cell>
          <table:table-cell table:style-name="Table5.B1" office:value-type="string">
            <text:p text:style-name="Standard" loext:marker-style-name="T32"><text:span text:style-name="T32">Wi-Fi Transfer App</text:span><text:span text:style-name="T32"/></text:p>
          </table:table-cell>
          <table:table-cell table:style-name="Table5.B1" office:value-type="string">
            <text:p text:style-name="Standard" loext:marker-style-name="T7"><text:span text:style-name="T7">Transfer the app from phone to phone, like Bluetooth but much faster. Both sender and receiver phones need the same app installed, e.g. </text:span><text:a xlink:type="simple" xlink:href="https://play.google.com/store/apps/details?id=cn.xender&amp;hl=en&amp;gl=US" text:style-name="Internet_20_link" text:visited-style-name="Visited_20_Internet_20_Link"><text:span text:style-name="Internet_20_link"><text:span text:style-name="T7">Xender</text:span></text:span></text:a><text:span text:style-name="T7">, </text:span><text:a xlink:type="simple" xlink:href="http://shareit.lenovo.com/" text:style-name="Internet_20_link" text:visited-style-name="Visited_20_Internet_20_Link"><text:span text:style-name="Internet_20_link"><text:span text:style-name="T7">SHAREit</text:span></text:span></text:a><text:span text:style-name="T7"> or </text:span><text:a xlink:type="simple" xlink:href="https://play.google.com/store/apps/details?id=shareit.lite&amp;hl=en&amp;gl=US" text:style-name="Internet_20_link" text:visited-style-name="Visited_20_Internet_20_Link"><text:span text:style-name="Internet_20_link"><text:span text:style-name="T7">SHAREit Lite</text:span></text:span></text:a><text:span text:style-name="T7">.</text:span></text:p>
          </table:table-cell>
        </table:table-row>
        <table:table-row table:style-name="Table5.1">
          <table:table-cell table:style-name="Table5.B1" office:value-type="string">
            <text:p text:style-name="P30" loext:marker-style-name="T34"><draw:frame draw:style-name="fr4" draw:name="Picture 13" text:anchor-type="as-char" svg:width="0.7945in" svg:height="1.2173in"><draw:image xlink:href="Pictures/10000001000002BC000002BCBD18BEDC.png" xlink:type="simple" xlink:show="embed" xlink:actuate="onLoad" draw:mime-type="image/png"/><svg:desc>LIGHTSTREAM WIFI HOTSPOT | Renew Outreach</svg:desc></draw:frame></text:p>
          </table:table-cell>
          <table:table-cell table:style-name="Table5.B1" office:value-type="string">
            <text:p text:style-name="P31" loext:marker-style-name="T36"><text:span text:style-name="T36">Wi-Fi Media Box </text:span><text:span text:style-name="T37">(LightStream, ConnectBox, MicroPi, etc.)</text:span></text:p>
          </table:table-cell>
          <table:table-cell table:style-name="Table5.B1" office:value-type="string">
            <text:p text:style-name="Standard" loext:marker-style-name="T7"><text:span text:style-name="T7">Copy the app installation file (APK) into the memory of a Wi-Fi media box, such as the </text:span><text:a xlink:type="simple" xlink:href="https://renewoutreach.org/equipment/lightstream-wifi-hotspot/" text:style-name="Internet_20_link" text:visited-style-name="Visited_20_Internet_20_Link"><text:span text:style-name="Internet_20_link"><text:span text:style-name="T7">LightStream</text:span></text:span></text:a><text:span text:style-name="T7">, </text:span><text:a xlink:type="simple" xlink:href="https://connectbox.technology/wp/" text:style-name="Internet_20_link" text:visited-style-name="Visited_20_Internet_20_Link"><text:span text:style-name="Internet_20_link"><text:span text:style-name="T7">ConnectBox</text:span></text:span></text:a><text:span text:style-name="T7"> or </text:span><text:a xlink:type="simple" xlink:href="https://sites.google.com/sil.org/micropi" text:style-name="Internet_20_link" text:visited-style-name="Visited_20_Internet_20_Link"><text:span text:style-name="Internet_20_link"><text:span text:style-name="T7">MicroPi</text:span></text:span></text:a><text:span text:style-name="T7">. Users connect to the Wi-Fi device and choose the file to transfer to their phone. Once the file arrives, they tap on it to install it.</text:span></text:p>
          </table:table-cell>
        </table:table-row>
      </table:table>
      <text:p text:style-name="P4" loext:marker-style-name="T4"/>
      <text:p text:style-name="P4" loext:marker-style-name="T4"/>
      <text:h text:style-name="Heading_20_2" text:outline-level="2"><text:bookmark-start text:name="_Toc220666438"/>Distribution options for iOS apps<text:bookmark-end text:name="_Toc220666438"/></text:h>
      <text:p text:style-name="Standard" loext:marker-style-name="T4"><text:span text:style-name="T4">For iOS apps, your main option for app distribution is the Apple App Store. You cannot distribute iOS apps from phone to phone offline.</text:span><text:span text:style-name="T4"/></text:p>
      <text:p text:style-name="P4" loext:marker-style-name="T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 loext:marker-style-name="T7"><draw:frame draw:style-name="fr2" draw:name="Picture 20" text:anchor-type="as-char" svg:width="0.7571in" svg:height="0.7571in"><draw:image xlink:href="Pictures/1000000100000300000003000A4F1D58.png" xlink:type="simple" xlink:show="embed" xlink:actuate="onLoad" draw:mime-type="image/png"/></draw:frame></text:p>
          </table:table-cell>
          <table:table-cell table:style-name="Table6.B1" office:value-type="string">
            <text:p text:style-name="Standard" loext:marker-style-name="T32"><text:span text:style-name="T32">Apple App Store </text:span><text:span text:style-name="T32"/></text:p>
          </table:table-cell>
          <table:table-cell table:style-name="Table6.B1" office:value-type="string">
            <text:p text:style-name="Standard" loext:marker-style-name="T7"><text:span text:style-name="T7">Publish the app on the Apple App Store for people to find and download. This is where all iOS apps are distributed.</text:span><text:span text:style-name="T7"/></text:p>
          </table:table-cell>
        </table:table-row>
      </table:table>
      <text:p text:style-name="P4" loext:marker-style-name="T4"/>
      <text:p text:style-name="Standard" loext:marker-style-name="T4"><text:span text:style-name="T4">When you are testing your iOS app, it is possible to share it with a limited number of known devices using Apple Test Flight. For more details on how to do this, please see the documentation on </text:span><text:span text:style-name="T38">Installing and Building on a Mac</text:span><text:span text:style-name="T4">.</text:span></text:p>
      <text:h text:style-name="Heading_20_2" text:outline-level="2"><text:bookmark-start text:name="_Toc220666439"/>Advantages and disadvantages of each distribution method<text:bookmark-end text:name="_Toc220666439"/></text:h>
      <text:p text:style-name="P10" loext:marker-style-name="T4"><text:span text:style-name="T4">The following table lists some of the advantages and disadvantages of each distribution method.</text:span><text:span text:style-name="T4"/></text:p>
      <text:p text:style-name="P32" loext:marker-style-name="T4"/>
      <text:p text:style-name="P32" loext:marker-style-name="T4"/>
      <text:p text:style-name="P32" loext:marker-style-name="T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 loext:marker-style-name="T36"/>
          </table:table-cell>
          <table:table-cell table:style-name="Table7.A1" office:value-type="string">
            <text:p text:style-name="P34" loext:marker-style-name="T36"><text:span text:style-name="T36">Advantages</text:span><text:span text:style-name="T36"/></text:p>
          </table:table-cell>
          <table:table-cell table:style-name="Table7.A1" office:value-type="string">
            <text:p text:style-name="P34" loext:marker-style-name="T36"><text:span text:style-name="T36">Disadvantages</text:span><text:span text:style-name="T36"/></text:p>
          </table:table-cell>
        </table:table-row>
        <table:table-row table:style-name="Table7.1">
          <table:table-cell table:style-name="Table7.A2" office:value-type="string">
            <text:p text:style-name="P35" loext:marker-style-name="T36"><text:span text:style-name="T36">Google Play</text:span><text:span text:style-name="T36"/></text:p>
          </table:table-cell>
          <table:table-cell table:style-name="Table7.B2" office:value-type="string">
            <text:p text:style-name="P35" loext:marker-style-name="T4"><text:span text:style-name="T4">Users can find the app by searching on the Google Play store (pre-installed on most Android devices).</text:span><text:span text:style-name="T4"/></text:p>
            <text:p text:style-name="P35" loext:marker-style-name="T4"><text:span text:style-name="T4">If you update the app, users will receive updates automatically next time they have an internet connection.</text:span><text:span text:style-name="T4"/></text:p>
            <text:p text:style-name="P35" loext:marker-style-name="T4"><text:span text:style-name="T4">The Play Store provides worldwide access to your app and is the best way to ensure compatibility with each user’s phone.</text:span><text:span text:style-name="T4"/></text:p>
            <text:p text:style-name="P35" loext:marker-style-name="T4"><text:span text:style-name="T4">Provides automatic security services. No warning messages for non-standard installation.</text:span><text:span text:style-name="T4"/></text:p>
          </table:table-cell>
          <table:table-cell table:style-name="Table7.C2" office:value-type="string">
            <text:p text:style-name="P35" loext:marker-style-name="T4"><text:span text:style-name="T4">Requires an internet connection.</text:span><text:span text:style-name="T4"/></text:p>
            <text:p text:style-name="P35" loext:marker-style-name="T4"><text:span text:style-name="T4">If you are uploading the app to Google Play yourself, you need to create a developer account ($25 one-time fee) and learn the publishing process.</text:span><text:span text:style-name="T4"/></text:p>
            <text:p text:style-name="P35" loext:marker-style-name="T4"><text:span text:style-name="T4">The maximum Android App Bundle (AAB) size is 150 MB.</text:span><text:span text:style-name="T4"/></text:p>
            <text:p text:style-name="P35" loext:marker-style-name="T4"><text:span text:style-name="T4">Audio files will often need to be hosted online and so it will cost the user for each chapter of audio they choose to download or stream.</text:span><text:span text:style-name="T4"/></text:p>
            <text:p text:style-name="P36" loext:marker-style-name="T4"><text:span text:style-name="T4">When an app is installed from Google Play, it will be trimmed and repackaged for the user’s specific device. This means that if you want to share it offline with a friend it might not contain all that their device needs.</text:span><text:span text:style-name="T4"/></text:p>
            <text:p text:style-name="P36" loext:marker-style-name="T4"><text:span text:style-name="T4">At least yearly, Google will introduce new API updates that will require updating and reposting the app to the store.</text:span><text:span text:style-name="T4"/></text:p>
            <text:p text:style-name="P36" loext:marker-style-name="T4"><text:span text:style-name="T4">Google occasionally rejects apps without providing much recourse for resolving the issue.</text:span><text:span text:style-name="T4"/></text:p>
          </table:table-cell>
        </table:table-row>
        <table:table-row table:style-name="Table7.1">
          <table:table-cell table:style-name="Table7.A3" office:value-type="string">
            <text:p text:style-name="P35" loext:marker-style-name="T36"><text:span text:style-name="T36">Amazon Appstore</text:span><text:span text:style-name="T36"/></text:p>
          </table:table-cell>
          <table:table-cell table:style-name="Table7.B3" office:value-type="string">
            <text:p text:style-name="P35" loext:marker-style-name="T4"><text:span text:style-name="T4">Good for users who like Amazon’s ecosystem</text:span><text:span text:style-name="T4"/></text:p>
            <text:p text:style-name="P35" loext:marker-style-name="T4"><text:span text:style-name="T4">Works seamlessly on Fire tablets and Amazon’s devices </text:span><text:span text:style-name="T4"/></text:p>
          </table:table-cell>
          <table:table-cell table:style-name="Table7.C3" office:value-type="string">
            <text:p text:style-name="P35" loext:marker-style-name="T4"><text:span text:style-name="T4">Might be more challenging to publish as the process is more intentionally curated.</text:span><text:span text:style-name="T4"/></text:p>
            <text:p text:style-name="P35" loext:marker-style-name="T4"><text:span text:style-name="T4">Not widely known outside of specific Amazon devices.</text:span><text:span text:style-name="T4"/></text:p>
            <text:p text:style-name="P35" loext:marker-style-name="T4"><text:span text:style-name="T4">Apps may exhibit compatibility issues for certain Google services.</text:span><text:span text:style-name="T4"/></text:p>
          </table:table-cell>
        </table:table-row>
        <table:table-row table:style-name="Table7.1">
          <table:table-cell table:style-name="Table7.A4" office:value-type="string">
            <text:p text:style-name="P35" loext:marker-style-name="T36"><text:span text:style-name="T36">Website download</text:span><text:span text:style-name="T36"/></text:p>
          </table:table-cell>
          <table:table-cell table:style-name="Table7.B4" office:value-type="string">
            <text:p text:style-name="P35" loext:marker-style-name="T4"><text:span text:style-name="T4">No restriction on app file size: you can distribute hundreds of MB of audio files and images packaged inside the app. You are not limited to a maximum app size of 150 MB like you would if you published it on Google Play.</text:span><text:span text:style-name="T4"/></text:p>
            <text:p text:style-name="P35" loext:marker-style-name="T4"><text:span text:style-name="T4">Website can be designed to handle multiple languages including the local, target language </text:span><text:span text:style-name="T4"/></text:p>
            <text:p text:style-name="P35" loext:marker-style-name="T4"><text:span text:style-name="T4">Multiple apps / items can be linked to so users can easily find other resources in the target language</text:span><text:span text:style-name="T4"/></text:p>
          </table:table-cell>
          <table:table-cell table:style-name="Table7.C4" office:value-type="string">
            <text:p text:style-name="P35" loext:marker-style-name="T4"><text:span text:style-name="T4">Requires an internet connection.</text:span><text:span text:style-name="T4"/></text:p>
            <text:p text:style-name="P35" loext:marker-style-name="T4"><text:span text:style-name="T4">When you update the app on Google Play, users who downloaded the app from a website will not get automatic updates.</text:span><text:span text:style-name="T4"/></text:p>
            <text:p text:style-name="P35" loext:marker-style-name="T4"><text:span text:style-name="T4">It may be challenging for users to copy the APK to their phone, find it and install it.</text:span><text:span text:style-name="T4"/></text:p>
            <text:p text:style-name="P37" loext:marker-style-name="T4"/>
          </table:table-cell>
        </table:table-row>
        <table:table-row table:style-name="Table7.1">
          <table:table-cell table:style-name="Table7.A5" office:value-type="string">
            <text:p text:style-name="P35" loext:marker-style-name="T35"><text:span text:style-name="T35">Cloud Storage</text:span><text:span text:style-name="T35"/></text:p>
            <text:p text:style-name="P35" loext:marker-style-name="T35">(Dropbox, Google Drive, etc.)<text:span text:style-name="T35"/></text:p>
          </table:table-cell>
          <table:table-cell table:style-name="Table7.B5" office:value-type="string">
            <text:p text:style-name="P35" loext:marker-style-name="T4"><text:span text:style-name="T4">No restriction on app file size: you can distribute hundreds of MB of audio files and images packaged inside the app. You are not limited to a maximum app size of 150 MB like you would if you published it on Google Play.<text:line-break/></text:span><text:span text:style-name="T4"/></text:p>
          </table:table-cell>
          <table:table-cell table:style-name="Table7.C5" office:value-type="string">
            <text:p text:style-name="P35" loext:marker-style-name="T4"><text:span text:style-name="T4">Requires an internet connection.</text:span><text:span text:style-name="T4"/></text:p>
            <text:p text:style-name="P35" loext:marker-style-name="T4"><text:span text:style-name="T4">When you update the app, users who receive the app from the cloud will not get automatic updates.</text:span><text:span text:style-name="T4"/></text:p>
            <text:p text:style-name="P35" loext:marker-style-name="T4"><text:span text:style-name="T4">Having enough space to host a large number of resources may necessitate a yearly fee.</text:span><text:span text:style-name="T4"/></text:p>
            <text:p text:style-name="P35" loext:marker-style-name="T4"><text:span text:style-name="T4">It may be challenging for users to copy the APK to their phone, find it and install it.</text:span><text:span text:style-name="T4"/></text:p>
            <text:p text:style-name="P37" loext:marker-style-name="T4"/>
          </table:table-cell>
        </table:table-row>
        <table:table-row table:style-name="Table7.1">
          <table:table-cell table:style-name="Table7.A6" office:value-type="string">
            <text:p text:style-name="P35" loext:marker-style-name="T35"><text:span text:style-name="T36">Email</text:span><text:span text:style-name="T36"/></text:p>
          </table:table-cell>
          <table:table-cell table:style-name="Table7.B6" office:value-type="string">
            <text:p text:style-name="P35" loext:marker-style-name="T4"><text:span text:style-name="T4">Allows you to share new apps with specific people.</text:span><text:span text:style-name="T4"/></text:p>
            <text:p text:style-name="P37" loext:marker-style-name="T4"/>
          </table:table-cell>
          <table:table-cell table:style-name="Table7.C6" office:value-type="string">
            <text:p text:style-name="P35" loext:marker-style-name="T4"><text:span text:style-name="T4">Not recommended if your APK size is over 5 MB.</text:span><text:span text:style-name="T4"/></text:p>
            <text:p text:style-name="P35" loext:marker-style-name="T4"><text:span text:style-name="T4">Some email servers may reject this type of attachement.</text:span><text:span text:style-name="T4"/></text:p>
            <text:p text:style-name="P35" loext:marker-style-name="T4"><text:span text:style-name="T4">Requires an internet connection.</text:span><text:span text:style-name="T4"/></text:p>
            <text:p text:style-name="P35" loext:marker-style-name="T4"><text:span text:style-name="T4">Limited distribution to those you have in your address book.</text:span><text:span text:style-name="T4"/></text:p>
            <text:p text:style-name="P35" loext:marker-style-name="T4"><text:span text:style-name="T4">When you update the app on Google Play, users will not get automatic updates so you will need to email the latest version.</text:span><text:span text:style-name="T4"/></text:p>
            <text:p text:style-name="P37" loext:marker-style-name="T4"/>
          </table:table-cell>
        </table:table-row>
        <table:table-row table:style-name="Table7.1">
          <table:table-cell table:style-name="Table7.A7" office:value-type="string">
            <text:p text:style-name="P35" loext:marker-style-name="T35"><text:span text:style-name="T35">Social Media direct messaging</text:span><text:span text:style-name="T35"/></text:p>
          </table:table-cell>
          <table:table-cell table:style-name="Table7.B7" office:value-type="string">
            <text:p text:style-name="P35" loext:marker-style-name="T4"><text:span text:style-name="T4">Allows you to share new apps with specific people.</text:span><text:span text:style-name="T4"/></text:p>
            <text:p text:style-name="P35" loext:marker-style-name="T4"><text:span text:style-name="T4">Very easy for users to see and install the APK file</text:span><text:span text:style-name="T4"/></text:p>
            <text:p text:style-name="P35" loext:marker-style-name="T4"><text:span text:style-name="T4">Allows large APK files</text:span><text:span text:style-name="T4"/></text:p>
          </table:table-cell>
          <table:table-cell table:style-name="Table7.C7" office:value-type="string">
            <text:p text:style-name="P35" loext:marker-style-name="T4"><text:span text:style-name="T4">Requires an internet connection.</text:span><text:span text:style-name="T4"/></text:p>
            <text:p text:style-name="P35" loext:marker-style-name="T4"><text:span text:style-name="T4">When you update the app on Google Play, users will not get automatic updates so you will need to email the latest version.</text:span><text:span text:style-name="T4"/></text:p>
            <text:p text:style-name="P35" loext:marker-style-name="T4"><text:span text:style-name="T4">Limited distribution to those you have in your contact list</text:span><text:span text:style-name="T4"/></text:p>
            <text:p text:style-name="P37" loext:marker-style-name="T4"/>
          </table:table-cell>
        </table:table-row>
        <table:table-row table:style-name="Table7.1">
          <table:table-cell table:style-name="Table7.A8" office:value-type="string">
            <text:p text:style-name="P35" loext:marker-style-name="T36"><text:span text:style-name="T36">Memory cards</text:span><text:span text:style-name="T36"/></text:p>
            <text:p text:style-name="P35" loext:marker-style-name="T4"><text:span text:style-name="T4">(microSD)</text:span><text:span text:style-name="T4"/></text:p>
          </table:table-cell>
          <table:table-cell table:style-name="Table7.B8" office:value-type="string">
            <text:p text:style-name="P35" loext:marker-style-name="T4"><text:span text:style-name="T4">No internet connection needed.</text:span><text:span text:style-name="T4"/></text:p>
            <text:p text:style-name="P35" loext:marker-style-name="T4"><text:span text:style-name="T4">No restriction on app file size: you can distribute hundreds of MB of audio files packaged inside the app.</text:span><text:span text:style-name="T4"/></text:p>
            <text:p text:style-name="P37" loext:marker-style-name="T4"/>
          </table:table-cell>
          <table:table-cell table:style-name="Table7.C8" office:value-type="string">
            <text:p text:style-name="P35" loext:marker-style-name="T4"><text:span text:style-name="T4">Users have to remove their current memory card in order to insert the new one, then copy files from one memory card to the other.</text:span><text:span text:style-name="T4"/></text:p>
            <text:p text:style-name="P35" loext:marker-style-name="T4"><text:span text:style-name="T4">When you update the app on Google Play, users who installed from a memory card will not get automatic updates.</text:span><text:span text:style-name="T4"/></text:p>
            <text:p text:style-name="P35" loext:marker-style-name="T4"><text:span text:style-name="T4">You need a sales/distribution strategy to get the memory cards to people.</text:span><text:span text:style-name="T4"/></text:p>
            <text:p text:style-name="P35" loext:marker-style-name="T4"><text:span text:style-name="T4">People may need direct help in finding and installing the app APK from the card.</text:span><text:span text:style-name="T4"/></text:p>
            <text:p text:style-name="P37" loext:marker-style-name="T4"/>
          </table:table-cell>
        </table:table-row>
        <table:table-row table:style-name="Table7.1">
          <table:table-cell table:style-name="Table7.A9" office:value-type="string">
            <text:p text:style-name="P35" loext:marker-style-name="T36"><text:span text:style-name="T36">Bluetooth</text:span><text:span text:style-name="T36"/></text:p>
          </table:table-cell>
          <table:table-cell table:style-name="Table7.B9" office:value-type="string">
            <text:p text:style-name="P35" loext:marker-style-name="T4"><text:span text:style-name="T4">No internet connection needed.</text:span><text:span text:style-name="T4"/></text:p>
            <text:p text:style-name="P35" loext:marker-style-name="T4"><text:span text:style-name="T4">Allows friends to share the app with each other and encourages viral distribution.</text:span><text:span text:style-name="T4"/></text:p>
          </table:table-cell>
          <table:table-cell table:style-name="Table7.C9" office:value-type="string">
            <text:p text:style-name="P35" loext:marker-style-name="T4"><text:span text:style-name="T4">When you update the app on Google Play, users who installed by Bluetooth will not get automatic updates.</text:span><text:span text:style-name="T4"/></text:p>
            <text:p text:style-name="P35" loext:marker-style-name="T4"><text:span text:style-name="T4">A slow method if you have a lot of audio files to transfer.</text:span><text:span text:style-name="T4"/></text:p>
            <text:p text:style-name="P37" loext:marker-style-name="T4"/>
          </table:table-cell>
        </table:table-row>
        <table:table-row table:style-name="Table7.1">
          <table:table-cell table:style-name="Table7.A10" office:value-type="string">
            <text:p text:style-name="P35" loext:marker-style-name="T36"><text:span text:style-name="T36">Wi-Fi Transfer</text:span><text:span text:style-name="T36"/></text:p>
            <text:p text:style-name="P38" loext:marker-style-name="T4"><text:span text:style-name="T4">(e.g. with the Xender or SHAREit apps)</text:span><text:span text:style-name="T4"/></text:p>
          </table:table-cell>
          <table:table-cell table:style-name="Table7.B10" office:value-type="string">
            <text:p text:style-name="P35" loext:marker-style-name="T4"><text:span text:style-name="T4">No internet connection needed.</text:span><text:span text:style-name="T4"/></text:p>
            <text:p text:style-name="P35" loext:marker-style-name="T4"><text:span text:style-name="T4">Up to 40 times faster than Bluetooth.</text:span><text:span text:style-name="T4"/></text:p>
            <text:p text:style-name="P35" loext:marker-style-name="T4"><text:span text:style-name="T4">Allows friends to share the app with each other and encourages viral distribution.</text:span><text:span text:style-name="T4"/></text:p>
            <text:p text:style-name="P35" loext:marker-style-name="T4"><text:span text:style-name="T4">No restriction on app file size: you can distribute hundreds of MB of audio files and images packaged inside the app.</text:span><text:span text:style-name="T4"/></text:p>
            <text:p text:style-name="P37" loext:marker-style-name="T4"/>
          </table:table-cell>
          <table:table-cell table:style-name="Table7.C10" office:value-type="string">
            <text:p text:style-name="P35" loext:marker-style-name="T4"><text:span text:style-name="T4">Both phones need the Wi-Fi transfer app installed.</text:span><text:span text:style-name="T4"/></text:p>
            <text:p text:style-name="P35" loext:marker-style-name="T4"><text:span text:style-name="T4">When you update the app on Google Play, users who installed by Wi-Fi transfer will not get automatic updates.</text:span><text:span text:style-name="T4"/></text:p>
          </table:table-cell>
        </table:table-row>
        <table:table-row table:style-name="Table7.1">
          <table:table-cell table:style-name="Table7.A11" office:value-type="string">
            <text:p text:style-name="P35" loext:marker-style-name="T36"><text:span text:style-name="T36">Wi-Fi Media Box </text:span><text:span text:style-name="T37">(LightStream, ConnectBox, MicroPi, etc.)</text:span></text:p>
            <text:p text:style-name="P39" loext:marker-style-name="T36"/>
          </table:table-cell>
          <table:table-cell table:style-name="Table7.B11" office:value-type="string">
            <text:p text:style-name="P35" loext:marker-style-name="T4"><text:span text:style-name="T4">No internet connection needed.</text:span><text:span text:style-name="T4"/></text:p>
            <text:p text:style-name="P37" loext:marker-style-name="T4"/>
          </table:table-cell>
          <table:table-cell table:style-name="Table7.C11" office:value-type="string">
            <text:p text:style-name="P35" loext:marker-style-name="T4"><text:span text:style-name="T4">Requires specialist equipment, not always available locally.</text:span><text:span text:style-name="T4"/></text:p>
            <text:p text:style-name="P35" loext:marker-style-name="T4"><text:span text:style-name="T4">When you update the app on Google Play, users who downloaded the app from a Wi-Fi media box like Lightstream will not get automatic updates.</text:span><text:span text:style-name="T4"/></text:p>
            <text:p text:style-name="P37" loext:marker-style-name="T4"/>
          </table:table-cell>
        </table:table-row>
      </table:table>
      <text:p text:style-name="P4" loext:marker-style-name="T4"/>
      <text:p text:style-name="P4" loext:marker-style-name="T4"/>
      <text:h text:style-name="P40" text:outline-level="1" loext:marker-style-name="T4"><text:bookmark-start text:name="_Toc220666440"/><text:span text:style-name="T4">Publishing apps on Google Play (using the Play console)</text:span><text:bookmark-end text:name="_Toc220666440"/><text:span text:style-name="T4"/></text:h>
      <table:table table:name="Table8" table:style-name="Table8">
        <table:table-column table:style-name="Table8.A"/>
        <table:table-column table:style-name="Table8.B"/>
        <table:table-row table:style-name="Table8.1">
          <table:table-cell table:style-name="Table8.A1" office:value-type="string">
            <text:p text:style-name="P14" loext:marker-style-name="T14"><text:span text:style-name="T15"></text:span><text:span text:style-name="T14"> </text:span></text:p>
          </table:table-cell>
          <table:table-cell table:style-name="Table8.B1" office:value-type="string">
            <text:p text:style-name="P38" loext:marker-style-name="T3"><text:span text:style-name="T3">Publishing an app yourself through the Play Console is the most direct, hands-on method, but may also be more complicated. <text:s/></text:span><text:span text:style-name="T3"/></text:p>
            <text:p text:style-name="P14" loext:marker-style-name="T16"><text:span text:style-name="T16">You may find it easier and more efficient to use SIL’s </text:span><text:span text:style-name="T39">Scriptoria</text:span><text:span text:style-name="T16"> publishing service (</text:span><text:a xlink:type="simple" xlink:href="#_Publishing_Apps_on" text:style-name="Internet_20_link" text:visited-style-name="Visited_20_Internet_20_Link"><text:span text:style-name="Internet_20_link"><text:span text:style-name="T16">see the section below</text:span></text:span></text:a><text:span text:style-name="T16">). For more info on the different ways to publish to the Play Store, see </text:span><text:span text:style-name="T39">Publishing </text:span><text:span text:style-name="T40"></text:span><text:span text:style-name="T39"> App Store </text:span><text:span text:style-name="T40"></text:span><text:span text:style-name="T39"> App Publishing</text:span><text:span text:style-name="T16"> under your app’s project in SAB.</text:span></text:p>
            <text:p text:style-name="P41" loext:marker-style-name="T16"/>
            <text:p text:style-name="P14" loext:marker-style-name="T16"><text:span text:style-name="T16">Note also that Google often changes the exact steps for app publishing, so the steps below may not be up to date.</text:span><text:span text:style-name="T16"/></text:p>
            <text:p text:style-name="P42" loext:marker-style-name="T10"/>
          </table:table-cell>
        </table:table-row>
      </table:table>
      <text:p text:style-name="P4" loext:marker-style-name="T4"/>
      <text:p text:style-name="P4" loext:marker-style-name="T4"/>
      <text:p text:style-name="Standard" loext:marker-style-name="T4"><text:span text:style-name="T4">To publish an Android app on Google Play:</text:span><text:span text:style-name="T4"/></text:p>
      <text:p text:style-name="P4" loext:marker-style-name="T4"/>
      <text:list text:style-name="WWNum26">
        <text:list-item>
          <text:p text:style-name="P43" loext:marker-style-name="T4"><text:span text:style-name="T4">Select </text:span><text:span text:style-name="T41">Build</text:span><text:span text:style-name="T4"> </text:span><text:span text:style-name="T42"></text:span><text:span text:style-name="T4"> </text:span><text:span text:style-name="T41">Build Android App Bundle</text:span><text:span text:style-name="T4"> from the menu in Scripture App Builder to build an </text:span><text:span text:style-name="T41">Android App Bundle</text:span><text:span text:style-name="T4"> (an .aab file). </text:span></text:p>
        </text:list-item>
      </text:list>
      <text:p text:style-name="P44" loext:marker-style-name="T4"><text:span text:style-name="T4">This is a different format from the APK file that you use for offline distribution.</text:span><text:span text:style-name="T4"/></text:p>
      <text:p text:style-name="P44" loext:marker-style-name="T4"><text:span text:style-name="T4">To publish your app on Google Play, the AAB file size must be no more than 150 MB.</text:span><text:span text:style-name="T4"/></text:p>
      <text:p text:style-name="P45" loext:marker-style-name="T4"/>
      <text:list text:continue-numbering="true" text:style-name="WWNum26">
        <text:list-item>
          <text:p text:style-name="P43" loext:marker-style-name="T4"><text:span text:style-name="T4">Go to the </text:span><text:span text:style-name="T36">Google Play Console</text:span><text:span text:style-name="T4">:</text:span></text:p>
        </text:list-item>
      </text:list>
      <text:p text:style-name="P46" loext:marker-style-name="T4"><text:a xlink:type="simple" xlink:href="https://play.google.com/apps/publish" text:style-name="Internet_20_link" text:visited-style-name="Visited_20_Internet_20_Link"><text:span text:style-name="Internet_20_link"><text:span text:style-name="T4">https://play.google.com/apps/publish</text:span></text:span></text:a><text:span text:style-name="T4"/></text:p>
      <text:p text:style-name="P4" loext:marker-style-name="T4"/>
      <text:list text:continue-numbering="true" text:style-name="WWNum26">
        <text:list-item>
          <text:p text:style-name="P43" loext:marker-style-name="T4"><text:span text:style-name="T4">Create a new account or login with an existing Google account. </text:span><text:span text:style-name="T4"/></text:p>
        </text:list-item>
      </text:list>
      <text:p text:style-name="P47" loext:marker-style-name="T4"><text:span text:style-name="T4">If this is the first time you do this, there is a one-time fee of USD $25 to create a Google Play developer account.</text:span><text:span text:style-name="T4"/></text:p>
      <text:p text:style-name="P48" loext:marker-style-name="T4"><text:span text:style-name="T4">Note: If you are publishing an app on behalf of an organisation rather than you personally, we strongly recommend you create a new Google account for this purpose rather than using your personal Gmail account.</text:span><text:span text:style-name="T4"/></text:p>
      <text:p text:style-name="P4" loext:marker-style-name="T4"/>
      <text:list text:continue-numbering="true" text:style-name="WWNum26">
        <text:list-item>
          <text:p text:style-name="P43" loext:marker-style-name="T4"><text:span text:style-name="T4">Click the </text:span><text:span text:style-name="T36">Create app</text:span><text:span text:style-name="T37"> button at the top right of the screen</text:span><text:span text:style-name="T4">.</text:span></text:p>
        </text:list-item>
      </text:list>
      <text:p text:style-name="P4" loext:marker-style-name="T4"/>
      <text:list text:continue-numbering="true" text:style-name="WWNum26">
        <text:list-item>
          <text:p text:style-name="P43" loext:marker-style-name="T4"><text:span text:style-name="T4">Enter the </text:span><text:span text:style-name="T41">App name</text:span><text:span text:style-name="T4"> (which should be your app’s project name) and the </text:span><text:span text:style-name="T41">default language</text:span><text:span text:style-name="T4">. Specify </text:span><text:span text:style-name="T41">App</text:span><text:span text:style-name="T4"> (rather than Game) and Free (rather than </text:span><text:span text:style-name="T41">Paid</text:span><text:span text:style-name="T4">).</text:span></text:p>
        </text:list-item>
      </text:list>
      <text:p text:style-name="P4" loext:marker-style-name="T4"/>
      <text:p text:style-name="P2" loext:marker-style-name="T4"><draw:frame draw:style-name="fr2" draw:name="Picture 1" text:anchor-type="as-char" svg:width="5.9846in" svg:height="3.9035in"><draw:image xlink:href="Pictures/100000010000040E000002A5F36C9AFF.png" xlink:type="simple" xlink:show="embed" xlink:actuate="onLoad" draw:mime-type="image/png"/><svg:desc>Graphical user interface, text, application, email

Description automatically generated</svg:desc></draw:frame></text:p>
      <text:p text:style-name="P4" loext:marker-style-name="T4"/>
      <text:list text:continue-numbering="true" text:style-name="WWNum26">
        <text:list-item>
          <text:p text:style-name="P43" loext:marker-style-name="T4"><text:span text:style-name="T4">Read and check the declarations to confirm that the app meets the terms and conditions.</text:span><text:span text:style-name="T4"/></text:p>
        </text:list-item>
      </text:list>
      <text:p text:style-name="P45" loext:marker-style-name="T4"/>
      <text:list text:continue-numbering="true" text:style-name="WWNum26">
        <text:list-item>
          <text:p text:style-name="P43" loext:marker-style-name="T4"><text:span text:style-name="T4">Click to accept </text:span><text:span text:style-name="T36">US export laws</text:span><text:span text:style-name="T4">.</text:span></text:p>
        </text:list-item>
      </text:list>
      <text:p text:style-name="P49" loext:marker-style-name="T4"/>
      <text:list text:continue-numbering="true" text:style-name="WWNum26">
        <text:list-item>
          <text:p text:style-name="P43" loext:marker-style-name="T4"><text:span text:style-name="T4">Select </text:span><text:span text:style-name="T36">Monitor and Improve &gt; Policy and Programs &gt; App content</text:span><text:span text:style-name="T4">. Under </text:span><text:span text:style-name="T36">Privacy policy</text:span><text:span text:style-name="T4">, click </text:span><text:span text:style-name="T36">Start Declaration</text:span><text:span text:style-name="T4"> and provide the URL to your app’s privacy policy. Click </text:span><text:span text:style-name="T36">Save</text:span><text:span text:style-name="T4">.</text:span></text:p>
        </text:list-item>
      </text:list>
      <text:p text:style-name="P49" loext:marker-style-name="T4"/>
      <text:list text:continue-numbering="true" text:style-name="WWNum26">
        <text:list-item>
          <text:p text:style-name="P43" loext:marker-style-name="T4"><text:span text:style-name="T4">Select </text:span><text:span text:style-name="T36">Monitor and Improve &gt; Policy and Programs &gt; App content</text:span><text:span text:style-name="T4">. Under </text:span><text:span text:style-name="T36">Ads</text:span><text:span text:style-name="T4">, click </text:span><text:span text:style-name="T36">Start Declaration</text:span><text:span text:style-name="T4">. Click </text:span><text:span text:style-name="T36">No</text:span><text:span text:style-name="T4">, then </text:span><text:span text:style-name="T36">Save</text:span><text:span text:style-name="T4">.</text:span></text:p>
        </text:list-item>
      </text:list>
      <text:p text:style-name="P49" loext:marker-style-name="T4"/>
      <text:list text:continue-numbering="true" text:style-name="WWNum26">
        <text:list-item>
          <text:p text:style-name="P43" loext:marker-style-name="T4"><text:span text:style-name="T4">Select </text:span><text:span text:style-name="T36">Monitor and Improve &gt; Policy and Programs &gt; App content</text:span><text:span text:style-name="T4">. Under </text:span><text:span text:style-name="T36">App</text:span><text:span text:style-name="T4"> </text:span><text:span text:style-name="T36">access</text:span><text:span text:style-name="T4">, click </text:span><text:span text:style-name="T36">Start Declaration</text:span><text:span text:style-name="T4">. Select the appropriate radio button based on your app features. Click </text:span><text:span text:style-name="T36">Save</text:span><text:span text:style-name="T4">.</text:span></text:p>
        </text:list-item>
      </text:list>
      <text:p text:style-name="P49" loext:marker-style-name="T4"/>
      <text:list text:continue-numbering="true" text:style-name="WWNum26">
        <text:list-item>
          <text:p text:style-name="P43" loext:marker-style-name="T4"><text:span text:style-name="T36">Select Monitor and Improve &gt; Policy and Programs &gt; App content</text:span><text:span text:style-name="T4">. Select </text:span><text:span text:style-name="T36">Content Ratings</text:span><text:span text:style-name="T4"> and </text:span><text:span text:style-name="T36">Start Declaration</text:span><text:span text:style-name="T4">. Select the appropriate ratings and click </text:span><text:span text:style-name="T36">Save</text:span><text:span text:style-name="T4">.<text:line-break/></text:span></text:p>
        </text:list-item>
        <text:list-item>
          <text:p text:style-name="P43" loext:marker-style-name="T4"><text:span text:style-name="T4">Click </text:span><text:span text:style-name="T41">Create app</text:span><text:span text:style-name="T4"> at the bottom of the page.</text:span></text:p>
        </text:list-item>
      </text:list>
      <text:p text:style-name="P4" loext:marker-style-name="T4"/>
      <text:list xml:id="list131421210022797" text:continue-numbering="true" text:style-name="WWNum26">
        <text:list-item>
          <text:p text:style-name="P43" loext:marker-style-name="T4"><text:span text:style-name="T4">Select </text:span><text:span text:style-name="T41">Grow</text:span><text:span text:style-name="T4"> </text:span><text:span text:style-name="T42"></text:span><text:span text:style-name="T4"> </text:span><text:span text:style-name="T41">Store presence</text:span><text:span text:style-name="T4"> </text:span><text:span text:style-name="T42"></text:span><text:span text:style-name="T4"> </text:span><text:span text:style-name="T41">Main store listing</text:span><text:span text:style-name="T4"> from the menu on the left of the screen, and enter the following details:</text:span></text:p>
        </text:list-item>
      </text:list>
      <text:p text:style-name="P49" loext:marker-style-name="T4"/>
      <text:p text:style-name="P50" loext:marker-style-name="T41"><text:span text:style-name="T41">App Details</text:span><text:span text:style-name="T41"/></text:p>
      <text:list text:style-name="WWNum25">
        <text:list-item>
          <text:p text:style-name="P51" loext:marker-style-name="T4"><text:span text:style-name="T36">Short description</text:span><text:span text:style-name="T4"> of the app (up to 80 characters)</text:span></text:p>
        </text:list-item>
        <text:list-item>
          <text:p text:style-name="P52" loext:marker-style-name="T4"><text:span text:style-name="T36">Full description</text:span><text:span text:style-name="T4"> of the app (up to 4,000 characters)</text:span></text:p>
          <text:list>
            <text:list-item>
              <text:p text:style-name="P53" loext:marker-style-name="T4"><text:span text:style-name="T4">These descriptions should describe the app clearly to the target audience in the most appropriate language(s). Mention the country and alternative language names to increase the chance of users finding the app when they search on Google Play. </text:span><text:span text:style-name="T4"/></text:p>
            </text:list-item>
          </text:list>
        </text:list-item>
      </text:list>
      <text:p text:style-name="P54" loext:marker-style-name="T4"><text:span text:style-name="T4">Google encourages you to “highlight what's great about your app. Share interesting and exciting facts about your app to help users understand what makes your app special.” </text:span><text:span text:style-name="T4"/></text:p>
      <text:p text:style-name="P54" loext:marker-style-name="T4"><text:span text:style-name="T4">You must not include user testimonials, excessive details or long lists of keywords. See </text:span><text:a xlink:type="simple" xlink:href="https://play.google.com/about/storelisting-promotional/metadata/" text:style-name="Internet_20_link" text:visited-style-name="Visited_20_Internet_20_Link"><text:span text:style-name="Internet_20_link"><text:span text:style-name="T4">https://play.google.com/about/storelisting-promotional/metadata/</text:span></text:span></text:a><text:span text:style-name="T4"> for more details.</text:span></text:p>
      <text:p text:style-name="P55" loext:marker-style-name="T4"/>
      <text:p text:style-name="P50" loext:marker-style-name="T41"><text:span text:style-name="T41">Graphics</text:span><text:span text:style-name="T41"/></text:p>
      <text:list xml:id="list131422730623075" text:continue-numbering="true" text:style-name="WWNum25">
        <text:list-item>
          <text:p text:style-name="P56" loext:marker-style-name="T4"><text:span text:style-name="T36">App icon</text:span><text:span text:style-name="T4"> (512 by 512 pixels)</text:span></text:p>
          <text:list>
            <text:list-item>
              <text:p text:style-name="P53" loext:marker-style-name="T4"><text:span text:style-name="T4">This should be the same as the app icon but a higher resolution 512 x 512 version. Ensure it is clear and not blurred, i.e. it might not work well to take a 144 x 144 icon and stretch it to 512 x 512.</text:span><text:span text:style-name="T4"/></text:p>
            </text:list-item>
          </text:list>
        </text:list-item>
        <text:list-item>
          <text:p text:style-name="P56" loext:marker-style-name="T4"><text:span text:style-name="T36">Feature graphic</text:span><text:span text:style-name="T4"> (1024 by 500 pixels)</text:span></text:p>
          <text:list>
            <text:list-item>
              <text:p text:style-name="P53" loext:marker-style-name="T4"><text:span text:style-name="T4">The feature graphic is displayed at the top of your store listing page in the Play Store app. Do not include any copy or important visual information near the borders of the image - specifically near the bottom third of the frame. Try to center align any logo or information in the vertical and horizontal center of the frame.</text:span><text:span text:style-name="T4"/></text:p>
            </text:list-item>
          </text:list>
        </text:list-item>
        <text:list-item>
          <text:p text:style-name="P51" loext:marker-style-name="T4"><text:span text:style-name="T36">Phone Screenshots</text:span><text:span text:style-name="T36"/></text:p>
          <text:list>
            <text:list-item>
              <text:p text:style-name="P53" loext:marker-style-name="T4"><text:span text:style-name="T4">Take screen captures from your phone when running the app. The way to do this differs from phone to phone: try pressing the </text:span><text:span text:style-name="T36">Power</text:span><text:span text:style-name="T4"> and </text:span><text:span text:style-name="T36">Volume down</text:span><text:span text:style-name="T4"> buttons simultaneously or the </text:span><text:span text:style-name="T36">Home</text:span><text:span text:style-name="T4"> and </text:span><text:span text:style-name="T36">Volume down</text:span><text:span text:style-name="T4"> buttons simultaneously. Find the screen capture images in your phone’s Pictures folder.</text:span></text:p>
            </text:list-item>
          </text:list>
        </text:list-item>
      </text:list>
      <text:p text:style-name="P57" loext:marker-style-name="T4"><text:span text:style-name="T4">You need to specify at least 2 screenshots of the app running on a smartphone. You can add up to 8 screenshots for each device type: phone, 7-inch tablet and 10-inch tablet.</text:span><text:span text:style-name="T4"/></text:p>
      <text:p text:style-name="P58" loext:marker-style-name="T4"/>
      <text:p text:style-name="P59" loext:marker-style-name="T4"><text:span text:style-name="T4">Click </text:span><text:span text:style-name="T41">Save</text:span><text:span text:style-name="T4"> at the bottom of the screen when you have finished.</text:span></text:p>
      <text:p text:style-name="P31" loext:marker-style-name="T4"><text:span text:style-name="T4"><text:line-break/></text:span><text:span text:style-name="T4"/></text:p>
      <text:list xml:id="list131422074426160" text:continue-list="list131421210022797" text:style-name="WWNum26">
        <text:list-item>
          <text:p text:style-name="P43" loext:marker-style-name="T4"><text:span text:style-name="T4">Select </text:span><text:span text:style-name="T41">Store presence</text:span><text:span text:style-name="T4"> </text:span><text:span text:style-name="T42"></text:span><text:span text:style-name="T4"> </text:span><text:span text:style-name="T41">Store settings</text:span><text:span text:style-name="T4"> from the menu on the left of the screen, and enter the following details:</text:span></text:p>
        </text:list-item>
      </text:list>
      <text:list text:continue-list="list131422730623075" text:style-name="WWNum25">
        <text:list-item>
          <text:p text:style-name="P51" loext:marker-style-name="T4"><text:span text:style-name="T41">App Category</text:span><text:span text:style-name="T4">:</text:span></text:p>
          <text:list>
            <text:list-item>
              <text:p text:style-name="P60" loext:marker-style-name="T4"><text:span text:style-name="T4">Example: Books &amp; reference.</text:span><text:span text:style-name="T4"/></text:p>
            </text:list-item>
          </text:list>
        </text:list-item>
        <text:list-item>
          <text:p text:style-name="P51" loext:marker-style-name="T4"><text:span text:style-name="T41">Store Listing contact details</text:span><text:span text:style-name="T4">:</text:span></text:p>
          <text:list>
            <text:list-item>
              <text:p text:style-name="P60" loext:marker-style-name="T4"><text:span text:style-name="T4">Email address (a contact email address, publicly displayed with your app)</text:span><text:span text:style-name="T4"/></text:p>
              <text:list>
                <text:list-item>
                  <text:p text:style-name="P61" loext:marker-style-name="T4"><text:span text:style-name="T4">Avoid using a personal email address, such as john.smith@gmail.com, or a work email account that is unrelated to the publishing of your apps. It might be best to create a new email address for this purpose.</text:span><text:span text:style-name="T4"/></text:p>
                </text:list-item>
              </text:list>
            </text:list-item>
            <text:list-item>
              <text:p text:style-name="P62" loext:marker-style-name="T4"><text:span text:style-name="T4">Phone number (optional)</text:span><text:span text:style-name="T4"/></text:p>
            </text:list-item>
            <text:list-item>
              <text:p text:style-name="P60" loext:marker-style-name="T4"><text:span text:style-name="T4">Website (optional)</text:span><text:span text:style-name="T4"/></text:p>
            </text:list-item>
          </text:list>
        </text:list-item>
      </text:list>
      <text:p text:style-name="P4" loext:marker-style-name="T4"/>
      <text:p text:style-name="P59" loext:marker-style-name="T4"><text:span text:style-name="T4">Click </text:span><text:span text:style-name="T41">Save</text:span><text:span text:style-name="T4"> at the bottom of the screen when you have finished.</text:span></text:p>
      <text:p text:style-name="P4" loext:marker-style-name="T4"/>
      <text:list text:continue-list="list131422074426160" text:style-name="WWNum26">
        <text:list-item>
          <text:p text:style-name="P43" loext:marker-style-name="T4"><text:span text:style-name="T4">Select </text:span><text:span text:style-name="T41">Release</text:span><text:span text:style-name="T4"> </text:span><text:span text:style-name="T42"></text:span><text:span text:style-name="T4"> </text:span><text:span text:style-name="T41">Production</text:span><text:span text:style-name="T4"> from the menu on the left of the screen, and click the button </text:span><text:span text:style-name="T41">Create new release</text:span><text:span text:style-name="T4"> at the top right of the screen.</text:span></text:p>
        </text:list-item>
      </text:list>
      <text:p text:style-name="P4" loext:marker-style-name="T4"/>
      <text:list xml:id="list131421284906947" text:continue-numbering="true" text:style-name="WWNum26">
        <text:list-item>
          <text:p text:style-name="P43" loext:marker-style-name="T4"><text:span text:style-name="T4">In the </text:span><text:span text:style-name="T41">App Bundles</text:span><text:span text:style-name="T4"> section of the screen, upload the Android App Bundle (.aab) file for your app and give release a </text:span><text:span text:style-name="T41">Release name</text:span><text:span text:style-name="T4"> in the field below.</text:span></text:p>
        </text:list-item>
      </text:list>
      <text:p text:style-name="P49" loext:marker-style-name="T4"/>
      <text:p text:style-name="P59" loext:marker-style-name="T4"><text:span text:style-name="T4">If there is a problem with the AAB file you upload, you will see a message in </text:span><text:span text:style-name="T43">red</text:span><text:span text:style-name="T4">. Possible error messages include:</text:span></text:p>
      <text:list text:style-name="WWNum33">
        <text:list-item>
          <text:p text:style-name="P63" loext:marker-style-name="T4"><text:span text:style-name="T38">“For new apps, Android App Bundles must be signed with an RSA key.”</text:span><text:span text:style-name="T4"> – this means that the app has been signed with an old keystore which is now deprecated because it is insecure. You need to create a new keystore with the </text:span><text:span text:style-name="T41">Tools</text:span><text:span text:style-name="T4"> </text:span><text:span text:style-name="T42"></text:span><text:span text:style-name="T4"> </text:span><text:span text:style-name="T41">Create New Keystore</text:span><text:span text:style-name="T4"> wizard and change the keystore on the </text:span><text:span text:style-name="T41">App</text:span><text:span text:style-name="T4"> </text:span><text:span text:style-name="T42"></text:span><text:span text:style-name="T4"> </text:span><text:span text:style-name="T41">App Signing</text:span><text:span text:style-name="T4"> tab.</text:span></text:p>
        </text:list-item>
        <text:list-item>
          <text:p text:style-name="P64" loext:marker-style-name="T4"><text:span text:style-name="T38">“Your Android App Bundle is signed with the wrong key. Ensure that your App Bundle is signed with the correct signing key and try again.” –</text:span><text:span text:style-name="T4"> this means that you have previously used a different signing key to upload your app.</text:span></text:p>
        </text:list-item>
        <text:list-item>
          <text:p text:style-name="P64" loext:marker-style-name="T38"><text:span text:style-name="T38">“You need to use a different package name because 'com.example' is restricted.” </text:span><text:span text:style-name="T4">– this means that you need to change the package name of your app on the </text:span><text:span text:style-name="T41">App</text:span><text:span text:style-name="T4"> </text:span><text:span text:style-name="T42"></text:span><text:span text:style-name="T4"> </text:span><text:span text:style-name="T41">Package</text:span><text:span text:style-name="T4"> tab.</text:span></text:p>
        </text:list-item>
      </text:list>
      <text:p text:style-name="P65" loext:marker-style-name="T4"/>
      <text:list text:continue-list="list131421284906947" text:style-name="WWNum26">
        <text:list-item>
          <text:p text:style-name="P43" loext:marker-style-name="T4"><text:span text:style-name="T4">Click the </text:span><text:span text:style-name="T41">Save </text:span><text:span text:style-name="T4">button and then </text:span><text:span text:style-name="T41">Review release</text:span><text:span text:style-name="T4"> button at the bottom right of the screen.</text:span></text:p>
        </text:list-item>
      </text:list>
      <text:p text:style-name="P44" loext:marker-style-name="T4"><text:span text:style-name="T4">If there are still steps to take before rolling out your app, you will see these listed under </text:span><text:span text:style-name="T41">Errors, warnings and messages</text:span><text:span text:style-name="T4">. Go to the </text:span><text:span text:style-name="T41">Dashboard</text:span><text:span text:style-name="T4"> (at the top of the menu on the left of the screen) for links to take you to where you need to fill out any missing information.</text:span></text:p>
      <text:p text:style-name="P66" loext:marker-style-name="T4"/>
      <text:list text:continue-numbering="true" text:style-name="WWNum26">
        <text:list-item>
          <text:p text:style-name="P43" loext:marker-style-name="T4"><text:span text:style-name="T4">After you have finished providing any missing information, click the </text:span><text:span text:style-name="T41">Start roll-out to Production</text:span><text:span text:style-name="T4"> button at the bottom right of the screen. You will be given further information about the publication of your app.</text:span></text:p>
        </text:list-item>
      </text:list>
      <text:p text:style-name="P4" loext:marker-style-name="T4"/>
      <text:p text:style-name="P67" loext:marker-style-name="T4"/>
      <table:table table:name="Table9" table:style-name="Table9">
        <table:table-column table:style-name="Table9.A"/>
        <table:table-column table:style-name="Table9.B"/>
        <table:table-row table:style-name="Table9.1">
          <table:table-cell table:style-name="Table9.A1" office:value-type="string">
            <text:p text:style-name="P14" loext:marker-style-name="T19"><text:span text:style-name="T20"></text:span><text:span text:style-name="T19"> </text:span></text:p>
          </table:table-cell>
          <table:table-cell table:style-name="Table9.B1" office:value-type="string">
            <text:p text:style-name="P38"><text:span text:style-name="T4">To increase the visibility of your app on the app store, we recommend that you familiarize yourself with the principles of </text:span><text:span text:style-name="T41">App Store Optimization (ASO)</text:span><text:span text:style-name="T4">. For more details, please see document #10 </text:span><text:span text:style-name="T38">‘App Store Optimization’</text:span><text:span text:style-name="T4">.</text:span></text:p>
          </table:table-cell>
        </table:table-row>
      </table:table>
      <text:p text:style-name="P59"/>
      <text:h text:style-name="Heading_20_1" text:outline-level="1" loext:marker-style-name="T4"><text:bookmark text:name="_Publishing_Apps_on"/><text:bookmark-start text:name="_Toc220666441"/><text:span text:style-name="T4">Publishing Apps on the Google Play Store (using Scriptoria)</text:span><text:bookmark-end text:name="_Toc220666441"/><text:span text:style-name="T4"/></text:h>
      <table:table table:name="Table10" table:style-name="Table10">
        <table:table-column table:style-name="Table10.A"/>
        <table:table-column table:style-name="Table10.B"/>
        <table:table-row table:style-name="Table10.1">
          <table:table-cell table:style-name="Table10.A1" office:value-type="string">
            <text:p text:style-name="P14" loext:marker-style-name="T14"><text:span text:style-name="T15"></text:span><text:span text:style-name="T14"> </text:span></text:p>
          </table:table-cell>
          <table:table-cell table:style-name="Table10.B1" office:value-type="string">
            <text:p text:style-name="P14" loext:marker-style-name="T16"><text:span text:style-name="T16">You may find it easier and more efficient to use SIL’s </text:span><text:span text:style-name="T39">Scriptoria</text:span><text:span text:style-name="T16"> publishing service.</text:span></text:p>
            <text:p text:style-name="P14" loext:marker-style-name="T16"><text:span text:style-name="T16">Note also that Google often changes the exact steps for app publishing, so the steps specified in Scriptoria may not be exactly up to date.</text:span><text:span text:style-name="T16"/></text:p>
            <text:p text:style-name="P42" loext:marker-style-name="T10"/>
          </table:table-cell>
        </table:table-row>
      </table:table>
      <text:p text:style-name="P4" loext:marker-style-name="T4"/>
      <text:p text:style-name="Standard" loext:marker-style-name="T10"><text:span text:style-name="T4">Go to </text:span><text:span text:style-name="T39">Publishing </text:span><text:span text:style-name="T40"></text:span><text:span text:style-name="T39"> App Store </text:span><text:span text:style-name="T40"></text:span><text:span text:style-name="T39"> App Publishing</text:span><text:span text:style-name="T16"> </text:span><text:span text:style-name="T10">under your app project in SAB. If you do not yet have access to Scriptoria, </text:span><text:a xlink:type="simple" xlink:href="https://app.scriptoria.io/request-access-for-organization" text:style-name="Internet_20_link" text:visited-style-name="Visited_20_Internet_20_Link"><text:span text:style-name="Internet_20_link"><text:span text:style-name="T10">click the link requesting access</text:span></text:span></text:a><text:span text:style-name="T10">.</text:span></text:p>
      <text:p text:style-name="P68" loext:marker-style-name="T10"/>
      <text:p text:style-name="Standard" loext:marker-style-name="T10"><text:span text:style-name="T10">Under </text:span><text:span text:style-name="T44">App Publishing Service</text:span><text:span text:style-name="T10">, choose </text:span><text:span text:style-name="T44">We would like to use Scriptoria</text:span><text:span text:style-name="T10">. This will cause four more tabs to appear to the right of the App Publishing tab.</text:span></text:p>
      <text:p text:style-name="P68" loext:marker-style-name="T10"/>
      <text:h text:style-name="Heading_20_2" text:outline-level="2"><text:bookmark-start text:name="_Toc220666442"/>The <text:span text:style-name="T45">Scriptoria</text:span> tab<text:bookmark-end text:name="_Toc220666442"/></text:h>
      <text:p text:style-name="P68" loext:marker-style-name="T10"/>
      <text:p text:style-name="Standard" loext:marker-style-name="T44"><text:span text:style-name="T10">Once you have received confirmation that you have access to Scriptoria, select the </text:span><text:span text:style-name="T44">Scriptoria</text:span><text:span text:style-name="T10"> tab. Under </text:span><text:span text:style-name="T44">Request Scriptoria</text:span><text:span text:style-name="T10">, click on </text:span><text:span text:style-name="T44">Go to Scriptoria Website…</text:span></text:p>
      <text:p text:style-name="P69" loext:marker-style-name="T44"/>
      <text:p text:style-name="Standard" loext:marker-style-name="T44"><text:span text:style-name="T10">Once at the Scriptoria website, click </text:span><text:span text:style-name="T44">My Projects</text:span><text:span text:style-name="T10"> and make sure your organization is selected at the top left of the screen. <text:s/>Click </text:span><text:span text:style-name="T44">Add Project</text:span><text:span text:style-name="T10"> towards to the top right. Follow the instructions for naming the project. <text:s/>Add the language code and a description. You will need to select which of your organization’s publishing page (</text:span><text:span text:style-name="T44">Project Group</text:span><text:span text:style-name="T10">) you want to publish to. Click </text:span><text:span text:style-name="T44">Save</text:span><text:span text:style-name="T10">. This will open a project page for your project. It will take a few seconds for the Repository Location to get filled in. Once it is, you will be able to add a </text:span><text:span text:style-name="T39">Product. </text:span><text:span text:style-name="T44"><text:s/></text:span><text:span text:style-name="T10">Normally, you will select an</text:span><text:span text:style-name="T44"> Android app for Google Play.</text:span></text:p>
      <text:p text:style-name="P68" loext:marker-style-name="T10"/>
      <table:table table:name="Table11" table:style-name="Table11">
        <table:table-column table:style-name="Table11.A"/>
        <table:table-column table:style-name="Table11.B"/>
        <table:table-row table:style-name="Table11.1">
          <table:table-cell table:style-name="Table11.A1" office:value-type="string">
            <text:p text:style-name="P14" loext:marker-style-name="T19"><text:span text:style-name="T20"></text:span><text:span text:style-name="T19"> </text:span></text:p>
          </table:table-cell>
          <table:table-cell table:style-name="Table11.B1" office:value-type="string">
            <text:p text:style-name="P14" loext:marker-style-name="T16"><text:span text:style-name="T16">On the Scriptoria webpage, click your profile icon in the top right corner of the page and choose </text:span><text:span text:style-name="T39">Help</text:span><text:span text:style-name="T16">. This will give you step-by-step help on adding and deleting products.</text:span></text:p>
          </table:table-cell>
        </table:table-row>
      </table:table>
      <text:p text:style-name="P68" loext:marker-style-name="T10"/>
      <text:p text:style-name="Standard" loext:marker-style-name="T10"><text:span text:style-name="T10">Copy the project URL and paste it into the field back in SAB under </text:span><text:span text:style-name="T44">Enter App Project URL</text:span><text:span text:style-name="T10">.</text:span></text:p>
      <text:p text:style-name="P68" loext:marker-style-name="T10"/>
      <text:p text:style-name="Standard" loext:marker-style-name="T10"><text:span text:style-name="T10">Under</text:span><text:span text:style-name="T44"> Send App Data, </text:span><text:span text:style-name="T10">you can upload your project data to Scriptoria by clicking the </text:span><text:span text:style-name="T44">Upload</text:span><text:span text:style-name="T10"> button. <text:s/>Note that you may have to log in again using the </text:span><text:span text:style-name="T44">Login</text:span><text:span text:style-name="T10"> button.</text:span></text:p>
      <text:p text:style-name="P68" loext:marker-style-name="T10"/>
      <text:p text:style-name="Standard" loext:marker-style-name="T44"><text:span text:style-name="T10">If you have filled in all the Play Store listing data (see the </text:span><text:a xlink:type="simple" xlink:href="#_The_Google_Play" text:style-name="Internet_20_link" text:visited-style-name="Visited_20_Internet_20_Link"><text:span text:style-name="Internet_20_link"><text:span text:style-name="T10">Google Play Store Listing</text:span></text:span></text:a><text:span text:style-name="T10"> tab), make sure to check</text:span><text:span text:style-name="T44"> Verify Google Play Store listing when sending app data.</text:span></text:p>
      <text:p text:style-name="P69" loext:marker-style-name="T44"/>
      <table:table table:name="Table12" table:style-name="Table12">
        <table:table-column table:style-name="Table12.A"/>
        <table:table-column table:style-name="Table12.B"/>
        <table:table-row table:style-name="Table12.1">
          <table:table-cell table:style-name="Table12.A1" office:value-type="string">
            <text:p text:style-name="P14" loext:marker-style-name="T14"><text:span text:style-name="T15"></text:span><text:span text:style-name="T14"> </text:span></text:p>
          </table:table-cell>
          <table:table-cell table:style-name="Table12.B1" office:value-type="string">
            <text:p text:style-name="P14" loext:marker-style-name="T16"><text:span text:style-name="T16">Care must be taken in Uploading and Downloading from Scriptoria. If the project was already placed in Scriptoria, you need to make sure that no-one else has downloaded it on another computer and made changes. If they have, you will need to click Download to get the latest version. <text:s/>You do not need to do this if you are creating a Scriptoria product entry for the first time.</text:span><text:span text:style-name="T16"/></text:p>
            <text:p text:style-name="P41" loext:marker-style-name="T16"/>
            <text:p text:style-name="P14" loext:marker-style-name="T16"><text:span text:style-name="T16">If you are working by yourself on an app project, you will most likely have the latest version on your computer. You can then </text:span><text:span text:style-name="T39">Upload</text:span><text:span text:style-name="T16"> it to Scriptoria (to save your project there) whenever you like until you are ready to publish. Once published, it would be wisest to Download the project again when you are ready to make changes. Then make the changes, test them and upload the project again. See Republishing an app.</text:span></text:p>
            <text:p text:style-name="P42" loext:marker-style-name="T10"/>
          </table:table-cell>
        </table:table-row>
      </table:table>
      <text:p text:style-name="P68" loext:marker-style-name="T10"/>
      <text:h text:style-name="Heading_20_2" text:outline-level="2"><text:bookmark text:name="_The_Google_Play"/><text:bookmark-start text:name="_Toc220666443"/>The <text:span text:style-name="T45">Google Play Store Listing</text:span> tab<text:bookmark-end text:name="_Toc220666443"/></text:h>
      <text:p text:style-name="Standard" loext:marker-style-name="T4"><text:span text:style-name="T4">You can use this tab to enter all the pertinent information required for the app’s Play Store listing including title, descriptions, screenshots and feature graphic.</text:span><text:span text:style-name="T4"/></text:p>
      <text:h text:style-name="Heading_20_3" text:outline-level="3" loext:marker-style-name="T4"><text:bookmark-start text:name="_Toc220666444"/><text:span text:style-name="T4">Manage Translations</text:span><text:bookmark-end text:name="_Toc220666444"/><text:span text:style-name="T4"/></text:h>
      <text:p text:style-name="Standard" loext:marker-style-name="T4"><text:span text:style-name="T4">Click this button to add one or more translations to the listing information. Google will normally display the Play Store in the language the user has selected for their browser. You can use </text:span><text:span text:style-name="T36">Manage Translations</text:span><text:span text:style-name="T4"> to provide a translation for your app information in several languages. You do not have to do this, but if your target audience uses several trade or national languages for which there is normally a translation available online, you may want to submit your own texts to make sure they are exactly correct.</text:span></text:p>
      <text:p text:style-name="P4" loext:marker-style-name="T4"/>
      <text:p text:style-name="Standard" loext:marker-style-name="T4"><text:span text:style-name="T4">Choose the translation languages you want to add. <text:s/>The language selector will now display them when you click the drop-down list box arrow. Changing the language will load a complete, unique set of information fields under the 5 tabs. You can then enter the Play Store information for each language by clicking on the various tabs and entering the text or images.</text:span><text:span text:style-name="T4"/></text:p>
      <text:h text:style-name="Heading_20_3" text:outline-level="3" loext:marker-style-name="T4"><text:bookmark-start text:name="_Toc220666445"/><text:span text:style-name="T4">Import From Google Play…</text:span><text:bookmark-end text:name="_Toc220666445"/><text:span text:style-name="T4"/></text:h>
      <text:p text:style-name="Standard" loext:marker-style-name="T4"><text:span text:style-name="T4">Click this button to import the Play Store information for an app that was already published before being put into Scriptoria.</text:span><text:span text:style-name="T4"/></text:p>
      <text:h text:style-name="Heading_20_3" text:outline-level="3" loext:marker-style-name="T4"><text:bookmark-start text:name="_Toc220666446"/><text:span text:style-name="T4">The Product Details tab</text:span><text:bookmark-end text:name="_Toc220666446"/><text:span text:style-name="T4"/></text:h>
      <text:p text:style-name="Standard" loext:marker-style-name="T4"><text:span text:style-name="T4">These fields provide the user with important information that they can use in determining whether they want to install the app or not. Care should be taken to clearly explain the purpose and features of the app. Google does verify that features listed here actually exist in the app. Apparently, Google also indexes the words in these text fields for helping with searches on the Play Store. In practice, this does not seem readily apparent, but it’s still worth thinking through some key terms that might be useful in searches. For more information, see the respective fields below:</text:span><text:span text:style-name="T4"/></text:p>
      <text:p text:style-name="P4" loext:marker-style-name="T4"/>
      <text:p text:style-name="Standard" loext:marker-style-name="T36"><text:span text:style-name="T36">Title</text:span><text:span text:style-name="T36"/></text:p>
      <text:p text:style-name="Standard" loext:marker-style-name="T4"><text:span text:style-name="T4">This is the main title that displays on the Play Store page for the app. It doesn’t have to be the same as the app name that appears under the app icon. It’s helpful to include the target app language in the title as well as one or more descriptive words. For a Bible app for the </text:span><text:span text:style-name="T36">Wolof</text:span><text:span text:style-name="T4"> language that includes audio, an English app title could be </text:span><text:span text:style-name="T46">Wolof Bible with audio</text:span><text:span text:style-name="T4">. Note that there is a 30 character limit.</text:span></text:p>
      <text:p text:style-name="P4" loext:marker-style-name="T4"/>
      <text:p text:style-name="Standard" loext:marker-style-name="T36"><text:span text:style-name="T36">Short Description</text:span><text:span text:style-name="T36"/></text:p>
      <text:p text:style-name="Standard" loext:marker-style-name="T4"><text:span text:style-name="T4">This information is shown on the Google Play Store phone app page for your app under the heading </text:span><text:span text:style-name="T46">About this app</text:span><text:span text:style-name="T4">. <text:s/>It currently does not display on the page if accessed on a PC. Use this description to give the user more details about your app, perhaps including alternate language name spellings, the main target country and specific resources the user can access (Bible plans, videos etc.). Note that there is an 80 character limit. </text:span></text:p>
      <text:p text:style-name="P4" loext:marker-style-name="T4"/>
      <text:p text:style-name="Standard" loext:marker-style-name="T36"><text:span text:style-name="T36">Full Description</text:span><text:span text:style-name="T36"/></text:p>
      <text:p text:style-name="Standard" loext:marker-style-name="T4"><text:span text:style-name="T4">This information is shown on the Google Play Store phone app page for your app if you tap the arrow next to </text:span><text:span text:style-name="T46">About this app</text:span><text:span text:style-name="T4">. <text:s/>It will then appear under the </text:span><text:span text:style-name="T36">Short Description</text:span><text:span text:style-name="T4">. It currently is the only information displayed if the page if accessed on a PC (meaning that the </text:span><text:span text:style-name="T36">Short Description</text:span><text:span text:style-name="T4"> is not shown). Use this description to give the user more complete details about your app, perhaps including which books of Bible are included (if just a subset), a list of features in the app (verse on image, highlighting, notes, reminder notifications, other book resources included etc.). Note that there is an 4000 character limit.</text:span></text:p>
      <text:p text:style-name="P4" loext:marker-style-name="T4"/>
      <table:table table:name="Table13" table:style-name="Table13">
        <table:table-column table:style-name="Table13.A"/>
        <table:table-column table:style-name="Table13.B"/>
        <table:table-row table:style-name="Table13.1">
          <table:table-cell table:style-name="Table13.A1" office:value-type="string">
            <text:p text:style-name="P14" loext:marker-style-name="T19"><text:span text:style-name="T20"></text:span><text:span text:style-name="T19"> </text:span></text:p>
          </table:table-cell>
          <table:table-cell table:style-name="Table13.B1" office:value-type="string">
            <text:p text:style-name="P14" loext:marker-style-name="T16"><text:span text:style-name="T16">Whether it’s done by AI or a real person, Google may apparently reject an entry if it contains much more than a description of the app functionality. E.g. if your description contains reasons to read the Bible and the impact it can have, it may be rejected. This was based on personal experience.</text:span><text:span text:style-name="T16"/></text:p>
          </table:table-cell>
        </table:table-row>
      </table:table>
      <text:h text:style-name="Heading_20_3" text:outline-level="3" loext:marker-style-name="T4"><text:bookmark-start text:name="_Toc220666447"/><text:span text:style-name="T4">The </text:span><text:span text:style-name="T3">What’s New</text:span><text:span text:style-name="T4"> tab</text:span><text:bookmark-end text:name="_Toc220666447"/></text:h>
      <text:p text:style-name="Standard" loext:marker-style-name="T4"><text:span text:style-name="T4">Use this to enter information pertaining to any changes you’ve made since the last published version. Do not fill this out for the first time you publish an app.</text:span><text:span text:style-name="T4"/></text:p>
      <text:h text:style-name="Heading_20_3" text:outline-level="3" loext:marker-style-name="T4"><text:bookmark-start text:name="_Toc220666448"/><text:span text:style-name="T4">The Screenshots tab</text:span><text:bookmark-end text:name="_Toc220666448"/><text:span text:style-name="T4"/></text:h>
      <text:p text:style-name="Standard" loext:marker-style-name="T4"><text:span text:style-name="T4">You are required to provide between 2 and 8 screenshots for your app publishing page. You may add screenshots for tablets too, if you wish. Try to provide screenshots that highlight important and attractive functionality. You can provide different screenshots for all the languages you’ve selected under </text:span><text:span text:style-name="T36">Manage Translations</text:span><text:span text:style-name="T4">. </text:span><text:span text:style-name="T3">Enhanced Screenshots</text:span><text:span text:style-name="T4"> that show your app displayed on a phone with an image spread across several screenshots can be particularly effective. There are several free tools available online that can help in producing these.</text:span></text:p>
      <text:p text:style-name="P4" loext:marker-style-name="T4"/>
      <text:h text:style-name="Heading_20_3" text:outline-level="3" loext:marker-style-name="T4"><text:bookmark-start text:name="_Toc220666449"/><text:span text:style-name="T4">High-res Icon</text:span><text:bookmark-end text:name="_Toc220666449"/><text:span text:style-name="T4"/></text:h>
      <text:p text:style-name="Standard" loext:marker-style-name="T4"><text:span text:style-name="T4">This is used to display a larger version of your app icon on the Play Store page. You can select the icon from the </text:span><text:span text:style-name="T36">drawable-web</text:span><text:span text:style-name="T4"> folder under your project’s data &gt; images subfolder.</text:span></text:p>
      <text:h text:style-name="Heading_20_3" text:outline-level="3" loext:marker-style-name="T4"><text:bookmark-start text:name="_Toc220666450"/><text:span text:style-name="T4">Feature Graphic</text:span><text:bookmark-end text:name="_Toc220666450"/><text:span text:style-name="T4"/></text:h>
      <text:p text:style-name="Standard" loext:marker-style-name="T4"><text:span text:style-name="T4">This is only used on the Publishing page when the Google Play Store is viewed on a computer browser (not on a phone). See the details for requirements. It can be simply the app icon on a background with a descriptive name—or a completely unique image—but it should reflect your app’s design.</text:span><text:span text:style-name="T4"/></text:p>
      <text:h text:style-name="Heading_20_2" text:outline-level="2"><text:bookmark-start text:name="_Toc220666451"/>The Scripture Earth tab<text:bookmark-end text:name="_Toc220666451"/></text:h>
      <text:p text:style-name="Standard" loext:marker-style-name="T4"><text:a xlink:type="simple" xlink:href="https://scriptureearth.org/00eng.php" text:style-name="Internet_20_link" text:visited-style-name="Visited_20_Internet_20_Link"><text:span text:style-name="Internet_20_link"><text:span text:style-name="T4">Scripture Earth</text:span></text:span></text:a><text:span text:style-name="T4"> is a website that allows users to find Scripture resources based on the language name or code. You can notify Scripture Earth to add a link to your app by entering the information on this tab.</text:span></text:p>
      <text:h text:style-name="Heading_20_2" text:outline-level="2"><text:bookmark-start text:name="_Toc220666452"/>The Publish Properties tab<text:bookmark-end text:name="_Toc220666452"/></text:h>
      <text:p text:style-name="Standard" loext:marker-style-name="T4"><text:span text:style-name="T4">Some Scriptoria projects may need additional information entered here. You Scriptoria contact person will let you know if this is necessary.</text:span><text:span text:style-name="T4"/></text:p>
      <text:h text:style-name="Heading_20_2" text:outline-level="2"><text:bookmark-start text:name="_Toc220666453"/>Republishing an App<text:bookmark-end text:name="_Toc220666453"/></text:h>
      <text:p text:style-name="Standard" loext:marker-style-name="T4"><text:span text:style-name="T4">Once an app has been published to the Play Store, it is fairly easy to update it. Make sure to do the following:</text:span><text:span text:style-name="T4"/></text:p>
      <text:list text:style-name="WWNum35">
        <text:list-item>
          <text:p text:style-name="P70" loext:marker-style-name="T4"><text:span text:style-name="T4">Download your app from Scriptoria so you have the latest version.</text:span><text:span text:style-name="T4"/></text:p>
        </text:list-item>
        <text:list-item>
          <text:p text:style-name="P70" loext:marker-style-name="T4"><text:span text:style-name="T4">Make sure your app version code (</text:span><text:span text:style-name="T36">App &gt; APK &gt; Version Code</text:span><text:span text:style-name="T4">) matches the version code on your app’s page in Scriptoria. <text:s/>This information can also be found on your app’s Google Console page under </text:span><text:span text:style-name="T36">Test and Release &gt; Latest releases and bundles</text:span><text:span text:style-name="T4">. Look for the </text:span><text:span text:style-name="T36">Latest Version</text:span><text:span text:style-name="T4"> number.</text:span></text:p>
        </text:list-item>
        <text:list-item>
          <text:p text:style-name="P70" loext:marker-style-name="T4"><text:span text:style-name="T4">Update your app’s version name by one (incrementing whichever number field you think is most appropriate for the amount of changes).</text:span><text:span text:style-name="T4"/></text:p>
        </text:list-item>
        <text:list-item>
          <text:p text:style-name="P70" loext:marker-style-name="T4"><text:span text:style-name="T4">Update your app in SAB, build and test it.</text:span><text:span text:style-name="T4"/></text:p>
        </text:list-item>
        <text:list-item>
          <text:p text:style-name="P70" loext:marker-style-name="T4"><text:span text:style-name="T4">Update the </text:span><text:span text:style-name="T36">What’s New</text:span><text:span text:style-name="T4"> information under </text:span><text:span text:style-name="T36">Publishing &gt; App Store &gt; Google Play Store Listing &gt; What’s New</text:span><text:span text:style-name="T4">.</text:span></text:p>
        </text:list-item>
        <text:list-item>
          <text:p text:style-name="P70" loext:marker-style-name="T4"><text:span text:style-name="T4">Make sure your About box information and publishing page descriptions are correct and up-to-date.</text:span><text:span text:style-name="T4"/></text:p>
        </text:list-item>
        <text:list-item>
          <text:p text:style-name="P70" loext:marker-style-name="T4"><text:span text:style-name="T4">Under </text:span><text:span text:style-name="T36">Publishing &gt; App Store &gt; Scriptoria</text:span><text:span text:style-name="T4">, choose </text:span><text:span text:style-name="T36">Upload and Rebuild</text:span><text:span text:style-name="T4">. This will send your app to Scriptoria to rebuild and republish.</text:span></text:p>
        </text:list-item>
      </text:list>
      <text:p text:style-name="P4" loext:marker-style-name="T4"/>
      <text:h text:style-name="P40" text:outline-level="1" loext:marker-style-name="T4"><text:bookmark-start text:name="_Toc220666454"/><text:span text:style-name="T4">Distributing apps by memory card</text:span><text:bookmark-end text:name="_Toc220666454"/><text:span text:style-name="T4"/></text:h>
      <text:p text:style-name="Standard" loext:marker-style-name="T7"><text:span text:style-name="T7">Copy the Android app’s APK file onto </text:span><text:span text:style-name="T32">microSD</text:span><text:span text:style-name="T7"> memory cards. People insert the card into their phone’s memory card slot, browse for it in a file explorer app, and tap on the APK to install it.</text:span></text:p>
      <text:p text:style-name="P23" loext:marker-style-name="T7"/>
      <text:p text:style-name="Standard" loext:marker-style-name="T4"><text:span text:style-name="T7">Most phones come with a pre-installed file explorer app, but if not, search for “File Explorer” on Google Play. These types of app allow you to browse files and folders on the phone – both internal memory and external memory cards.</text:span><text:span text:style-name="T4"/></text:p>
      <text:p text:style-name="P4" loext:marker-style-name="T4"/>
      <text:p text:style-name="Standard" loext:marker-style-name="T4"><text:span text:style-name="T4">If you have audio files to distribute together with the app, these can be placed in a sub-folder on the memory card.</text:span><text:span text:style-name="T4"/></text:p>
      <text:p text:style-name="P4" loext:marker-style-name="T4"/>
      <text:p text:style-name="Standard" loext:marker-style-name="T47"><text:span text:style-name="T4">There are three main problems that you might encounter when installing an app from memory cards:</text:span><text:span text:style-name="T47"/></text:p>
      <text:p text:style-name="P4" loext:marker-style-name="T4"/>
      <text:list text:style-name="WWNum31">
        <text:list-item>
          <text:p text:style-name="P71" loext:marker-style-name="T36"><text:span text:style-name="T36">Install blocked</text:span><text:span text:style-name="T36"/></text:p>
        </text:list-item>
      </text:list>
      <text:p text:style-name="P72" loext:marker-style-name="T4"><text:span text:style-name="T4">Most phones are configured only to install apps that are downloaded from the Google Play store – rather than those that are shared offline by memory card or Bluetooth. In that case you will get an “Install blocked” message. To fix this, go to </text:span><text:span text:style-name="T36">Settings</text:span><text:span text:style-name="T4"> &gt; </text:span><text:span text:style-name="T36">Security</text:span><text:span text:style-name="T4"> (or Settings &gt; Applications) and check the box next to </text:span><text:span text:style-name="T36">Unknown sources</text:span><text:span text:style-name="T4">.</text:span></text:p>
      <text:p text:style-name="P23" loext:marker-style-name="T7"/>
      <text:list text:continue-numbering="true" text:style-name="WWNum31">
        <text:list-item>
          <text:p text:style-name="P71" loext:marker-style-name="T36"><text:span text:style-name="T36">Low on Space</text:span><text:span text:style-name="T36"/></text:p>
        </text:list-item>
      </text:list>
      <text:p text:style-name="P72" loext:marker-style-name="T4"><text:span text:style-name="T4">If there is not much space left in the phone’s internal storage, you will get a message saying that the phone is low on space. Check the internal storage space by going to </text:span><text:span text:style-name="T36">Settings</text:span><text:span text:style-name="T4"> &gt; </text:span><text:span text:style-name="T36">SD card &amp; phone storage</text:span><text:span text:style-name="T4"> and looking at the </text:span><text:span text:style-name="T36">Available space</text:span><text:span text:style-name="T4"> under </text:span><text:span text:style-name="T36">Internal phone storage</text:span><text:span text:style-name="T4">. It should be at least 27 MB. If it is less than that, clear up space by deleting unused apps (with the phone owner's permission of course). Similarly, the SD card will need to have sufficient space for installing the app and associated audio files. You can check the available space on the SD card in </text:span><text:span text:style-name="T36">Settings</text:span><text:span text:style-name="T4"> &gt; </text:span><text:span text:style-name="T36">SD card &amp; phone storage</text:span><text:span text:style-name="T4">.</text:span></text:p>
      <text:p text:style-name="P23" loext:marker-style-name="T7"/>
      <text:list text:continue-numbering="true" text:style-name="WWNum31">
        <text:list-item>
          <text:p text:style-name="P71" loext:marker-style-name="T36"><text:span text:style-name="T36">Problem with Parsing the Package</text:span><text:span text:style-name="T36"/></text:p>
        </text:list-item>
      </text:list>
      <text:p text:style-name="P72" loext:marker-style-name="T4"><text:span text:style-name="T4">If you get an error about a problem parsing the package or if the application installation finishes and says that the application could not be installed, then the phone is unable to write the files to the memory card. When this happens, you need to remove the memory card from the phone and put it in a computer or other device and write the files directly to the memory card. Then put the memory card back in the phone and try the install again. It should work this time.</text:span><text:span text:style-name="T4"/></text:p>
      <text:p text:style-name="P4" loext:marker-style-name="T4"/>
      <text:p text:style-name="P4" loext:marker-style-name="T4"/>
      <text:h text:style-name="P73" text:outline-level="1" loext:marker-style-name="T4"><text:bookmark-start text:name="_Toc220666455"/><text:span text:style-name="T4">Sharing apps by Bluetooth</text:span><text:bookmark-end text:name="_Toc220666455"/><text:span text:style-name="T4"/></text:h>
      <text:p text:style-name="P74" loext:marker-style-name="T7"><text:span text:style-name="T7">Use Bluetooth to transfer the Android APK file from your phone to another phone. Once people receive the file, they tap on it to install it.</text:span><text:span text:style-name="T7"/></text:p>
      <text:p text:style-name="P75" loext:marker-style-name="T7"/>
      <table:table table:name="Table14" table:style-name="Table14">
        <table:table-column table:style-name="Table14.A"/>
        <table:table-column table:style-name="Table14.B"/>
        <table:table-row table:style-name="Table14.1">
          <table:table-cell table:style-name="Table14.A1" office:value-type="string">
            <text:p text:style-name="P14" loext:marker-style-name="T14"><text:span text:style-name="T15"></text:span><text:span text:style-name="T14"> </text:span></text:p>
          </table:table-cell>
          <table:table-cell table:style-name="Table14.B1" office:value-type="string">
            <text:p text:style-name="P14" loext:marker-style-name="T10"><text:span text:style-name="T16">Make sure to turn on the option to share your app’s APK. <text:s/>Go to </text:span><text:span text:style-name="T39">Navigation &gt; Navigation Drawer &gt; Share App</text:span><text:span text:style-name="T16"> and check the box next to </text:span><text:span text:style-name="T39">Share App Installer File</text:span><text:span text:style-name="T16">.</text:span></text:p>
          </table:table-cell>
        </table:table-row>
      </table:table>
      <text:p text:style-name="P75" loext:marker-style-name="T7"/>
      <text:p text:style-name="P74" loext:marker-style-name="T7"><text:span text:style-name="T4">If you have audio files to distribute together with the app, these will need to be transferred as well.</text:span><text:span text:style-name="T7"/></text:p>
      <text:p text:style-name="P4" loext:marker-style-name="T4"/>
      <text:p text:style-name="Standard" loext:marker-style-name="T32"><text:span text:style-name="T32">Troubleshooting</text:span><text:span text:style-name="T32"/></text:p>
      <text:p text:style-name="Standard" loext:marker-style-name="T4"><text:span text:style-name="T7">Some Android devices block you from sending or receiving APK files. This is analogous to some email systems stopping you from sending .exe or .zip files because of security concerns. To get round this, you can rename the file extension to MP3, send it, and then change it back to APK before installing it. Alternatively, i</text:span><text:span text:style-name="T4">t may give a security warning (which can simply be dismissed).</text:span></text:p>
      <text:p text:style-name="P4" loext:marker-style-name="T4"/>
      <text:h text:style-name="P40" text:outline-level="1" loext:marker-style-name="T4"><text:bookmark-start text:name="_Toc220666456"/><text:span text:style-name="T4">Sharing apps by Wi-Fi transfer</text:span><text:bookmark-end text:name="_Toc220666456"/><text:span text:style-name="T4"/></text:h>
      <text:p text:style-name="Standard" loext:marker-style-name="T4"><text:span text:style-name="T4">If you have large Android APK files to transfer from phone to phone or if you have a lot of audio files, Bluetooth can be a slow method of transfer. In such cases, using a Wi-Fi transfer app can give you phone to phone transfer speeds up to 40 times faster than Bluetooth.</text:span><text:span text:style-name="T4"/></text:p>
      <text:p text:style-name="P4" loext:marker-style-name="T4"/>
      <text:p text:style-name="Standard" loext:marker-style-name="T4"><text:span text:style-name="T4">Both devices (the sender and the receiver phone) need to have a Wi-Fi transfer app installed, and both need to have Wi-Fi turned on. </text:span><text:span text:style-name="T4"/></text:p>
      <text:p text:style-name="P4" loext:marker-style-name="T4"/>
      <text:p text:style-name="P24" loext:marker-style-name="T4"><text:span text:style-name="T4">Popular apps for Wi-Fi transfer include:</text:span><text:span text:style-name="T4"/></text:p>
      <text:list text:style-name="WWNum32">
        <text:list-item>
          <text:p text:style-name="P76" loext:marker-style-name="T4"><text:span text:style-name="T4">Xender</text:span><text:span text:style-name="T4"/></text:p>
        </text:list-item>
        <text:list-item>
          <text:p text:style-name="P76" loext:marker-style-name="T4"><text:span text:style-name="T4">SHAREit</text:span><text:span text:style-name="T4"/></text:p>
        </text:list-item>
        <text:list-item>
          <text:p text:style-name="P76" loext:marker-style-name="T4"><text:span text:style-name="T4">SHAREit Lite</text:span><text:span text:style-name="T4"/></text:p>
        </text:list-item>
      </text:list>
      <text:p text:style-name="P4" loext:marker-style-name="T4"/>
      <text:p text:style-name="Standard" loext:marker-style-name="T4"><text:span text:style-name="T4">If you are in doubt about which Wi-Fi transfer app to use, ask around in the community, especially among young people, to find out which app they use to share digital content between them.</text:span><text:span text:style-name="T4"/></text:p>
      <text:p text:style-name="P4" loext:marker-style-name="T4"/>
      <text:h text:style-name="Heading_20_1" text:outline-level="1" loext:marker-style-name="T4"><text:bookmark-start text:name="_Toc220666457"/><text:span text:style-name="T4">Other Ways to Share Your App Installer File</text:span><text:bookmark-end text:name="_Toc220666457"/><text:span text:style-name="T4"/></text:h>
      <text:p text:style-name="Standard" loext:marker-style-name="T4"><text:span text:style-name="T4">There are various other ways to share your app APK file. You can host it on a website for people to download, or on Cloud storage (Google Drive, Dropbox etc.). In these cases, the user may need some help locating the APK file on their phone using a File Explorer app. Once located, tap on the APK file to install. </text:span><text:span text:style-name="T4"/></text:p>
      <text:p text:style-name="Standard" loext:marker-style-name="T4"><text:span text:style-name="T4">You can alternatively attach it to an email (if it is less than 20 MB or so) or send it via Social Media by selecting the APK file to share. Simply tapping on the attached APK file should install it.</text:span><text:span text:style-name="T4"/></text:p>
      <text:p text:style-name="P4" loext:marker-style-name="T4"/>
      <text:p text:style-name="Standard" loext:marker-style-name="T32"><text:span text:style-name="T32">Troubleshooting</text:span><text:span text:style-name="T32"/></text:p>
      <text:p text:style-name="Standard" loext:marker-style-name="T4"><text:span text:style-name="T7">Some Android devices block you from sending or receiving APK files. This is analogous to some email systems stopping you from sending .exe or .zip files because of security concerns. To get round this, you can rename the file extension to MP3, send it, and then change it back to APK before installing it. Alternatively, i</text:span><text:span text:style-name="T4">t may give a security warning (which can simply be dismis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rmal_20__28_Web_29_" style:display-name="Normal (Web)" style:family="paragraph" style:parent-style-name="Standard">
      <style:text-properties style:font-name="Times" fo:font-family="Times"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size-complex="10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605e5c" loext:opacity="100%" fo:background-color="#e1dfd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fo:language="en" fo:country="US"/>
    </style:style>
    <style:style style:name="ListLabel_20_317" style:display-name="ListLabel 317" style:family="text">
      <style:text-properties fo:language="en" fo:country="US" fo:font-style="italic" style:font-style-asian="italic" style:font-name-complex="Calibri1" style:font-family-complex="Calibri" style:font-family-generic-complex="system" style:font-pitch-complex="variable"/>
    </style:style>
    <style:style style:name="ListLabel_20_318" style:display-name="ListLabel 318" style:family="text">
      <style:text-properties fo:language="en" fo:country="GB"/>
    </style:style>
    <style:style style:name="ListLabel_20_319" style:display-name="ListLabel 319" style:family="text">
      <style:text-properties fo:language="en" fo:country="US" style:font-name-complex="Calibri1"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102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0102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102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010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102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0102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102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0102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10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3752in" fo:margin-bottom="0.4925in" fo:margin-left="1.1417in" fo:margin-right="1.141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draw:text-box fo:min-height="0in" fo:min-width="0.0161in"><text:p text:style-name="MP1" loext:marker-style-name="Page Number"><text:span text:style-name="Page_20_Number"><text:page-number text:select-page="current">5</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Distributing Apps</dc:title>
    <meta:initial-creator>Richard Margetts</meta:initial-creator>
    <dc:creator>Richard Margetts</dc:creator>
    <meta:editing-cycles>293</meta:editing-cycles>
    <meta:print-date>2026-01-30T17:53:00</meta:print-date>
    <meta:creation-date>2015-08-15T09:35:00</meta:creation-date>
    <dc:date>2026-02-17T08:20:00</dc:date>
    <meta:editing-duration>P0D</meta:editing-duration>
    <meta:generator>LibreOffice/26.2.3.2$Linux_X86_64 LibreOffice_project/620$Build-2</meta:generator>
    <meta:document-statistic meta:table-count="14" meta:image-count="12" meta:object-count="2" meta:page-count="5" meta:paragraph-count="311" meta:word-count="5373" meta:character-count="30390" meta:non-whitespace-character-count="25343"/>
    <meta:user-defined meta:name="AppVersion">16.0000</meta:user-defined>
    <meta:template xlink:type="simple" xlink:actuate="onRequest" xlink:title="Normal.dotm" xlink:href=""/>
  </office:meta>
</office:document-meta>
</file>