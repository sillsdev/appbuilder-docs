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103" manifest:media-type="application/vnd.sun.star.oleobject"/>
  <manifest:file-entry manifest:full-path="settings.xml" manifest:media-type="text/xml"/>
  <manifest:file-entry manifest:full-path="ObjectReplacements/Obj103" manifest:media-type=""/>
  <manifest:file-entry manifest:full-path="ObjectReplacements/Obj102" manifest:media-type=""/>
  <manifest:file-entry manifest:full-path="Thumbnails/thumbnail.png" manifest:media-type="image/png"/>
  <manifest:file-entry manifest:full-path="styles.xml" manifest:media-type="text/xml"/>
  <manifest:file-entry manifest:full-path="manifest.rdf" manifest:media-type="application/rdf+xml"/>
  <manifest:file-entry manifest:full-path="content.xml" manifest:media-type="text/xml"/>
  <manifest:file-entry manifest:full-path="Obj102" manifest:media-type="application/vnd.sun.star.oleobject"/>
  <manifest:file-entry manifest:full-path="meta.xml" manifest:media-type="text/xml"/>
  <manifest:file-entry manifest:full-path="Pictures/1000000100000300000003000A4F1D58.png" manifest:media-type="image/png"/>
  <manifest:file-entry manifest:full-path="Pictures/10000001000000E3000000E845863480.png" manifest:media-type="image/png"/>
  <manifest:file-entry manifest:full-path="Pictures/10000000000002D6000001F7BE403E48.jpg" manifest:media-type="image/jpeg"/>
  <manifest:file-entry manifest:full-path="Pictures/1000000000000258000002582742E9A7.jpg" manifest:media-type="image/jpeg"/>
  <manifest:file-entry manifest:full-path="Pictures/10000001000000D3000000D6F63B3F30.png" manifest:media-type="image/png"/>
  <manifest:file-entry manifest:full-path="Pictures/10000001000004770000050079FEEEC3.png" manifest:media-type="image/png"/>
  <manifest:file-entry manifest:full-path="Pictures/10000001000004B0000004B00D994124.png" manifest:media-type="image/png"/>
  <manifest:file-entry manifest:full-path="Pictures/10000000000001F4000001F4ABAB9A73.jpg" manifest:media-type="image/jpeg"/>
  <manifest:file-entry manifest:full-path="Pictures/100000010000042C000004B0826D13D2.png" manifest:media-type="image/png"/>
  <manifest:file-entry manifest:full-path="Pictures/10000001000002BC000002BCBD18BEDC.png" manifest:media-type="image/png"/>
  <manifest:file-entry manifest:full-path="Pictures/1000000100000846000002729EF3B20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778in" fo:margin-left="0.0035in" fo:margin-top="0in" fo:margin-bottom="0in" table:align="left" style:writing-mode="lr-tb"/>
    </style:style>
    <style:style style:name="Table1.A" style:family="table-column">
      <style:table-column-properties style:column-width="0.6299in"/>
    </style:style>
    <style:style style:name="Table1.B" style:family="table-column">
      <style:table-column-properties style:column-width="5.3479in"/>
    </style:style>
    <style:style style:name="Table1.1" style:family="table-row">
      <style:table-row-properties style:min-row-height="0.5257in" fo:keep-together="auto"/>
    </style:style>
    <style:style style:name="Table1.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2.B1" style:family="table-cell">
      <style:table-cell-properties fo:padding="0.0799in" fo:border="0.5pt solid #000000" style:writing-mode="lr-tb"/>
    </style:style>
    <style:style style:name="Table3" style:family="table">
      <style:table-properties style:width="6.4403in" fo:margin-left="-0.075in" fo:margin-top="0in" fo:margin-bottom="0in" table:align="left" style:writing-mode="page"/>
    </style:style>
    <style:style style:name="Table3.A" style:family="table-column">
      <style:table-column-properties style:column-width="6.4403in"/>
    </style:style>
    <style:style style:name="Table3.1" style:family="table-row">
      <style:table-row-properties style:min-row-height="0.3618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2528in" fo:margin-left="0.0785in" fo:margin-top="0in" fo:margin-bottom="0in" table:align="left" style:writing-mode="page"/>
    </style:style>
    <style:style style:name="Table4.A" style:family="table-column">
      <style:table-column-properties style:column-width="1.3in"/>
    </style:style>
    <style:style style:name="Table4.B" style:family="table-column">
      <style:table-column-properties style:column-width="1.4667in"/>
    </style:style>
    <style:style style:name="Table4.C" style:family="table-column">
      <style:table-column-properties style:column-width="3.4042in"/>
    </style:style>
    <style:style style:name="Table4.D" style:family="table-column">
      <style:table-column-properties style:column-width="0.0819in"/>
    </style:style>
    <style:style style:name="Table4.1" style:family="table-row">
      <style:table-row-properties style:min-row-height="0.7201in" fo:keep-together="always"/>
    </style:style>
    <style:style style:name="Table4.A1" style:family="table-cell">
      <style:table-cell-properties fo:padding-left="0.075in" fo:padding-right="0.075in" fo:padding-top="0.0785in" fo:padding-bottom="0.0785in" fo:border="0.5pt solid #999999"/>
    </style:style>
    <style:style style:name="Table4.B1" style:family="table-cell">
      <style:table-cell-properties style:vertical-align="middle" fo:padding-left="0.075in" fo:padding-right="0.075in" fo:padding-top="0.0785in" fo:padding-bottom="0.0785in" fo:border="0.5pt solid #999999"/>
    </style:style>
    <style:style style:name="Table4.D2" style:family="table-cell">
      <style:table-cell-properties fo:padding-left="0.075in" fo:padding-right="0.075in" fo:padding-top="0.0785in" fo:padding-bottom="0.0785in" fo:border="none"/>
    </style:style>
    <style:style style:name="Table4.3" style:family="table-row">
      <style:table-row-properties fo:keep-together="always"/>
    </style:style>
    <style:style style:name="Table4.D3" style:family="table-cell">
      <style:table-cell-properties fo:padding-left="0.075in" fo:padding-right="0.075in" fo:padding-top="0.0785in" fo:padding-bottom="0.0785in" fo:border="none"/>
    </style:style>
    <style:style style:name="Table4.4" style:family="table-row">
      <style:table-row-properties fo:keep-together="always"/>
    </style:style>
    <style:style style:name="Table4.D4" style:family="table-cell">
      <style:table-cell-properties fo:padding-left="0.075in" fo:padding-right="0.075in" fo:padding-top="0.0785in" fo:padding-bottom="0.0785in" fo:border="none"/>
    </style:style>
    <style:style style:name="Table4.5" style:family="table-row">
      <style:table-row-properties style:min-row-height="0.8597in" fo:keep-together="always"/>
    </style:style>
    <style:style style:name="Table4.D5" style:family="table-cell">
      <style:table-cell-properties fo:padding-left="0.075in" fo:padding-right="0.075in" fo:padding-top="0.0785in" fo:padding-bottom="0.0785in" fo:border="none"/>
    </style:style>
    <style:style style:name="Table4.6" style:family="table-row">
      <style:table-row-properties fo:keep-together="always"/>
    </style:style>
    <style:style style:name="Table4.D6" style:family="table-cell">
      <style:table-cell-properties fo:padding-left="0.075in" fo:padding-right="0.075in" fo:padding-top="0.0785in" fo:padding-bottom="0.0785in" fo:border="none"/>
    </style:style>
    <style:style style:name="Table5" style:family="table">
      <style:table-properties style:width="5.9035in" fo:margin-left="0.0785in" fo:margin-top="0in" fo:margin-bottom="0in" table:align="left" style:writing-mode="page"/>
    </style:style>
    <style:style style:name="Table5.A" style:family="table-column">
      <style:table-column-properties style:column-width="1.3007in"/>
    </style:style>
    <style:style style:name="Table5.B" style:family="table-column">
      <style:table-column-properties style:column-width="1.466in"/>
    </style:style>
    <style:style style:name="Table5.C" style:family="table-column">
      <style:table-column-properties style:column-width="3.1368in"/>
    </style:style>
    <style:style style:name="Table5.1" style:family="table-row">
      <style:table-row-properties fo:keep-together="always"/>
    </style:style>
    <style:style style:name="Table5.A1" style:family="table-cell">
      <style:table-cell-properties fo:padding-left="0.075in" fo:padding-right="0.075in" fo:padding-top="0.0785in" fo:padding-bottom="0.0785in" fo:border="0.5pt solid #999999"/>
    </style:style>
    <style:style style:name="Table5.B1" style:family="table-cell">
      <style:table-cell-properties style:vertical-align="middle" fo:padding-left="0.075in" fo:padding-right="0.075in" fo:padding-top="0.0785in" fo:padding-bottom="0.0785in" fo:border="0.5pt solid #999999"/>
    </style:style>
    <style:style style:name="Table6" style:family="table">
      <style:table-properties style:width="5.9035in" fo:margin-left="0.0785in" fo:margin-top="0in" fo:margin-bottom="0in" table:align="left" style:may-break-between-rows="false" style:writing-mode="page"/>
    </style:style>
    <style:style style:name="Table6.A" style:family="table-column">
      <style:table-column-properties style:column-width="1.3007in"/>
    </style:style>
    <style:style style:name="Table6.B" style:family="table-column">
      <style:table-column-properties style:column-width="1.466in"/>
    </style:style>
    <style:style style:name="Table6.C" style:family="table-column">
      <style:table-column-properties style:column-width="3.1368in"/>
    </style:style>
    <style:style style:name="Table6.1" style:family="table-row">
      <style:table-row-properties style:min-row-height="0.7201in" fo:keep-together="always"/>
    </style:style>
    <style:style style:name="Table6.A1" style:family="table-cell">
      <style:table-cell-properties fo:padding-left="0.075in" fo:padding-right="0.075in" fo:padding-top="0.0785in" fo:padding-bottom="0.0785in" fo:border="0.5pt solid #999999"/>
    </style:style>
    <style:style style:name="Table6.B1" style:family="table-cell">
      <style:table-cell-properties style:vertical-align="middle" fo:padding-left="0.075in" fo:padding-right="0.075in" fo:padding-top="0.0785in" fo:padding-bottom="0.0785in" fo:border="0.5pt solid #999999"/>
    </style:style>
    <style:style style:name="Table7" style:family="table">
      <style:table-properties style:width="5.9778in" fo:margin-left="0.0035in" fo:margin-top="0in" fo:margin-bottom="0in" table:align="left" style:writing-mode="lr-tb"/>
    </style:style>
    <style:style style:name="Table7.A" style:family="table-column">
      <style:table-column-properties style:column-width="1.5715in"/>
    </style:style>
    <style:style style:name="Table7.B" style:family="table-column">
      <style:table-column-properties style:column-width="2.1653in"/>
    </style:style>
    <style:style style:name="Table7.C" style:family="table-column">
      <style:table-column-properties style:column-width="2.241in"/>
    </style:style>
    <style:style style:name="Table7.1" style:family="table-row">
      <style:table-row-properties fo:keep-together="always"/>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C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C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C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7.C8" style:family="table-cell">
      <style:table-cell-properties fo:padding-left="0.075in" fo:padding-right="0.075in" fo:padding-top="0in" fo:padding-bottom="0in" fo:border="0.5pt solid #000000" style:writing-mode="lr-tb"/>
    </style:style>
    <style:style style:name="Table7.A9" style:family="table-cell">
      <style:table-cell-properties fo:padding-left="0.075in" fo:padding-right="0.075in" fo:padding-top="0in" fo:padding-bottom="0in" fo:border="0.5pt solid #000000" style:writing-mode="lr-tb"/>
    </style:style>
    <style:style style:name="Table7.B9" style:family="table-cell">
      <style:table-cell-properties fo:padding-left="0.075in" fo:padding-right="0.075in" fo:padding-top="0in" fo:padding-bottom="0in" fo:border="0.5pt solid #000000" style:writing-mode="lr-tb"/>
    </style:style>
    <style:style style:name="Table7.C9" style:family="table-cell">
      <style:table-cell-properties fo:padding-left="0.075in" fo:padding-right="0.075in" fo:padding-top="0in" fo:padding-bottom="0in" fo:border="0.5pt solid #000000" style:writing-mode="lr-tb"/>
    </style:style>
    <style:style style:name="Table8" style:family="table">
      <style:table-properties style:width="5.9778in" fo:margin-left="0.0035in" fo:margin-top="0in" fo:margin-bottom="0in" table:align="left" style:writing-mode="lr-tb"/>
    </style:style>
    <style:style style:name="Table8.A" style:family="table-column">
      <style:table-column-properties style:column-width="0.6215in"/>
    </style:style>
    <style:style style:name="Table8.B" style:family="table-column">
      <style:table-column-properties style:column-width="5.3563in"/>
    </style:style>
    <style:style style:name="Table8.1" style:family="table-row">
      <style:table-row-properties style:min-row-height="0.5257in" fo:keep-together="auto"/>
    </style:style>
    <style:style style:name="Table8.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8.B1" style:family="table-cell">
      <style:table-cell-properties fo:padding="0.0799in" fo:border="0.5pt solid #000000" style:writing-mode="lr-tb"/>
    </style:style>
    <style:style style:name="Table9" style:family="table">
      <style:table-properties style:width="5.9778in" fo:margin-left="0.0035in" fo:margin-top="0in" fo:margin-bottom="0in" table:align="left" style:writing-mode="lr-tb"/>
    </style:style>
    <style:style style:name="Table9.A" style:family="table-column">
      <style:table-column-properties style:column-width="0.6299in"/>
    </style:style>
    <style:style style:name="Table9.B" style:family="table-column">
      <style:table-column-properties style:column-width="5.3479in"/>
    </style:style>
    <style:style style:name="Table9.1" style:family="table-row">
      <style:table-row-properties style:min-row-height="0.5257in" fo:keep-together="auto"/>
    </style:style>
    <style:style style:name="Table9.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9.B1" style:family="table-cell">
      <style:table-cell-properties fo:padding-left="0.0799in" fo:padding-right="0.0799in" fo:padding-top="0.0799in" fo:padding-bottom="0.0201in" fo:border="0.5pt solid #000000" style:writing-mode="lr-tb"/>
    </style:style>
    <style:style style:name="Table10" style:family="table">
      <style:table-properties style:width="5.9778in" fo:margin-left="0.0035in" fo:margin-top="0in" fo:margin-bottom="0in" table:align="left" style:writing-mode="lr-tb"/>
    </style:style>
    <style:style style:name="Table10.A" style:family="table-column">
      <style:table-column-properties style:column-width="0.6215in"/>
    </style:style>
    <style:style style:name="Table10.B" style:family="table-column">
      <style:table-column-properties style:column-width="5.3563in"/>
    </style:style>
    <style:style style:name="Table10.1" style:family="table-row">
      <style:table-row-properties style:min-row-height="0.5257in" fo:keep-together="auto"/>
    </style:style>
    <style:style style:name="Table10.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0.B1" style:family="table-cell">
      <style:table-cell-properties fo:padding="0.0799in" fo:border="0.5pt solid #000000" style:writing-mode="lr-tb"/>
    </style:style>
    <style:style style:name="Table11" style:family="table">
      <style:table-properties style:width="5.9778in" fo:margin-left="0.0035in" fo:margin-top="0in" fo:margin-bottom="0in" table:align="left" style:writing-mode="lr-tb"/>
    </style:style>
    <style:style style:name="Table11.A" style:family="table-column">
      <style:table-column-properties style:column-width="0.6299in"/>
    </style:style>
    <style:style style:name="Table11.B" style:family="table-column">
      <style:table-column-properties style:column-width="5.3479in"/>
    </style:style>
    <style:style style:name="Table11.1" style:family="table-row">
      <style:table-row-properties style:min-row-height="0.5257in" fo:keep-together="auto"/>
    </style:style>
    <style:style style:name="Table11.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1.B1" style:family="table-cell">
      <style:table-cell-properties fo:padding-left="0.0799in" fo:padding-right="0.0799in" fo:padding-top="0.0799in" fo:padding-bottom="0.0201in" fo:border="0.5pt solid #000000" style:writing-mode="lr-tb"/>
    </style:style>
    <style:style style:name="Table12" style:family="table">
      <style:table-properties style:width="5.9778in" fo:margin-left="0.0035in" fo:margin-top="0in" fo:margin-bottom="0in" table:align="left" style:writing-mode="lr-tb"/>
    </style:style>
    <style:style style:name="Table12.A" style:family="table-column">
      <style:table-column-properties style:column-width="0.6215in"/>
    </style:style>
    <style:style style:name="Table12.B" style:family="table-column">
      <style:table-column-properties style:column-width="5.3563in"/>
    </style:style>
    <style:style style:name="Table12.1" style:family="table-row">
      <style:table-row-properties style:min-row-height="0.5257in" fo:keep-together="auto"/>
    </style:style>
    <style:style style:name="Table12.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2.B1" style:family="table-cell">
      <style:table-cell-properties fo:padding="0.0799in" fo:border="0.5pt solid #000000" style:writing-mode="lr-tb"/>
    </style:style>
    <style:style style:name="Table13" style:family="table">
      <style:table-properties style:width="5.9778in" fo:margin-left="0.0035in" fo:margin-top="0in" fo:margin-bottom="0in" table:align="left" style:writing-mode="lr-tb"/>
    </style:style>
    <style:style style:name="Table13.A" style:family="table-column">
      <style:table-column-properties style:column-width="0.6299in"/>
    </style:style>
    <style:style style:name="Table13.B" style:family="table-column">
      <style:table-column-properties style:column-width="5.3479in"/>
    </style:style>
    <style:style style:name="Table13.1" style:family="table-row">
      <style:table-row-properties style:min-row-height="0.5257in" fo:keep-together="auto"/>
    </style:style>
    <style:style style:name="Table1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3.B1" style:family="table-cell">
      <style:table-cell-properties fo:padding-left="0.0799in" fo:padding-right="0.0799in" fo:padding-top="0.0799in" fo:padding-bottom="0.0201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style:font-name="Calibri"/>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keep-with-next="always"/>
      <style:text-properties style:font-name-complex="Calibri1"/>
    </style:style>
    <style:style style:name="P9" style:family="paragraph" style:parent-style-name="Standard">
      <style:paragraph-properties fo:keep-with-next="always"/>
    </style:style>
    <style:style style:name="P10" style:family="paragraph" style:parent-style-name="Standard">
      <style:paragraph-properties fo:keep-with-next="always"/>
      <style:text-properties fo:font-size="8pt" style:font-size-asian="8pt" style:font-name-complex="Calibri1" style:font-size-complex="8pt"/>
    </style:style>
    <style:style style:name="P11" style:family="paragraph" style:parent-style-name="Standard">
      <style:paragraph-properties>
        <style:tab-stops>
          <style:tab-stop style:position="3.4063in"/>
        </style:tab-stops>
      </style:paragraph-properties>
    </style:style>
    <style:style style:name="P12"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13"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Calibri1" style:language-complex="ar" style:country-complex="SA"/>
    </style:style>
    <style:style style:name="P14" style:family="paragraph" style:parent-style-name="Standard">
      <style:paragraph-properties>
        <style:tab-stops>
          <style:tab-stop style:position="3.4063in"/>
        </style:tab-stops>
      </style:paragraph-properties>
      <style:text-properties fo:font-size="2pt" style:font-size-asian="2pt" style:font-name-complex="Calibri1" style:font-size-complex="2pt"/>
    </style:style>
    <style:style style:name="P15" style:family="paragraph" style:parent-style-name="Standard">
      <style:paragraph-properties>
        <style:tab-stops>
          <style:tab-stop style:position="3.4063in"/>
        </style:tab-stops>
      </style:paragraph-properties>
      <style:text-properties fo:font-weight="bold" style:font-weight-asian="bold" style:font-name-complex="Calibri1"/>
    </style:style>
    <style:style style:name="P16"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1" style:font-size-complex="4pt"/>
    </style:style>
    <style:style style:name="P17" style:family="paragraph" style:parent-style-name="Standard">
      <style:paragraph-properties>
        <style:tab-stops>
          <style:tab-stop style:position="4.8126in"/>
        </style:tab-stops>
      </style:paragraph-properties>
      <style:text-properties fo:font-size="2pt" fo:font-weight="bold" style:font-size-asian="2pt" style:font-weight-asian="bold" style:font-name-complex="Calibri1" style:font-size-complex="2pt"/>
    </style:style>
    <style:style style:name="P18" style:family="paragraph" style:parent-style-name="Standard">
      <style:paragraph-properties fo:text-align="center" style:justify-single-word="false"/>
      <style:text-properties style:font-name="Calibri" fo:font-size="16pt" fo:language="en" fo:country="GB" fo:font-weight="bold" style:font-size-asian="16pt" style:font-weight-asian="bold" style:font-size-complex="16pt"/>
    </style:style>
    <style:style style:name="P19" style:family="paragraph" style:parent-style-name="Standard">
      <style:text-properties style:font-name="Calibri" fo:language="en" fo:country="GB"/>
    </style:style>
    <style:style style:name="P20" style:family="paragraph" style:parent-style-name="Standard">
      <style:text-properties style:font-name="Calibri" fo:font-size="16pt" fo:language="en" fo:country="GB" fo:font-weight="bold" style:font-size-asian="16pt" style:font-weight-asian="bold" style:font-size-complex="16pt"/>
    </style:style>
    <style:style style:name="P21" style:family="paragraph" style:parent-style-name="Heading_20_1">
      <style:paragraph-properties fo:text-indent="-0.248in" style:auto-text-indent="false" fo:break-before="page"/>
    </style:style>
    <style:style style:name="P22" style:family="paragraph" style:parent-style-name="Standard">
      <style:paragraph-properties fo:margin-top="0in" fo:margin-bottom="0.0835in" style:contextual-spacing="false"/>
    </style:style>
    <style:style style:name="P23" style:family="paragraph" style:parent-style-name="Standard">
      <style:paragraph-properties fo:margin-top="0.0555in" fo:margin-bottom="0in" style:contextual-spacing="false" fo:text-align="center" style:justify-single-word="false"/>
    </style:style>
    <style:style style:name="P24" style:family="paragraph" style:parent-style-name="Standard">
      <style:paragraph-properties fo:margin-top="0in" fo:margin-bottom="0in" style:contextual-spacing="false" style:line-height-at-least="0in"/>
      <style:text-properties fo:font-size="1pt" style:font-size-asian="1pt"/>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margin-top="0.1665in" fo:margin-bottom="0.0835in" style:contextual-spacing="false"/>
      <style:text-properties fo:language="en" fo:country="US" fo:font-style="italic" fo:font-weight="bold" style:font-style-asian="italic" style:font-weight-asian="bold" style:font-style-complex="italic" style:font-weight-complex="bold"/>
    </style:style>
    <style:style style:name="P27" style:family="paragraph" style:parent-style-name="Standard">
      <style:paragraph-properties fo:margin-top="0.1665in" fo:margin-bottom="0.0835in" style:contextual-spacing="false"/>
    </style:style>
    <style:style style:name="P28" style:family="paragraph" style:parent-style-name="Standard">
      <style:paragraph-properties fo:margin-top="0.0835in" fo:margin-bottom="0in" style:contextual-spacing="false" fo:text-align="center" style:justify-single-word="false"/>
    </style:style>
    <style:style style:name="P29" style:family="paragraph" style:parent-style-name="Standard">
      <style:paragraph-properties fo:margin-top="0.0835in" fo:margin-bottom="0in" style:contextual-spacing="false"/>
    </style:style>
    <style:style style:name="P30" style:family="paragraph" style:parent-style-name="Standard">
      <style:paragraph-properties fo:margin-top="0.0835in" fo:margin-bottom="0.0835in" style:contextual-spacing="false" fo:text-align="left" style:justify-single-word="false" fo:orphans="2" fo:widows="2" fo:keep-with-next="always"/>
      <style:text-properties fo:font-weight="bold" style:letter-kerning="false" style:font-name-asian="Times New Roman1" style:font-weight-asian="bold" style:font-name-complex="Times New Roman1" style:language-complex="ar" style:country-complex="SA"/>
    </style:style>
    <style:style style:name="P31" style:family="paragraph" style:parent-style-name="Standard">
      <style:paragraph-properties fo:margin-top="0.0835in" fo:margin-bottom="0.0835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32" style:family="paragraph" style:parent-style-name="Standard">
      <style:paragraph-properties fo:margin-top="0.0835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3" style:family="paragraph" style:parent-style-name="Standard">
      <style:paragraph-properties fo:margin-top="0.0835in" fo:margin-bottom="0.0835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4" style:family="paragraph" style:parent-style-name="Standard">
      <style:paragraph-properties fo:margin-top="0.0835in" fo:margin-bottom="0in" style:contextual-spacing="false" fo:text-align="left" style:justify-single-word="false" fo:orphans="2" fo:widows="2">
        <style:tab-stops>
          <style:tab-stop style:position="1.4583in"/>
        </style:tab-stops>
      </style:paragraph-properties>
      <style:text-properties style:letter-kerning="false" style:font-name-asian="Times New Roman1" style:font-name-complex="Times New Roman1" style:language-complex="ar" style:country-complex="SA"/>
    </style:style>
    <style:style style:name="P35"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36" style:family="paragraph" style:parent-style-name="Standard">
      <style:paragraph-properties fo:margin-top="0.0835in" fo:margin-bottom="0in" style:contextual-spacing="false" fo:text-align="left" style:justify-single-word="false" fo:orphans="2" fo:widows="2" fo:text-indent="0.4917in" style:auto-text-indent="false"/>
      <style:text-properties style:letter-kerning="false" style:font-name-asian="Times New Roman1" style:font-name-complex="Times New Roman1" style:language-complex="ar" style:country-complex="SA"/>
    </style:style>
    <style:style style:name="P37" style:family="paragraph" style:parent-style-name="Standard">
      <style:paragraph-properties fo:margin-top="0.0835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38" style:family="paragraph" style:parent-style-name="List_20_Paragraph" style:list-style-name="WWNum26"/>
    <style:style style:name="P39" style:family="paragraph" style:parent-style-name="List_20_Paragraph">
      <style:paragraph-properties fo:margin-left="0.248in" fo:margin-top="0.0835in" fo:margin-bottom="0in" style:contextual-spacing="false"/>
    </style:style>
    <style:style style:name="P40" style:family="paragraph" style:parent-style-name="List_20_Paragraph">
      <style:paragraph-properties fo:margin-left="0.25in">
        <style:tab-stops>
          <style:tab-stop style:position="2.1457in"/>
        </style:tab-stops>
      </style:paragraph-properties>
    </style:style>
    <style:style style:name="P41" style:family="paragraph" style:parent-style-name="Standard">
      <style:paragraph-properties fo:margin-top="0.0835in" fo:margin-bottom="0in" style:contextual-spacing="false" fo:text-indent="0.4925in" style:auto-text-indent="false"/>
    </style:style>
    <style:style style:name="P42" style:family="paragraph" style:parent-style-name="Standard">
      <style:paragraph-properties fo:margin-left="0.25in" fo:margin-top="0.0835in" fo:margin-bottom="0in" style:contextual-spacing="false"/>
    </style:style>
    <style:style style:name="P43" style:family="paragraph" style:parent-style-name="List_20_Paragraph">
      <style:paragraph-properties fo:margin-left="0.4925in" fo:margin-top="0.0835in" fo:margin-bottom="0in" style:contextual-spacing="false"/>
    </style:style>
    <style:style style:name="P44" style:family="paragraph" style:parent-style-name="List_20_Paragraph">
      <style:paragraph-properties>
        <style:tab-stops>
          <style:tab-stop style:position="2.5728in"/>
        </style:tab-stops>
      </style:paragraph-properties>
    </style:style>
    <style:style style:name="P45" style:family="paragraph" style:parent-style-name="List_20_Paragraph">
      <style:text-properties fo:language="en" fo:country="GB"/>
    </style:style>
    <style:style style:name="P46" style:family="paragraph" style:parent-style-name="List_20_Paragraph">
      <style:paragraph-properties fo:margin-left="0.25in"/>
    </style:style>
    <style:style style:name="P47" style:family="paragraph" style:parent-style-name="List_20_Paragraph" style:list-style-name="WWNum25">
      <style:paragraph-properties fo:margin-top="0.1665in" fo:margin-bottom="0in" style:contextual-spacing="false"/>
    </style:style>
    <style:style style:name="P48" style:family="paragraph" style:parent-style-name="List_20_Paragraph" style:list-style-name="WWNum25">
      <style:paragraph-properties fo:margin-top="0.0835in" fo:margin-bottom="0in" style:contextual-spacing="false"/>
    </style:style>
    <style:style style:name="P49" style:family="paragraph" style:parent-style-name="List_20_Paragraph">
      <style:paragraph-properties fo:margin-left="1in" fo:margin-top="0.0835in" fo:margin-bottom="0in" style:contextual-spacing="false"/>
    </style:style>
    <style:style style:name="P50" style:family="paragraph" style:parent-style-name="List_20_Paragraph">
      <style:paragraph-properties fo:margin-left="0.9835in" fo:margin-top="0.0835in" fo:margin-bottom="0in" style:contextual-spacing="false"/>
    </style:style>
    <style:style style:name="P51" style:family="paragraph" style:parent-style-name="Standard">
      <style:paragraph-properties fo:margin-top="0.0835in" fo:margin-bottom="0in" style:contextual-spacing="false">
        <style:tab-stops>
          <style:tab-stop style:position="1.3283in"/>
        </style:tab-stops>
      </style:paragraph-properties>
    </style:style>
    <style:style style:name="P52" style:family="paragraph" style:parent-style-name="Standard">
      <style:paragraph-properties fo:margin-left="0.25in"/>
    </style:style>
    <style:style style:name="P53" style:family="paragraph" style:parent-style-name="List_20_Paragraph" style:list-style-name="WWNum25">
      <style:paragraph-properties fo:margin-left="0.4957in" fo:margin-top="0.1665in" fo:margin-bottom="0in" style:contextual-spacing="false" fo:text-indent="-0.248in" style:auto-text-indent="false"/>
    </style:style>
    <style:style style:name="P54" style:family="paragraph" style:parent-style-name="List_20_Paragraph" style:list-style-name="WWNum25">
      <style:paragraph-properties fo:margin-left="0.9957in" fo:margin-top="0.1665in" fo:margin-bottom="0in" style:contextual-spacing="false" fo:text-indent="-0.248in" style:auto-text-indent="false"/>
    </style:style>
    <style:style style:name="P55" style:family="paragraph" style:parent-style-name="List_20_Paragraph" style:list-style-name="WWNum25">
      <style:paragraph-properties fo:margin-left="0.9957in" fo:margin-top="0.0835in" fo:margin-bottom="0in" style:contextual-spacing="false" fo:text-indent="-0.248in" style:auto-text-indent="false"/>
    </style:style>
    <style:style style:name="P56" style:family="paragraph" style:parent-style-name="List_20_Paragraph" style:list-style-name="WWNum33">
      <style:paragraph-properties fo:margin-top="0.0835in" fo:margin-bottom="0in" style:contextual-spacing="false"/>
    </style:style>
    <style:style style:name="P57" style:family="paragraph" style:parent-style-name="List_20_Paragraph" style:list-style-name="WWNum33">
      <style:paragraph-properties fo:margin-top="0.1665in" fo:margin-bottom="0in" style:contextual-spacing="false"/>
    </style:style>
    <style:style style:name="P58" style:family="paragraph" style:parent-style-name="List_20_Paragraph">
      <style:paragraph-properties fo:margin-top="0.1665in" fo:margin-bottom="0in" style:contextual-spacing="false"/>
    </style:style>
    <style:style style:name="P59" style:family="paragraph" style:parent-style-name="Standard">
      <style:paragraph-properties>
        <style:tab-stops>
          <style:tab-stop style:position="4.4165in"/>
        </style:tab-stops>
      </style:paragraph-properties>
    </style:style>
    <style:style style:name="P60" style:family="paragraph" style:parent-style-name="Standard">
      <style:text-properties style:font-name-complex="Calibri1"/>
    </style:style>
    <style:style style:name="P61" style:family="paragraph" style:parent-style-name="Standard">
      <style:text-properties fo:language="en" fo:country="US" style:font-name-complex="Calibri1"/>
    </style:style>
    <style:style style:name="P62" style:family="paragraph" style:parent-style-name="Standard">
      <style:paragraph-properties>
        <style:tab-stops>
          <style:tab-stop style:position="4.5472in"/>
        </style:tab-stops>
      </style:paragraph-properties>
    </style:style>
    <style:style style:name="P63" style:family="paragraph" style:parent-style-name="Standard">
      <style:text-properties fo:font-weight="bold" style:font-weight-asian="bold" style:font-name-complex="Calibri1"/>
    </style:style>
    <style:style style:name="P64"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fo:font-style="italic" style:letter-kerning="false" style:font-name-asian="Times New Roman1" style:font-style-asian="italic" style:font-name-complex="Calibri1" style:language-complex="ar" style:country-complex="SA"/>
    </style:style>
    <style:style style:name="P65" style:family="paragraph" style:parent-style-name="Heading_20_3">
      <style:paragraph-properties>
        <style:tab-stops>
          <style:tab-stop style:position="0.4374in"/>
        </style:tab-stops>
      </style:paragraph-properties>
    </style:style>
    <style:style style:name="P66" style:family="paragraph" style:parent-style-name="Heading_20_3">
      <style:paragraph-properties>
        <style:tab-stops>
          <style:tab-stop style:position="0.3752in"/>
          <style:tab-stop style:position="0.4374in"/>
        </style:tab-stops>
      </style:paragraph-properties>
    </style:style>
    <style:style style:name="P67" style:family="paragraph" style:parent-style-name="Standard">
      <style:paragraph-properties>
        <style:tab-stops>
          <style:tab-stop style:position="1.4016in"/>
        </style:tab-stops>
      </style:paragraph-properties>
    </style:style>
    <style:style style:name="P68" style:family="paragraph" style:parent-style-name="Standard">
      <style:paragraph-properties fo:margin-left="0.4917in">
        <style:tab-stops>
          <style:tab-stop style:position="1.4016in"/>
        </style:tab-stops>
      </style:paragraph-properties>
    </style:style>
    <style:style style:name="P69" style:family="paragraph" style:parent-style-name="List_20_Paragraph" style:list-style-name="WWNum31"/>
    <style:style style:name="P70" style:family="paragraph" style:parent-style-name="Standard">
      <style:paragraph-properties fo:margin-left="0.4917in"/>
    </style:style>
    <style:style style:name="P71"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style:font-size-asian="16pt"/>
    </style:style>
    <style:style style:name="T6" style:family="text">
      <style:text-properties fo:font-size="11pt" fo:font-style="italic" style:font-size-asian="11pt" style:font-style-asian="italic"/>
    </style:style>
    <style:style style:name="T7" style:family="text">
      <style:text-properties style:font-name="Calibri"/>
    </style:style>
    <style:style style:name="T8" style:family="text">
      <style:text-properties fo:font-size="20pt" fo:font-weight="bold" style:font-size-asian="20pt" style:font-weight-asian="bold" style:font-name-complex="Calibri1" style:font-size-complex="20pt"/>
    </style:style>
    <style:style style:name="T9" style:family="text">
      <style:text-properties style:font-name-complex="Calibri1"/>
    </style:style>
    <style:style style:name="T10" style:family="text">
      <style:text-properties fo:font-size="8pt" style:font-size-asian="8pt" style:font-name-complex="Calibri1" style:font-size-complex="8pt"/>
    </style:style>
    <style:style style:name="T11" style:family="text">
      <style:text-properties fo:font-weight="bold" style:font-weight-asian="bold" style:font-name-complex="Calibri1"/>
    </style:style>
    <style:style style:name="T12" style:family="text">
      <style:text-properties fo:font-size="4pt" style:font-size-asian="4pt" style:font-name-complex="Calibri1" style:font-size-complex="4pt"/>
    </style:style>
    <style:style style:name="T13" style:family="text">
      <style:text-properties fo:font-size="30pt" fo:font-weight="bold" style:font-size-asian="30pt" style:font-weight-asian="bold" style:font-name-complex="Calibri1" style:font-size-complex="30pt"/>
    </style:style>
    <style:style style:name="T14"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15" style:family="text">
      <style:text-properties fo:font-style="italic" style:font-style-asian="italic" style:font-name-complex="Calibri1"/>
    </style:style>
    <style:style style:name="T16" style:family="text">
      <style:text-properties fo:font-size="2pt" style:font-size-asian="2pt" style:font-name-complex="Calibri1" style:font-size-complex="2pt"/>
    </style:style>
    <style:style style:name="T17" style:family="text">
      <style:text-properties fo:font-size="4pt" fo:font-weight="bold" style:font-size-asian="4pt" style:font-weight-asian="bold" style:font-name-complex="Calibri1" style:font-size-complex="4pt"/>
    </style:style>
    <style:style style:name="T18" style:family="text">
      <style:text-properties fo:font-size="36pt" fo:font-weight="bold" style:font-size-asian="36pt" style:font-weight-asian="bold" style:font-name-complex="Calibri1" style:font-size-complex="36pt"/>
    </style:style>
    <style:style style:name="T19"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20" style:family="text">
      <style:text-properties fo:font-size="2pt" fo:font-weight="bold" style:font-size-asian="2pt" style:font-weight-asian="bold" style:font-name-complex="Calibri1" style:font-size-complex="2pt"/>
    </style:style>
    <style:style style:name="T21" style:family="text">
      <style:text-properties style:font-name="Calibri" fo:font-size="16pt" fo:language="en" fo:country="GB" fo:font-weight="bold" style:font-size-asian="16pt" style:font-weight-asian="bold" style:font-size-complex="16pt"/>
    </style:style>
    <style:style style:name="T22" style:family="text">
      <style:text-properties fo:font-family="Calibri" style:font-family-generic="roman" style:font-pitch="variable"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23"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24" style:family="text">
      <style:text-properties text:display="true"/>
    </style:style>
    <style:style style:name="T25" style:family="text">
      <style:text-properties fo:font-family="Calibri" style:font-family-generic="roman" style:font-pitch="variable"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26" style:family="text">
      <style:text-properties fo:language="fr" fo:country="FR"/>
    </style:style>
    <style:style style:name="T27"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28" style:family="text">
      <style:text-properties fo:font-family="Calibri" style:font-family-generic="roman" style:font-pitch="variable"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29"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30" style:family="text">
      <style:text-properties style:font-name="Calibri" fo:language="en" fo:country="GB"/>
    </style:style>
    <style:style style:name="T31" style:family="text">
      <style:text-properties fo:font-size="20pt" fo:language="fr" fo:country="FR" style:font-size-asian="20pt" style:font-size-complex="20pt"/>
    </style:style>
    <style:style style:name="T32" style:family="text">
      <style:text-properties fo:language="fr" fo:country="FR" fo:font-style="italic" fo:font-weight="bold" style:font-style-asian="italic" style:font-weight-asian="bold"/>
    </style:style>
    <style:style style:name="T33" style:family="text">
      <style:text-properties fo:font-size="20pt" fo:language="fr" fo:country="FR" fo:font-weight="bold" style:font-size-asian="20pt" style:font-weight-asian="bold" style:font-size-complex="20pt" style:font-weight-complex="bold"/>
    </style:style>
    <style:style style:name="T34" style:family="text">
      <style:text-properties fo:language="en" fo:country="GB" fo:font-style="italic" fo:font-weight="bold" style:font-style-asian="italic" style:font-weight-asian="bold" style:font-style-complex="italic" style:font-weight-complex="bold"/>
    </style:style>
    <style:style style:name="T35" style:family="text">
      <style:text-properties fo:language="en" fo:country="US"/>
    </style:style>
    <style:style style:name="T36" style:family="text">
      <style:text-properties fo:language="en" fo:country="US" fo:font-weight="bold" style:font-weight-asian="bold"/>
    </style:style>
    <style:style style:name="T37" style:family="text">
      <style:text-properties fo:language="en" fo:country="US" style:language-asian="en" style:country-asian="US"/>
    </style:style>
    <style:style style:name="T38" style:family="text">
      <style:text-properties fo:font-size="1pt" style:font-size-asian="1pt"/>
    </style:style>
    <style:style style:name="T39" style:family="text">
      <style:text-properties fo:language="en" fo:country="GB" style:language-asian="en" style:country-asian="GB"/>
    </style:style>
    <style:style style:name="T40" style:family="text">
      <style:text-properties fo:font-weight="bold" style:font-weight-asian="bold"/>
    </style:style>
    <style:style style:name="T41" style:family="text">
      <style:text-properties fo:language="en" fo:country="US" fo:font-style="italic" fo:font-weight="bold" style:font-style-asian="italic" style:font-weight-asian="bold"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language="en" fo:country="GB" fo:font-weight="bold" style:font-weight-asian="bold"/>
    </style:style>
    <style:style style:name="T44" style:family="text">
      <style:text-properties fo:language="en" fo:country="GB" style:font-weight-complex="bold"/>
    </style:style>
    <style:style style:name="T45"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46" style:family="text">
      <style:text-properties fo:language="en" fo:country="GB"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family="'Cambria Math'" style:font-family-generic="roman" style:font-pitch="variable" style:font-family-complex="'Cambria Math'" style:font-family-generic-complex="system" style:font-pitch-complex="variable"/>
    </style:style>
    <style:style style:name="T49" style:family="text">
      <style:text-properties fo:color="#ff0000" loext:opacity="100%"/>
    </style:style>
    <style:style style:name="T50" style:family="text">
      <style:text-properties fo:font-style="italic" style:font-style-asian="italic" style:font-style-complex="italic"/>
    </style:style>
    <style:style style:name="T51" style:family="text">
      <style:text-properties fo:font-family="'Cambria Math'" style:font-family-generic="roman" style:font-pitch="variable" fo:font-style="italic" style:font-style-asian="italic" style:font-family-complex="'Cambria Math'" style:font-family-generic-complex="system" style:font-pitch-complex="variable" style:font-style-complex="italic"/>
    </style:style>
    <style:style style:name="T52" style:family="text">
      <style:text-properties fo:font-style="italic" style:font-style-asian="italic" style:font-name-complex="Calibri1" style:font-style-complex="italic"/>
    </style:style>
    <style:style style:name="T53" style:family="text">
      <style:text-properties fo:font-family="'Cambria Math'" style:font-family-generic="roman" style:font-pitch="variable" fo:font-weight="bold" style:font-weight-asian="bold" style:font-family-complex="'Cambria Math'" style:font-family-generic-complex="system" style:font-pitch-complex="variable"/>
    </style:style>
    <style:style style:name="T54" style:family="text">
      <style:text-properties fo:font-style="italic" style:font-style-asian="italic"/>
    </style:style>
    <style:style style:name="T55" style:family="text">
      <style:text-properties fo:language="en" fo:country="US" style:font-name-complex="Calibri1"/>
    </style:style>
    <style:style style:name="T56" style:family="text">
      <style:text-properties fo:language="en" fo:country="US" fo:font-weight="bold" style:font-weight-asian="bold" style:font-name-complex="Calibri1"/>
    </style:style>
    <style:style style:name="T57" style:family="text">
      <style:text-properties fo:font-style="italic" fo:font-weight="bold" style:font-style-asian="italic" style:font-weight-asian="bold" style:font-name-complex="Calibri1"/>
    </style:style>
    <style:style style:name="T58" style:family="text">
      <style:text-properties fo:language="en" fo:country="US" fo:font-style="italic" style:font-style-asian="italic" style:font-name-complex="Calibri1"/>
    </style:style>
    <style:style style:name="T59" style:family="text">
      <style:text-properties style:font-name="Times" fo:font-size="10pt" style:font-size-asian="10pt" style:language-asian="en" style:country-asian="US"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4"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437in, 1.8874in, 1.0181in, 2.0547in)" draw:luminance="0%" draw:contrast="0%" draw:red="0%" draw:green="0%" draw:blue="0%" draw:gamma="100%" draw:color-inversion="false" draw:image-opacity="100%" draw:color-mode="standard" loext:decorative="false"/>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0" text:anchor-type="as-char" svg:width="5.8063in" svg:height="1.7764in"><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2">Distribution d'application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2" draw:name="Picture 9" text:anchor-type="as-char" svg:width="0.672in" svg:height="0.752in"><draw:image xlink:href="Pictures/100000010000042C000004B0826D13D2.png" xlink:type="simple" xlink:show="embed" xlink:actuate="onLoad" draw:mime-type="image/png"/><svg:desc>Logo

Description automatically generated</svg:desc></draw:frame></text:p>
      <text:p text:style-name="P3" loext:marker-style-name="T3"/>
      <text:p text:style-name="P3" loext:marker-style-name="T3"/>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5" loext:marker-style-name="T4"/>
      <text:p text:style-name="P2" loext:marker-style-name="T5"><text:span text:style-name="T5">Scripture App Builder: Distribution d'applications</text:span><text:span text:style-name="T5"/></text:p>
      <text:p text:style-name="P2"/>
      <text:p text:style-name="P2">© 2026, SIL Global</text:p>
      <text:p text:style-name="P2"/>
      <text:p text:style-name="P2" loext:marker-style-name="T6"><text:span text:style-name="T6">Dernière mise à jour: 30 janvier 2026</text:span><text:span text:style-name="T6"/></text:p>
      <text:p text:style-name="P2"/>
      <text:p text:style-name="P2"/>
      <text:p text:style-name="P2"/>
      <text:p text:style-name="P2"/>
      <text:p text:style-name="P2"/>
      <text:p text:style-name="P2">Vous êtes libre d'imprimer ce manuel pour un usage personnel et pour des ateliers de formation.</text:p>
      <text:p text:style-name="P2"/>
      <text:p text:style-name="P2">La dernière version est disponible sur <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et dans le menu Aide de Scripture App Builder.</text:p>
      <text:p text:style-name="Standard"/>
      <text:p text:style-name="Standard"/>
      <text:p text:style-name="Standard"/>
      <text:p text:style-name="P6" loext:marker-style-name="T7"/>
      <text:p text:style-name="P6" loext:marker-style-name="T7"/>
      <text:p text:style-name="P7" loext:marker-style-name="T8"><text:span text:style-name="T8">Comment utiliser ce manuel</text:span><text:span text:style-name="T8"/></text:p>
      <text:p text:style-name="P8" loext:marker-style-name="T9"/>
      <text:p text:style-name="P9" loext:marker-style-name="T9"><text:span text:style-name="T9">Ce guide contient des notes et des conseils pour vous aider à tirer le meilleur parti du logiciel. Les notes et les conseils apparaîtront sous cette forme:</text:span><text:span text:style-name="T9"/></text:p>
      <text:p text:style-name="P10" loext:marker-style-name="T10"/>
      <text:p text:style-name="P11" loext:marker-style-name="T11"><text:span text:style-name="T11">Remarques :</text:span><text:span text:style-name="T11"/></text:p>
      <text:p text:style-name="P11" loext:marker-style-name="T12"><text:span text:style-name="T12"><text:s/></text:span><text:span text:style-name="T12"/></text:p>
      <table:table table:name="Table1" table:style-name="Table1">
        <table:table-column table:style-name="Table1.A"/>
        <table:table-column table:style-name="Table1.B"/>
        <table:table-row table:style-name="Table1.1">
          <table:table-cell table:style-name="Table1.A1" office:value-type="string">
            <text:p text:style-name="P12" loext:marker-style-name="T13"><text:span text:style-name="T14"></text:span><text:span text:style-name="T13"> </text:span></text:p>
          </table:table-cell>
          <table:table-cell table:style-name="Table1.B1" office:value-type="string">
            <text:p text:style-name="P12" loext:marker-style-name="T15"><text:span text:style-name="T15">Les utilisateurs devront peut-être cliquer sur un message de sécurité pour autoriser l'installation de l'application..</text:span><text:span text:style-name="T15"/></text:p>
            <text:p text:style-name="P13" loext:marker-style-name="T9"/>
          </table:table-cell>
        </table:table-row>
      </table:table>
      <text:p text:style-name="P14" loext:marker-style-name="T16"/>
      <text:p text:style-name="P15" loext:marker-style-name="T11"/>
      <text:p text:style-name="P11" loext:marker-style-name="T11"><text:span text:style-name="T11">Conseils :</text:span><text:span text:style-name="T11"/></text:p>
      <text:p text:style-name="P16" loext:marker-style-name="T17"/>
      <table:table table:name="Table2" table:style-name="Table2">
        <table:table-column table:style-name="Table2.A"/>
        <table:table-column table:style-name="Table2.B"/>
        <table:table-row table:style-name="Table2.1">
          <table:table-cell table:style-name="Table2.A1" office:value-type="string">
            <text:p text:style-name="P12" loext:marker-style-name="T18"><text:span text:style-name="T19"></text:span><text:span text:style-name="T18"> </text:span></text:p>
          </table:table-cell>
          <table:table-cell table:style-name="Table2.B1" office:value-type="string">
            <text:p text:style-name="P12" loext:marker-style-name="T15"><text:span text:style-name="T15">Proposez une variété d'options permettant aux utilisateurs de trouver et d'installer vos applications en fonction des besoins spécifiques des groupes cibles..</text:span><text:span text:style-name="T15"/></text:p>
          </table:table-cell>
        </table:table-row>
      </table:table>
      <text:p text:style-name="P17" loext:marker-style-name="T20"/>
      <text:p text:style-name="P6" loext:marker-style-name="T7"/>
      <text:p text:style-name="P7" loext:marker-style-name="T21"><text:span text:style-name="T21">Contentu</text:span><text:span text:style-name="T21"/></text:p>
      <text:p text:style-name="P18" loext:marker-style-name="T2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2"><text:a xlink:type="simple" xlink:href="#_Toc222208911" text:style-name="Index_20_Link" text:visited-style-name="Index_20_Link"><text:span text:style-name="T4">1.</text:span><text:span text:style-name="T23"><text:tab/></text:span><text:span text:style-name="T4">Introduction</text:span><text:span text:style-name="T24"><text:tab/>5</text:span></text:a></text:p>
          <text:p text:style-name="Contents_20_2" loext:marker-style-name="T25"><text:a xlink:type="simple" xlink:href="#_Toc222208912" text:style-name="Index_20_Link" text:visited-style-name="Index_20_Link"><text:span text:style-name="T26">1.1.</text:span><text:span text:style-name="T27"><text:tab/></text:span><text:span text:style-name="T26">Vérifier que votre application est prête à être publiée.</text:span><text:span text:style-name="T24"><text:tab/>5</text:span></text:a></text:p>
          <text:p text:style-name="Contents_20_2" loext:marker-style-name="T25"><text:a xlink:type="simple" xlink:href="#_Toc222208913" text:style-name="Index_20_Link" text:visited-style-name="Index_20_Link"><text:span text:style-name="T26">1.2.</text:span><text:span text:style-name="T27"><text:tab/></text:span><text:span text:style-name="T26">Options de distribution pour les applications Android</text:span><text:span text:style-name="T24"><text:tab/>5</text:span></text:a></text:p>
          <text:p text:style-name="Contents_20_2" loext:marker-style-name="T25"><text:a xlink:type="simple" xlink:href="#_Toc222208914" text:style-name="Index_20_Link" text:visited-style-name="Index_20_Link"><text:span text:style-name="T26">1.3.</text:span><text:span text:style-name="T27"><text:tab/></text:span><text:span text:style-name="T26">Options de distribution pour les applications iOS</text:span><text:span text:style-name="T24"><text:tab/>6</text:span></text:a></text:p>
          <text:p text:style-name="Contents_20_2" loext:marker-style-name="T25"><text:a xlink:type="simple" xlink:href="#_Toc222208915" text:style-name="Index_20_Link" text:visited-style-name="Index_20_Link"><text:span text:style-name="T26">1.4.</text:span><text:span text:style-name="T27"><text:tab/></text:span><text:span text:style-name="T26">Avantages et inconvénients de chaque méthode de distribution</text:span><text:span text:style-name="T24"><text:tab/>8</text:span></text:a></text:p>
          <text:p text:style-name="Contents_20_1" loext:marker-style-name="T22"><text:a xlink:type="simple" xlink:href="#_Toc222208916" text:style-name="Index_20_Link" text:visited-style-name="Index_20_Link">2.<text:span text:style-name="T23"><text:tab/></text:span>Publication d'applications sur Google Play (à l'aide de la console Play)<text:span text:style-name="T24"><text:tab/>11</text:span></text:a></text:p>
          <text:p text:style-name="Contents_20_1" loext:marker-style-name="T22"><text:a xlink:type="simple" xlink:href="#_Toc222208917" text:style-name="Index_20_Link" text:visited-style-name="Index_20_Link">3.<text:span text:style-name="T23"><text:tab/></text:span>Publication d'applications sur le Google Play Store (à l'aide de Scriptoria)<text:span text:style-name="T24"><text:tab/>15</text:span></text:a></text:p>
          <text:p text:style-name="Contents_20_2" loext:marker-style-name="T25"><text:a xlink:type="simple" xlink:href="#_Toc222208918" text:style-name="Index_20_Link" text:visited-style-name="Index_20_Link">3.1.<text:span text:style-name="T27"><text:tab/></text:span>L’onglet Scriptoria<text:span text:style-name="T24"><text:tab/>15</text:span></text:a></text:p>
          <text:p text:style-name="Contents_20_2" loext:marker-style-name="T25"><text:a xlink:type="simple" xlink:href="#_Toc222208919" text:style-name="Index_20_Link" text:visited-style-name="Index_20_Link">3.2.<text:span text:style-name="T27"><text:tab/></text:span>L’Onglet Fiche Google Play Store<text:span text:style-name="T24"><text:tab/>16</text:span></text:a></text:p>
          <text:p text:style-name="Contents_20_3" loext:marker-style-name="T28"><text:a xlink:type="simple" xlink:href="#_Toc222208920" text:style-name="Index_20_Link" text:visited-style-name="Index_20_Link"><text:span text:style-name="T4">3.2.1.</text:span><text:span text:style-name="T29"><text:tab/></text:span><text:span text:style-name="T4">Gérer les traductions</text:span><text:span text:style-name="T24"><text:tab/>16</text:span></text:a></text:p>
          <text:p text:style-name="Contents_20_3" loext:marker-style-name="T28"><text:a xlink:type="simple" xlink:href="#_Toc222208921" text:style-name="Index_20_Link" text:visited-style-name="Index_20_Link"><text:span text:style-name="T4">3.2.2.</text:span><text:span text:style-name="T29"><text:tab/></text:span><text:span text:style-name="T4">Importer depuis Google Play…</text:span><text:span text:style-name="T24"><text:tab/>17</text:span></text:a></text:p>
          <text:p text:style-name="Contents_20_3" loext:marker-style-name="T28"><text:a xlink:type="simple" xlink:href="#_Toc222208922" text:style-name="Index_20_Link" text:visited-style-name="Index_20_Link">3.2.3.<text:span text:style-name="T29"><text:tab/></text:span>L'onglet Informations sur le produit<text:span text:style-name="T24"><text:tab/>17</text:span></text:a></text:p>
          <text:p text:style-name="Contents_20_3" loext:marker-style-name="T28"><text:a xlink:type="simple" xlink:href="#_Toc222208923" text:style-name="Index_20_Link" text:visited-style-name="Index_20_Link"><text:span text:style-name="T4">3.2.4.</text:span><text:span text:style-name="T29"><text:tab/></text:span><text:span text:style-name="T4">L’onglet </text:span><text:span text:style-name="T3">Nouveautés de cette version</text:span><text:span text:style-name="T24"><text:tab/>18</text:span></text:a></text:p>
          <text:p text:style-name="Contents_20_3" loext:marker-style-name="T28"><text:a xlink:type="simple" xlink:href="#_Toc222208924" text:style-name="Index_20_Link" text:visited-style-name="Index_20_Link"><text:span text:style-name="T4">3.2.5.</text:span><text:span text:style-name="T29"><text:tab/></text:span><text:span text:style-name="T4">L’onglet </text:span><text:span text:style-name="T3">Captures d’écran</text:span><text:span text:style-name="T24"><text:tab/>18</text:span></text:a></text:p>
          <text:p text:style-name="Contents_20_3" loext:marker-style-name="T28"><text:a xlink:type="simple" xlink:href="#_Toc222208925" text:style-name="Index_20_Link" text:visited-style-name="Index_20_Link">3.2.6.<text:span text:style-name="T29"><text:tab/></text:span>Icône haute résolution<text:span text:style-name="T24"><text:tab/>18</text:span></text:a></text:p>
          <text:p text:style-name="Contents_20_3" loext:marker-style-name="T28"><text:a xlink:type="simple" xlink:href="#_Toc222208926" text:style-name="Index_20_Link" text:visited-style-name="Index_20_Link"><text:span text:style-name="T4">3.2.7.</text:span><text:span text:style-name="T29"><text:tab/></text:span><text:span text:style-name="T4">Image de présentation</text:span><text:span text:style-name="T24"><text:tab/>18</text:span></text:a></text:p>
          <text:p text:style-name="Contents_20_2" loext:marker-style-name="T25"><text:a xlink:type="simple" xlink:href="#_Toc222208927" text:style-name="Index_20_Link" text:visited-style-name="Index_20_Link">3.3.<text:span text:style-name="T27"><text:tab/></text:span>L’onglet Scripture Earth<text:span text:style-name="T24"><text:tab/>18</text:span></text:a></text:p>
          <text:p text:style-name="Contents_20_2" loext:marker-style-name="T25"><text:a xlink:type="simple" xlink:href="#_Toc222208928" text:style-name="Index_20_Link" text:visited-style-name="Index_20_Link">3.4.<text:span text:style-name="T27"><text:tab/></text:span>L’onglet Publish Properties<text:span text:style-name="T24"><text:tab/>19</text:span></text:a></text:p>
          <text:p text:style-name="Contents_20_2" loext:marker-style-name="T25"><text:a xlink:type="simple" xlink:href="#_Toc222208929" text:style-name="Index_20_Link" text:visited-style-name="Index_20_Link">3.5.<text:span text:style-name="T27"><text:tab/></text:span>Republier une application<text:span text:style-name="T24"><text:tab/>19</text:span></text:a></text:p>
          <text:p text:style-name="Contents_20_1" loext:marker-style-name="T22"><text:a xlink:type="simple" xlink:href="#_Toc222208930" text:style-name="Index_20_Link" text:visited-style-name="Index_20_Link">4.<text:span text:style-name="T23"><text:tab/></text:span>Distribution d'applications via carte mémoire<text:span text:style-name="T24"><text:tab/>19</text:span></text:a></text:p>
          <text:p text:style-name="Contents_20_1" loext:marker-style-name="T22"><text:a xlink:type="simple" xlink:href="#_Toc222208931" text:style-name="Index_20_Link" text:visited-style-name="Index_20_Link"><text:span text:style-name="T4">5.</text:span><text:span text:style-name="T23"><text:tab/></text:span><text:span text:style-name="T4">Partage d'applications via Bluetooth</text:span><text:span text:style-name="T24"><text:tab/>20</text:span></text:a></text:p>
          <text:p text:style-name="Contents_20_1" loext:marker-style-name="T22"><text:a xlink:type="simple" xlink:href="#_Toc222208932" text:style-name="Index_20_Link" text:visited-style-name="Index_20_Link">6.<text:span text:style-name="T23"><text:tab/></text:span>Partage d'applications par transfert Wi-Fi<text:span text:style-name="T24"><text:tab/>21</text:span></text:a></text:p>
          <text:p text:style-name="Contents_20_1" loext:marker-style-name="T22"><text:a xlink:type="simple" xlink:href="#_Toc222208933" text:style-name="Index_20_Link" text:visited-style-name="Index_20_Link">7.<text:span text:style-name="T23"><text:tab/></text:span>Autres façons de partager le fichier d'installation de votre application<text:span text:style-name="T24"><text:tab/>21</text:span></text:a></text:p>
        </text:index-body>
      </text:table-of-content>
      <text:p text:style-name="P19" loext:marker-style-name="T30"/>
      <text:p text:style-name="P20" loext:marker-style-name="T21"/>
      <text:p text:style-name="P20" loext:marker-style-name="T21"/>
      <text:h text:style-name="P21" text:outline-level="1" loext:marker-style-name="T4"><text:bookmark-start text:name="_Toc222208911"/><text:span text:style-name="T4">Introduction</text:span><text:bookmark-end text:name="_Toc222208911"/><text:span text:style-name="T4"/></text:h>
      <text:h text:style-name="Heading_20_2" text:outline-level="2" loext:marker-style-name="T26"><text:bookmark-start text:name="_Toc222208912"/><text:span text:style-name="T26">Vérifier que votre application est prête à être publiée.</text:span><text:bookmark-end text:name="_Toc222208912"/><text:span text:style-name="T26"/></text:h>
      <table:table table:name="Table3" table:style-name="Table3">
        <table:table-column table:style-name="Table3.A"/>
        <table:table-row table:style-name="Table3.1">
          <table:table-cell table:style-name="Table3.A1" office:value-type="string">
            <text:p text:style-name="Default" loext:marker-style-name="T31"><text:span text:style-name="T26">Avant de distribuer votre application, veuillez utiliser la </text:span><text:span text:style-name="T32">Check-list pour la publication d'une application</text:span><text:span text:style-name="T26"> (disponible via le menu Aide de SAB ou sur le site web de SAB) pour vérifier qu'elle est prête à être publiée.</text:span><text:span text:style-name="T33"> </text:span></text:p>
          </table:table-cell>
        </table:table-row>
      </table:table>
      <text:p text:style-name="Standard"/>
      <text:h text:style-name="Heading_20_2" text:outline-level="2" loext:marker-style-name="T26"><text:bookmark-start text:name="_Toc222208913"/><text:span text:style-name="T26">Options de distribution pour les applications Android</text:span><text:bookmark-end text:name="_Toc222208913"/><text:span text:style-name="T26"/></text:h>
      <text:p text:style-name="Standard">Il existe plusieurs façons de transférer des applications Android vers un smartphone. Ces méthodes incluent des options en ligne et hors ligne: </text:p>
      <text:p text:style-name="Standard"/>
      <text:p text:style-name="P22" loext:marker-style-name="T34"><text:span text:style-name="T34">Distribution en ligne</text:span><text:span text:style-name="T34"/></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 loext:marker-style-name="T35"><draw:frame draw:style-name="fr2" draw:name="Picture 11" text:anchor-type="as-char" svg:width="0.5362in" svg:height="0.6in"><draw:image xlink:href="Pictures/10000001000004770000050079FEEEC3.png" xlink:type="simple" xlink:show="embed" xlink:actuate="onLoad" draw:mime-type="image/png"/><svg:desc>Google Play Icon - Free vector graphic on Pixabay</svg:desc></draw:frame></text:p>
          </table:table-cell>
          <table:table-cell table:style-name="Table4.B1" office:value-type="string">
            <text:p text:style-name="Standard" loext:marker-style-name="T36"><text:span text:style-name="T36">Google Play </text:span><text:span text:style-name="T36"/></text:p>
          </table:table-cell>
          <table:table-cell table:style-name="Table4.B1" table:number-columns-spanned="2" office:value-type="string">
            <text:p text:style-name="Standard">Publiez l'application sur Google Play afin que les utilisateurs puissent la trouver et la télécharger. C'est la plateforme de distribution de la plupart des applications Android.</text:p>
          </table:table-cell>
          <table:covered-table-cell/>
        </table:table-row>
        <table:table-row table:style-name="Table4.1">
          <table:table-cell table:style-name="Table4.B1" office:value-type="string">
            <text:p text:style-name="P23" loext:marker-style-name="T37"><draw:frame draw:style-name="fr2" draw:name="Picture 3" text:anchor-type="as-char" svg:width="0.7291in" svg:height="0.7291in"><draw:image xlink:href="Pictures/10000000000001F4000001F4ABAB9A73.jpg" xlink:type="simple" xlink:show="embed" xlink:actuate="onLoad" draw:mime-type="image/jpeg"/><svg:desc>Amazon.com: Amazon Appstore: Appstore for Android</svg:desc></draw:frame></text:p>
          </table:table-cell>
          <table:table-cell table:style-name="Table4.B1" office:value-type="string">
            <text:p text:style-name="Standard" loext:marker-style-name="T36"><text:span text:style-name="T36">Amazon Appstore</text:span><text:span text:style-name="T36"/></text:p>
          </table:table-cell>
          <table:table-cell table:style-name="Table4.B1" office:value-type="string">
            <text:p text:style-name="Standard">Publiez l'application sur l'Amazon Appstore afin que les utilisateurs puissent la trouver et la télécharger..</text:p>
          </table:table-cell>
          <table:table-cell table:style-name="Table4.D2" office:value-type="string">
            <text:p text:style-name="P24" loext:marker-style-name="T38"/>
          </table:table-cell>
        </table:table-row>
        <table:table-row table:style-name="Table4.3">
          <table:table-cell table:style-name="Table4.B1" office:value-type="string">
            <text:p text:style-name="P25" loext:marker-style-name="T39"><draw:frame draw:style-name="fr2" draw:name="Picture 14" text:anchor-type="as-char" svg:width="0.5744in" svg:height="0.5744in"><draw:image xlink:href="Pictures/10000001000004B0000004B00D994124.png" xlink:type="simple" xlink:show="embed" xlink:actuate="onLoad" draw:mime-type="image/png"/></draw:frame></text:p>
          </table:table-cell>
          <table:table-cell table:style-name="Table4.B1" office:value-type="string">
            <text:p text:style-name="P9" loext:marker-style-name="T36"><text:span text:style-name="T36">Web Sites</text:span><text:span text:style-name="T36"/></text:p>
          </table:table-cell>
          <table:table-cell table:style-name="Table4.B1" office:value-type="string">
            <text:p text:style-name="P9">Publiez le fichier d'installation de l'application (APK) sur votre site web afin que les utilisateurs puissent le trouver et le télécharger. Une fois le fichier téléchargé, il leur suffit d'appuyer dessus pour l'installer.</text:p>
          </table:table-cell>
          <table:table-cell table:style-name="Table4.D3" office:value-type="string">
            <text:p text:style-name="P24" loext:marker-style-name="T38"/>
          </table:table-cell>
        </table:table-row>
        <table:table-row table:style-name="Table4.4">
          <table:table-cell table:style-name="Table4.B1" office:value-type="string">
            <text:p text:style-name="P25"><draw:frame draw:style-name="fr2" draw:name="Picture 16" text:anchor-type="as-char" svg:width="0.7827in" svg:height="0.7937in"><draw:image xlink:href="Pictures/10000001000000D3000000D6F63B3F30.png" xlink:type="simple" xlink:show="embed" xlink:actuate="onLoad" draw:mime-type="image/png"/></draw:frame></text:p>
          </table:table-cell>
          <table:table-cell table:style-name="Table4.B1" office:value-type="string">
            <text:p text:style-name="P9" loext:marker-style-name="T36"><text:span text:style-name="T36">Dropbox, Google Drive, etc.</text:span><text:span text:style-name="T36"/></text:p>
          </table:table-cell>
          <table:table-cell table:style-name="Table4.B1" office:value-type="string">
            <text:p text:style-name="P9">Téléchargez le fichier d'installation de l'application (APK) dans un dossier d'un service de stockage en ligne (comme Dropbox ou Google Drive). Partagez le lien avec d'autres personnes. Une fois le fichier téléchargé, il leur suffit d'appuyer dessus pour l'installer.</text:p>
          </table:table-cell>
          <table:table-cell table:style-name="Table4.D4" office:value-type="string">
            <text:p text:style-name="P24" loext:marker-style-name="T38"/>
          </table:table-cell>
        </table:table-row>
        <table:table-row table:style-name="Table4.5">
          <table:table-cell table:style-name="Table4.B1" office:value-type="string">
            <text:p text:style-name="P25"><draw:frame draw:style-name="fr3" draw:name="Object1" text:anchor-type="as-char" svg:width="0.8335in" svg:height="0.6598in"><draw:object-ole xlink:href="./Obj102" xlink:type="simple" xlink:show="embed" xlink:actuate="onLoad"/><draw:image xlink:href="./ObjectReplacements/Obj102" xlink:type="simple" xlink:show="embed" xlink:actuate="onLoad"/></draw:frame></text:p>
          </table:table-cell>
          <table:table-cell table:style-name="Table4.B1" office:value-type="string">
            <text:p text:style-name="P9" loext:marker-style-name="T36"><text:span text:style-name="T36">E-mail</text:span><text:span text:style-name="T36"/></text:p>
          </table:table-cell>
          <table:table-cell table:style-name="Table4.B1" office:value-type="string">
            <text:p text:style-name="P9">Envoyez le fichier APK directement par e-mail à une ou plusieurs personnes. Enregistrez la pièce jointe sur leur téléphone et appuyez dessus pour installer l'application.</text:p>
          </table:table-cell>
          <table:table-cell table:style-name="Table4.D5" office:value-type="string">
            <text:p text:style-name="P24" loext:marker-style-name="T38"/>
          </table:table-cell>
        </table:table-row>
        <table:table-row table:style-name="Table4.6">
          <table:table-cell table:style-name="Table4.B1" office:value-type="string">
            <text:p text:style-name="P25" loext:marker-style-name="T37"><draw:frame draw:style-name="fr3" draw:name="Object2" text:anchor-type="as-char" svg:width="0.722in" svg:height="0.7016in"><draw:object-ole xlink:href="./Obj103" xlink:type="simple" xlink:show="embed" xlink:actuate="onLoad"/><draw:image xlink:href="./ObjectReplacements/Obj103" xlink:type="simple" xlink:show="embed" xlink:actuate="onLoad"/></draw:frame></text:p>
          </table:table-cell>
          <table:table-cell table:style-name="Table4.B1" office:value-type="string">
            <text:p text:style-name="P9" loext:marker-style-name="T40"><text:span text:style-name="T40">Messagerie sur les réseaux sociaux</text:span><text:span text:style-name="T40"/></text:p>
          </table:table-cell>
          <table:table-cell table:style-name="Table4.B1" office:value-type="string">
            <text:p text:style-name="P9" loext:marker-style-name="T35">Envoyez le fichier APK directement à une ou plusieurs personnes. <text:span text:style-name="T35">Elles pourront cliquer sur le lien pour installer l'application.</text:span><text:span text:style-name="T35"/></text:p>
          </table:table-cell>
          <table:table-cell table:style-name="Table4.D6" office:value-type="string">
            <text:p text:style-name="P24" loext:marker-style-name="T38"/>
          </table:table-cell>
        </table:table-row>
      </table:table>
      <text:p text:style-name="P26" loext:marker-style-name="T41"/>
      <text:p text:style-name="P26" loext:marker-style-name="T41"/>
      <text:p text:style-name="P26" loext:marker-style-name="T41"/>
      <text:p text:style-name="P26" loext:marker-style-name="T41"/>
      <text:p text:style-name="P26" loext:marker-style-name="T41"/>
      <text:p text:style-name="P27" loext:marker-style-name="T42"><text:span text:style-name="T42">Distribution hors ligne</text:span><text:span text:style-name="T42"/></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draw:frame draw:style-name="fr2" draw:name="Picture 5" text:anchor-type="as-char" svg:width="0.7362in" svg:height="0.7362in"><draw:image xlink:href="Pictures/1000000000000258000002582742E9A7.jpg" xlink:type="simple" xlink:show="embed" xlink:actuate="onLoad" draw:mime-type="image/jpeg"/></draw:frame></text:p>
          </table:table-cell>
          <table:table-cell table:style-name="Table5.B1" office:value-type="string">
            <text:p text:style-name="P9" loext:marker-style-name="T40"><text:span text:style-name="T40">Cartes mémoire</text:span><text:span text:style-name="T40"/></text:p>
          </table:table-cell>
          <table:table-cell table:style-name="Table5.B1" office:value-type="string">
            <text:p text:style-name="P9">Copiez le fichier d'installation de l'application (APK) sur des cartes mémoire microSD. Les utilisateurs insèrent la carte dans l'emplacement prévu à cet effet sur leur téléphone, recherchent le fichier APK à l'aide d'une application d'explorateur de fichiers et appuient sur le fichier pour l'installer.</text:p>
          </table:table-cell>
        </table:table-row>
        <table:table-row table:style-name="Table5.1">
          <table:table-cell table:style-name="Table5.B1" office:value-type="string">
            <text:p text:style-name="Standard" loext:marker-style-name="T35"><draw:frame draw:style-name="fr2" draw:name="Picture 4" text:anchor-type="as-char" svg:width="1.1508in" svg:height="0.7264in"><draw:image xlink:href="Pictures/10000000000002D6000001F7BE403E48.jpg" xlink:type="simple" xlink:show="embed" xlink:actuate="onLoad" draw:mime-type="image/jpeg"/></draw:frame></text:p>
          </table:table-cell>
          <table:table-cell table:style-name="Table5.B1" office:value-type="string">
            <text:p text:style-name="Standard" loext:marker-style-name="T36"><text:span text:style-name="T36">Bluetooth </text:span><text:span text:style-name="T36"/></text:p>
          </table:table-cell>
          <table:table-cell table:style-name="Table5.B1" office:value-type="string">
            <text:p text:style-name="Standard">Utilisez le Bluetooth pour transférer l'application de votre téléphone vers un autre téléphone. Une fois que les utilisateurs ont reçu le fichier d'installation de l'application (APK), il leur suffit d'appuyer dessus pour l'installer.</text:p>
          </table:table-cell>
        </table:table-row>
        <table:table-row table:style-name="Table5.1">
          <table:table-cell table:style-name="Table5.B1" office:value-type="string">
            <text:p text:style-name="P2" loext:marker-style-name="T39"><draw:frame draw:style-name="fr2" draw:name="Picture 12" text:anchor-type="as-char" svg:width="0.7134in" svg:height="0.7283in"><draw:image xlink:href="Pictures/10000001000000E3000000E845863480.png" xlink:type="simple" xlink:show="embed" xlink:actuate="onLoad" draw:mime-type="image/png"/></draw:frame></text:p>
          </table:table-cell>
          <table:table-cell table:style-name="Table5.B1" office:value-type="string">
            <text:p text:style-name="Standard" loext:marker-style-name="T40"><text:span text:style-name="T40">Application de transfert Wi-Fi</text:span><text:span text:style-name="T40"/></text:p>
          </table:table-cell>
          <table:table-cell table:style-name="Table5.B1" office:value-type="string">
            <text:p text:style-name="Standard">Transférez l'application d'un téléphone à l'autre, comme avec le Bluetooth, mais en beaucoup plus rapide. Les deux téléphones, celui de l'expéditeur et celui du destinataire, doivent avoir la même application installée, par exemple Send Anywhere, SHAREit ou SHAREit Lite.</text:p>
          </table:table-cell>
        </table:table-row>
        <table:table-row table:style-name="Table5.1">
          <table:table-cell table:style-name="Table5.B1" office:value-type="string">
            <text:p text:style-name="P28" loext:marker-style-name="T39"><draw:frame draw:style-name="fr4" draw:name="Picture 13" text:anchor-type="as-char" svg:width="0.7945in" svg:height="1.2173in"><draw:image xlink:href="Pictures/10000001000002BC000002BCBD18BEDC.png" xlink:type="simple" xlink:show="embed" xlink:actuate="onLoad" draw:mime-type="image/png"/><svg:desc>LIGHTSTREAM WIFI HOTSPOT | Renew Outreach</svg:desc></draw:frame></text:p>
          </table:table-cell>
          <table:table-cell table:style-name="Table5.B1" office:value-type="string">
            <text:p text:style-name="P29" loext:marker-style-name="T43"><text:span text:style-name="T43">Boîtier multimédia Wi-Fi </text:span><text:span text:style-name="T44">(LightStream, ConnectBox, MicroPi, etc.)</text:span></text:p>
          </table:table-cell>
          <table:table-cell table:style-name="Table5.B1" office:value-type="string">
            <text:p text:style-name="Standard">Copiez le fichier d'installation de l'application (APK) dans la mémoire d'un boîtier multimédia Wi-Fi, tel que le LightStream, le ConnectBox ou le MicroPi. Les utilisateurs se connectent à l'appareil Wi-Fi et sélectionnent le fichier à transférer sur leur téléphone. Une fois le fichier transféré, il leur suffit d'appuyer dessus pour l'installer.</text:p>
          </table:table-cell>
        </table:table-row>
      </table:table>
      <text:p text:style-name="Standard"/>
      <text:p text:style-name="Standard"/>
      <text:h text:style-name="Heading_20_2" text:outline-level="2" loext:marker-style-name="T26"><text:bookmark-start text:name="_Toc222208914"/><text:span text:style-name="T26">Options de distribution pour les applications iOS</text:span><text:bookmark-end text:name="_Toc222208914"/><text:span text:style-name="T26"/></text:h>
      <text:p text:style-name="Standard">Pour les applications iOS, la principale méthode de distribution est l'Apple App Store. Il n'est pas possible de distribuer des applications iOS d'un téléphone à l'autre hors lign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 loext:marker-style-name="T35"><draw:frame draw:style-name="fr2" draw:name="Picture 20" text:anchor-type="as-char" svg:width="0.7571in" svg:height="0.7571in"><draw:image xlink:href="Pictures/1000000100000300000003000A4F1D58.png" xlink:type="simple" xlink:show="embed" xlink:actuate="onLoad" draw:mime-type="image/png"/></draw:frame></text:p>
          </table:table-cell>
          <table:table-cell table:style-name="Table6.B1" office:value-type="string">
            <text:p text:style-name="Standard" loext:marker-style-name="T36"><text:span text:style-name="T36">Apple App Store </text:span><text:span text:style-name="T36"/></text:p>
          </table:table-cell>
          <table:table-cell table:style-name="Table6.B1" office:value-type="string">
            <text:p text:style-name="Standard">Publiez l'application sur l'Apple App Store afin que les utilisateurs puissent la trouver et la télécharger. C'est la plateforme de distribution de toutes les applications iOS.</text:p>
          </table:table-cell>
        </table:table-row>
      </table:table>
      <text:p text:style-name="Standard"/>
      <text:p text:style-name="Standard">Lorsque vous testez votre application iOS, il est possible de la partager avec un nombre limité d'appareils connus. Pour plus de détails sur la procédure à suivre, veuillez consulter la documentation relative à l'installation et à la compilation sur Mac.</text:p>
      <text:h text:style-name="Heading_20_2" text:outline-level="2" loext:marker-style-name="T26"><text:span text:style-name="T26"><text:s/></text:span><text:bookmark-start text:name="_Toc222208915"/><text:span text:style-name="T26">Avantages et inconvénients de chaque méthode de distribution</text:span><text:bookmark-end text:name="_Toc222208915"/><text:span text:style-name="T26"/></text:h>
      <text:p text:style-name="P9">Le tableau suivant présente certains des avantages et des inconvénients de chaque méthode de distribution.</text:p>
      <text:p text:style-name="P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 loext:marker-style-name="T40"/>
          </table:table-cell>
          <table:table-cell table:style-name="Table7.A1" office:value-type="string">
            <text:p text:style-name="P31" loext:marker-style-name="T43"><text:span text:style-name="T40">Avantages</text:span><text:span text:style-name="T43"/></text:p>
          </table:table-cell>
          <table:table-cell table:style-name="Table7.A1" office:value-type="string">
            <text:p text:style-name="P31" loext:marker-style-name="T43"><text:span text:style-name="T40">Inconvénients</text:span><text:span text:style-name="T43"/></text:p>
          </table:table-cell>
        </table:table-row>
        <table:table-row table:style-name="Table7.1">
          <table:table-cell table:style-name="Table7.A2" office:value-type="string">
            <text:p text:style-name="P32" loext:marker-style-name="T43"><text:span text:style-name="T43">Google Play</text:span><text:span text:style-name="T43"/></text:p>
          </table:table-cell>
          <table:table-cell table:style-name="Table7.B2" office:value-type="string">
            <text:p text:style-name="P32">Les utilisateurs peuvent trouver l'application en effectuant une recherche sur le Google Play Store (préinstallé sur la plupart des appareils Android).</text:p>
            <text:p text:style-name="P32">Si vous mettez à jour l'application, les utilisateurs recevront automatiquement les mises à jour lors de leur prochaine connexion à Internet.</text:p>
          </table:table-cell>
          <table:table-cell table:style-name="Table7.C2" office:value-type="string">
            <text:p text:style-name="P32">Nécessite une connexion internet.</text:p>
            <text:p text:style-name="P32">Si vous téléchargez l'application sur Google Play vous-même, vous devez créer un compte développeur (frais uniques de 25 $) et vous familiariser avec le processus de publication..</text:p>
            <text:p text:style-name="P32">La taille maximale d'un package d'application Android (AAB) est de 150 Mo..</text:p>
            <text:p text:style-name="P32">Les fichiers audio doivent souvent être hébergés en ligne, ce qui implique des coûts pour l'utilisateur à chaque fois qu'il télécharge ou écoute en streaming un chapitre audio..</text:p>
            <text:p text:style-name="P33">Lorsqu'une application est installée depuis Google Play, elle est optimisée et reconditionnée pour l'appareil spécifique de l'utilisateur. Cela signifie que si vous souhaitez la partager hors ligne avec un ami, elle risque de ne pas contenir tous les éléments nécessaires au bon fonctionnement sur son appareil.</text:p>
          </table:table-cell>
        </table:table-row>
        <table:table-row table:style-name="Table7.1">
          <table:table-cell table:style-name="Table7.A3" office:value-type="string">
            <text:p text:style-name="P32" loext:marker-style-name="T43"><text:span text:style-name="T43">Cartes mémoire</text:span><text:span text:style-name="T43"/></text:p>
            <text:p text:style-name="P32" loext:marker-style-name="T4"><text:span text:style-name="T4">(microSD)</text:span><text:span text:style-name="T4"/></text:p>
          </table:table-cell>
          <table:table-cell table:style-name="Table7.B3" office:value-type="string">
            <text:p text:style-name="P32">Aucune connexion internet n'est nécessaire.</text:p>
            <text:p text:style-name="P32">Aucune restriction sur la taille des fichiers d'application : vous pouvez distribuer des centaines de Mo de fichiers audio intégrés à l'application.</text:p>
            <text:p text:style-name="P34"><text:tab/></text:p>
          </table:table-cell>
          <table:table-cell table:style-name="Table7.C3" office:value-type="string">
            <text:p text:style-name="P32">Les utilisateurs doivent retirer leur carte mémoire actuelle pour insérer la nouvelle, puis copier les fichiers d'une carte mémoire à l'autre..</text:p>
            <text:p text:style-name="P32">Lorsque vous mettez à jour l'application sur Google Play, les utilisateurs qui l'ont installée à partir d'une carte mémoire ne recevront pas les mises à jour automatiques..</text:p>
            <text:p text:style-name="P32">Vous avez besoin d'une stratégie de vente/distribution pour que les cartes mémoire parviennent aux consommateurs.</text:p>
            <text:p text:style-name="P32"/>
          </table:table-cell>
        </table:table-row>
        <table:table-row table:style-name="Table7.1">
          <table:table-cell table:style-name="Table7.A4" office:value-type="string">
            <text:p text:style-name="P32" loext:marker-style-name="T43"><text:span text:style-name="T43">Bluetooth</text:span><text:span text:style-name="T43"/></text:p>
          </table:table-cell>
          <table:table-cell table:style-name="Table7.B4" office:value-type="string">
            <text:p text:style-name="P32">Aucune connexion internet n'est nécessaire.</text:p>
            <text:p text:style-name="P32">Permet aux amis de partager l'application entre eux et favorise sa diffusion virale.</text:p>
          </table:table-cell>
          <table:table-cell table:style-name="Table7.C4" office:value-type="string">
            <text:p text:style-name="P32">Lorsque vous mettez à jour l'application sur Google Play, les utilisateurs qui l'ont installée via Bluetooth ne recevront pas les mises à jour automatiques.</text:p>
            <text:p text:style-name="P32">C'est une méthode lente si vous avez beaucoup de fichiers audio à transférer.</text:p>
            <text:p text:style-name="P32"/>
          </table:table-cell>
        </table:table-row>
        <table:table-row table:style-name="Table7.1">
          <table:table-cell table:style-name="Table7.A5" office:value-type="string">
            <text:p text:style-name="P32" loext:marker-style-name="T40"><text:span text:style-name="T40">Transfert via Wi-Fi</text:span><text:span text:style-name="T40"/></text:p>
            <text:p text:style-name="P35">(par exemple avec les applications Xender ou SHAREit)</text:p>
          </table:table-cell>
          <table:table-cell table:style-name="Table7.B5" office:value-type="string">
            <text:p text:style-name="P32">Aucune connexion internet n'est nécessaire.</text:p>
            <text:p text:style-name="P32">Jusqu'à 40 fois plus rapide que le Bluetooth..</text:p>
            <text:p text:style-name="P32">Permet aux amis de partager l'application entre eux et favorise sa diffusion virale.</text:p>
            <text:p text:style-name="P32">Aucune restriction sur la taille des fichiers de l'application : vous pouvez distribuer des centaines de mégaoctets de fichiers audio et d'images intégrés à l'application.</text:p>
            <text:p text:style-name="P32"/>
          </table:table-cell>
          <table:table-cell table:style-name="Table7.C5" office:value-type="string">
            <text:p text:style-name="P32">Les deux téléphones doivent avoir l'application de transfert Wi-Fi installée..</text:p>
            <text:p text:style-name="P32">Lorsque vous mettez à jour l'application sur Google Play, les utilisateurs qui l'ont installée par transfert Wi-Fi ne recevront pas les mises à jour automatiques.</text:p>
          </table:table-cell>
        </table:table-row>
        <table:table-row table:style-name="Table7.1">
          <table:table-cell table:style-name="Table7.A6" office:value-type="string">
            <text:p text:style-name="P32" loext:marker-style-name="T43"><text:span text:style-name="T43">Téléchargement du site web</text:span><text:span text:style-name="T43"/></text:p>
          </table:table-cell>
          <table:table-cell table:style-name="Table7.B6" office:value-type="string">
            <text:p text:style-name="P32">Aucune restriction sur la taille des fichiers de l'application : vous pouvez distribuer des centaines de mégaoctets de fichiers audio et d'images intégrés à l'application. Vous n'êtes pas limité à une taille maximale de 150 Mo, comme c'est le cas si vous publiez votre application sur Google Play.</text:p>
          </table:table-cell>
          <table:table-cell table:style-name="Table7.C6" office:value-type="string">
            <text:p text:style-name="P32">Nécessite une connexion internet.</text:p>
            <text:p text:style-name="P32">Lorsque vous mettez à jour l'application sur Google Play, les utilisateurs qui ont téléchargé l'application depuis un site web ne recevront pas les mises à jour automatiques.</text:p>
            <text:p text:style-name="P36"/>
          </table:table-cell>
        </table:table-row>
        <table:table-row table:style-name="Table7.1">
          <table:table-cell table:style-name="Table7.A7" office:value-type="string">
            <text:p text:style-name="P32" loext:marker-style-name="T43"><text:span text:style-name="T43">E-mail</text:span><text:span text:style-name="T43"/></text:p>
          </table:table-cell>
          <table:table-cell table:style-name="Table7.B7" office:value-type="string">
            <text:p text:style-name="P32">Permet de partager de nouvelles applications avec des personnes spécifiques.</text:p>
            <text:p text:style-name="P37"/>
          </table:table-cell>
          <table:table-cell table:style-name="Table7.C7" office:value-type="string">
            <text:p text:style-name="P32">Déconseillé si la taille de votre fichier APK dépasse 5 Mo.</text:p>
            <text:p text:style-name="P32">Nécessite une connexion internet.</text:p>
            <text:p text:style-name="P32">Lorsque vous mettez à jour l'application sur Google Play, les utilisateurs ne recevront pas de mises à jour automatiques ; vous devrez donc leur envoyer la dernière version par e-mail.</text:p>
            <text:p text:style-name="P32"/>
          </table:table-cell>
        </table:table-row>
        <table:table-row table:style-name="Table7.1">
          <table:table-cell table:style-name="Table7.A8" office:value-type="string">
            <text:p text:style-name="P32" loext:marker-style-name="T40"><text:span text:style-name="T40">Stockage en nuage</text:span><text:span text:style-name="T40"/></text:p>
            <text:p text:style-name="P32">(Dropbox, Google Drive, etc.)</text:p>
          </table:table-cell>
          <table:table-cell table:style-name="Table7.B8" office:value-type="string">
            <text:p text:style-name="P32">Aucune restriction sur la taille des fichiers de l'application : vous pouvez distribuer des centaines de mégaoctets de fichiers audio et d'images intégrés à l'application. Vous n'êtes pas limité à une taille maximale de 150 Mo, comme c'est le cas si vous publiez votre application sur Google Play.<text:line-break/></text:p>
          </table:table-cell>
          <table:table-cell table:style-name="Table7.C8" office:value-type="string">
            <text:p text:style-name="P32">Nécessite une connexion internet.</text:p>
            <text:p text:style-name="P32">Lorsque vous mettez à jour l'application, les utilisateurs qui l'ont reçue via Dropbox etc. ne bénéficieront pas des mises à jour automatiques.</text:p>
            <text:p text:style-name="P37"/>
          </table:table-cell>
        </table:table-row>
        <table:table-row table:style-name="Table7.1">
          <table:table-cell table:style-name="Table7.A9" office:value-type="string">
            <text:p text:style-name="P32" loext:marker-style-name="T43"><text:span text:style-name="T43">Boîtier multimédia Wi-Fi (</text:span><text:span text:style-name="T4">LightStream, ConnectBox, MicroPi, etc.)</text:span></text:p>
          </table:table-cell>
          <table:table-cell table:style-name="Table7.B9" office:value-type="string">
            <text:p text:style-name="P32">Aucune connexion internet n'est nécessaire.</text:p>
            <text:p text:style-name="P32"/>
          </table:table-cell>
          <table:table-cell table:style-name="Table7.C9" office:value-type="string">
            <text:p text:style-name="P32">Cela nécessite un équipement spécialisé, qui n'est pas toujours disponible localement.</text:p>
            <text:p text:style-name="P32">Lorsque vous mettez à jour l'application sur Google Play, les utilisateurs qui ont téléchargé l'application via un boîtier multimédia Wi-Fi comme Lightstream ne recevront pas les mises à jour automatiques.</text:p>
            <text:p text:style-name="P32"/>
          </table:table-cell>
        </table:table-row>
      </table:table>
      <text:p text:style-name="Standard"/>
      <text:p text:style-name="Standard"/>
      <text:h text:style-name="Heading_20_1" text:outline-level="1"><text:bookmark-start text:name="_Toc222208916"/>Publication d'applications sur Google Play (à l'aide de la console Play)<text:bookmark-end text:name="_Toc222208916"/></text:h>
      <text:p text:style-name="Standard"/>
      <text:p text:style-name="Standard">Veuillez noter que ces instructions ont été traduites de l'anglais et peuvent ne pas correspondre exactement au texte français affiché dans la console Google Play. De plus, Google modifie fréquemment l'ordre et la dénomination des options dans le processus de publication des applications.</text:p>
      <text:p text:style-name="Standard"/>
      <text:p text:style-name="Standard">Pour publier une application Android sur Google Play:</text:p>
      <text:p text:style-name="Standard"/>
      <text:list text:style-name="WWNum26">
        <text:list-item>
          <text:p text:style-name="P38">Sélectionnez <text:span text:style-name="T40">Compiler &gt; Compiler Android App Bundle</text:span> dans le menu de Scripture App Builder pour générer un fichier .aab (Android App Bundle). </text:p>
        </text:list-item>
      </text:list>
      <text:p text:style-name="P39">Il s'agit d'un format différent du fichier APK que vous utilisez pour la distribution hors ligne.</text:p>
      <text:p text:style-name="P39">Pour publier votre application sur Google Play, la taille du fichier AAB ne doit pas dépasser 150 Mo.</text:p>
      <text:p text:style-name="P40"><text:tab/></text:p>
      <text:list text:continue-numbering="true" text:style-name="WWNum26">
        <text:list-item>
          <text:p text:style-name="P38">Accédez à la console Google Play.:</text:p>
        </text:list-item>
      </text:list>
      <text:p text:style-name="P41"><text:a xlink:type="simple" xlink:href="https://play.google.com/apps/publish" text:style-name="Internet_20_link" text:visited-style-name="Visited_20_Internet_20_Link"><text:span text:style-name="Internet_20_link">https://play.google.com/apps/publish</text:span></text:a></text:p>
      <text:p text:style-name="Standard"/>
      <text:list text:continue-numbering="true" text:style-name="WWNum26">
        <text:list-item>
          <text:p text:style-name="P38">Créez un nouveau compte ou connectez-vous avec un compte Google existant. </text:p>
        </text:list-item>
      </text:list>
      <text:p text:style-name="P42">Si c'est la première fois que vous effectuez cette démarche, des frais uniques de 25 dollars américains vous seront facturés pour la création d'un compte développeur Google Play.</text:p>
      <text:p text:style-name="P43">Remarque : Si vous publiez une application au nom d'une organisation et non à titre personnel, nous vous recommandons fortement de créer un nouveau compte Google à cette fin plutôt que d'utiliser votre compte Gmail personnel.</text:p>
      <text:p text:style-name="Standard"/>
      <text:list text:continue-numbering="true" text:style-name="WWNum26">
        <text:list-item>
          <text:p text:style-name="P38">Cliquez sur le bouton « <text:span text:style-name="T40">Créer une application</text:span> » en haut à droite de l'écran.</text:p>
        </text:list-item>
      </text:list>
      <text:p text:style-name="Standard"/>
      <text:list text:continue-numbering="true" text:style-name="WWNum26">
        <text:list-item>
          <text:p text:style-name="P38">Saisissez le nom de l'application et la langue par défaut. Indiquez qu'il s'agit d'une application (et non d'un jeu) et qu'elle est gratuite (et non payante).</text:p>
        </text:list-item>
      </text:list>
      <text:p text:style-name="Standard"/>
      <text:list text:continue-numbering="true" text:style-name="WWNum26">
        <text:list-item>
          <text:p text:style-name="P38">Lisez et vérifiez les déclarations pour confirmer que l'application respecte les conditions générales.</text:p>
        </text:list-item>
      </text:list>
      <text:p text:style-name="List_20_Paragraph"/>
      <text:list text:continue-numbering="true" text:style-name="WWNum26">
        <text:list-item>
          <text:p text:style-name="P38">Cliquez pour accepter les lois américaines sur l'exportation.</text:p>
        </text:list-item>
      </text:list>
      <text:p text:style-name="List_20_Paragraph"/>
      <text:list text:continue-numbering="true" text:style-name="WWNum26">
        <text:list-item>
          <text:p text:style-name="P38">Sélectionnez <text:span text:style-name="T40">Surveiller et améliorer &gt; Politiques et programmes &gt; Contenu de l'application</text:span>. Sous Politique de confidentialité, cliquez sur <text:span text:style-name="T40">Commencer la déclaration</text:span> et indiquez l'URL de la politique de confidentialité de votre application. <text:span text:style-name="T4">Cliquez sur </text:span><text:span text:style-name="T43">Enregistrer</text:span><text:span text:style-name="T4">.</text:span></text:p>
        </text:list-item>
      </text:list>
      <text:p text:style-name="Standard"/>
      <text:list text:continue-numbering="true" text:style-name="WWNum26">
        <text:list-item>
          <text:p text:style-name="P38">Sélectionnez <text:span text:style-name="T40">Surveiller et améliorer &gt; Politiques et programmes &gt; Contenu de l'application</text:span>. Sous <text:span text:style-name="T40">Annonces</text:span>, cliquez sur <text:span text:style-name="T40">Commencer la déclaration</text:span>. Cliquez sur <text:span text:style-name="T40">Non</text:span>, puis sur <text:span text:style-name="T40">Enregistrer</text:span>.</text:p>
        </text:list-item>
      </text:list>
      <text:p text:style-name="P44"><text:tab/></text:p>
      <text:list text:continue-numbering="true" text:style-name="WWNum26">
        <text:list-item>
          <text:p text:style-name="P38" loext:marker-style-name="T4">Sélectionnez <text:span text:style-name="T40">Surveiller et améliorer &gt; Politiques et programmes &gt; Contenu de l'application</text:span>. Sous <text:span text:style-name="T40">Accès à l'application</text:span>, cliquez sur <text:span text:style-name="T40">Commencer la déclaration</text:span>. Sélectionnez le bouton radio correspondant aux fonctionnalités de votre application. <text:span text:style-name="T4">Cliquez sur </text:span><text:span text:style-name="T43">Enregistrer</text:span><text:span text:style-name="T4">.</text:span></text:p>
        </text:list-item>
      </text:list>
      <text:p text:style-name="P45" loext:marker-style-name="T4"/>
      <text:list text:continue-numbering="true" text:style-name="WWNum26">
        <text:list-item>
          <text:p text:style-name="P38">Sélectionnez <text:span text:style-name="T40">Surveiller et améliorer &gt; Politiques et programmes &gt; Contenu de l'application</text:span>. Sélectionnez <text:span text:style-name="T40">Classifications du contenu</text:span> et Démarrer la déclaration. Sélectionnez les classifications appropriées et cliquez sur <text:span text:style-name="T40">Enregistrer</text:span>.<text:line-break/></text:p>
        </text:list-item>
        <text:list-item>
          <text:p text:style-name="P38">Cliquez sur <text:span text:style-name="T40">Créer une application</text:span> en bas de la page.</text:p>
        </text:list-item>
      </text:list>
      <text:p text:style-name="Standard"/>
      <text:list xml:id="list131421885868371" text:continue-numbering="true" text:style-name="WWNum26">
        <text:list-item>
          <text:p text:style-name="P38">Sélectionnez <text:span text:style-name="T40">Croissance</text:span> <text:span text:style-name="T45"></text:span> <text:span text:style-name="T40">Pr</text:span><text:span text:style-name="T11">é</text:span><text:span text:style-name="T40">sence en magasin</text:span> <text:span text:style-name="T45"></text:span> <text:span text:style-name="T40">Fiche principale du magasin</text:span> dans le menu situ<text:span text:style-name="T9">é</text:span> <text:span text:style-name="T9">à</text:span> gauche de l'écran, puis saisissez les informations suivantes:</text:p>
        </text:list-item>
      </text:list>
      <text:p text:style-name="List_20_Paragraph"/>
      <text:p text:style-name="P46" loext:marker-style-name="T46"><text:span text:style-name="T46">Détails de l'application</text:span><text:span text:style-name="T46"/></text:p>
      <text:list text:style-name="WWNum25">
        <text:list-item>
          <text:p text:style-name="P47"><text:span text:style-name="T40">Courte description de l'application (jusqu'à 80 caractères)</text:span></text:p>
        </text:list-item>
        <text:list-item>
          <text:p text:style-name="P48"><text:span text:style-name="T40">Description complète de l'application (jusqu'à 4 000 caractères)</text:span></text:p>
          <text:list>
            <text:list-item>
              <text:p text:style-name="P48">Ces descriptions doivent présenter l'application clairement au public cible, dans la ou les langues les plus appropriées. Mentionnez le pays et les noms des langues alternatives afin d'augmenter les chances que les utilisateurs trouvent l'application lors de leurs recherches sur Google Play. </text:p>
            </text:list-item>
          </text:list>
        </text:list-item>
      </text:list>
      <text:p text:style-name="P49">Google vous encourage à « mettre en avant les points forts de votre application. Partagez des informations intéressantes et captivantes sur votre application pour aider les utilisateurs à comprendre ce qui la rend unique. »</text:p>
      <text:p text:style-name="P49">Vous ne devez pas inclure de témoignages d'utilisateurs, de détails excessifs ni de longues listes de mots-clés. Consultez la page <text:a xlink:type="simple" xlink:href="https://play.google.com/about/storelisting-promotional/metadata/" text:style-name="Internet_20_link" text:visited-style-name="Visited_20_Internet_20_Link"><text:span text:style-name="Internet_20_link">https://play.google.com/about/storelisting-promotional/metadata/</text:span></text:a> <text:s/>pour plus d'informations.</text:p>
      <text:p text:style-name="P50"/>
      <text:p text:style-name="P46" loext:marker-style-name="T46"><text:span text:style-name="T46">Graphique</text:span><text:span text:style-name="T46"/></text:p>
      <text:list xml:id="list131422992535297" text:continue-numbering="true" text:style-name="WWNum25">
        <text:list-item>
          <text:p text:style-name="P47"><text:span text:style-name="T40">Icône de l'application (512 x 512 pixels)</text:span></text:p>
          <text:list>
            <text:list-item>
              <text:p text:style-name="P48">Il doit s'agir de la même image que l'icône de l'application, mais en haute résolution (512 x 512 pixels). Assurez-vous qu'elle soit nette et non floue ; par exemple, il n'est pas recommandé de redimensionner une icône de 144 x 144 pixels pour obtenir une image de 512 x 512 pixels..</text:p>
            </text:list-item>
          </text:list>
        </text:list-item>
        <text:list-item>
          <text:p text:style-name="P47"><text:span text:style-name="T40">Image de présentation (1024 x 500 pixels) </text:span>(Feature graphic)</text:p>
          <text:list>
            <text:list-item>
              <text:p text:style-name="P48">L'image de présentation s'affiche en haut de la page de votre application dans le Play Store. N'incluez aucun texte ni information visuelle importante près des bords de l'image, en particulier dans le tiers inférieur. Essayez de centrer le logo ou les informations au milieu de l'image, horizontalement et verticalement.</text:p>
            </text:list-item>
          </text:list>
        </text:list-item>
        <text:list-item>
          <text:p text:style-name="P47" loext:marker-style-name="T4"><text:span text:style-name="T43">Captures d'écran du téléphone</text:span><text:span text:style-name="T43"/></text:p>
          <text:list>
            <text:list-item>
              <text:p text:style-name="P48">Prenez des captures d'écran de votre téléphone pendant l'utilisation de l'application. La procédure varie selon les téléphones : essayez d'appuyer simultanément sur les boutons Marche/Arrêt et Volume bas, ou sur les boutons Accueil et Volume bas. Vous trouverez les captures d'écran dans le dossier « Images » de votre téléphone..</text:p>
            </text:list-item>
          </text:list>
        </text:list-item>
      </text:list>
      <text:p text:style-name="P50">Vous devez fournir au moins deux captures d'écran de l'application fonctionnant sur un smartphone. Vous pouvez ajouter jusqu'à huit captures d'écran pour chaque type d'appareil : téléphone, tablette 7 pouces et tablette 10 pouces.</text:p>
      <text:p text:style-name="P51"><text:tab/></text:p>
      <text:p text:style-name="P52">Cliquez sur <text:span text:style-name="T40">Enregistrer</text:span> en bas de l'écran lorsque vous avez terminé..</text:p>
      <text:p text:style-name="P29"><text:line-break/></text:p>
      <text:list xml:id="list131422462897986" text:continue-list="list131421885868371" text:style-name="WWNum26">
        <text:list-item>
          <text:p text:style-name="P38">Sélectionnez <text:span text:style-name="T40">Présence en magasin</text:span> <text:s/>&gt; <text:s/><text:span text:style-name="T40">Paramètres du magasin</text:span> dans le menu situé à gauche de l'écran, puis saisissez les informations suivantes.:</text:p>
        </text:list-item>
      </text:list>
      <text:list text:continue-list="list131422992535297" text:style-name="WWNum25">
        <text:list-item>
          <text:p text:style-name="P53" loext:marker-style-name="T4"><text:span text:style-name="T46">Catégorie de l’appli</text:span><text:span text:style-name="T4">:</text:span></text:p>
          <text:list>
            <text:list-item>
              <text:p text:style-name="P48" loext:marker-style-name="T4"><text:span text:style-name="T4">Exemple: Livres et références.</text:span><text:span text:style-name="T4"/></text:p>
            </text:list-item>
          </text:list>
        </text:list-item>
        <text:list-item>
          <text:p text:style-name="P47"><text:span text:style-name="T47">Coordonnées de la fiche produit</text:span>:</text:p>
          <text:list>
            <text:list-item>
              <text:p text:style-name="P48">Adresse e-mail (une adresse e-mail de contact, affichée publiquement avec votre application)</text:p>
              <text:list>
                <text:list-item>
                  <text:p text:style-name="P48">Évitez d'utiliser une adresse e-mail personnelle, telle que john.smith@gmail.com, ou une adresse e-mail professionnelle sans lien avec la publication de vos applications. Il est préférable de créer une nouvelle adresse e-mail spécifiquement pour cet usage.</text:p>
                </text:list-item>
              </text:list>
            </text:list-item>
            <text:list-item>
              <text:p text:style-name="P54">Numéro de téléphone (facultatif)</text:p>
            </text:list-item>
            <text:list-item>
              <text:p text:style-name="P55" loext:marker-style-name="T4"><text:span text:style-name="T4">Site web (</text:span>facultatif<text:span text:style-name="T4">)</text:span></text:p>
            </text:list-item>
          </text:list>
        </text:list-item>
      </text:list>
      <text:p text:style-name="P4" loext:marker-style-name="T4"/>
      <text:p text:style-name="P52">Cliquez sur <text:span text:style-name="T40">Enregistrer</text:span> en bas de l'écran lorsque vous avez terminé.</text:p>
      <text:p text:style-name="Standard"/>
      <text:list text:continue-list="list131422462897986" text:style-name="WWNum26">
        <text:list-item>
          <text:p text:style-name="P38">Sélectionnez <text:span text:style-name="T40">Publication</text:span> <text:span text:style-name="T48">▸</text:span> <text:span text:style-name="T40">Production</text:span> dans le menu situ<text:span text:style-name="T9">é</text:span> <text:span text:style-name="T9">à</text:span> gauche de l'<text:span text:style-name="T9">é</text:span>cran, puis cliquez sur le bouton <text:span text:style-name="T9">«</text:span> <text:span text:style-name="T40">Cr</text:span><text:span text:style-name="T11">é</text:span><text:span text:style-name="T40">er une nouvelle publication</text:span> <text:span text:style-name="T9">»</text:span> en haut <text:span text:style-name="T9">à</text:span> droite de l'<text:span text:style-name="T9">é</text:span>cran.</text:p>
        </text:list-item>
      </text:list>
      <text:p text:style-name="Standard"/>
      <text:list xml:id="list131423021993179" text:continue-numbering="true" text:style-name="WWNum26">
        <text:list-item>
          <text:p text:style-name="P38">Dans la section « App Bundles » de l'écran, téléchargez le fichier Android App Bundle (.aab) de votre application et attribuez un nom à cette version dans le champ ci-dessous.</text:p>
        </text:list-item>
      </text:list>
      <text:p text:style-name="List_20_Paragraph"/>
      <text:p text:style-name="P52" loext:marker-style-name="T4">Si un problème survient avec le fichier AAB que vous téléchargez, un message s'affichera en <text:span text:style-name="T49">rouge</text:span>. <text:span text:style-name="T4">Voici quelques exemples de messages d'erreur possibles :</text:span></text:p>
      <text:list text:style-name="WWNum33">
        <text:list-item>
          <text:p text:style-name="P56"><text:span text:style-name="T50">« Pour les nouvelles applications, les Android App Bundles doivent être signés avec une clé RSA. » – Cela signifie que l'application a été signée avec un ancien fichier de clés, désormais obsolète car non sécurisé. Vous devez créer un nouveau fichier de clés à l'aide de l'assistant Outils </text:span><text:span text:style-name="T51">▸</text:span><text:span text:style-name="T50"> Cr</text:span><text:span text:style-name="T52">é</text:span><text:span text:style-name="T50">er un nouveau fichier de cl</text:span><text:span text:style-name="T52">é</text:span><text:span text:style-name="T50">s et modifier le fichier de cl</text:span><text:span text:style-name="T52">é</text:span><text:span text:style-name="T50">s dans l'onglet Application </text:span><text:span text:style-name="T51">▸</text:span><text:span text:style-name="T50"> Signature de l'application.</text:span></text:p>
        </text:list-item>
        <text:list-item>
          <text:p text:style-name="P57"><text:span text:style-name="T50">« Votre Android App Bundle est signé avec une clé incorrecte. Assurez-vous que votre package d'application est signé avec la bonne clé de signature et réessayez. » – cela signifie que vous avez précédemment utilisé une clé de signature différente pour télécharger votre application.</text:span></text:p>
        </text:list-item>
        <text:list-item>
          <text:p text:style-name="P57" loext:marker-style-name="T50"><text:span text:style-name="T50">« Vous devez utiliser un nom de package différent car « com.example » est réservé. » – Cela signifie que vous devez modifier le nom du package de votre application dans l'onglet « Package de l'application »</text:span>.</text:p>
        </text:list-item>
      </text:list>
      <text:p text:style-name="P58"/>
      <text:list text:continue-list="list131423021993179" text:style-name="WWNum26">
        <text:list-item>
          <text:p text:style-name="P38">Cliquez sur le bouton <text:span text:style-name="T40">Enregistrer</text:span>, puis sur le bouton Examiner la publication en bas à droite de l'écran.</text:p>
        </text:list-item>
      </text:list>
      <text:p text:style-name="P39">S'il reste des étapes à franchir avant le déploiement de votre application, vous les trouverez listées sous « Erreurs, avertissements et messages ». Rendez-vous sur le tableau de bord (en haut du menu à gauche de l'écran) pour accéder aux liens vous permettant de compléter les informations manquantes.</text:p>
      <text:p text:style-name="P39"/>
      <text:list text:continue-numbering="true" text:style-name="WWNum26">
        <text:list-item>
          <text:p text:style-name="P38">Une fois que vous avez fourni toutes les informations manquantes, cliquez sur le bouton « Lancer le déploiement en production » en bas à droite de l'écran. Vous recevrez ensuite des informations supplémentaires concernant la publication de votre application.</text:p>
        </text:list-item>
      </text:list>
      <text:p text:style-name="Standard"/>
      <text:p text:style-name="P52"/>
      <table:table table:name="Table8" table:style-name="Table8">
        <table:table-column table:style-name="Table8.A"/>
        <table:table-column table:style-name="Table8.B"/>
        <table:table-row table:style-name="Table8.1">
          <table:table-cell table:style-name="Table8.A1" office:value-type="string">
            <text:p text:style-name="P12" loext:marker-style-name="T18"><text:span text:style-name="T19"></text:span><text:span text:style-name="T18"> </text:span></text:p>
          </table:table-cell>
          <table:table-cell table:style-name="Table8.B1" office:value-type="string">
            <text:p text:style-name="P12" loext:marker-style-name="T15"><text:span text:style-name="T47">Pour améliorer la visibilité de votre application sur la boutique d'applications, nous vous recommandons de vous familiariser avec les principes de l'optimisation pour les boutiques d'applications (ASO). Pour plus de détails, veuillez consulter le document « App Store Optimization »</text:span>.</text:p>
          </table:table-cell>
        </table:table-row>
      </table:table>
      <text:p text:style-name="P52"/>
      <text:p text:style-name="Standard"/>
      <text:h text:style-name="Heading_20_1" text:outline-level="1"><text:bookmark-start text:name="_Toc222208917"/>Publication d'applications sur le Google Play Store (à l'aide de Scriptoria)<text:bookmark-end text:name="_Toc222208917"/></text:h>
      <table:table table:name="Table9" table:style-name="Table9">
        <table:table-column table:style-name="Table9.A"/>
        <table:table-column table:style-name="Table9.B"/>
        <table:table-row table:style-name="Table9.1">
          <table:table-cell table:style-name="Table9.A1" office:value-type="string">
            <text:p text:style-name="P12" loext:marker-style-name="T13"><text:span text:style-name="T14"></text:span><text:span text:style-name="T13"> </text:span></text:p>
          </table:table-cell>
          <table:table-cell table:style-name="Table9.B1" office:value-type="string">
            <text:p text:style-name="P12" loext:marker-style-name="T15"><text:span text:style-name="T15">Vous trouverez peut-être plus simple et plus efficace d'utiliser le service de publication Scriptoria de SIL. Veuillez noter que Google modifie fréquemment les étapes exactes de publication d'applications ; par conséquent, les instructions fournies dans Scriptoria peuvent ne pas être totalement à jour.</text:span><text:span text:style-name="T15"/></text:p>
            <text:p text:style-name="P13" loext:marker-style-name="T9"/>
          </table:table-cell>
        </table:table-row>
      </table:table>
      <text:p text:style-name="Standard"/>
      <text:p text:style-name="Standard" loext:marker-style-name="T9">Accédez à <text:span text:style-name="T40">Publication </text:span><text:span text:style-name="T53">▸</text:span><text:span text:style-name="T40"> App Store </text:span><text:span text:style-name="T53">▸</text:span><text:span text:style-name="T40"> Publication de l'appli</text:span> dans votre projet d'application sur SAB. Si vous n'avez pas encore acc<text:span text:style-name="T9">è</text:span>s <text:span text:style-name="T9">à</text:span> Scriptoria, cliquez <text:a xlink:type="simple" xlink:href="https://app.scriptoria.io/request-access-for-organization" text:style-name="Internet_20_link" text:visited-style-name="Visited_20_Internet_20_Link"><text:span text:style-name="Internet_20_link">sur le lien pour demander l'acc</text:span><text:span text:style-name="Internet_20_link"><text:span text:style-name="T9">è</text:span></text:span><text:span text:style-name="Internet_20_link">s</text:span></text:a><text:span text:style-name="T9">.</text:span></text:p>
      <text:p text:style-name="P59" loext:marker-style-name="T9"><text:span text:style-name="T9"><text:tab/></text:span><text:span text:style-name="T9"/></text:p>
      <text:p text:style-name="Standard" loext:marker-style-name="T9"><text:span text:style-name="T9">Sous « </text:span><text:span text:style-name="T11">Service de publication d'applis</text:span><text:span text:style-name="T9"> », sélectionnez « </text:span><text:span text:style-name="T11">Nous aimerions utiliser Scriptoria</text:span><text:span text:style-name="T9"> ». Quatre onglets supplémentaires apparaîtront alors à droite de l'onglet «</text:span><text:span text:style-name="T40">Publication de l'appli</text:span><text:span text:style-name="T9">».</text:span></text:p>
      <text:p text:style-name="P60" loext:marker-style-name="T9"/>
      <text:h text:style-name="Heading_20_2" text:outline-level="2"><text:bookmark-start text:name="_Toc220081352"/><text:bookmark-start text:name="_Toc222208918"/>L’onglet <text:span text:style-name="T54">Scriptoria</text:span><text:bookmark-end text:name="_Toc220081352"/><text:bookmark-end text:name="_Toc222208918"/></text:h>
      <text:p text:style-name="P61" loext:marker-style-name="T55"/>
      <text:p text:style-name="Standard" loext:marker-style-name="T11"><text:span text:style-name="T9">Une fois que vous avez reçu la confirmation que vous avez accès à Scriptoria, sélectionnez l'onglet </text:span><text:span text:style-name="T11">Scriptoria</text:span><text:span text:style-name="T9">. Sous « </text:span><text:span text:style-name="T11">Demander Scriptoria</text:span><text:span text:style-name="T9"> », cliquez sur « </text:span><text:span text:style-name="T11">Aller sur le site Scriptoria…</text:span><text:span text:style-name="T9"> »</text:span></text:p>
      <text:p text:style-name="P62" loext:marker-style-name="T11"><text:span text:style-name="T11"><text:tab/></text:span><text:span text:style-name="T11"/></text:p>
      <text:p text:style-name="Standard" loext:marker-style-name="T55"><text:span text:style-name="T9">Une fois sur le site web de Scriptoria, cliquez sur « </text:span><text:span text:style-name="T11">Mes projets</text:span><text:span text:style-name="T9"> » et assurez-vous que votre organisation est bien sélectionnée en haut à gauche de l'écran. Cliquez sur « </text:span><text:span text:style-name="T11">Ajouter projet</text:span><text:span text:style-name="T9"> » en haut à droite. Suivez les instructions pour nommer le projet. Ajoutez le code de langue et une description. Vous devrez sélectionner la page de publication (</text:span><text:span text:style-name="T11">Groupe de projets</text:span><text:span text:style-name="T9">) de votre organisation sur laquelle vous souhaitez publier. Cliquez sur « </text:span><text:span text:style-name="T11">Enregistrer</text:span><text:span text:style-name="T9"> ». Une page dédiée à votre projet s'ouvrira. Le champ « Emplacement du dépôt » se remplira automatiquement après quelques secondes. Une fois cette information affichée, vous pourrez ajouter un </text:span><text:span text:style-name="T11">produit</text:span><text:span text:style-name="T9">. </text:span><text:span text:style-name="T55">Généralement, vous sélectionnerez </text:span><text:span text:style-name="T56">une application Android pour Google Play</text:span><text:span text:style-name="T55">.</text:span></text:p>
      <text:p text:style-name="P61" loext:marker-style-name="T55"/>
      <table:table table:name="Table10" table:style-name="Table10">
        <table:table-column table:style-name="Table10.A"/>
        <table:table-column table:style-name="Table10.B"/>
        <table:table-row table:style-name="Table10.1">
          <table:table-cell table:style-name="Table10.A1" office:value-type="string">
            <text:p text:style-name="P12" loext:marker-style-name="T18"><text:span text:style-name="T19"></text:span><text:span text:style-name="T18"> </text:span></text:p>
          </table:table-cell>
          <table:table-cell table:style-name="Table10.B1" office:value-type="string">
            <text:p text:style-name="P12" loext:marker-style-name="T15"><text:span text:style-name="T15">Sur la page web de Scriptoria, cliquez sur votre icône de profil en haut à droite de la page et sélectionnez « </text:span><text:span text:style-name="T57">Aide</text:span><text:span text:style-name="T15"> ». Vous obtiendrez ainsi des instructions détaillées pour ajouter et supprimer des produits.</text:span></text:p>
          </table:table-cell>
        </table:table-row>
      </table:table>
      <text:p text:style-name="P60" loext:marker-style-name="T9"/>
      <text:p text:style-name="Standard" loext:marker-style-name="T9"><text:span text:style-name="T9">Copiez l'URL du projet et collez-la dans le champ prévu à cet effet dans SAB, sous « </text:span><text:span text:style-name="T11">Préciser l'URL du projet de l'appli</text:span><text:span text:style-name="T9"> ».</text:span></text:p>
      <text:p text:style-name="P60" loext:marker-style-name="T9"/>
      <text:p text:style-name="Standard" loext:marker-style-name="T9"><text:span text:style-name="T9">Dans la section « </text:span><text:span text:style-name="T11">Envoyer les données de l'appli</text:span><text:span text:style-name="T9"> », vous pouvez envoyer les données de votre projet sur Scriptoria en cliquant sur le bouton « </text:span><text:span text:style-name="T11">Envoyer</text:span><text:span text:style-name="T9"> ». Veuillez noter qu'il vous faudra peut-être vous reconnecter en utilisant le bouton « </text:span><text:span text:style-name="T11">Login</text:span><text:span text:style-name="T9"> ».</text:span></text:p>
      <text:p text:style-name="P60" loext:marker-style-name="T9"/>
      <text:p text:style-name="Standard" loext:marker-style-name="T11"><text:span text:style-name="T9">Si vous avez renseigné toutes les informations relatives à la fiche de votre application sur le Play Store (voir l'onglet « </text:span><text:span text:style-name="T11">Fiche Google Play Store</text:span><text:span text:style-name="T9"> »), veillez à cocher l'option « </text:span><text:span text:style-name="T11">Vérifier les informations pour Google Play</text:span><text:span text:style-name="T9"> </text:span><text:span text:style-name="T11">lors de l'envoi</text:span><text:span text:style-name="T9">» des données de l'application.</text:span></text:p>
      <text:p text:style-name="P63" loext:marker-style-name="T11"/>
      <table:table table:name="Table11" table:style-name="Table11">
        <table:table-column table:style-name="Table11.A"/>
        <table:table-column table:style-name="Table11.B"/>
        <table:table-row table:style-name="Table11.1">
          <table:table-cell table:style-name="Table11.A1" office:value-type="string">
            <text:p text:style-name="P12" loext:marker-style-name="T13"><text:span text:style-name="T14"></text:span><text:span text:style-name="T13"> </text:span></text:p>
          </table:table-cell>
          <table:table-cell table:style-name="Table11.B1" office:value-type="string">
            <text:p text:style-name="P12" loext:marker-style-name="T15"><text:span text:style-name="T15">Il est important de faire preuve de prudence lors du téléchargement et du téléversement de fichiers sur Scriptoria. Si le projet est déjà présent sur Scriptoria, assurez-vous que personne d'autre ne l'a téléchargé sur un autre ordinateur et modifié. Si c'est le cas, vous devrez cliquer sur Télécharger pour obtenir la dernière version. Cette étape n'est pas nécessaire si vous créez une entrée de produit Scriptoria pour la première fois.</text:span><text:span text:style-name="T15"/></text:p>
            <text:p text:style-name="P64" loext:marker-style-name="T15"/>
            <text:p text:style-name="P12" loext:marker-style-name="T15"><text:span text:style-name="T15">Si vous travaillez seul sur un projet d'application, vous disposez probablement de la dernière version sur votre ordinateur. Vous pouvez ensuite la téléverser sur Scriptoria (pour y sauvegarder votre projet) à tout moment, jusqu'à ce que vous soyez prêt à la publier. Une fois publiée, il est conseillé de télécharger à nouveau le projet lorsque vous souhaitez apporter des modifications. Effectuez ensuite les modifications, testez-les et enovyez à nouveau le projet. Voir la section « Republier une application ».</text:span><text:span text:style-name="T15"/></text:p>
            <text:p text:style-name="P13" loext:marker-style-name="T9"/>
          </table:table-cell>
        </table:table-row>
      </table:table>
      <text:p text:style-name="P60" loext:marker-style-name="T9"/>
      <text:h text:style-name="Heading_20_2" text:outline-level="2"><text:bookmark text:name="_The_Google_Play"/><text:bookmark-start text:name="_Toc222208919"/>L’Onglet <text:span text:style-name="T54">Fiche Google Play Store</text:span><text:bookmark-end text:name="_Toc222208919"/></text:h>
      <text:p text:style-name="Standard">Vous pouvez utiliser cet onglet pour saisir toutes les informations pertinentes nécessaires à la publication de l'application sur le Play Store, notamment le titre, les descriptions, les captures d'écran et l'image de présentation.</text:p>
      <text:h text:style-name="P65" text:outline-level="3" loext:marker-style-name="T4"><text:bookmark-start text:name="_Toc222208920"/><text:span text:style-name="T4">Gérer les traductions</text:span><text:bookmark-end text:name="_Toc222208920"/><text:span text:style-name="T4"/></text:h>
      <text:p text:style-name="Standard">Cliquez sur ce bouton pour ajouter une ou plusieurs traductions aux informations de la fiche descriptive. Google affiche généralement le Play Store dans la langue sélectionnée par l'utilisateur dans son navigateur. Vous pouvez utiliser la fonction « <text:span text:style-name="T40">Gérer traductions</text:span> » pour fournir une traduction des informations de votre application en plusieurs langues. Ce n'est pas obligatoire, mais si votre public cible utilise plusieurs langues commerciales ou nationales pour lesquelles une traduction est généralement disponible en ligne, vous pouvez soumettre vos propres textes pour vous assurer de leur exactitude.</text:p>
      <text:p text:style-name="Standard"/>
      <text:p text:style-name="Standard">Choisissez les langues de traduction que vous souhaitez ajouter. Le sélecteur de langue les affichera lorsque vous cliquerez sur la flèche de la liste déroulante. Changer de langue chargera un ensemble complet et unique de champs d'information sous les 5 onglets. Vous pouvez ensuite saisir les informations du Play Store pour chaque langue en cliquant sur les différents onglets et en saisissant le texte ou en ajoutant des images.</text:p>
      <text:h text:style-name="P66" text:outline-level="3" loext:marker-style-name="T4"><text:bookmark-start text:name="_Toc220081355"/><text:bookmark-start text:name="_Toc222208921"/><text:span text:style-name="T4">Importer depuis Google Play…</text:span><text:bookmark-end text:name="_Toc220081355"/><text:bookmark-end text:name="_Toc222208921"/><text:span text:style-name="T4"/></text:h>
      <text:p text:style-name="Standard">Cliquez sur ce bouton pour importer les informations du Play Store concernant une application qui a déjà été publiée avant d'être intégrée à Scriptoria.</text:p>
      <text:h text:style-name="Heading_20_3" text:outline-level="3"><text:bookmark-start text:name="_Toc222208922"/>L'onglet Informations sur le produit<text:bookmark-end text:name="_Toc222208922"/></text:h>
      <text:p text:style-name="Standard">Ces champs fournissent à l'utilisateur des informations importantes qui lui permettent de décider s'il souhaite installer l'application ou non. Il est essentiel d'expliquer clairement l'objectif et les fonctionnalités de l'application. Google vérifie que les fonctionnalités mentionnées ici sont bien présentes dans l'application. Apparemment, Google indexe également les mots contenus dans ces champs de texte afin d'améliorer les résultats de recherche sur le Play Store. En pratique, cet aspect n'est pas toujours évident, mais il est néanmoins judicieux de réfléchir aux mots-clés pertinents pour les recherches. Pour plus d'informations, consultez les champs correspondants ci-dessous:</text:p>
      <text:p text:style-name="Standard"/>
      <text:p text:style-name="Standard" loext:marker-style-name="T40"><text:span text:style-name="T40">Titre</text:span><text:span text:style-name="T40"/></text:p>
      <text:p text:style-name="Standard">Il s'agit du titre principal qui s'affiche sur la page de l'application dans le Play Store. Il n'est pas nécessaire qu'il soit identique au nom de l'application qui apparaît sous l'icône. Il est conseillé d'inclure la langue cible de l'application dans le titre, ainsi qu'un ou plusieurs mots descriptifs. Par exemple, pour une application biblique en <text:span text:style-name="T40">wolof</text:span> avec fonction audio, un titre en français pourrait être « Bible Wolof avec audio ». Veuillez noter que la limite est de 30 caractères.</text:p>
      <text:p text:style-name="Standard"/>
      <text:p text:style-name="Standard" loext:marker-style-name="T40"><text:span text:style-name="T40">Brève Description</text:span><text:span text:style-name="T40"/></text:p>
      <text:p text:style-name="Standard" loext:marker-style-name="T4">Ces informations s'affichent sur la page de votre application dans le Google Play Store, sous la rubrique « <text:span text:style-name="T40">À propos de cette application</text:span> ». Elles ne s'affichent pas actuellement sur la page consultée depuis un ordinateur. Utilisez cette description pour fournir à l'utilisateur plus de détails sur votre application, notamment les différentes orthographes du nom dans d'autres langues, le pays cible principal et les ressources spécifiques auxquelles l'utilisateur peut accéder (plans de lecture de la Bible, vidéos, etc.). Veuillez noter que la limite est de 80 caractères.</text:p>
      <text:p text:style-name="P4" loext:marker-style-name="T4"/>
      <text:p text:style-name="Standard" loext:marker-style-name="T40"><text:span text:style-name="T40">Description complète</text:span><text:span text:style-name="T40"/></text:p>
      <text:p text:style-name="Standard" loext:marker-style-name="T4">Ces informations s'affichent sur la page de votre application dans le Google Play Store (version mobile) lorsque vous appuyez sur la flèche à côté de « À propos de cette application ». Elles apparaissent ensuite sous la description courte. Actuellement, il s'agit de la seule information affichée lorsque la page est consultée sur un ordinateur (la description courte n'étant pas visible). Utilisez cette description pour fournir à l'utilisateur des informations plus complètes sur votre application, en précisant par exemple les livres de la Bible inclus (s'il ne s'agit que d'une sélection), la liste des fonctionnalités (verset sur image, surlignage, notes, notifications de rappel, autres ressources bibliques, etc.). <text:span text:style-name="T4">Veuillez noter que la limite est de 4000 caractères.</text:span><text:span text:style-name="T4"/></text:p>
      <text:p text:style-name="P4" loext:marker-style-name="T4"/>
      <table:table table:name="Table12" table:style-name="Table12">
        <table:table-column table:style-name="Table12.A"/>
        <table:table-column table:style-name="Table12.B"/>
        <table:table-row table:style-name="Table12.1">
          <table:table-cell table:style-name="Table12.A1" office:value-type="string">
            <text:p text:style-name="P12" loext:marker-style-name="T18"><text:span text:style-name="T19"></text:span><text:span text:style-name="T18"> </text:span></text:p>
          </table:table-cell>
          <table:table-cell table:style-name="Table12.B1" office:value-type="string">
            <text:p text:style-name="P12" loext:marker-style-name="T58"><text:span text:style-name="T15">Qu'elle soit effectuée par une IA ou par une personne réelle, Google peut apparemment rejeter une candidature si elle contient bien plus qu'une simple description des fonctionnalités de l'application. Par exemple, si votre description inclut des raisons de lire la Bible et l'impact qu'elle peut avoir, elle risque d'être rejetée. </text:span><text:span text:style-name="T58">Cette information est basée sur une expérience personnelle.</text:span></text:p>
          </table:table-cell>
        </table:table-row>
      </table:table>
      <text:h text:style-name="Heading_20_3" text:outline-level="3" loext:marker-style-name="T4"><text:bookmark-start text:name="_Toc220081357"/><text:bookmark-start text:name="_Toc222208923"/><text:span text:style-name="T4">L’onglet </text:span><text:span text:style-name="T3">Nouveautés de cette version</text:span><text:bookmark-end text:name="_Toc220081357"/><text:bookmark-end text:name="_Toc222208923"/></text:h>
      <text:p text:style-name="Standard">Utilisez ce champ pour saisir les informations relatives aux modifications que vous avez apportées depuis la dernière version publiée. Ne remplissez pas ce champ lors de la première publication de votre application. </text:p>
      <text:h text:style-name="Heading_20_3" text:outline-level="3" loext:marker-style-name="T4"><text:bookmark-start text:name="_Toc220081358"/><text:bookmark-start text:name="_Toc222208924"/><text:span text:style-name="T4">L’onglet </text:span><text:span text:style-name="T3">Captures d’écran</text:span><text:bookmark-end text:name="_Toc220081358"/><text:bookmark-end text:name="_Toc222208924"/></text:h>
      <text:p text:style-name="Standard">Vous devez fournir entre 2 et 8 captures d'écran pour la page de publication de votre application. Vous pouvez également ajouter des captures d'écran pour les tablettes, si vous le souhaitez. Privilégiez des captures d'écran qui mettent en valeur les fonctionnalités importantes et attrayantes de votre application. Vous pouvez fournir des captures d'écran différentes pour chacune des langues sélectionnées dans la section « <text:span text:style-name="T40">Gérer traductions</text:span> ». Les captures d'écran améliorées, présentant votre application affichée sur un téléphone avec une image répartie sur plusieurs captures, peuvent être particulièrement efficaces. Plusieurs outils gratuits sont disponibles en ligne pour vous aider à les créer.</text:p>
      <text:h text:style-name="Heading_20_3" text:outline-level="3"><text:bookmark-start text:name="_Toc222208925"/>Icône haute résolution<text:bookmark-end text:name="_Toc222208925"/></text:h>
      <text:p text:style-name="Standard">Cette image est utilisée pour afficher une version plus grande de l'icône de votre application sur la page du Play Store. Vous pouvez sélectionner l'icône dans le dossier <text:span text:style-name="T40">drawable-web</text:span>, situé dans le sous-dossier <text:span text:style-name="T40">data &gt; images</text:span> de votre projet.</text:p>
      <text:h text:style-name="Heading_20_3" text:outline-level="3" loext:marker-style-name="T4"><text:bookmark-start text:name="_Toc222208926"/><text:span text:style-name="T4">Image de présentation</text:span><text:bookmark-end text:name="_Toc222208926"/><text:span text:style-name="T4"/></text:h>
      <text:p text:style-name="Standard">Cette image n'est utilisée que sur la page de publication lorsque le Google Play Store est consulté depuis un navigateur web sur un ordinateur (et non sur un téléphone). Consultez les détails pour connaître les exigences. Il peut s'agir simplement de l'icône de l'application sur un fond avec un nom descriptif, ou d'une image entièrement originale, mais elle doit refléter le design de votre application.</text:p>
      <text:h text:style-name="Heading_20_2" text:outline-level="2"><text:bookmark-start text:name="_Toc220081361"/><text:bookmark-start text:name="_Toc222208927"/>L’onglet <text:span text:style-name="T54">Scripture Earth</text:span><text:bookmark-end text:name="_Toc220081361"/><text:bookmark-end text:name="_Toc222208927"/></text:h>
      <text:p text:style-name="Standard"><text:a xlink:type="simple" xlink:href="https://scriptureearth.org/00fra.php" text:style-name="Internet_20_link" text:visited-style-name="Visited_20_Internet_20_Link"><text:span text:style-name="Internet_20_link">Scripture Earth</text:span></text:a> est un site web qui permet aux utilisateurs de trouver des ressources bibliques en fonction du nom ou du code de la langue. Vous pouvez demander à Scripture Earth d'ajouter un lien vers votre application en saisissant les informations sur cet onglet.</text:p>
      <text:h text:style-name="Heading_20_2" text:outline-level="2"><text:bookmark-start text:name="_Toc220081362"/><text:bookmark-start text:name="_Toc222208928"/>L’onglet <text:span text:style-name="T54">Publish Properties</text:span><text:bookmark-end text:name="_Toc220081362"/><text:bookmark-end text:name="_Toc222208928"/></text:h>
      <text:p text:style-name="Standard">Certains projets Scriptoria peuvent nécessiter des informations supplémentaires à saisir ici. Votre interlocuteur chez Scriptoria vous indiquera si cela est nécessaire.</text:p>
      <text:h text:style-name="Heading_20_2" text:outline-level="2"><text:bookmark-start text:name="_Toc222208929"/>Republier une application<text:bookmark-end text:name="_Toc222208929"/></text:h>
      <text:p text:style-name="P67" loext:marker-style-name="T4">Une fois une application publiée sur le Play Store, sa mise à jour est relativement simple. <text:span text:style-name="T4">Veillez à suivre les étapes suivantes :</text:span><text:span text:style-name="T4"/></text:p>
      <text:p text:style-name="P68">• Téléchargez votre application depuis Scriptoria afin de disposer de la dernière version.</text:p>
      <text:p text:style-name="P68">• Assurez-vous que le code de version de votre application (<text:span text:style-name="T40">Application &gt; APK &gt; Code de version</text:span>) corresponde au code de version affiché sur la page de votre application dans Scriptoria. Cette information est également disponible sur la page Google Console de votre application, sous <text:span text:style-name="T40">Tests et versions &gt; Dernières versions et lots</text:span>. Recherchez le numéro de la dernière version.</text:p>
      <text:p text:style-name="P68">• Incrémentez le numéro de version de votre application (en augmentant le champ numérique qui vous semble le plus approprié en fonction de l'ampleur des modifications).</text:p>
      <text:p text:style-name="P68">• Mettez à jour votre application dans SAB, puis compilez-la et testez-la.</text:p>
      <text:p text:style-name="P68">• Mettez à jour les informations « <text:span text:style-name="T40">Nouveautés de cette version</text:span>» sous.<text:span text:style-name="T40"> Publication &gt; App Store &gt; Fiche Google Play Store &gt; Nouveautés de cette version.</text:span></text:p>
      <text:p text:style-name="P68">• Assurez-vous que les informations de la section « <text:span text:style-name="T40">À propos</text:span> » et les descriptions de la page de publication soient correctes et à jour.</text:p>
      <text:p text:style-name="P68">• Sous <text:span text:style-name="T40">Publication &gt; App Store &gt; Scriptoria</text:span>, sélectionnez <text:span text:style-name="T40">Envoyer</text:span>. Votre application sera alors envoyée à Scriptoria pour être reconstruite et republiée.<text:tab/></text:p>
      <text:h text:style-name="Heading_20_1" text:outline-level="1"><text:bookmark-start text:name="_Toc222208930"/>Distribution d'applications via carte mémoire<text:bookmark-end text:name="_Toc222208930"/></text:h>
      <text:p text:style-name="Standard">Copiez le fichier APK de l'application Android sur des cartes mémoire microSD. Les utilisateurs insèrent la carte dans l'emplacement prévu à cet effet sur leur téléphone, la recherchent à l'aide d'une application d'explorateur de fichiers et appuient sur le fichier APK pour l'installer.</text:p>
      <text:p text:style-name="Standard"/>
      <text:p text:style-name="Standard">La plupart des téléphones sont livrés avec une application d'explorateur de fichiers préinstallée, mais si ce n'est pas le cas, recherchez « Explorateur de fichiers » sur Google Play. Ce type d'application permet de parcourir les fichiers et les dossiers du téléphone, qu'il s'agisse de la mémoire interne ou de la carte mémoire externe.</text:p>
      <text:p text:style-name="Standard"/>
      <text:p text:style-name="Standard">Si vous avez des fichiers audio à distribuer avec l'application, vous pouvez les placer dans un sous-dossier sur la carte mémoire.</text:p>
      <text:p text:style-name="Standard"/>
      <text:p text:style-name="Standard" loext:marker-style-name="T59">Il existe trois principaux problèmes que vous pourriez rencontrer lors de l'installation d'une application à partir d'une carte mémoire:<text:span text:style-name="T59"/></text:p>
      <text:p text:style-name="Standard"/>
      <text:list text:style-name="WWNum31">
        <text:list-item>
          <text:p text:style-name="P69" loext:marker-style-name="T43"><text:span text:style-name="T43">Installation bloquée</text:span><text:span text:style-name="T43"/></text:p>
        </text:list-item>
      </text:list>
      <text:p text:style-name="P70">La plupart des téléphones sont configurés pour n'installer que les applications téléchargées depuis le Google Play Store, et non celles partagées hors ligne via une carte mémoire ou Bluetooth. Dans ce cas, un message « Installation bloquée » s'affiche. Pour résoudre ce problème, accédez à Paramètres &gt; Sécurité (ou Paramètres &gt; Applications) et cochez la case « Sources inconnues ».</text:p>
      <text:p text:style-name="Standard"/>
      <text:list text:continue-numbering="true" text:style-name="WWNum31">
        <text:list-item>
          <text:p text:style-name="P69" loext:marker-style-name="T43"><text:span text:style-name="T43">Manque d'espace</text:span><text:span text:style-name="T43"/></text:p>
        </text:list-item>
      </text:list>
      <text:p text:style-name="P70">Si l'espace de stockage interne de votre téléphone est presque saturé, un message vous indiquera que l'espace disponible est insuffisant. Pour vérifier l'espace de stockage interne, accédez à Paramètres &gt; Carte SD et stockage du téléphone et consultez l'espace disponible sous Stockage interne du téléphone. Il doit être d'au moins 27 Mo. Si l'espace disponible est inférieur à cette valeur, libérez de l'espace en supprimant les applications inutilisées (avec l'autorisation du propriétaire du téléphone, bien entendu). De même, la carte SD doit disposer d'un espace suffisant pour l'installation de l'application et des fichiers audio associés. Vous pouvez vérifier l'espace disponible sur la carte SD dans <text:span text:style-name="T40">Paramètres</text:span> &gt; <text:span text:style-name="T40">Carte SD et stockage</text:span> du téléphone.</text:p>
      <text:p text:style-name="Standard"/>
      <text:list text:continue-numbering="true" text:style-name="WWNum31">
        <text:list-item>
          <text:p text:style-name="P69" loext:marker-style-name="T40"><text:span text:style-name="T40">Problème lors de l'analyse du package.</text:span><text:span text:style-name="T40"/></text:p>
        </text:list-item>
      </text:list>
      <text:p text:style-name="P70" loext:marker-style-name="T4">Si vous rencontrez une erreur lors de l'analyse du package ou si l'installation de l'application se termine en indiquant qu'elle n'a pas pu être installée, cela signifie que le téléphone ne parvient pas à écrire les fichiers sur la carte mémoire. Dans ce cas, retirez la carte mémoire du téléphone, insérez-la dans un ordinateur ou un autre appareil et copiez-y directement les fichiers. Remettez ensuite la carte mémoire dans le téléphone et réessayez l'installation. <text:span text:style-name="T4">Elle devrait fonctionner cette fois-ci.</text:span><text:span text:style-name="T4"/></text:p>
      <text:p text:style-name="P4" loext:marker-style-name="T4"/>
      <text:p text:style-name="P4" loext:marker-style-name="T4"/>
      <text:h text:style-name="Heading_20_1" text:outline-level="1" loext:marker-style-name="T4"><text:bookmark-start text:name="_Toc222208931"/><text:span text:style-name="T4">Partage d'applications via Bluetooth</text:span><text:bookmark-end text:name="_Toc222208931"/><text:span text:style-name="T4"/></text:h>
      <text:p text:style-name="Standard">Utilisez le Bluetooth pour transférer le fichier APK Android de votre téléphone vers un autre téléphone. Une fois le fichier reçu, il suffit de l'ouvrir pour l'installer.</text:p>
      <table:table table:name="Table13" table:style-name="Table13">
        <table:table-column table:style-name="Table13.A"/>
        <table:table-column table:style-name="Table13.B"/>
        <table:table-row table:style-name="Table13.1">
          <table:table-cell table:style-name="Table13.A1" office:value-type="string">
            <text:p text:style-name="P12" loext:marker-style-name="T13"><text:span text:style-name="T14"></text:span><text:span text:style-name="T13"> </text:span></text:p>
          </table:table-cell>
          <table:table-cell table:style-name="Table13.B1" office:value-type="string">
            <text:p text:style-name="P12" loext:marker-style-name="T9"><text:span text:style-name="T15">Veillez à activer l'option permettant de partager le fichier APK de votre application. Accédez à </text:span><text:span text:style-name="T57">Navigation &gt; Tiroir de navigation &gt; Partager application</text:span><text:span text:style-name="T15"> et cochez la case située à côté de « </text:span><text:span text:style-name="T57">Partager le fichier d'installation de l'application</text:span><text:span text:style-name="T15"> ».</text:span></text:p>
          </table:table-cell>
        </table:table-row>
      </table:table>
      <text:p text:style-name="Standard"/>
      <text:p text:style-name="Standard">Si vous avez des fichiers audio à distribuer avec l'application, vous devrez également les transférer.</text:p>
      <text:p text:style-name="Standard"/>
      <text:p text:style-name="Standard" loext:marker-style-name="T40"><text:span text:style-name="T40">Dépannage</text:span><text:span text:style-name="T40"/></text:p>
      <text:p text:style-name="Standard">Certains appareils Android bloquent l'envoi ou la réception de fichiers APK. Ce comportement est similaire à celui de certains systèmes de messagerie qui empêchent l'envoi de fichiers .exe ou .zip pour des raisons de sécurité. Pour contourner ce problème, vous pouvez renommer l'extension du fichier en MP3, l'envoyer, puis la modifier à nouveau en APK avant l'installation.<text:line-break/></text:p>
      <text:p text:style-name="Standard"/>
      <text:h text:style-name="Heading_20_1" text:outline-level="1"><text:bookmark-start text:name="_Toc222208932"/>Partage d'applications par transfert Wi-Fi<text:bookmark-end text:name="_Toc222208932"/></text:h>
      <text:p text:style-name="Standard">Si vous devez transférer des fichiers APK Android volumineux d'un téléphone à l'autre ou si vous avez de nombreux fichiers audio, le Bluetooth peut s'avérer lent. Dans ce cas, une application de transfert Wi-Fi permet d'atteindre des vitesses de transfert jusqu'à 40 fois plus rapides que le Bluetooth.</text:p>
      <text:p text:style-name="Standard"/>
      <text:p text:style-name="Standard">Les deux appareils (le téléphone émetteur et le téléphone récepteur) doivent avoir une application de transfert Wi-Fi installée et le Wi-Fi doit être activé sur les deux.</text:p>
      <text:p text:style-name="Standard"/>
      <text:p text:style-name="Standard">Parmi les applications de transfert Wi-Fi populaires, on trouve :</text:p>
      <text:p text:style-name="Standard">• Xender</text:p>
      <text:p text:style-name="Standard">• SHAREit</text:p>
      <text:p text:style-name="Standard">• SHAREit Lite</text:p>
      <text:p text:style-name="Standard"/>
      <text:p text:style-name="Standard">Si vous hésitez quant à l'application de transfert Wi-Fi à utiliser, n'hésitez pas à demander conseil autour de vous, notamment auprès des jeunes, pour savoir quelle application ils utilisent pour partager du contenu numérique.</text:p>
      <text:p text:style-name="Standard"/>
      <text:h text:style-name="Heading_20_1" text:outline-level="1"><text:bookmark-start text:name="_Toc222208933"/>Autres façons de partager le fichier d'installation de votre application<text:bookmark-end text:name="_Toc222208933"/></text:h>
      <text:p text:style-name="Standard">Il existe plusieurs autres façons de partager le fichier APK de votre application. Vous pouvez l'héberger sur un site web pour que les utilisateurs puissent le télécharger, ou sur un service de stockage en ligne (Google Drive, Dropbox, etc.). Dans ces cas, l'utilisateur pourrait avoir besoin d'aide pour localiser le fichier APK sur son téléphone à l'aide d'une application de gestion de fichiers. Une fois le fichier trouvé, il suffit d'appuyer dessus pour l'installer.</text:p>
      <text:p text:style-name="Standard">Vous pouvez également l'envoyer par e-mail (si sa taille est inférieure à environ 20 Mo) ou via les réseaux sociaux en sélectionnant le fichier APK à partager. Un simple appui sur le fichier APK joint devrait lancer l'installation.</text:p>
      <text:p text:style-name="Standard"/>
      <text:p text:style-name="Standard" loext:marker-style-name="T36"><text:span text:style-name="T36">Dépannage</text:span><text:span text:style-name="T36"/></text:p>
      <text:p text:style-name="Standard">Certains appareils Android bloquent l'envoi et la réception de fichiers APK. Ce comportement est similaire à celui de certains systèmes de messagerie qui empêchent l'envoi de fichiers .exe ou .zip pour des raisons de sécurité. Pour contourner ce problème, vous pouvez renommer l'extension du fichier en MP3, l'envoyer, puis la renommer à nouveau en APK avant l'installation. Il est également possible qu'un avertissement de sécurité s'affiche (que vous pouvez simplement ignor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rmal_20__28_Web_29_" style:display-name="Normal (Web)" style:family="paragraph" style:parent-style-name="Standard">
      <style:text-properties style:font-name="Times" fo:font-family="Times"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size-complex="10pt"/>
    </style:style>
    <style:style style:name="Default" style:family="paragraph">
      <style:paragraph-properties fo:margin-top="0in" fo:margin-bottom="0in" style:contextual-spacing="false" fo:text-align="left" style:justify-single-word="false" fo:orphans="2" fo:widows="2" style:writing-mode="lr-tb"/>
      <style:text-properties fo:color="#000000" loext:opacity="100%" style:font-name="Calibri" fo:font-family="Calibri" style:font-family-generic="swiss" style:font-pitch="variable" fo:font-size="12pt" fo:language="en" fo:country="US" style:font-size-asian="12pt" style:font-name-complex="Calibri1" style:font-family-complex="Calibri"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605e5c" loext:opacity="100%" fo:background-color="#e1dfd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alibri1"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102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0102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102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010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102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0102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102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0102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10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2"><draw:text-box fo:min-height="0in" fo:min-width="0.0161in"><text:p text:style-name="MP1" loext:marker-style-name="Page Number"><text:span text:style-name="Page_20_Number"><text:page-number text:select-page="current">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Distributing Apps</dc:title>
    <meta:initial-creator>Richard Margetts</meta:initial-creator>
    <dc:creator>Richard Margetts</dc:creator>
    <meta:editing-cycles>286</meta:editing-cycles>
    <meta:print-date>2026-01-30T17:54:00</meta:print-date>
    <meta:creation-date>2015-08-15T09:35:00</meta:creation-date>
    <dc:date>2026-02-17T08:23:00</dc:date>
    <meta:editing-duration>P0D</meta:editing-duration>
    <meta:generator>LibreOffice/26.2.3.2$Linux_X86_64 LibreOffice_project/620$Build-2</meta:generator>
    <meta:document-statistic meta:table-count="13" meta:image-count="11" meta:object-count="2" meta:page-count="4" meta:paragraph-count="285" meta:word-count="5461" meta:character-count="35810" meta:non-whitespace-character-count="30638"/>
    <meta:user-defined meta:name="AppVersion">16.0000</meta:user-defined>
    <meta:template xlink:type="simple" xlink:actuate="onRequest" xlink:title="Normal.dotm" xlink:href=""/>
  </office:meta>
</office:document-meta>
</file>