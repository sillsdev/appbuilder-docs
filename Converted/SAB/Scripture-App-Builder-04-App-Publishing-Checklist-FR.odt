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080353264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11in" fo:margin-left="0in" fo:margin-top="0in" fo:margin-bottom="0in" table:align="left" style:writing-mode="lr-tb"/>
    </style:style>
    <style:style style:name="Table1.A" style:family="table-column">
      <style:table-column-properties style:column-width="3.5201in"/>
    </style:style>
    <style:style style:name="Table1.B" style:family="table-column">
      <style:table-column-properties style:column-width="2.74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3896in"/>
    </style:style>
    <style:style style:name="Table2.B" style:family="table-column">
      <style:table-column-properties style:column-width="5.8715in"/>
    </style:style>
    <style:style style:name="Table2.1" style:family="table-row">
      <style:table-row-properties fo:keep-together="auto"/>
    </style:style>
    <style:style style:name="Table2.A1" style:family="table-cell">
      <style:table-cell-properties fo:padding-left="0.075in" fo:padding-right="0.075in" fo:padding-top="0.1181in" fo:padding-bottom="0.1972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3896in"/>
    </style:style>
    <style:style style:name="Table3.B" style:family="table-column">
      <style:table-column-properties style:column-width="5.8715in"/>
    </style:style>
    <style:style style:name="Table3.1" style:family="table-row">
      <style:table-row-properties fo:keep-together="auto"/>
    </style:style>
    <style:style style:name="Table3.A1" style:family="table-cell">
      <style:table-cell-properties fo:padding-left="0.075in" fo:padding-right="0.075in" fo:padding-top="0.1181in" fo:padding-bottom="0.1972in" fo:border="0.5pt solid #000000" style:writing-mode="lr-tb"/>
    </style:style>
    <style:style style:name="P1" style:family="paragraph" style:parent-style-name="Standard">
      <style:paragraph-properties fo:margin-top="0.0417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in" fo:margin-bottom="0in" style:contextual-spacing="false" fo:line-height="100%" fo:text-align="left" style:justify-single-word="false" fo:orphans="2" fo:widows="2"/>
      <style:text-properties style:font-name="Calibri" fo:font-size="11pt" style:letter-kerning="false" style:font-name-asian="Calibri2" style:font-size-asian="11pt" style:language-asian="en" style:country-asian="US" style:font-name-complex="Arial1" style:font-size-complex="11pt" style:language-complex="ar" style:country-complex="SA"/>
    </style:style>
    <style:style style:name="P4" style:family="paragraph" style:parent-style-name="Standard">
      <style:paragraph-properties fo:margin-top="0.25in" fo:margin-bottom="0.1665in" style:contextual-spacing="false"/>
    </style:style>
    <style:style style:name="P5" style:family="paragraph" style:parent-style-name="Standard">
      <style:paragraph-properties fo:margin-top="0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6" style:family="paragraph" style:parent-style-name="Heading_20_1" style:list-style-name="WWNum6">
      <style:paragraph-properties fo:margin-left="0in" fo:margin-top="0in" fo:margin-bottom="0in" style:contextual-spacing="false" fo:text-align="left" style:justify-single-word="false" fo:orphans="2" fo:widows="2" fo:text-indent="0in" style:auto-text-indent="false"/>
      <style:text-properties fo:font-size="11pt" fo:language="en" fo:country="GB" style:letter-kerning="false" style:font-size-asian="11pt" style:language-asian="en" style:country-asian="US" style:language-complex="ar" style:country-complex="SA"/>
    </style:style>
    <style:style style:name="P7" style:family="paragraph" style:parent-style-name="Standard">
      <style:paragraph-properties fo:margin-top="0.166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8" style:family="paragraph" style:parent-style-name="List_20_Paragraph" style:list-style-name="WWNum1">
      <style:paragraph-properties fo:margin-top="0.0417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9" style:family="paragraph" style:parent-style-name="List_20_Paragraph" style:list-style-name="WWNum1">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0" style:family="paragraph" style:parent-style-name="List_20_Paragraph" style:list-style-name="WWNum1">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1" style:family="paragraph" style:parent-style-name="List_20_Paragraph" style:list-style-name="WWNum1">
      <style:paragraph-properties fo:margin-left="0.4957in" fo:margin-top="0.0417in" fo:margin-bottom="0in" style:contextual-spacing="tru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2" style:family="paragraph" style:parent-style-name="List_20_Paragraph" style:list-style-name="WWNum5">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3" style:family="paragraph" style:parent-style-name="List_20_Paragraph" style:list-style-name="WWNum5">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4" style:family="paragraph" style:parent-style-name="List_20_Paragraph" style:list-style-name="WWNum3">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5" style:family="paragraph" style:parent-style-name="List_20_Paragraph" style:list-style-name="WWNum3">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6" style:family="paragraph" style:parent-style-name="List_20_Paragraph" style:list-style-name="WWNum1">
      <style:paragraph-properties fo:margin-top="0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7" style:family="paragraph" style:parent-style-name="Standard">
      <style:paragraph-properties fo:margin-top="0in" fo:margin-bottom="0in" style:contextual-spacing="false" fo:line-height="100%" fo:text-align="left" style:justify-single-word="false" fo:orphans="2" fo:widows="2"/>
      <style:text-properties style:font-name="Calibri" fo:font-size="10pt" fo:language="fr" fo:country="FR" style:letter-kerning="false" style:font-name-asian="Calibri2" style:font-size-asian="10pt" style:language-asian="en" style:country-asian="US" style:font-name-complex="Arial1" style:font-size-complex="11pt" style:language-complex="ar" style:country-complex="SA"/>
    </style:style>
    <style:style style:name="P18" style:family="paragraph" style:parent-style-name="List_20_Paragraph" style:list-style-name="WWNum1">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9" style:family="paragraph" style:parent-style-name="List_20_Paragraph" style:list-style-name="WWNum7">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0" style:family="paragraph" style:parent-style-name="List_20_Paragraph" style:list-style-name="WWNum1">
      <style:paragraph-properties fo:margin-left="0.4957in" fo:margin-top="0.0835in" fo:margin-bottom="0in" style:contextual-spacing="tru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1" style:family="paragraph" style:parent-style-name="Standard">
      <style:paragraph-properties fo:margin-left="0.7118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2" style:family="paragraph" style:parent-style-name="List_20_Paragraph" style:list-style-name="WWNum1">
      <style:paragraph-properties fo:margin-left="0.4957in" fo:margin-top="0.166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3" style:family="paragraph" style:parent-style-name="List_20_Paragraph">
      <style:paragraph-properties fo:margin-left="0.4957in" fo:margin-top="0.111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4" style:family="paragraph" style:parent-style-name="List_20_Paragraph" style:list-style-name="WWNum1">
      <style:paragraph-properties fo:margin-left="0.4957in" fo:margin-top="0.1665in" fo:margin-bottom="0in" style:contextual-spacing="fals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5" style:family="paragraph" style:parent-style-name="List_20_Paragraph">
      <style:paragraph-properties fo:margin-left="0.7118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6" style:family="paragraph" style:parent-style-name="List_20_Paragraph">
      <style:paragraph-properties fo:margin-left="0.4957in" fo:margin-top="0.139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7" style:family="paragraph" style:parent-style-name="Standard">
      <style:paragraph-properties fo:margin-top="0in" fo:margin-bottom="0in" style:contextual-spacing="fals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8" style:family="paragraph" style:parent-style-name="Standard">
      <style:paragraph-properties fo:margin-top="0.0835in" fo:margin-bottom="0in" style:contextual-spacing="fals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9" style:family="paragraph" style:parent-style-name="List_20_Paragraph" style:list-style-name="WWNum1">
      <style:paragraph-properties fo:margin-left="0.4957in" fo:margin-top="0.0417in" fo:margin-bottom="0in" style:contextual-spacing="tru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0" style:family="paragraph" style:parent-style-name="List_20_Paragraph" style:list-style-name="WWNum10">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1" style:family="paragraph" style:parent-style-name="List_20_Paragraph" style:list-style-name="WWNum10">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2" style:family="paragraph" style:parent-style-name="List_20_Paragraph" style:list-style-name="WWNum12">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3" style:family="paragraph" style:parent-style-name="List_20_Paragraph" style:list-style-name="WWNum12">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4" style:family="paragraph" style:parent-style-name="List_20_Paragraph" style:list-style-name="WWNum4">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5" style:family="paragraph" style:parent-style-name="List_20_Paragraph" style:list-style-name="WWNum4">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6" style:family="paragraph" style:parent-style-name="List_20_Paragraph" style:list-style-name="WWNum8">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7" style:family="paragraph" style:parent-style-name="List_20_Paragraph" style:list-style-name="WWNum8">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8" style:family="paragraph" style:parent-style-name="List_20_Paragraph" style:list-style-name="WWNum8">
      <style:paragraph-properties fo:margin-top="0.0835in" fo:margin-bottom="0in" style:contextual-spacing="tru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9" style:family="paragraph" style:parent-style-name="List_20_Paragraph" style:list-style-name="WWNum8">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0" style:family="paragraph" style:parent-style-name="List_20_Paragraph">
      <style:paragraph-properties fo:margin-left="0.4957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1" style:family="paragraph" style:parent-style-name="List_20_Paragraph" style:list-style-name="WWNum1">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2" style:family="paragraph" style:parent-style-name="List_20_Paragraph" style:list-style-name="WWNum1">
      <style:paragraph-properties fo:margin-left="0.4957in" fo:margin-top="0.0835in" fo:margin-bottom="0in" style:contextual-spacing="fals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3" style:family="paragraph" style:parent-style-name="List_20_Paragraph">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4" style:family="paragraph" style:parent-style-name="Standard">
      <style:paragraph-properties fo:text-align="right" style:justify-single-word="false"/>
      <style:text-properties fo:font-size="10pt" fo:language="fr" fo:country="FR" style:font-size-asian="10pt"/>
    </style:style>
    <style:style style:name="P45" style:family="paragraph" style:parent-style-name="Standard">
      <style:paragraph-properties fo:text-align="right" style:justify-single-word="false"/>
    </style:style>
    <style:style style:name="T1" style:family="text">
      <style:text-properties fo:font-size="24pt" fo:language="fr" fo:country="FR" fo:font-weight="bold" style:font-size-asian="24pt" style:font-weight-asian="bold"/>
    </style:style>
    <style:style style:name="T2" style:family="text">
      <style:text-properties fo:font-size="20pt" fo:language="fr" fo:country="FR" fo:font-weight="bold" style:font-size-asian="20pt" style:font-weight-asian="bold"/>
    </style:style>
    <style:style style:name="T3" style:family="text">
      <style:text-properties fo:font-size="22pt" fo:language="fr" fo:country="FR" fo:font-weight="bold" style:font-size-asian="22pt" style:font-weight-asian="bold"/>
    </style:style>
    <style:style style:name="T4" style:family="text">
      <style:text-properties fo:language="fr" fo:country="FR" fo:font-style="italic" fo:font-weight="bold" style:font-style-asian="italic" style:font-weight-asian="bold"/>
    </style:style>
    <style:style style:name="T5" style:family="text">
      <style:text-properties fo:font-size="12pt" fo:language="fr" fo:country="FR" fo:font-style="italic" fo:font-weight="bold" style:font-size-asian="12pt" style:font-style-asian="italic" style:font-weight-asian="bold"/>
    </style:style>
    <style:style style:name="T6" style:family="text">
      <style:text-properties fo:language="fr" fo:country="FR" fo:font-weight="bold" style:font-weight-asian="bold"/>
    </style:style>
    <style:style style:name="T7" style:family="text">
      <style:text-properties fo:font-size="10pt" fo:language="fr" fo:country="FR" style:font-size-asian="10pt"/>
    </style:style>
    <style:style style:name="T8" style:family="text">
      <style:text-properties fo:language="fr" fo:country="FR"/>
    </style:style>
    <style:style style:name="T9" style:family="text">
      <style:text-properties fo:font-family="'MS Gothic'" style:font-family-generic="roman" style:font-pitch="variable" fo:language="fr" fo:country="FR" style:font-family-asian="'MS Gothic'" style:font-family-generic-asian="system" style:font-pitch-asian="variable"/>
    </style:style>
    <style:style style:name="T10" style:family="text">
      <style:text-properties fo:font-family="Wingdings" style:font-family-generic="roman" style:font-pitch="variable" style:font-charset="x-symbol" fo:font-size="10pt" fo:language="fr" fo:country="FR" style:font-family-asian="Wingdings" style:font-family-generic-asian="system" style:font-pitch-asian="variable" style:font-size-asian="10pt" style:font-family-complex="Wingdings" style:font-family-generic-complex="system" style:font-pitch-complex="variable"/>
    </style:style>
    <style:style style:name="T11" style:family="text">
      <style:text-properties fo:font-size="10pt" fo:language="fr" fo:country="FR" fo:font-weight="bold" style:font-size-asian="10pt" style:font-weight-asian="bold"/>
    </style:style>
    <style:style style:name="T12" style:family="text">
      <style:text-properties fo:font-size="10pt" fo:language="fr" fo:country="FR" fo:font-style="italic" style:font-size-asian="10pt" style:font-style-asian="italic"/>
    </style:style>
    <style:style style:name="T13" style:family="text">
      <style:text-properties fo:font-size="10pt" fo:language="fr" fo:country="FR" style:font-size-asian="10pt" style:font-size-complex="10pt"/>
    </style:style>
    <style:style style:name="T14" style:family="text">
      <style:text-properties fo:color="#0070c0" loext:opacity="100%" fo:font-size="10pt" fo:language="fr" fo:country="FR" style:font-size-asian="10pt" style:font-size-complex="10pt"/>
    </style:style>
    <style:style style:name="T15" style:family="text">
      <style:text-properties fo:color="#0070c0" loext:opacity="100%" fo:font-size="10pt" fo:language="fr" fo:country="FR" style:font-size-asian="10pt"/>
    </style:style>
    <style:style style:name="T16" style:family="text">
      <style:text-properties fo:color="#2e74b5" loext:opacity="100%" fo:font-size="10pt" fo:language="fr" fo:country="FR" style:font-size-asian="10pt">
        <loext:char-complex-color loext:theme-type="accent1" loext:color-type="theme">
          <loext:transformation loext:type="shade" loext:value="2509"/>
        </loext:char-complex-color>
      </style:text-properties>
    </style:style>
    <style:style style:name="T17" style:family="text">
      <style:text-properties fo:font-size="10pt" style:font-size-asian="10pt"/>
    </style:style>
    <style:style style:name="T18" style:family="text">
      <style:text-properties fo:font-family="'MS Gothic'" style:font-family-generic="roman" style:font-pitch="variable" style:font-family-asian="'MS Gothic'" style:font-family-generic-asian="system" style:font-pitch-asian="variable" style:script-type="asian"/>
    </style:style>
    <style:style style:name="T19" style:family="text">
      <style:text-properties fo:font-family="'MS Gothic'" style:font-family-generic="roman" style:font-pitch="variable" fo:language="fr" fo:country="FR" style:font-family-asian="'MS Gothic'" style:font-family-generic-asian="system" style:font-pitch-asian="variable" style:script-type="asian"/>
    </style:style>
    <style:style style:name="T20" style:family="text">
      <style:text-properties fo:font-size="10pt" style:font-size-asian="10pt" style:font-size-complex="10pt"/>
    </style:style>
    <style:style style:name="T21" style:family="text">
      <style:text-properties fo:font-size="10pt" fo:language="fr" fo:country="FR" fo:font-style="italic" fo:font-weight="bold" style:font-size-asian="10pt" style:font-style-asian="italic" style:font-weight-asian="bold"/>
    </style:style>
    <style:style style:name="T22" style:family="text">
      <style:text-properties fo:color="#2e74b5" loext:opacity="100%" fo:font-size="10pt" fo:language="fr" fo:country="FR" style:text-underline-style="solid" style:text-underline-width="auto" style:text-underline-color="font-color" style:font-size-asian="10pt">
        <loext:char-complex-color loext:theme-type="accent1" loext:color-type="theme">
          <loext:transformation loext:type="shade" loext:value="2509"/>
        </loext:char-complex-color>
      </style:text-properties>
    </style:style>
    <style:style style:name="T23" style:family="text">
      <style:text-properties fo:language="fr" fo:country="FR"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Check-list pour la publication d’une application </text:span><text:span text:style-name="T3"><text:s/></text:span></text:p>
            <text:p text:style-name="P2" loext:marker-style-name="T4"><text:span text:style-name="T5"><text:s text:c="3"/></text:span><text:span text:style-name="T4">Votre application est-elle prête pour être publiée ?</text:span></text:p>
          </table:table-cell>
          <table:table-cell table:style-name="Table1.A1" office:value-type="string">
            <text:p text:style-name="P3" loext:marker-style-name="T6"><draw:frame draw:style-name="fr1" draw:name="Picture 1" text:anchor-type="as-char" svg:width="2.5827in" svg:height="0.7508in"><draw:image xlink:href="Pictures/10000001000001B800000080353264D0.png" xlink:type="simple" xlink:show="embed" xlink:actuate="onLoad" draw:mime-type="image/png"/><svg:desc>C:\Users\Richard\AppData\Local\Microsoft\Windows\INetCacheContent.Word\SAB-logo-128.png</svg:desc></draw:frame></text:p>
          </table:table-cell>
        </table:table-row>
      </table:table>
      <text:p text:style-name="P4" loext:marker-style-name="T7"><text:span text:style-name="T7">Avant de sortir votre application et de la rendre disponible pour des utilisateurs qui vont l’installer et la partager, voici une liste de choses à contrôler. Cette check-list peut être utilisée par les responsables chargés du contrôle des publications numériques au sein de votre organisation.</text:span><text:span text:style-name="T7"/></text:p>
      <table:table table:name="Table2" table:style-name="Table2">
        <table:table-column table:style-name="Table2.A"/>
        <table:table-column table:style-name="Table2.B"/>
        <table:table-row table:style-name="Table2.1">
          <table:table-cell table:style-name="Table2.A1" office:value-type="string">
            <text:p text:style-name="P5" loext:marker-style-name="T8"><loext:content-control loext:plain-text="true" loext:id="1036232264"><text:span text:style-name="T9">☐</text:span></loext:content-control><text:span text:style-name="T9"/></text:p>
          </table:table-cell>
          <table:table-cell table:style-name="Table2.A1" office:value-type="string">
            <text:list text:style-name="WWNum6">
              <text:list-item>
                <text:h text:style-name="P6" text:outline-level="1" loext:marker-style-name="T8"><text:span text:style-name="T8">Vérification par un conseiller</text:span><text:span text:style-name="T8"/></text:h>
              </text:list-item>
            </text:list>
            <text:p text:style-name="P2" loext:marker-style-name="T7"><text:span text:style-name="T7">Les contrôles obligatoires devant être faits par des conseillers ont-ils étés effectués ? <text:line-break/>Exemples : L’Écriture traduite a-t-elle été vérifiée par un conseiller en traduction ? A-t-elle été acceptée pour être publiée ? <text:s/></text:span><text:span text:style-name="T7"/></text:p>
            <text:p text:style-name="P2" loext:marker-style-name="T7"><text:span text:style-name="T7">Utilisez-vous une orthographe acceptée ?</text:span><text:span text:style-name="T7"/></text:p>
            <text:p text:style-name="P7" loext:marker-style-name="T8"><text:span text:style-name="T7">Si vous utilisez SAB pour créer une application destinée à un nombre limité d’utilisateurs comme un comité de réviseurs ou un essai d’orthographe que vous voulez mettre à jour dans quelques mois, veuillez voir le paragraphe ci-dessous “Date d’expiration ou système de distribution limité”.</text:span><text:span text:style-name="T7"/></text:p>
          </table:table-cell>
        </table:table-row>
        <table:table-row table:style-name="Table2.1">
          <table:table-cell table:style-name="Table2.A1" office:value-type="string">
            <text:p text:style-name="P5" loext:marker-style-name="T8"><loext:content-control loext:plain-text="true" loext:id="-262601614"><text:span text:style-name="T9">☐</text:span></loext:content-control><text:span text:style-name="T9"/></text:p>
          </table:table-cell>
          <table:table-cell table:style-name="Table2.A1" office:value-type="string">
            <text:list xml:id="list131421217563270" text:continue-numbering="true" text:style-name="WWNum6">
              <text:list-item>
                <text:h text:style-name="P6" text:outline-level="1" loext:marker-style-name="T8"><text:span text:style-name="T8">Vérification Paratext </text:span><text:span text:style-name="T8"/></text:h>
              </text:list-item>
            </text:list>
            <text:p text:style-name="P2" loext:marker-style-name="T7"><text:span text:style-name="T7">Si vous utilisez des fichiers Paratext avez-vous exécuté les vérifications de base ? (Dans Paratext, sélectionner Vérification </text:span><text:span text:style-name="T10"></text:span><text:span text:style-name="T7"> Effectuer vérifications de base…) Le texte est-il passé par toutes ces vérifications ? <text:s/></text:span></text:p>
            <text:p text:style-name="P2" loext:marker-style-name="T7"><text:span text:style-name="T7">Vérifications primordiales :</text:span><text:span text:style-name="T7"/></text:p>
            <text:list text:style-name="WWNum1">
              <text:list-item>
                <text:p text:style-name="P8" loext:marker-style-name="T11"><text:span text:style-name="T11">Numérotage Chapitre/verset :</text:span><text:span text:style-name="T7"> Vérifie s’il y a des versets ou des chapitres à double ou non valables. Vérifie que tous les chapitres et versets dans la versification pour le projet sont présents.</text:span></text:p>
              </text:list-item>
              <text:list-item>
                <text:p text:style-name="P9" loext:marker-style-name="T11"><text:span text:style-name="T11">Marqueurs : </text:span><text:span text:style-name="T7">Vérifie que vous utilisez des marqueurs USFM valables et qu’ils ne se trouvent pas dans des endroits où on ne les attend pas.</text:span></text:p>
              </text:list-item>
              <text:list-item>
                <text:p text:style-name="P9" loext:marker-style-name="T7"><text:span text:style-name="T11">Références :</text:span><text:span text:style-name="T7"> Vérifie que les références bibliques (ex. : Mt 6 : 1-5) respectent exactement les abréviations et la syntaxe, sinon elles ne fonctionneront pas en tant que lien dans l’application.</text:span></text:p>
              </text:list-item>
            </text:list>
            <text:p text:style-name="P2" loext:marker-style-name="T7"><text:span text:style-name="T7">Vérifications importantes :</text:span><text:span text:style-name="T7"/></text:p>
            <text:list xml:id="list131421737302817" text:continue-numbering="true" text:style-name="WWNum1">
              <text:list-item>
                <text:p text:style-name="P9" loext:marker-style-name="T7"><text:span text:style-name="T7">Toutes les vérifications de base restantes : caractères, ponctuation, écriture en majuscules, mots répétés, erreurs de ponctuation double, citations, nombres.</text:span><text:span text:style-name="T7"/></text:p>
              </text:list-item>
              <text:list-item>
                <text:p text:style-name="P9" loext:marker-style-name="T7"><text:span text:style-name="T11">Orthographe </text:span><text:span text:style-name="T7">:</text:span><text:span text:style-name="T11"> </text:span><text:span text:style-name="T7">Dans Paratext, il faut sélectionner Vérification </text:span><text:span text:style-name="T10"></text:span><text:span text:style-name="T7"> Vérifier l’orthographe du livre actuel…</text:span></text:p>
              </text:list-item>
            </text:list>
            <text:p text:style-name="P7" loext:marker-style-name="T7"><text:span text:style-name="T7">Si vous utilisez un texte tiré de la Bibliotheque numérique de la Bible (Digital Bible Library) au lieu des fichiers Paratext USFM, ainsi la vérification de base sera déjà effectuée.</text:span><text:span text:style-name="T7"/></text:p>
          </table:table-cell>
        </table:table-row>
        <table:table-row table:style-name="Table2.1">
          <table:table-cell table:style-name="Table2.A1" office:value-type="string">
            <text:p text:style-name="P5" loext:marker-style-name="T8"><loext:content-control loext:plain-text="true" loext:id="689646986"><text:span text:style-name="T9">☐</text:span></loext:content-control><text:span text:style-name="T9"/></text:p>
          </table:table-cell>
          <table:table-cell table:style-name="Table2.A1" office:value-type="string">
            <text:list xml:id="list131420866449617" text:continue-list="list131421217563270" text:style-name="WWNum6">
              <text:list-item>
                <text:h text:style-name="P6" text:outline-level="1" loext:marker-style-name="T8"><text:span text:style-name="T8">Autorisation de diffuser un contenu </text:span><text:span text:style-name="T8"/></text:h>
              </text:list-item>
            </text:list>
            <text:p text:style-name="P2" loext:marker-style-name="T7"><text:span text:style-name="T7">Assurez-vous que vous avez les permissions nécessaires pour diffuser le contenu de l’application :</text:span><text:span text:style-name="T7"/></text:p>
            <text:list text:continue-list="list131421737302817" text:style-name="WWNum1">
              <text:list-item>
                <text:p text:style-name="P10" loext:marker-style-name="T7"><text:span text:style-name="T7">Avez-vous l’autorisation de diffuser le </text:span><text:span text:style-name="T11">texte</text:span><text:span text:style-name="T7"> ?</text:span></text:p>
              </text:list-item>
              <text:list-item>
                <text:p text:style-name="P9" loext:marker-style-name="T7"><text:span text:style-name="T7">S’il y a des fichiers </text:span><text:span text:style-name="T11">audio</text:span><text:span text:style-name="T7">, avez-vous l’autorisation de les diffuser ? </text:span></text:p>
              </text:list-item>
              <text:list-item>
                <text:p text:style-name="P9" loext:marker-style-name="T7"><text:span text:style-name="T7">S’il y a des fichiers </text:span><text:span text:style-name="T11">vidéo</text:span><text:span text:style-name="T7">, avez-vous l’autorisation de les diffuser ? </text:span></text:p>
              </text:list-item>
              <text:list-item>
                <text:p text:style-name="P9" loext:marker-style-name="T7"><text:span text:style-name="T7">S’il y a des </text:span><text:span text:style-name="T11">images</text:span><text:span text:style-name="T7">, avez-vous l’autorisation de les diffuser ?</text:span></text:p>
              </text:list-item>
            </text:list>
            <text:p text:style-name="P7" loext:marker-style-name="T6"><text:span text:style-name="T7">Rappelez-vous que pour les textes, les enregistrements audio, vidéos et les images, les droits d’auteur sont souvent détenus par différents propriétaires et vous devez avoir une autorisation pour chacune d’elles.</text:span><text:span text:style-name="T11"/></text:p>
            <text:p text:style-name="P7" loext:marker-style-name="T7"><text:span text:style-name="T7">Vous avez l’autorisation si :</text:span><text:span text:style-name="T7"/></text:p>
            <text:list xml:id="list131421526779792" text:continue-numbering="true" text:style-name="WWNum1">
              <text:list-item>
                <text:p text:style-name="P11" loext:marker-style-name="T7"><text:span text:style-name="T7">Vous êtes le propriétaire (titulaire d’un droit de propriété) du contenu, ou bien</text:span><text:span text:style-name="T7"/></text:p>
              </text:list-item>
              <text:list-item>
                <text:p text:style-name="P9" loext:marker-style-name="T7"><text:span text:style-name="T7">Vous avez reçu l’autorisation de la part du titulaire de diffuser les contenus. De telles autorisations peuvent être accordées de la manière suivante : (i) par une licence telle qu’une licence Creative Commons ou (ii) par un accord particulier signé entre vous et le titulaire. </text:span><text:span text:style-name="T7"/></text:p>
              </text:list-item>
            </text:list>
            <text:p text:style-name="P7" loext:marker-style-name="T7"><text:span text:style-name="T7">Il est important de savoir si vous avez l’autorisation de diffuser le contenu dans une publication </text:span><text:span text:style-name="T12">numérique.</text:span><text:span text:style-name="T7"> Si par exemple vous avez l’autorisation d’utiliser une image dans un ouvrage imprimé, vous devez aussi vérifier si vous avez le droit de l’utiliser dans une appli.</text:span></text:p>
          </table:table-cell>
        </table:table-row>
        <table:table-row table:style-name="Table2.1">
          <table:table-cell table:style-name="Table2.A1" office:value-type="string">
            <text:p text:style-name="P5" loext:marker-style-name="T8"><loext:content-control loext:plain-text="true" loext:id="-1835130762"><text:span text:style-name="T9">☐</text:span></loext:content-control><text:span text:style-name="T9"/></text:p>
          </table:table-cell>
          <table:table-cell table:style-name="Table2.A1" office:value-type="string">
            <text:list xml:id="list131421151295487" text:continue-list="list131420866449617" text:style-name="WWNum6">
              <text:list-item>
                <text:h text:style-name="P6" text:outline-level="1" loext:marker-style-name="T8"><text:span text:style-name="T8">Installation de l’application et navigation</text:span><text:span text:style-name="T8"/></text:h>
              </text:list-item>
            </text:list>
            <text:p text:style-name="P2" loext:marker-style-name="T7"><text:span text:style-name="T7">Installer l’application au moins à deux smartphones ayant des versions Android différentes. Choisissez des modèles de téléphones que les usagers typiques possèdent, c’est-à-dire non seulement les appareils les plus rapides et les plus chers mais des appareils de bas et milieu de gamme.</text:span><text:span text:style-name="T7"/></text:p>
            <text:list text:style-name="WWNum5">
              <text:list-item>
                <text:p text:style-name="P12" loext:marker-style-name="T8"><text:span text:style-name="T7">Est-ce que l’installation de l’application a bien fonctionné ?</text:span><text:span text:style-name="T7"/></text:p>
              </text:list-item>
              <text:list-item>
                <text:p text:style-name="P13" loext:marker-style-name="T8"><text:span text:style-name="T7">Pouvez-vous naviguer sans problème dans l’application ? Essayez de sélectionner des livres et des chapitres, de faire défiler des textes, faire passer des chapitres, chercher des mots etc.</text:span><text:span text:style-name="T7"/></text:p>
              </text:list-item>
              <text:list-item>
                <text:p text:style-name="P13" loext:marker-style-name="T8"><text:span text:style-name="T7">Est-ce que la mise en évidence du texte simultané est correctement synchronisée avec le son lorsque ce dernier est enclenché ?</text:span><text:span text:style-name="T7"/></text:p>
              </text:list-item>
              <text:list-item>
                <text:p text:style-name="P13" loext:marker-style-name="T8"><text:span text:style-name="T7">Pouvez-vous voir le contenu de la rubrique “A propos” ?</text:span><text:span text:style-name="T7"/></text:p>
              </text:list-item>
            </text:list>
          </table:table-cell>
        </table:table-row>
        <table:table-row table:style-name="Table2.1">
          <table:table-cell table:style-name="Table2.A1" office:value-type="string">
            <text:p text:style-name="P5" loext:marker-style-name="T8"><loext:content-control loext:plain-text="true" loext:id="1182171712"><text:span text:style-name="T9">☐</text:span></loext:content-control><text:span text:style-name="T9"/></text:p>
          </table:table-cell>
          <table:table-cell table:style-name="Table2.A1" office:value-type="string">
            <text:list xml:id="list131421147014313" text:continue-list="list131421151295487" text:style-name="WWNum6">
              <text:list-item>
                <text:h text:style-name="P6" text:outline-level="1" loext:marker-style-name="T8"><text:span text:style-name="T8">Nom de l’application</text:span><text:span text:style-name="T8"/></text:h>
              </text:list-item>
            </text:list>
            <text:p text:style-name="P2" loext:marker-style-name="T6"><text:span text:style-name="T7">Il s’agit du titre principal de l’application affiché sur le téléphone de l’utilisateur sous l’icône de l’application.</text:span><text:span text:style-name="T11"/></text:p>
            <text:list text:style-name="WWNum3">
              <text:list-item>
                <text:p text:style-name="P14" loext:marker-style-name="T13"><text:span text:style-name="T13">Est-ce que le nom est assez court ? Il est par exemple mieux d’avoir écrit “Bible Giryama” que “La Sainte Bible en langue Giryama”. Sinon, certains noms ne seront pas entièrement visibles lorsqu’ils seront affichés sur le téléphone.</text:span><text:span text:style-name="T13"/></text:p>
              </text:list-item>
              <text:list-item>
                <text:p text:style-name="P14" loext:marker-style-name="T13"><text:span text:style-name="T13">Le nom est-il clair et compréhensible par les gens qui parlent cette langue ? Est-il mieux d’utiliser un nom de communication courant au lieu d’un nom uniquement compris dans une langue locale ? </text:span><text:span text:style-name="T13"/></text:p>
              </text:list-item>
              <text:list-item>
                <text:p text:style-name="P15" loext:marker-style-name="T13"><text:span text:style-name="T13">Le titre est-il écrit correctement avec ses majuscules et ses minuscules ? Exemple : “La Bible en Tharaka” et non “LA BIBLE EN THARAKA”.</text:span><text:span text:style-name="T13"/></text:p>
              </text:list-item>
              <text:list-item>
                <text:p text:style-name="P15" loext:marker-style-name="T13"><text:span text:style-name="T13">Rappelez-vous que le nom de l’application sera affiché en une police de caractère du système et non de l’application. Est-ce qu’il y a des caractères spéciaux qui demandent une police spéciale ? </text:span><text:span text:style-name="T13"/></text:p>
              </text:list-item>
              <text:list-item>
                <text:p text:style-name="P14" loext:marker-style-name="T8"><text:span text:style-name="T7">Si l’application sera utilisée dans différents pays ayant des langues officielles différentes, avez-vous prévu des traductions pour le nom de l’application le cas échéant ? Exemple : Si vous voulez une application dont le nom dans les pays anglophones est “Suba Bible” et dans les pays francophones “Bible en suba”. <text:s text:c="2"/></text:span><text:span text:style-name="T7"/></text:p>
              </text:list-item>
            </text:list>
          </table:table-cell>
        </table:table-row>
        <table:table-row table:style-name="Table2.1">
          <table:table-cell table:style-name="Table2.A1" office:value-type="string">
            <text:p text:style-name="P5" loext:marker-style-name="T8"><loext:content-control loext:plain-text="true" loext:id="587726742"><text:span text:style-name="T9">☐</text:span></loext:content-control><text:span text:style-name="T9"/></text:p>
          </table:table-cell>
          <table:table-cell table:style-name="Table2.A1" office:value-type="string">
            <text:list xml:id="list131421814043276" text:continue-list="list131421147014313" text:style-name="WWNum6">
              <text:list-item>
                <text:h text:style-name="P6" text:outline-level="1" loext:marker-style-name="T8"><text:span text:style-name="T8">Icône de l’application</text:span><text:span text:style-name="T8"/></text:h>
              </text:list-item>
            </text:list>
            <text:p text:style-name="P2" loext:marker-style-name="T6"><text:span text:style-name="T7">L’icône de l’application est l’icône qui correspond à l’application sur le smartphone ou la tablette de l’utilisateur.</text:span><text:span text:style-name="T11"/></text:p>
            <text:list xml:id="list131421712275169" text:continue-list="list131421526779792" text:style-name="WWNum1">
              <text:list-item>
                <text:p text:style-name="P11" loext:marker-style-name="T7"><text:span text:style-name="T7">Est-ce que l’image est nette et non floue ?</text:span><text:span text:style-name="T7"/></text:p>
              </text:list-item>
              <text:list-item>
                <text:p text:style-name="P11" loext:marker-style-name="T7"><text:span text:style-name="T7">Est-ce que l’utilisateur typique comprendra ce qu’elle représente ?</text:span><text:span text:style-name="T7"/></text:p>
              </text:list-item>
              <text:list-item>
                <text:p text:style-name="P16" loext:marker-style-name="T7"><text:span text:style-name="T7">Est-elle culturellement adaptée ?</text:span><text:span text:style-name="T7"/></text:p>
              </text:list-item>
              <text:list-item>
                <text:p text:style-name="P16" loext:marker-style-name="T7"><text:span text:style-name="T7">La qualité du design est-elle suffisamment professionnelle ?</text:span><text:span text:style-name="T7"/></text:p>
              </text:list-item>
              <text:list-item>
                <text:p text:style-name="P16" loext:marker-style-name="T7"><text:span text:style-name="T7">Avez-vous défini des icônes adaptatives pour Android ainsi que des anciennes icônes ?</text:span><text:span text:style-name="T7"/></text:p>
              </text:list-item>
            </text:list>
            <text:p text:style-name="P17" loext:marker-style-name="T7"/>
            <text:p text:style-name="P5" loext:marker-style-name="T7"><text:span text:style-name="T7">Parfois, les gens font une icône d'application qui a trop de détails, comme du texte, qui a l’air bien quand on travaille dessus dans un éditeur d’images mais qui n'est pas visible quand on regarde l’icône sur le téléphone.</text:span><text:span text:style-name="T7"/></text:p>
          </table:table-cell>
        </table:table-row>
        <table:table-row table:style-name="Table2.1">
          <table:table-cell table:style-name="Table2.A1" office:value-type="string">
            <text:p text:style-name="P5" loext:marker-style-name="T8"><loext:content-control loext:plain-text="true" loext:id="-408388926"><text:span text:style-name="T9">☐</text:span></loext:content-control><text:span text:style-name="T9"/></text:p>
          </table:table-cell>
          <table:table-cell table:style-name="Table2.A1" office:value-type="string">
            <text:list xml:id="list131420735628587" text:continue-list="list131421814043276" text:style-name="WWNum6">
              <text:list-item>
                <text:h text:style-name="P6" text:outline-level="1" loext:marker-style-name="T8"><text:span text:style-name="T8">Écran d’accueil</text:span><text:span text:style-name="T8"/></text:h>
              </text:list-item>
            </text:list>
            <text:p text:style-name="P2" loext:marker-style-name="T7"><text:span text:style-name="T7">L’écran d’accueil est l’image qui apparait sur tout l’écran lors du chargement de l’application. C’est facultatif, mais si elle est comprise dedans :</text:span><text:span text:style-name="T7"/></text:p>
            <text:list xml:id="list131422339712741" text:continue-list="list131421712275169" text:style-name="WWNum1">
              <text:list-item>
                <text:p text:style-name="P18" loext:marker-style-name="T7"><text:span text:style-name="T7">Est-ce que l’image est nette et non floue ?</text:span><text:span text:style-name="T7"/></text:p>
              </text:list-item>
              <text:list-item>
                <text:p text:style-name="P16" loext:marker-style-name="T7"><text:span text:style-name="T7">Est-ce que l’utilisateur typique comprendra ce qu’elle représente ?</text:span><text:span text:style-name="T7"/></text:p>
              </text:list-item>
              <text:list-item>
                <text:p text:style-name="P16" loext:marker-style-name="T7"><text:span text:style-name="T7">Est-il culturellement adapté ?</text:span><text:span text:style-name="T7"/></text:p>
              </text:list-item>
              <text:list-item>
                <text:p text:style-name="P16" loext:marker-style-name="T7"><text:span text:style-name="T7">La qualité du design est-elle suffisamment professionnelle ?</text:span><text:span text:style-name="T7"/></text:p>
              </text:list-item>
            </text:list>
          </table:table-cell>
        </table:table-row>
        <table:table-row table:style-name="Table2.1">
          <table:table-cell table:style-name="Table2.A1" office:value-type="string">
            <text:p text:style-name="P5" loext:marker-style-name="T8"><loext:content-control loext:plain-text="true" loext:id="276915966"><text:span text:style-name="T9">☐</text:span></loext:content-control><text:span text:style-name="T9"/></text:p>
          </table:table-cell>
          <table:table-cell table:style-name="Table2.A1" office:value-type="string">
            <text:list text:continue-list="list131420735628587" text:style-name="WWNum6">
              <text:list-item>
                <text:h text:style-name="P6" text:outline-level="1" loext:marker-style-name="T8"><text:span text:style-name="T8">Couleurs</text:span><text:span text:style-name="T8"/></text:h>
              </text:list-item>
            </text:list>
            <text:p text:style-name="P2" loext:marker-style-name="T6"><text:span text:style-name="T7">Le choix des couleurs est-il adapté à la culture et convient-il au contenu de l’application ? C’est-à-dire, est-ce le meilleur choix de couleurs pour la publication des Écritures dans cette langue ?</text:span><text:span text:style-name="T11"/></text:p>
          </table:table-cell>
        </table:table-row>
        <table:table-row table:style-name="Table2.1">
          <table:table-cell table:style-name="Table2.A1" office:value-type="string">
            <text:p text:style-name="P5" loext:marker-style-name="T8"><loext:content-control loext:plain-text="true" loext:id="-741022130"><text:span text:style-name="T9">☐</text:span></loext:content-control><text:span text:style-name="T9"/></text:p>
          </table:table-cell>
          <table:table-cell table:style-name="Table2.A1" office:value-type="string">
            <text:list text:continue-numbering="true" text:style-name="WWNum6">
              <text:list-item>
                <text:h text:style-name="P6" text:outline-level="1" loext:marker-style-name="T8"><text:span text:style-name="T8">Police de caractère</text:span><text:span text:style-name="T8"/></text:h>
              </text:list-item>
            </text:list>
            <text:p text:style-name="P2" loext:marker-style-name="T7"><text:span text:style-name="T7">Est-ce que les polices de caractère sont lisibles et disponibles pour la langue et le contenu de l’application ? Les caractères spéciaux sont-ils correctement affichés ?</text:span><text:span text:style-name="T7"/></text:p>
            <text:p text:style-name="P2" loext:marker-style-name="T7"><text:span text:style-name="T7">La taille de police par défaut est-elle raisonnable ? C’est-à-dire la taille du texte lorsque quelqu’un lance l’application pour la première fois. Si vous avez une écriture arabe, vous devrez peut-être spécifier une taille de police par défaut supérieure à la taille de police par défaut de l’écriture romaine par défaut.</text:span><text:span text:style-name="T7"/></text:p>
            <text:p text:style-name="P2" loext:marker-style-name="T6"><text:span text:style-name="T7">Si vous utilisez une écriture autre que la latine (par exemple les écritures arabes, éthiopiens, thaï) ou l’écriture latine avec des diacritiques (ɔ́, ɛ̀), il faut contrôler que les téléphones ayant des versions différentes d’Android les affichent correctement. En particulier, les versions Android 4.3 et inférieures auront besoin de Grandroid pour l’application. Autrement, les caractères ne seront pas correctement affichés. <text:s text:c="4"/></text:span><text:span text:style-name="T11"/></text:p>
          </table:table-cell>
        </table:table-row>
        <table:table-row table:style-name="Table2.1">
          <table:table-cell table:style-name="Table2.A1" office:value-type="string">
            <text:p text:style-name="P5" loext:marker-style-name="T8"><loext:content-control loext:plain-text="true" loext:id="-1802527918"><text:span text:style-name="T9">☐</text:span></loext:content-control><text:span text:style-name="T9"/></text:p>
          </table:table-cell>
          <table:table-cell table:style-name="Table2.A1" office:value-type="string">
            <text:list xml:id="list131421110192179" text:continue-numbering="true" text:style-name="WWNum6">
              <text:list-item>
                <text:h text:style-name="P6" text:outline-level="1" loext:marker-style-name="T8"><text:span text:style-name="T8">Nom de package</text:span><text:span text:style-name="T8"/></text:h>
              </text:list-item>
            </text:list>
            <text:p text:style-name="P2" loext:marker-style-name="T13"><text:span text:style-name="T13">L’application est uniquement identifiée par le nom de package. Il s’agit d’une série de caractères en minuscules séparée par des points et sans espace telle que : </text:span><text:span text:style-name="T14">org.wycliffe.mamara.bible</text:span><text:span text:style-name="T13">. </text:span></text:p>
            <text:list text:style-name="WWNum7">
              <text:list-item>
                <text:p text:style-name="P19" loext:marker-style-name="T13"><text:span text:style-name="T13">Le nom de package commence-t-il avec le nom du site Internet inversé ? <text:s/><text:line-break/>Exemple : “org.wycliffe”, “org.biblesociety” au lieu de “wycliffe.org”. Assurez-vous que vous avez le droit d’utiliser l’adresse de cette organisation. <text:s/></text:span><text:span text:style-name="T13"/></text:p>
              </text:list-item>
              <text:list-item>
                <text:p text:style-name="P19" loext:marker-style-name="T8"><text:span text:style-name="T7">Les autres composant du nom de package ont-ils étés bien choisis ? Une bonne idée est d’inclure le nom ou/et le code de la langue (Exemple : ‘mamara’ ou ‘myk’) et le type de la publication (‘bible’). </text:span><text:span text:style-name="T7"/></text:p>
              </text:list-item>
            </text:list>
            <text:p text:style-name="P7" loext:marker-style-name="T7"><text:span text:style-name="T7">Le nom de package peut être vu par des utilisateurs lorsqu’ils regardent l’appli dans Google Play. Il est donc important de bien le choisir. Lorsque plus tard vous voudrez mettre à jour une application, vous ne pourrez pas changer le nom de package. </text:span><text:span text:style-name="T7"/></text:p>
            <text:p text:style-name="P2" loext:marker-style-name="T8"><text:span text:style-name="T7">Si vous publiez une application contenant le Nouveau Testament mais que lors d’une mise à jour future, l’application contiendra aussi l’Ancien Testament, il est mieux que le nom de package mentionne ‘bible’ plutôt que ‘nt’ (pour Nouveau Testament). Par ex. </text:span><text:span text:style-name="T15">org.wycliffe.mamara.bible</text:span><text:span text:style-name="T7"> au lieu de </text:span><text:span text:style-name="T15">org.wycliffe.mamara.nt</text:span><text:span text:style-name="T7">.</text:span></text:p>
          </table:table-cell>
        </table:table-row>
        <table:table-row table:style-name="Table2.1">
          <table:table-cell table:style-name="Table2.A1" office:value-type="string">
            <text:p text:style-name="P5" loext:marker-style-name="T8"><loext:content-control loext:plain-text="true" loext:id="-1132172093"><text:span text:style-name="T9">☐</text:span></loext:content-control><text:span text:style-name="T9"/></text:p>
          </table:table-cell>
          <table:table-cell table:style-name="Table2.A1" office:value-type="string">
            <text:list xml:id="list131422213634493" text:continue-list="list131421110192179" text:style-name="WWNum6">
              <text:list-item>
                <text:h text:style-name="P6" text:outline-level="1" loext:marker-style-name="T8"><text:span text:style-name="T8">Boîte d’informations “A propos”</text:span><text:span text:style-name="T8"/></text:h>
              </text:list-item>
            </text:list>
            <text:p text:style-name="P2" loext:marker-style-name="T6"><text:span text:style-name="T7">Contrôlez que la boîte “À propos de” de l’application contienne les informations suivantes le cas échéant :</text:span><text:span text:style-name="T11"/></text:p>
            <text:list text:continue-list="list131422339712741" text:style-name="WWNum1">
              <text:list-item>
                <text:p text:style-name="P20" loext:marker-style-name="T7"><text:span text:style-name="T7">Le </text:span><text:span text:style-name="T11">titre</text:span><text:span text:style-name="T7"> de l’application.</text:span></text:p>
              </text:list-item>
              <text:list-item>
                <text:p text:style-name="P18" loext:marker-style-name="T7"><text:span text:style-name="T7">Une </text:span><text:span text:style-name="T11">description </text:span><text:span text:style-name="T7">de l’application, par exemple :</text:span></text:p>
              </text:list-item>
            </text:list>
            <text:p text:style-name="P21" loext:marker-style-name="T16"><text:span text:style-name="T16">Le Nouveau Testament dans la langue angave en Papouasie-Nouvelle-Guinée</text:span><text:span text:style-name="T16"/></text:p>
            <text:list text:continue-numbering="true" text:style-name="WWNum1">
              <text:list-item>
                <text:p text:style-name="P22" loext:marker-style-name="T7"><text:span text:style-name="T11">Coordonnées </text:span><text:span text:style-name="T7">de votre organisation,<text:line-break/> <text:s text:c="2"/>Par exemple : votre adresse Internet, numéro de téléphone, adresse postale, etc.</text:span></text:p>
              </text:list-item>
            </text:list>
            <text:p text:style-name="P23" loext:marker-style-name="T7"><text:span text:style-name="T7">Est-ce que des hyperliens pour des adresses Internet et des numéros de téléphone sont utilisés de telle sorte que l’utilisateur puisse les sélectionner pour aller sur le site Internet ou le numéro de téléphone pour composer le numéro ?</text:span><text:span text:style-name="T7"/></text:p>
            <text:list text:continue-numbering="true" text:style-name="WWNum1">
              <text:list-item>
                <text:p text:style-name="P24" loext:marker-style-name="T7"><text:span text:style-name="T11">Informations concernant le copyright pour le texte </text:span><text:span text:style-name="T7">comme l’exige le détenteur des droits. Exemple :</text:span></text:p>
              </text:list-item>
            </text:list>
            <text:p text:style-name="P21" loext:marker-style-name="T16"><text:span text:style-name="T16">Texte : © 1997 Wycliffe Bible Translators, Inc.<text:line-break/></text:span><text:span text:style-name="T16"/></text:p>
            <text:list text:continue-numbering="true" text:style-name="WWNum1">
              <text:list-item>
                <text:p text:style-name="P16" loext:marker-style-name="T7"><text:span text:style-name="T11">Informations concernant le copyright pour le message audio</text:span><text:span text:style-name="T7"> comme l’exige le détenteur des droits. Exemple :</text:span></text:p>
              </text:list-item>
            </text:list>
            <text:p text:style-name="P25" loext:marker-style-name="T16"><text:span text:style-name="T16">Audio : ℗ 2005 Hosanna. Bible.is.</text:span><text:span text:style-name="T16"/></text:p>
            <text:p text:style-name="P26" loext:marker-style-name="T7"><text:span text:style-name="T7">Le symbole ℗ est utilisé pour représenter le copyright pour un enregistrement audio. Si la police de caractère que vous utilisez ne contient pas ce symbole, vous pouvez mettre à la place l’inscription (P). <text:line-break/></text:span><text:span text:style-name="T7"/></text:p>
            <text:list text:continue-numbering="true" text:style-name="WWNum1">
              <text:list-item>
                <text:p text:style-name="P16" loext:marker-style-name="T7"><text:span text:style-name="T11">Informations concernant le copyright pour l’image</text:span><text:span text:style-name="T7"> comme l’exige le détenteur des droits. Exemple :</text:span></text:p>
              </text:list-item>
            </text:list>
            <text:p text:style-name="P25" loext:marker-style-name="T7"><text:span text:style-name="T16">Illustrations : © 2015, Jennifer Coulibaly. Utilisé avec l’autorisation.</text:span><text:span text:style-name="T16"/></text:p>
            <text:list xml:id="list131421003366697" text:continue-numbering="true" text:style-name="WWNum1">
              <text:list-item>
                <text:p text:style-name="P24" loext:marker-style-name="T7"><text:span text:style-name="T11">Information sur la licence </text:span><text:span text:style-name="T7">:</text:span><text:span text:style-name="T11"> </text:span><text:span text:style-name="T17">dire aux utilisateurs de l’application ce qu’ils peuvent faire avec les différents contenus de l’application et de l'application elle-même.<text:line-break/></text:span></text:p>
              </text:list-item>
            </text:list>
            <text:p text:style-name="P27" loext:marker-style-name="T7"><text:span text:style-name="T11">Choix de la langue :</text:span><text:span text:style-name="T11"/></text:p>
            <text:p text:style-name="P5" loext:marker-style-name="T7"><text:span text:style-name="T7">Assurez-vous que les informations contenues dans la boîte “A propos de” soient écrites dans une langue que beaucoup de vos utilisateurs et membres d’une communauté élargie peuvent comprendre. Réfléchissez à la manière dont laquelle vous utiliseriez une langue officielle sous copyright dans un livre imprimé dans une langue locale. Par exemple, pour les applications dans les langues d’Amérique du Sud, procurez-vous les licences en espagnol ou en portugais plutôt (et ainsi) qu’en anglais. Une licence Creative Commons en plusieurs langues est disponible par des liens sur le site Internet Creative Commons (https://creativecommons.org/choose/).</text:span><text:span text:style-name="T7"/></text:p>
            <text:p text:style-name="P7" loext:marker-style-name="T7"><text:span text:style-name="T11">IMPORTANT : <text:line-break/></text:span><text:span text:style-name="T7">Si vous quelque chose n’est pas claire pour vous au sujet de certains de ces détails, ne cherchez pas à deviner. Veuillez contacter les responsables pour les publications numériques au sein de votre organisation pour recevoir des conseils et des propositions de formulation.</text:span></text:p>
            <text:p text:style-name="P2" loext:marker-style-name="T7"><text:span text:style-name="T7">Ne copiez pas simplement les informations d’un texte imprimé de “A propos de”. L’information éditeur, les licences, les données concernant la publication que vous trouvez imprimées sur une page d’introduction seront souvent différentes de ce qui est nécessaire pour une appli. Une publication numérique n’est pas la même chose qu’une publication écrite. </text:span><text:span text:style-name="T7"/></text:p>
          </table:table-cell>
        </table:table-row>
        <table:table-row table:style-name="Table2.1">
          <table:table-cell table:style-name="Table2.A1" office:value-type="string">
            <text:p text:style-name="P5" loext:marker-style-name="T8"><loext:content-control loext:plain-text="true" loext:id="1129511602"><text:span text:style-name="T9">☐</text:span></loext:content-control><text:span text:style-name="T9"/></text:p>
          </table:table-cell>
          <table:table-cell table:style-name="Table2.A1" office:value-type="string">
            <text:list xml:id="list131422423544917" text:continue-list="list131422213634493" text:style-name="WWNum6">
              <text:list-item>
                <text:h text:style-name="P6" text:outline-level="1" loext:marker-style-name="T8"><text:span text:style-name="T8">Livres et noms de livres</text:span><text:span text:style-name="T8"/></text:h>
              </text:list-item>
            </text:list>
            <text:p text:style-name="P2" loext:marker-style-name="T7"><text:span text:style-name="T7">Est-ce que tous les livres devant être inclus sont inclus ? Assurez-vous que vous n’avez manqué aucun livre de la Bible par accident.</text:span><text:span text:style-name="T7"/></text:p>
            <text:p text:style-name="P28" loext:marker-style-name="T6"><text:span text:style-name="T7">Regardez la liste des noms de livres pour les applications :</text:span><text:span text:style-name="T11"/></text:p>
            <text:list xml:id="list131420901417090" text:continue-list="list131421003366697" text:style-name="WWNum1">
              <text:list-item>
                <text:p text:style-name="P29" loext:marker-style-name="T7"><text:span text:style-name="T7">La liste est-elle cohérente ? C’est-à-dire, est-ce qu’il n’y a pas de mélange de noms complets et d’abréviations ? </text:span><text:span text:style-name="T7"/></text:p>
              </text:list-item>
              <text:list-item>
                <text:p text:style-name="P11" loext:marker-style-name="T7"><text:span text:style-name="T7">Les noms sont-ils écrits correctement avec leurs majuscules et leurs minuscules ? C’est-à-dire “Matthieu” et non “MATTHIEU” ?</text:span><text:span text:style-name="T7"/></text:p>
              </text:list-item>
            </text:list>
          </table:table-cell>
        </table:table-row>
        <table:table-row table:style-name="Table2.1">
          <table:table-cell table:style-name="Table2.A1" office:value-type="string">
            <text:p text:style-name="P5" loext:marker-style-name="T8"><loext:content-control loext:plain-text="true" loext:id="-1136325014"><text:span text:style-name="T9">☐</text:span></loext:content-control><text:span text:style-name="T9"/></text:p>
          </table:table-cell>
          <table:table-cell table:style-name="Table2.A1" office:value-type="string">
            <text:list text:continue-list="list131422423544917" text:style-name="WWNum6">
              <text:list-item>
                <text:h text:style-name="P6" text:outline-level="1" loext:marker-style-name="T8"><text:span text:style-name="T8">Liens de renvoi</text:span><text:span text:style-name="T8"/></text:h>
              </text:list-item>
            </text:list>
            <text:p text:style-name="P2" loext:marker-style-name="T7"><text:span text:style-name="T7">Si vous avez des </text:span><text:span text:style-name="T11">liens de renvoi </text:span><text:span text:style-name="T7">dans l’application, les liens ont-ils étés générés correctement ? Exemple : Si vous cliquez sur un lien tel que ‘Luc 15 : 8’, arrivez-vous au bon livre avec le bon chapitre et le bon verset ?</text:span></text:p>
          </table:table-cell>
        </table:table-row>
        <table:table-row table:style-name="Table2.1">
          <table:table-cell table:style-name="Table2.A1" office:value-type="string">
            <text:p text:style-name="P5" loext:marker-style-name="T8"><loext:content-control loext:plain-text="true" loext:id="-22401696"><text:span text:style-name="T9">☐</text:span></loext:content-control><text:span text:style-name="T9"/></text:p>
          </table:table-cell>
          <table:table-cell table:style-name="Table2.A1" office:value-type="string">
            <text:list text:continue-numbering="true" text:style-name="WWNum6">
              <text:list-item>
                <text:h text:style-name="P6" text:outline-level="1" loext:marker-style-name="T8"><text:span text:style-name="T8">Liens menant à des glossaires</text:span><text:span text:style-name="T8"/></text:h>
              </text:list-item>
            </text:list>
            <text:p text:style-name="P2" loext:marker-style-name="T7"><text:span text:style-name="T7">Si vous avez un </text:span><text:span text:style-name="T11">glossaire</text:span><text:span text:style-name="T7"> dans votre application, est-ce que les liens dans le texte menant aux articles du glossaire sont correctement générés ? Exemple : Si vous cliquez sur un lien tel que ‘Abraham’ dans le livre de Matthieu, est-ce que l’entrée du glossaire pour ‘Abraham’ vous est montré dans une fenêtre intruse ?</text:span></text:p>
            <text:p text:style-name="P2" loext:marker-style-name="T7"><text:span text:style-name="T7">Si les liens n’apparaissent pas, vérifiez que vous avez utilisé les marqueurs \w … \w* correctement. </text:span><text:span text:style-name="T7"/></text:p>
          </table:table-cell>
        </table:table-row>
        <table:table-row table:style-name="Table2.1">
          <table:table-cell table:style-name="Table2.A1" office:value-type="string">
            <text:p text:style-name="P5" loext:marker-style-name="T8"><loext:content-control loext:plain-text="true" loext:id="-64722867"><text:span text:style-name="T9">☐</text:span></loext:content-control><text:span text:style-name="T9"/></text:p>
          </table:table-cell>
          <table:table-cell table:style-name="Table2.A1" office:value-type="string">
            <text:list xml:id="list131421668846961" text:continue-numbering="true" text:style-name="WWNum6">
              <text:list-item>
                <text:h text:style-name="P6" text:outline-level="1" loext:marker-style-name="T8"><text:span text:style-name="T8">Recherche</text:span><text:span text:style-name="T8"/></text:h>
              </text:list-item>
            </text:list>
            <text:p text:style-name="P2" loext:marker-style-name="T7"><text:span text:style-name="T7">S’il existe une fonction de recherche dans l’application : </text:span><text:span text:style-name="T7"/></text:p>
            <text:list xml:id="list2437639305" text:style-name="WWNum10">
              <text:list-item>
                <text:p text:style-name="P30" loext:marker-style-name="T11"><text:span text:style-name="T7">Est-ce que la fonction de recherche fonctionne correctement ?</text:span><text:span text:style-name="T11"/></text:p>
              </text:list-item>
              <text:list-item>
                <text:p text:style-name="P31" loext:marker-style-name="T7"><text:span text:style-name="T7">Un clavier Keyman adapté a-t-il été inclus pour la saisie de mots de recherche dans la langue ? Ou est-ce qu’un bouton de saisie de caractère a été spécifié pour l’écran de recherche ? (Ce sont les boutons qu’un utilisateur peut utiliser en plus des claviers de systèmes de téléphone.)</text:span><text:span text:style-name="T7"/></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0837432750" text:continue-list="list131421668846961" text:style-name="WWNum6">
              <text:list-item>
                <text:h text:style-name="P6" text:outline-level="1" loext:marker-style-name="T8"><text:span text:style-name="T8">Plusieurs collections de livres</text:span><text:span text:style-name="T8"/></text:h>
              </text:list-item>
            </text:list>
            <text:p text:style-name="P2" loext:marker-style-name="T7"><text:span text:style-name="T7">Si l’application contient plusieurs collections de livres, par ex. autres traductions dans les langues locales ou majoritaires :</text:span><text:span text:style-name="T7"/></text:p>
            <text:list text:continue-list="list2437639305" text:style-name="WWNum12">
              <text:list-item>
                <text:p text:style-name="P32" loext:marker-style-name="T8"><text:span text:style-name="T13">Les noms de ces collections de livres sont-ils clairs et compréhensibles dans la boîte de dialogue de configuration ‘Langue et agencement’ ?</text:span><text:span text:style-name="T13"/></text:p>
              </text:list-item>
              <text:list-item>
                <text:p text:style-name="P33" loext:marker-style-name="T8"><text:span text:style-name="T13">Les noms courts affichés dans le petit bouton en haut à droite du texte sont-ils compréhensibles et assez larges pour être exploités par l'utilisateur ? Il est préférable d'utiliser un nom de langue abrégé, par ex. "Mamara" plutôt qu’un code de langue, "myk", qui pourrait être difficile à comprendre pour les utilisateurs.</text:span><text:span text:style-name="T13"/></text:p>
              </text:list-item>
              <text:list-item>
                <text:p text:style-name="P33" loext:marker-style-name="T8"><text:span text:style-name="T13">Est-ce que les bonnes polices sont utilisées pour chacune des collections de livres ? Avez-vous spécifié des tailles de police par défaut appropriées pour chacun, par ex. vous devrez peut-être faire en sorte que la taille de police par défaut d’une collection de livres en écriture arabe soit légèrement supérieure à celle d’une collection de livres en écriture romaine.</text:span><text:span text:style-name="T13"/></text:p>
              </text:list-item>
              <text:list-item>
                <text:p text:style-name="P33" loext:marker-style-name="T8"><text:span text:style-name="T13">Les informations de droit d’auteur et de licence sont-elles fournies sur la page “À propos” pour chaque traduction ?</text:span><text:span text:style-name="T13"/></text:p>
              </text:list-item>
              <text:list-item>
                <text:p text:style-name="P33" loext:marker-style-name="T8"><text:span text:style-name="T13">Les restrictions ont-elles été correctement définies pour chaque collection de livres ? Par exemple, vous pourriez avoir été autorisé à utiliser une certaine traduction uniquement si elle figure à côté d'une autre traduction et non pas seule.</text:span><text:span text:style-name="T13"/></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1908524923" text:continue-list="list131420837432750" text:style-name="WWNum6">
              <text:list-item>
                <text:h text:style-name="P6" text:outline-level="1" loext:marker-style-name="T8"><text:span text:style-name="T8">Langue de l’interface et traduction</text:span><text:span text:style-name="T8"/></text:h>
              </text:list-item>
            </text:list>
            <text:p text:style-name="P2" loext:marker-style-name="T6"><text:span text:style-name="T7">Examiner la langue utilisée pour l’interface et les éléments de menu de l’écran de recherche : Par exemple : “Chercher”, “A propos”, “Recherche de mots entiers”, etc. :</text:span><text:span text:style-name="T11"/></text:p>
            <text:list xml:id="list131421341364390" text:continue-list="list131420901417090" text:style-name="WWNum1">
              <text:list-item>
                <text:p text:style-name="P8" loext:marker-style-name="T7"><text:span text:style-name="T7">Est-ce qu’il y a un bon choix de langues d'interface pour l’utilisateur typique ? Quelle est la langue d'interface par défaut lorsqu’un utilisateur installe l’application pour la première fois ? Est-il préférable d’utiliser par défaut l’anglais, le français, le chinois, une langue locale, etc. ?</text:span><text:span text:style-name="T7"/></text:p>
              </text:list-item>
              <text:list-item>
                <text:p text:style-name="P9" loext:marker-style-name="T7"><text:span text:style-name="T7">Si les éléments de l’interface ont-ils étés traduits dans une langue locale, est-ce que les traductions ont été contrôlées pour voir si elles sont compréhensibles ? </text:span><text:span text:style-name="T7"/></text:p>
              </text:list-item>
            </text:list>
          </table:table-cell>
        </table:table-row>
        <table:table-row table:style-name="Table2.1">
          <table:table-cell table:style-name="Table2.A1" office:value-type="string">
            <text:p text:style-name="P5" loext:marker-style-name="T8"><text:span text:style-name="T18">☐</text:span><text:span text:style-name="T19"/></text:p>
          </table:table-cell>
          <table:table-cell table:style-name="Table2.A1" office:value-type="string">
            <text:list xml:id="list131420623791941" text:continue-list="list131421908524923" text:style-name="WWNum6">
              <text:list-item>
                <text:h text:style-name="P6" text:outline-level="1">Verset sur image</text:h>
              </text:list-item>
            </text:list>
            <text:p text:style-name="P2" loext:marker-style-name="T20"><text:span text:style-name="T20">Si l’éditeur Verset sur image est inclus dans l’application :</text:span><text:span text:style-name="T20"/></text:p>
            <text:list xml:id="list3110499723" text:style-name="WWNum4">
              <text:list-item>
                <text:p text:style-name="P34" loext:marker-style-name="T20"><text:span text:style-name="T20">Existe-t-il un bon ensemble d’images de fond, adapté au contexte ?</text:span><text:span text:style-name="T20"/></text:p>
              </text:list-item>
            </text:list>
            <text:list xml:id="list131422229259947" text:continue-list="list131421341364390" text:style-name="WWNum1">
              <text:list-item>
                <text:p text:style-name="P9" loext:marker-style-name="T8"><text:span text:style-name="T20">Le texte </text:span><text:span text:style-name="T7">apparait</text:span><text:span text:style-name="T20">-il correctement sur l’image ? (Si l’utilisateur peut choisir entre différentes polices, vérifiez que chacune de ces polices peut bien afficher le texte).</text:span></text:p>
              </text:list-item>
            </text:list>
          </table:table-cell>
        </table:table-row>
        <table:table-row table:style-name="Table2.1">
          <table:table-cell table:style-name="Table2.A1" office:value-type="string">
            <text:p text:style-name="P5" loext:marker-style-name="T8"><text:span text:style-name="T18">☐</text:span><text:span text:style-name="T19"/></text:p>
          </table:table-cell>
          <table:table-cell table:style-name="Table2.A1" office:value-type="string">
            <text:list xml:id="list131420962721851" text:continue-list="list131420623791941" text:style-name="WWNum6">
              <text:list-item>
                <text:h text:style-name="P6" text:outline-level="1">Verset du jour, Rappel quotidien</text:h>
              </text:list-item>
            </text:list>
            <text:p text:style-name="P28" loext:marker-style-name="T20"><text:span text:style-name="T20">Si le verset du jour et/ou le rappel quotidien sont inclus dans l'application :</text:span><text:span text:style-name="T20"/></text:p>
            <text:list xml:id="list131422015510949" text:continue-list="list3110499723" text:style-name="WWNum4">
              <text:list-item>
                <text:p text:style-name="P34" loext:marker-style-name="T20"><text:span text:style-name="T20">L'heure de défaut des notifications a-t-elle été fixée à un moment approprié ? L'utilisateur peut-il modifier cette heure dans les paramètres ?</text:span><text:span text:style-name="T20"/></text:p>
              </text:list-item>
            </text:list>
            <text:list xml:id="list131421909616411" text:continue-list="list131422229259947" text:style-name="WWNum1">
              <text:list-item>
                <text:p text:style-name="P9" loext:marker-style-name="T8"><text:span text:style-name="T20">Les </text:span><text:span text:style-name="T7">versets</text:span><text:span text:style-name="T20"> s'affichent-ils correctement dans les notifications ? (par exemple, si la police du système a été choisie, les caractères spéciaux s'affichent-ils correctement)</text:span></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0465363144" text:continue-list="list131420962721851" text:style-name="WWNum6">
              <text:list-item>
                <text:h text:style-name="P6" text:outline-level="1" loext:marker-style-name="T8"><text:span text:style-name="T8">Keystore pour la signature de l’application</text:span><text:span text:style-name="T8"/></text:h>
              </text:list-item>
            </text:list>
            <text:p text:style-name="P28" loext:marker-style-name="T7"><text:span text:style-name="T7">Toutes les applications Android sont signées avec une clef keystore. Vous pouvez utiliser le même keystore pour plusieurs applications ou un keystore différent pour chaque application.</text:span><text:span text:style-name="T7"/></text:p>
            <text:list text:continue-list="list131422015510949" text:style-name="WWNum4">
              <text:list-item>
                <text:p text:style-name="P34" loext:marker-style-name="T7"><text:span text:style-name="T7">L’application a-t-elle été signée avec un keystore que vous avez généré pour la publication ? C’est-à-dire le keystore contient-il des données concernant votre organisation plutôt qu’un keystore temporaire que vous avez vite créé pour faire un test chez vous ? </text:span><text:span text:style-name="T7"/></text:p>
              </text:list-item>
              <text:list-item>
                <text:p text:style-name="P35" loext:marker-style-name="T7"><text:span text:style-name="T11">IMPORTANT :</text:span><text:span text:style-name="T7"> Votre fichier keystore est-il quelque part en sécurité ? Lorsque vous mettrez votre application à jour, il vous faudra exactement même fichier keystore.</text:span></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text:continue-list="list131420465363144" text:style-name="WWNum6">
              <text:list-item>
                <text:h text:style-name="P6" text:outline-level="1" loext:marker-style-name="T8"><text:span text:style-name="T8">Synchronisation des textes audio</text:span><text:span text:style-name="T8"/></text:h>
              </text:list-item>
            </text:list>
            <text:p text:style-name="P2" loext:marker-style-name="T7"><text:span text:style-name="T7">Lorsque vous utilisez une synchronisation audio-texte pour mettre en évidence le texte phrase par phrase ou verset par verset lorsque le son est enclenché, la mise en évidence fonctionne-t-elle avec précision ?</text:span><text:span text:style-name="T7"/></text:p>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0638535187" text:continue-numbering="true" text:style-name="WWNum6">
              <text:list-item>
                <text:h text:style-name="P6" text:outline-level="1" loext:marker-style-name="T8"><text:span text:style-name="T8">Distribution de fichiers audio</text:span><text:span text:style-name="T8"/></text:h>
              </text:list-item>
            </text:list>
            <text:p text:style-name="P2" loext:marker-style-name="T7"><text:span text:style-name="T7">Si votre application utilise l’audio comment avez-vous décidé de distribuer les fichiers audio ?</text:span><text:span text:style-name="T7"/></text:p>
            <text:list xml:id="list2328650963" text:style-name="WWNum8">
              <text:list-item>
                <text:p text:style-name="P36" loext:marker-style-name="T21"><text:span text:style-name="T21">Dans le fichier APK de l’application :</text:span><text:span text:style-name="T7"> Contrôler que la taille de l’application n’est pas trop grande. La limite pour publier une application sur Google Play est de 100 Mo. Si vous désirez que l’utilisateur puisse partager l’application via Bluetooth il est préférable qu’elle soit beaucoup plus petite.</text:span></text:p>
              </text:list-item>
              <text:list-item>
                <text:p text:style-name="P37" loext:marker-style-name="T21"><text:span text:style-name="T21">Distribution dans un dossier externe :</text:span><text:span text:style-name="T7"> Avez-vous une bonne stratégie de distribution pour rendre les fichiers audio disponible aux gens ?</text:span></text:p>
              </text:list-item>
              <text:list-item>
                <text:p text:style-name="P37" loext:marker-style-name="T21"><text:span text:style-name="T21">Téléchargement depuis Internet :</text:span><text:span text:style-name="T7"> Hébergez-vous les fichiers audio sur un serveur fiable ? Testez si le téléchargement fonctionne lorsque vous essayez de faire fonctionner un fichier audio dans l’application. </text:span></text:p>
              </text:list-item>
              <text:list-item>
                <text:p text:style-name="P37" loext:marker-style-name="T7"><text:span text:style-name="T21">Téléchargement depuis la plateforme “FCBH Digital Bible” :</text:span><text:span text:style-name="T7"> Utilisez-vous une clef DBT qui vous a été délivrée par FCBH dans ce but ? Testez si le téléchargement fonctionne lorsque vous essayez de faire fonctionner un fichier audio dans l’application. </text:span></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1000841218" text:continue-list="list131420638535187" text:style-name="WWNum6">
              <text:list-item>
                <text:h text:style-name="P6" text:outline-level="1" loext:marker-style-name="T8"><text:span text:style-name="T8">Date d’expiration ou distribution limitée</text:span><text:span text:style-name="T8"/></text:h>
              </text:list-item>
            </text:list>
            <text:p text:style-name="P28" loext:marker-style-name="T7"><text:span text:style-name="T7">Si vous désirez limiter la durée de vie de l’application, par exemple, lorsqu’il s’agit d’une version d’essai :</text:span><text:span text:style-name="T7"/></text:p>
            <text:list text:continue-list="list2328650963" text:style-name="WWNum8">
              <text:list-item>
                <text:p text:style-name="P38" loext:marker-style-name="T7"><text:span text:style-name="T7">Est-ce qu’une date limite a été spécifiée ? </text:span><text:span text:style-name="T7"/></text:p>
              </text:list-item>
              <text:list-item>
                <text:p text:style-name="P39" loext:marker-style-name="T7"><text:span text:style-name="T7">Quel message sera affiché à l’utilisateur au moment de la date limite et après celle-ci ?</text:span><text:span text:style-name="T7"/></text:p>
              </text:list-item>
              <text:list-item>
                <text:p text:style-name="P39" loext:marker-style-name="T7"><text:span text:style-name="T7">Est-ce que l’utilisateur pourra encore utiliser l’application après avoir vu le message d’expiration ?</text:span><text:span text:style-name="T7"/></text:p>
              </text:list-item>
            </text:list>
            <text:p text:style-name="P7" loext:marker-style-name="T7"><text:span text:style-name="T7">Si vous désirez restreindre le nombre d’appareils qui peuvent installer l’application. Exemple : Vous désirez que seule une équipe restreinte puisse l’utiliser : </text:span><text:span text:style-name="T7"/></text:p>
            <text:list text:continue-numbering="true" text:style-name="WWNum8">
              <text:list-item>
                <text:p text:style-name="P36" loext:marker-style-name="T7"><text:span text:style-name="T7">Avez-vous dressé dans l’application une liste des numéros IMEI ou IDs Android des appareils qui sont autorisés ? </text:span><text:span text:style-name="T7"/></text:p>
              </text:list-item>
              <text:list-item>
                <text:p text:style-name="P39" loext:marker-style-name="T7"><text:span text:style-name="T7">Si vous essayez de faire fonctionner l’application avec un appareil qui ne figure pas sur la liste, est-ce qu’un message d’erreur s’affiche ?</text:span><text:span text:style-name="T7"/></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2024559888" text:continue-list="list131421000841218" text:style-name="WWNum6">
              <text:list-item>
                <text:h text:style-name="P6" text:outline-level="1" loext:marker-style-name="T8"><text:span text:style-name="T8">Archivage et soumission d’un texte à la Bibliothèque numérique de la Bible <text:line-break/> <text:s text:c="7"/>(Digital Bible Library)</text:span><text:span text:style-name="T8"/></text:h>
              </text:list-item>
            </text:list>
            <text:p text:style-name="P28" loext:marker-style-name="T7"><text:span text:style-name="T7">Si vous êtes le détenteur des droits du contenu de l’application, avez-vous suivi les indications de votre organisation ? Le cas échéant, il faut voir ce qui concerne :</text:span><text:span text:style-name="T7"/></text:p>
            <text:list xml:id="list131421215823223" text:continue-list="list131421909616411" text:style-name="WWNum1">
              <text:list-item>
                <text:p text:style-name="P11" loext:marker-style-name="T8"><text:span text:style-name="T7">Archivage des textes et des messages audio enregistrés</text:span><text:span text:style-name="T7"/></text:p>
              </text:list-item>
              <text:list-item>
                <text:p text:style-name="P11" loext:marker-style-name="T8"><text:span text:style-name="T7">Soumission du texte à la Bibliothèque numérique de la Bible (DBL). </text:span><text:span text:style-name="T7"/></text:p>
              </text:list-item>
            </text:list>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0410259592" text:continue-list="list131422024559888" text:style-name="WWNum6">
              <text:list-item>
                <text:h text:style-name="P6" text:outline-level="1" loext:marker-style-name="T8"><text:span text:style-name="T8">Stratégie de publication et de marketing</text:span><text:span text:style-name="T8"/></text:h>
              </text:list-item>
            </text:list>
            <text:p text:style-name="P2" loext:marker-style-name="T7"><text:span text:style-name="T7">Où allez-vous rendre votre application disponible ? Quel compte développeur de Google Play serait le plus stratégique ? </text:span><text:span text:style-name="T7"/></text:p>
            <text:list xml:id="list131422228154180" text:continue-list="list131421215823223" text:style-name="WWNum1">
              <text:list-item>
                <text:p text:style-name="P11" loext:marker-style-name="T7"><text:span text:style-name="T7">Publierez-vous votre application sur une page international, ensemble avec d’autres applications de la Bible dans beaucoup de différentes langues du monde ?</text:span><text:span text:style-name="T7"/></text:p>
              </text:list-item>
              <text:list-item>
                <text:p text:style-name="P11" loext:marker-style-name="T7"><text:span text:style-name="T7">Ou sur une page avec des applications de votre pays ou de votre région ?</text:span><text:span text:style-name="T7"/></text:p>
              </text:list-item>
              <text:list-item>
                <text:p text:style-name="P11" loext:marker-style-name="T7"><text:span text:style-name="T7">Ou sur une page avec d’autres types d’applications pour la même langue (par ex. des applis dictionnaires et des applis de lecture) ?</text:span><text:span text:style-name="T7"/></text:p>
              </text:list-item>
            </text:list>
            <text:p text:style-name="P2" loext:marker-style-name="T7"><text:span text:style-name="T7">Avez-vous besoin de créer un nouveau compte développeur ? <text:s/></text:span><text:span text:style-name="T7"/></text:p>
            <text:p text:style-name="P2" loext:marker-style-name="T7"><text:span text:style-name="T7">Pour les organisations partenaires de la SIL : Pouvez-vous utiliser le Scripture App Publishing Service pour développer, publier et garder vos mises à jour d’applications ?</text:span><text:span text:style-name="T7"/></text:p>
            <text:p text:style-name="P2" loext:marker-style-name="T7"><text:span text:style-name="T7">Allez-vous également distribuer vos applications hors ligne, par ex. en utilisant un BibleBox ou Lightstream, ou via des cartes mémoire ?</text:span><text:span text:style-name="T7"/></text:p>
            <text:p text:style-name="P2" loext:marker-style-name="T8"><text:span text:style-name="T7">Comment allez-vous faire connaître aux gens l’existence de votre application ? Voulez-vous faire du marketing via les réseaux sociaux (Exemple : Facebook) ? Avez-vous un budget pour la publicité, par ex. en utilisant Google Ads ou Facebook Ads ?</text:span><text:span text:style-name="T7"/></text:p>
            <text:p text:style-name="P2" loext:marker-style-name="T7"><text:span text:style-name="T11">IMPORTANT </text:span><text:span text:style-name="T7">: Veuillez prendre ce sujet de stratégie de marketing au sérieux. Il ne suffit pas de créer et de publier une application : nous voulons la voir utilisée !</text:span></text:p>
          </table:table-cell>
        </table:table-row>
        <table:table-row table:style-name="Table2.1">
          <table:table-cell table:style-name="Table2.A1" office:value-type="string">
            <text:p text:style-name="P5" loext:marker-style-name="T8"><text:span text:style-name="T9">☐</text:span><text:span text:style-name="T9"/></text:p>
          </table:table-cell>
          <table:table-cell table:style-name="Table2.A1" office:value-type="string">
            <text:list xml:id="list131421247111891" text:continue-list="list131420410259592" text:style-name="WWNum6">
              <text:list-item>
                <text:h text:style-name="P6" text:outline-level="1" loext:marker-style-name="T8"><text:span text:style-name="T8">Points à contrôler pour Google Play Store </text:span><text:span text:style-name="T8"/></text:h>
              </text:list-item>
            </text:list>
            <text:p text:style-name="P2" loext:marker-style-name="T7"><text:span text:style-name="T7">Si votre application est publiée sur Google Play Store, veuillez contrôler les points suivants pour le stockage :</text:span><text:span text:style-name="T7"/></text:p>
            <text:list text:continue-list="list131422228154180" text:style-name="WWNum1">
              <text:list-item>
                <text:p text:style-name="P18" loext:marker-style-name="T21"><text:span text:style-name="T21">Titre de l’application</text:span><text:span text:style-name="T21"/></text:p>
              </text:list-item>
              <text:list-item>
                <text:p text:style-name="P18" loext:marker-style-name="T7"><text:span text:style-name="T21">Description brève mais complète : </text:span><text:span text:style-name="T7">Elle doit décrire clairement l’application au public cible dans la (les) langue(s) la (les) mieux appropriée(s). Mentionnez le pays et les autres noms pour la langue afin d’augmenter la probabilité que les utilisateurs trouvent l’application lorsqu’ils cherchent sur Google Play.</text:span></text:p>
              </text:list-item>
            </text:list>
            <text:p text:style-name="P40" loext:marker-style-name="T7"><text:span text:style-name="T7">Google vous encourage de “mettre en valeur ce que votre application a de formidable. Partagez des faits intéressants et passionnants au sujet de votre application pour aider l’utilisateur à comprendre ce qui rend votre application spéciale.” Vous ne devez pas ajouter des témoignages d’utilisateurs, trop de détails ou une longue liste de mots-clés. Pour plus de détails voir <text:s/></text:span><text:span text:style-name="T22">https://play.google.com/about/storelisting-promotional/metadata</text:span><text:span text:style-name="T16">/</text:span><text:span text:style-name="T7"> </text:span></text:p>
            <text:list text:continue-numbering="true" text:style-name="WWNum1">
              <text:list-item>
                <text:p text:style-name="P18" loext:marker-style-name="T7"><text:span text:style-name="T21">Icônes d’application à haute résolution :</text:span><text:span text:style-name="T7"> Il faut que ce soit la même que l’icône de l’application mais avec une version à plus haute résolution 512x512. Assurez-vous qu’elle soit nette et non floue, c’est-à-dire que si vous prenez une icône 14 4x144 et que vous l’étirez à 512x512, ça ne fonctionnera probablement pas bien <text:s/></text:span></text:p>
              </text:list-item>
              <text:list-item>
                <text:p text:style-name="P41" loext:marker-style-name="T21"><text:span text:style-name="T21">Caractéristique graphique :</text:span><text:span text:style-name="T7"> Dans l’application Play Store, la caractéristique graphique est affichée en haut de votre page d’accueil. Ne mettez pas de copies d’informations visuelles importantes dans l’image près du bord, et ceci près du tiers inférieur du cadre. Essayez d’aligner au centre un logo ou de centrer dans le cadre verticalement et horizontalement des informations.</text:span></text:p>
              </text:list-item>
              <text:list-item>
                <text:p text:style-name="P41" loext:marker-style-name="T21"><text:span text:style-name="T21">Captures d’écran :</text:span><text:span text:style-name="T7"> Sur un smartphone, vous devez spécifier au moins 2 captures d’écran de l’application ouverte/en cours d’utilisation sur un smartphone. Vous pouvez en ajouter jusqu’à 8 pour chaque type d’appareil : téléphones, tablettes 7 pouces et tablettes 10 pouces. Est-ce que les captures d’écrans ont été bien choisies pour montrer les caractéristiques de l’application ? <text:s text:c="2"/></text:span></text:p>
              </text:list-item>
              <text:list-item>
                <text:p text:style-name="P42" loext:marker-style-name="T21"><text:span text:style-name="T21">Adresse pour l’appui technique : </text:span><text:span text:style-name="T7">Avez-vous une adresse e-mail appropriée pour publier sur la page d’accueil pour des questions concernant l’application et des feedbacks ?</text:span></text:p>
              </text:list-item>
            </text:list>
            <text:p text:style-name="P43" loext:marker-style-name="T7"><text:span text:style-name="T7">Évitez d’utiliser une adresse e-mail personnelle telle </text:span><text:span text:style-name="T13">que </text:span><text:span text:style-name="T23">j</text:span><text:span text:style-name="T13">ean</text:span><text:span text:style-name="T23">.</text:span><text:span text:style-name="T13">martin</text:span><text:span text:style-name="T23">@gmail.com</text:span><text:span text:style-name="T7"> ou celle de votre place de travail qui est sans rapport avec la publication d’applications pour les Écritures. Il se peut que la meilleure chose à faire est de créer une nouvelle adresse e-mail.</text:span></text:p>
          </table:table-cell>
        </table:table-row>
        <table:table-row table:style-name="Table2.1">
          <table:table-cell table:style-name="Table2.A1" office:value-type="string">
            <text:p text:style-name="P5" loext:marker-style-name="T9"><text:span text:style-name="T9">☐</text:span><text:span text:style-name="T9"/></text:p>
          </table:table-cell>
          <table:table-cell table:style-name="Table2.A1" office:value-type="string">
            <text:list text:continue-list="list131421247111891" text:style-name="WWNum6">
              <text:list-item>
                <text:h text:style-name="P6" text:outline-level="1" loext:marker-style-name="T8"><text:span text:style-name="T8">Test par des utilisateurs</text:span><text:span text:style-name="T8"/></text:h>
              </text:list-item>
            </text:list>
            <text:p text:style-name="P2" loext:marker-style-name="T13"><text:span text:style-name="T13">Demandez à quelques personnes d’installer une version d’essai de l’application et de vous donner leur feedback.</text:span><text:span text:style-name="T13"/></text:p>
          </table:table-cell>
        </table:table-row>
      </table:table>
      <text:p text:style-name="P44" loext:marker-style-name="T7"/>
      <table:table table:name="Table3" table:style-name="Table3">
        <table:table-column table:style-name="Table3.A"/>
        <table:table-column table:style-name="Table3.B"/>
        <table:table-row table:style-name="Table3.1">
          <table:table-cell table:style-name="Table3.A1" office:value-type="string">
            <text:p text:style-name="P5" loext:marker-style-name="T9"><text:span text:style-name="T9">☐</text:span><text:span text:style-name="T9"/></text:p>
          </table:table-cell>
          <table:table-cell table:style-name="Table3.A1" office:value-type="string">
            <text:list text:continue-numbering="true" text:style-name="WWNum6">
              <text:list-item>
                <text:h text:style-name="P6" text:outline-level="1" loext:marker-style-name="T8"><text:span text:style-name="T8">Approbation finale</text:span><text:span text:style-name="T8"/></text:h>
              </text:list-item>
            </text:list>
            <text:p text:style-name="P2" loext:marker-style-name="T13"><text:span text:style-name="T13">Après avoir complété cette check-list, avez-vous reçu la permission de publier l’appli par le responsable des publications numériques dans votre organisation ?</text:span><text:span text:style-name="T13"/></text:p>
          </table:table-cell>
        </table:table-row>
      </table:table>
      <text:p text:style-name="P44" loext:marker-style-name="T7"/>
      <text:p text:style-name="P44" loext:marker-style-name="T7"/>
      <text:p text:style-name="P45" loext:marker-style-name="T7"><text:span text:style-name="T7">Dernière mise à jour : le 09 mars 2021</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WWNum6" style:class="chapter">
      <style:paragraph-properties fo:margin-left="0in" fo:margin-top="0in" fo:margin-bottom="0in" style:contextual-spacing="false" fo:line-height="100%" fo:keep-together="always" fo:text-indent="0in" style:auto-text-indent="false" fo:keep-with-next="always">
        <style:tab-stops>
          <style:tab-stop style:position="0.2362in"/>
        </style:tab-stops>
      </style:paragraph-properties>
      <style:text-properties style:font-name="Calibri1" fo:font-family="Calibri" style:font-family-generic="swiss"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style:font-name="Calibri1" fo:font-family="Calibri" style:font-family-generic="swiss"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size="10pt" style:font-size-asian="10pt" style:font-size-complex="10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fo:font-weight="bold"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6228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1228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6228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1228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6228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1228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6228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1228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6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1</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App Publishing Checklist</dc:title>
    <meta:initial-creator>Richard Margetts</meta:initial-creator>
    <dc:creator>Richard Margetts</dc:creator>
    <meta:editing-cycles>44</meta:editing-cycles>
    <meta:creation-date>2016-09-20T09:48:00</meta:creation-date>
    <dc:date>2021-03-09T08:56:00</dc:date>
    <meta:editing-duration>PT17H30M</meta:editing-duration>
    <meta:generator>LibreOffice/26.2.3.2$Linux_X86_64 LibreOffice_project/620$Build-2</meta:generator>
    <meta:document-statistic meta:table-count="3" meta:image-count="1" meta:object-count="0" meta:page-count="1" meta:paragraph-count="198" meta:word-count="3713" meta:character-count="23344" meta:non-whitespace-character-count="19844"/>
    <meta:user-defined meta:name="AppVersion">16.0000</meta:user-defined>
    <meta:template xlink:type="simple" xlink:actuate="onRequest" xlink:title="Normal.dotm" xlink:href=""/>
  </office:meta>
</office:document-meta>
</file>