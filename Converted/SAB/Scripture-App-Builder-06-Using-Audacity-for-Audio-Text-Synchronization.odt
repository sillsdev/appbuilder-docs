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1833CE2F20D.png" manifest:media-type="image/png"/>
  <manifest:file-entry manifest:full-path="Pictures/10000000000001F300000183ED2BD124.png" manifest:media-type="image/png"/>
  <manifest:file-entry manifest:full-path="Pictures/100000000000032F000001C95B937A69.png" manifest:media-type="image/png"/>
  <manifest:file-entry manifest:full-path="Pictures/1000000000000226000001362E61B54E.png" manifest:media-type="image/png"/>
  <manifest:file-entry manifest:full-path="Pictures/1000000100000846000002729EF3B20B.png" manifest:media-type="image/png"/>
  <manifest:file-entry manifest:full-path="Pictures/10000000000001F300000183FB6552FC.png" manifest:media-type="image/png"/>
  <manifest:file-entry manifest:full-path="Pictures/10000000000000600000006CCBDB454E.png" manifest:media-type="image/png"/>
  <manifest:file-entry manifest:full-path="Pictures/10000000000002D900000152AF435827.png" manifest:media-type="image/png"/>
  <manifest:file-entry manifest:full-path="Pictures/100000000000032F000001C944848F40.png" manifest:media-type="image/png"/>
  <manifest:file-entry manifest:full-path="Pictures/10000000000000FD000000645817885E.jpg" manifest:media-type="image/jpeg"/>
  <manifest:file-entry manifest:full-path="Pictures/10000000000001F30000018324F8F924.png" manifest:media-type="image/png"/>
  <manifest:file-entry manifest:full-path="Pictures/100000000000024800000170BF1C90AB.png" manifest:media-type="image/png"/>
  <manifest:file-entry manifest:full-path="Pictures/100000000000017700000107BC7F8427.png" manifest:media-type="image/png"/>
  <manifest:file-entry manifest:full-path="Pictures/100000000000032F000001C91C8C43CD.png" manifest:media-type="image/png"/>
  <manifest:file-entry manifest:full-path="Pictures/10000000000001F300000183684571A6.png" manifest:media-type="image/png"/>
  <manifest:file-entry manifest:full-path="Pictures/10000000000001F300000183854602AE.png" manifest:media-type="image/png"/>
  <manifest:file-entry manifest:full-path="Pictures/100000000000024800000170E39B73FE.png" manifest:media-type="image/png"/>
  <manifest:file-entry manifest:full-path="Pictures/100000000000012B00000098363E8AB6.png" manifest:media-type="image/png"/>
  <manifest:file-entry manifest:full-path="Pictures/100000000000032F000001C9CD1547A3.png" manifest:media-type="image/png"/>
  <manifest:file-entry manifest:full-path="Pictures/10000000000001F30000018351ED4511.png" manifest:media-type="image/png"/>
  <manifest:file-entry manifest:full-path="Pictures/1000000000000248000001706D265004.png" manifest:media-type="image/png"/>
  <manifest:file-entry manifest:full-path="Pictures/10000000000001F300000183465E43E3.png" manifest:media-type="image/png"/>
  <manifest:file-entry manifest:full-path="Pictures/100000000000032F000001C923B1E5AD.png" manifest:media-type="image/png"/>
  <manifest:file-entry manifest:full-path="Pictures/100000000000017E000001079146D5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haris SIL" svg:font-family="'Charis SIL'" style:font-family-generic="roman" style:font-pitch="variable"/>
    <style:font-face style:name="Charis SIL1" svg:font-family="'Charis SIL'"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1417in" fo:margin-left="-0.0438in" fo:margin-top="0in" fo:margin-bottom="0in" table:align="left" style:writing-mode="page"/>
    </style:style>
    <style:style style:name="Table1.A" style:family="table-column">
      <style:table-column-properties style:column-width="0.416in"/>
    </style:style>
    <style:style style:name="Table1.B" style:family="table-column">
      <style:table-column-properties style:column-width="4.7257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2" style:family="table">
      <style:table-properties style:width="5.5069in" fo:margin-left="0.5007in" fo:margin-top="0in" fo:margin-bottom="0in" table:align="left" style:writing-mode="page"/>
    </style:style>
    <style:style style:name="Table2.A" style:family="table-column">
      <style:table-column-properties style:column-width="3.25in"/>
    </style:style>
    <style:style style:name="Table2.B" style:family="table-column">
      <style:table-column-properties style:column-width="1.125in"/>
    </style:style>
    <style:style style:name="Table2.C" style:family="table-column">
      <style:table-column-properties style:column-width="1.1319in"/>
    </style:style>
    <style:style style:name="Table2.1" style:family="table-row">
      <style:table-row-properties fo:keep-together="auto"/>
    </style:style>
    <style:style style:name="Table2.A1" style:family="table-cell">
      <style:table-cell-properties fo:background-color="#f8f8f8" fo:padding-left="0.075in" fo:padding-right="0.075in" fo:padding-top="0.0396in" fo:padding-bottom="0.0396in" fo:border="0.5pt solid #000000">
        <style:background-image/>
      </style:table-cell-properties>
    </style:style>
    <style:style style:name="Table2.A2" style:family="table-cell">
      <style:table-cell-properties style:vertical-align="middle" fo:background-color="#f8f8f8" fo:padding-left="0.075in" fo:padding-right="0.075in" fo:padding-top="0.0396in" fo:padding-bottom="0.0396in" fo:border="0.5pt solid #000000">
        <style:background-image/>
      </style:table-cell-properties>
    </style:style>
    <style:style style:name="Table1" style:family="table">
      <style:table-properties style:width="5.1417in" fo:margin-left="-0.0438in" fo:margin-top="0in" fo:margin-bottom="0in" table:align="left" style:writing-mode="page"/>
    </style:style>
    <style:style style:name="Table1.A" style:family="table-column">
      <style:table-column-properties style:column-width="0.416in"/>
    </style:style>
    <style:style style:name="Table1.B" style:family="table-column">
      <style:table-column-properties style:column-width="4.7257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loext:graphic-properties draw:fill="none"/>
      <style:paragraph-properties fo:text-align="center"/>
    </style:style>
    <style:style style:name="P4" style:family="paragraph" style:parent-style-name="Standard">
      <style:paragraph-properties fo:text-align="center" style:justify-single-word="false"/>
      <style:text-properties fo:language="en" fo:country="GB" fo:font-style="italic" style:font-style-asian="italic"/>
    </style:style>
    <style:style style:name="P5" style:family="paragraph" style:parent-style-name="Standard">
      <style:paragraph-properties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break-before="page">
        <style:tab-stops>
          <style:tab-stop style:position="2.5555in"/>
        </style:tab-stops>
      </style:paragraph-properties>
    </style:style>
    <style:style style:name="P9" style:family="paragraph" style:parent-style-name="Standard">
      <style:paragraph-properties fo:text-align="center" style:justify-single-word="false"/>
      <style:text-properties fo:font-size="16pt" fo:language="en" fo:country="US" fo:font-weight="bold" style:font-size-asian="16pt" style:font-weight-asian="bold" style:font-size-complex="16pt"/>
    </style:style>
    <style:style style:name="P10" style:family="paragraph" style:parent-style-name="Standard">
      <style:text-properties fo:language="en" fo:country="US"/>
    </style:style>
    <style:style style:name="P11" style:family="paragraph" style:parent-style-name="Standard">
      <style:paragraph-properties fo:break-before="page"/>
      <style:text-properties fo:language="en" fo:country="US"/>
    </style:style>
    <style:style style:name="P12" style:family="paragraph" style:parent-style-name="Heading_20_1" style:list-style-name="WWNum13"/>
    <style:style style:name="P13" style:family="paragraph" style:parent-style-name="Standard" style:list-style-name="WWNum23">
      <style:paragraph-properties fo:margin-left="0.4957in" fo:margin-top="0.0835in" fo:margin-bottom="0in" style:contextual-spacing="false" fo:text-indent="-0.248in" style:auto-text-indent="false"/>
    </style:style>
    <style:style style:name="P14" style:family="paragraph" style:parent-style-name="Standard">
      <style:paragraph-properties fo:margin-top="0.0835in" fo:margin-bottom="0in" style:contextual-spacing="false"/>
      <style:text-properties fo:language="en" fo:country="GB"/>
    </style:style>
    <style:style style:name="P15" style:family="paragraph" style:parent-style-name="Standard">
      <loext:graphic-properties draw:fill="solid" draw:fill-color="#f2f2f2"/>
      <style:paragraph-properties fo:margin-left="0.2957in" fo:background-color="#f2f2f2" fo:padding="0.0835in" fo:border="0.51pt solid #ffffff" style:shadow="none"/>
    </style:style>
    <style:style style:name="P16" style:family="paragraph" style:parent-style-name="Standard">
      <style:paragraph-properties fo:margin-top="0.0835in" fo:margin-bottom="0.0835in" style:contextual-spacing="false"/>
      <style:text-properties fo:language="en" fo:country="GB"/>
    </style:style>
    <style:style style:name="P17" style:family="paragraph" style:parent-style-name="Standard">
      <style:paragraph-properties fo:margin-top="0.0835in" fo:margin-bottom="0.0835in" style:contextual-spacing="false"/>
    </style:style>
    <style:style style:name="P18" style:family="paragraph" style:parent-style-name="Standard" style:list-style-name="WWNum26">
      <style:paragraph-properties fo:margin-left="0.4957in" fo:margin-top="0.0835in" fo:margin-bottom="0in" style:contextual-spacing="false" fo:text-indent="-0.248in" style:auto-text-indent="false"/>
    </style:style>
    <style:style style:name="P19" style:family="paragraph" style:parent-style-name="Standard" style:list-style-name="WWNum26">
      <style:paragraph-properties fo:margin-left="0.4957in" fo:margin-top="0.0417in" fo:margin-bottom="0in" style:contextual-spacing="false" fo:text-indent="-0.248in" style:auto-text-indent="false"/>
    </style:style>
    <style:style style:name="P20" style:family="paragraph" style:parent-style-name="Standard">
      <style:paragraph-properties fo:margin-top="0.1665in" fo:margin-bottom="0in" style:contextual-spacing="false"/>
    </style:style>
    <style:style style:name="P21" style:family="paragraph" style:parent-style-name="Standard">
      <style:paragraph-properties fo:margin-top="0.1665in" fo:margin-bottom="0.0835in" style:contextual-spacing="false"/>
    </style:style>
    <style:style style:name="P22" style:family="paragraph" style:parent-style-name="Standard">
      <style:paragraph-properties fo:margin-top="0.1665in" fo:margin-bottom="0in" style:contextual-spacing="false"/>
      <style:text-properties fo:language="en" fo:country="GB"/>
    </style:style>
    <style:style style:name="P23" style:family="paragraph" style:parent-style-name="Standard">
      <style:paragraph-properties fo:margin-top="0.0835in" fo:margin-bottom="0.0835in" style:contextual-spacing="false" fo:keep-with-next="always"/>
    </style:style>
    <style:style style:name="P24" style:family="paragraph" style:parent-style-name="Standard">
      <style:paragraph-properties fo:margin-top="0.0835in" fo:margin-bottom="0in" style:contextual-spacing="false" fo:keep-with-next="always"/>
    </style:style>
    <style:style style:name="P25" style:family="paragraph" style:parent-style-name="Standard" style:list-style-name="WWNum14">
      <style:paragraph-properties fo:margin-top="0.0835in" fo:margin-bottom="0in" style:contextual-spacing="false"/>
    </style:style>
    <style:style style:name="P26" style:family="paragraph" style:parent-style-name="Standard" style:list-style-name="WWNum14">
      <style:paragraph-properties fo:margin-left="0.4957in" fo:text-indent="-0.248in" style:auto-text-indent="false"/>
    </style:style>
    <style:style style:name="P27" style:family="paragraph" style:parent-style-name="Standard">
      <style:paragraph-properties fo:margin-top="0.25in" fo:margin-bottom="0in" style:contextual-spacing="false"/>
    </style:style>
    <style:style style:name="P28" style:family="paragraph" style:parent-style-name="Standard">
      <style:paragraph-properties fo:margin-top="0.1665in" fo:margin-bottom="0in" style:contextual-spacing="false" fo:text-align="center" style:justify-single-word="false"/>
    </style:style>
    <style:style style:name="P29" style:family="paragraph">
      <loext:graphic-properties draw:fill="solid" draw:fill-color="#f8f8f8"/>
    </style:style>
    <style:style style:name="P30" style:family="paragraph" style:parent-style-name="Standard">
      <style:paragraph-properties fo:margin-top="0.0835in" fo:margin-bottom="0in" style:contextual-spacing="false"/>
    </style:style>
    <style:style style:name="P31" style:family="paragraph" style:parent-style-name="Frame_20_contents">
      <style:paragraph-properties>
        <style:tab-stops>
          <style:tab-stop style:position="1.25in"/>
          <style:tab-stop style:position="2.5in"/>
        </style:tab-stops>
      </style:paragraph-properties>
    </style:style>
    <style:style style:name="P32" style:family="paragraph" style:parent-style-name="Standard">
      <style:paragraph-properties fo:margin-top="0.1665in" fo:margin-bottom="0in" style:contextual-spacing="false" fo:keep-together="always" fo:keep-with-next="always"/>
      <style:text-properties fo:language="en" fo:country="GB"/>
    </style:style>
    <style:style style:name="P33" style:family="paragraph" style:parent-style-name="Standard">
      <style:paragraph-properties fo:margin-top="0.1665in" fo:margin-bottom="0in" style:contextual-spacing="false" fo:keep-together="always" fo:keep-with-next="always"/>
    </style:style>
    <style:style style:name="P34" style:family="paragraph" style:parent-style-name="Standard">
      <style:paragraph-properties fo:margin-left="0.25in"/>
    </style:style>
    <style:style style:name="P35" style:family="paragraph" style:parent-style-name="Heading_20_2" style:list-style-name="WWNum13"/>
    <style:style style:name="P36" style:family="paragraph" style:parent-style-name="Standard" style:list-style-name="WWNum15">
      <style:paragraph-properties fo:margin-left="0.4957in" fo:margin-top="0.0835in" fo:margin-bottom="0in" style:contextual-spacing="false" fo:text-indent="-0.248in" style:auto-text-indent="false"/>
    </style:style>
    <style:style style:name="P37" style:family="paragraph" style:parent-style-name="Standard" style:list-style-name="WWNum15"/>
    <style:style style:name="P38" style:family="paragraph" style:parent-style-name="style0">
      <style:text-properties fo:font-size="10pt" style:font-size-asian="10pt" style:font-size-complex="10pt"/>
    </style:style>
    <style:style style:name="P39" style:family="paragraph" style:parent-style-name="Standard">
      <style:paragraph-properties fo:keep-with-next="always"/>
    </style:style>
    <style:style style:name="P40" style:family="paragraph" style:parent-style-name="Standard">
      <style:paragraph-properties fo:keep-with-next="always"/>
      <style:text-properties fo:language="en" fo:country="GB"/>
    </style:style>
    <style:style style:name="P41" style:family="paragraph" style:parent-style-name="Standard">
      <style:paragraph-properties fo:margin-top="0.0835in" fo:margin-bottom="0in" style:contextual-spacing="false" fo:text-align="center" style:justify-single-word="false"/>
    </style:style>
    <style:style style:name="P42" style:family="paragraph" style:parent-style-name="Heading_20_1" style:list-style-name="WWNum13">
      <style:paragraph-properties fo:keep-together="always"/>
    </style:style>
    <style:style style:name="P43" style:family="paragraph" style:parent-style-name="Standard">
      <style:paragraph-properties fo:keep-together="always" fo:keep-with-next="always"/>
      <style:text-properties fo:language="en" fo:country="GB"/>
    </style:style>
    <style:style style:name="P44" style:family="paragraph" style:parent-style-name="Standard" style:list-style-name="WWNum5">
      <style:paragraph-properties fo:keep-together="always" fo:keep-with-next="always"/>
    </style:style>
    <style:style style:name="P45" style:family="paragraph" style:parent-style-name="Standard">
      <style:paragraph-properties fo:margin-left="0.25in"/>
      <style:text-properties fo:language="en" fo:country="GB"/>
    </style:style>
    <style:style style:name="P46" style:family="paragraph" style:parent-style-name="Standard" style:list-style-name="WWNum5"/>
    <style:style style:name="P47" style:family="paragraph" style:parent-style-name="Standard" style:list-style-name="WWNum5">
      <style:paragraph-properties fo:margin-left="0.248in" fo:text-indent="-0.248in" style:auto-text-indent="false" fo:keep-with-next="always"/>
    </style:style>
    <style:style style:name="P48" style:family="paragraph" style:parent-style-name="Standard">
      <style:paragraph-properties fo:margin-left="0.5in" fo:keep-with-next="always"/>
    </style:style>
    <style:style style:name="P49" style:family="paragraph" style:parent-style-name="Standard" style:list-style-name="WWNum5">
      <style:paragraph-properties fo:keep-with-next="always"/>
    </style:style>
    <style:style style:name="P50" style:family="paragraph" style:parent-style-name="Standard">
      <style:paragraph-properties fo:margin-left="0.25in" fo:text-indent="0.2417in" style:auto-text-indent="false" fo:keep-with-next="always"/>
    </style:style>
    <style:style style:name="P51" style:family="paragraph" style:parent-style-name="Standard">
      <style:paragraph-properties fo:margin-left="0.4917in" fo:keep-with-next="always"/>
      <style:text-properties fo:language="en" fo:country="GB"/>
    </style:style>
    <style:style style:name="P52" style:family="paragraph" style:parent-style-name="Standard">
      <style:paragraph-properties fo:margin-left="0.4917in" fo:keep-with-next="always"/>
    </style:style>
    <style:style style:name="P53" style:family="paragraph" style:parent-style-name="Standard">
      <style:text-properties fo:language="en" fo:country="GB" fo:font-style="italic" style:font-style-asian="italic"/>
    </style:style>
    <style:style style:name="P54" style:family="paragraph" style:parent-style-name="Standard">
      <style:paragraph-properties fo:margin-left="0.4917in"/>
    </style:style>
    <style:style style:name="P55" style:family="paragraph" style:parent-style-name="Standard">
      <style:paragraph-properties fo:margin-left="0.4917in"/>
      <style:text-properties fo:font-size="8pt" fo:language="en" fo:country="GB" fo:font-style="italic" style:font-size-asian="8pt" style:font-style-asian="italic"/>
    </style:style>
    <style:style style:name="P56" style:family="paragraph" style:parent-style-name="Standard">
      <style:paragraph-properties fo:margin-left="0.4917in"/>
      <style:text-properties fo:language="en" fo:country="GB" fo:font-style="italic" style:font-style-asian="italic"/>
    </style:style>
    <style:style style:name="P57" style:family="paragraph" style:parent-style-name="Standard">
      <style:text-properties fo:language="en" fo:country="GB" fo:font-style="italic" fo:font-weight="bold" style:font-style-asian="italic" style:font-weight-asian="bold"/>
    </style:style>
    <style:style style:name="P58" style:family="paragraph" style:parent-style-name="Standard">
      <style:paragraph-properties fo:margin-left="0.4925in" fo:margin-top="0.0835in" fo:margin-bottom="0in" style:contextual-spacing="false" fo:text-align="center" style:justify-single-word="false"/>
    </style:style>
    <style:style style:name="P59" style:family="paragraph" style:parent-style-name="Standard">
      <style:paragraph-properties fo:margin-left="0.4917in"/>
      <style:text-properties fo:language="en" fo:country="GB"/>
    </style:style>
    <style:style style:name="P60" style:family="paragraph" style:parent-style-name="Standard">
      <style:paragraph-properties fo:margin-left="0.4898in"/>
    </style:style>
    <style:style style:name="P61" style:family="paragraph" style:parent-style-name="Standard">
      <style:paragraph-properties fo:margin-left="0.4898in"/>
      <style:text-properties fo:font-size="10pt" fo:language="en" fo:country="GB" style:font-size-asian="10pt"/>
    </style:style>
    <style:style style:name="P62" style:family="paragraph" style:parent-style-name="Standard">
      <style:paragraph-properties fo:margin-left="0.4898in"/>
      <style:text-properties fo:language="en" fo:country="GB"/>
    </style:style>
    <style:style style:name="P63" style:family="paragraph" style:parent-style-name="Standard" style:list-style-name="WWNum5">
      <style:paragraph-properties fo:margin-top="0.0835in" fo:margin-bottom="0in" style:contextual-spacing="false"/>
    </style:style>
    <style:style style:name="P64" style:family="paragraph" style:parent-style-name="Heading_20_1" style:list-style-name="WWNum13">
      <style:paragraph-properties fo:margin-left="0.248in" fo:text-indent="-0.248in" style:auto-text-indent="false" fo:break-before="page"/>
    </style:style>
    <style:style style:name="P65" style:family="paragraph" style:parent-style-name="Standard" style:list-style-name="WWNum21">
      <style:paragraph-properties fo:margin-left="0.4957in" fo:margin-top="0.0835in" fo:margin-bottom="0in" style:contextual-spacing="false" fo:text-indent="-0.248in" style:auto-text-indent="false"/>
    </style:style>
    <style:style style:name="P66" style:family="paragraph" style:parent-style-name="Standard">
      <style:paragraph-properties fo:margin-left="0.9835in" fo:margin-top="0.0835in" fo:margin-bottom="0in" style:contextual-spacing="false"/>
    </style:style>
    <style:style style:name="P67" style:family="paragraph" style:parent-style-name="Standard" style:list-style-name="WWNum22">
      <style:paragraph-properties fo:margin-left="0.4957in" fo:margin-top="0.0835in" fo:margin-bottom="0in" style:contextual-spacing="false" fo:text-indent="-0.248in" style:auto-text-indent="false"/>
    </style:style>
    <style:style style:name="P68" style:family="paragraph" style:parent-style-name="Standard" style:list-style-name="WWNum22">
      <style:paragraph-properties fo:margin-left="0.4957in" fo:text-indent="-0.248in" style:auto-text-indent="false"/>
    </style:style>
    <style:style style:name="P69" style:family="paragraph" style:parent-style-name="Heading_20_1" style:list-style-name="WWNum13">
      <style:paragraph-properties fo:break-before="page"/>
    </style:style>
    <style:style style:name="P70" style:family="paragraph" style:parent-style-name="Standard" style:list-style-name="WWNum19"/>
    <style:style style:name="P71" style:family="paragraph" style:parent-style-name="Standard">
      <style:paragraph-properties fo:margin-left="0.25in" fo:text-align="center" style:justify-single-word="false"/>
    </style:style>
    <style:style style:name="P72" style:family="paragraph" style:parent-style-name="Standard">
      <style:paragraph-properties fo:margin-left="0.25in" fo:text-align="center" style:justify-single-word="false"/>
      <style:text-properties fo:language="en" fo:country="GB"/>
    </style:style>
    <style:style style:name="P73" style:family="paragraph" style:parent-style-name="Standard" style:list-style-name="WWNum19">
      <style:paragraph-properties fo:keep-with-next="always"/>
    </style:style>
    <style:style style:name="P74" style:family="paragraph" style:parent-style-name="Standard">
      <style:paragraph-properties fo:margin-left="0.25in" fo:keep-with-next="always"/>
      <style:text-properties fo:language="en" fo:country="GB"/>
    </style:style>
    <style:style style:name="P75" style:family="paragraph" style:parent-style-name="Standard">
      <style:paragraph-properties fo:margin-left="0.5in"/>
      <style:text-properties fo:language="en" fo:country="GB"/>
    </style:style>
    <style:style style:name="P76" style:family="paragraph" style:parent-style-name="Standard">
      <style:paragraph-properties fo:keep-together="always" fo:keep-with-next="always"/>
    </style:style>
    <style:style style:name="P77" style:family="paragraph" style:parent-style-name="Standard" style:list-style-name="WWNum16"/>
    <style:style style:name="P78" style:family="paragraph" style:parent-style-name="Standard">
      <style:text-properties fo:language="en" fo:country="GB" fo:font-weight="bold" style:font-weight-asian="bold"/>
    </style:style>
    <style:style style:name="P79" style:family="paragraph" style:parent-style-name="Standard">
      <style:paragraph-properties fo:keep-with-next="always"/>
      <style:text-properties fo:language="en" fo:country="GB" fo:font-weight="bold" style:font-weight-asian="bold"/>
    </style:style>
    <style:style style:name="P80" style:family="paragraph" style:parent-style-name="Frame_20_contents">
      <style:text-properties style:font-name="Courier New" fo:font-size="10pt" fo:language="en" fo:country="GB" style:font-size-asian="10pt" style:font-name-complex="Courier New1" style:font-size-complex="10pt"/>
    </style:style>
    <style:style style:name="P81" style:family="paragraph" style:parent-style-name="Standard" style:list-style-name="WWNum8"/>
    <style:style style:name="P82" style:family="paragraph" style:parent-style-name="Standard" style:list-style-name="WWNum7">
      <style:paragraph-properties fo:margin-left="0.4957in" fo:margin-top="0.0417in" fo:margin-bottom="0in" style:contextual-spacing="false" fo:text-indent="-0.248in" style:auto-text-indent="false"/>
    </style:style>
    <style:style style:name="P83" style:family="paragraph" style:parent-style-name="Standard" style:list-style-name="WWNum11">
      <style:paragraph-properties fo:margin-top="0.0835in" fo:margin-bottom="0in" style:contextual-spacing="false" fo:keep-with-next="always"/>
    </style:style>
    <style:style style:name="P84" style:family="paragraph" style:parent-style-name="Standard">
      <style:paragraph-properties fo:margin-left="0.25in" fo:margin-top="0.0835in" fo:margin-bottom="0in" style:contextual-spacing="false" fo:keep-with-next="always"/>
      <style:text-properties fo:language="en" fo:country="GB" style:font-size-complex="11pt"/>
    </style:style>
    <style:style style:name="P85" style:family="paragraph" style:parent-style-name="Standard">
      <style:paragraph-properties fo:margin-left="0.25in" fo:margin-top="0.0835in" fo:margin-bottom="0in" style:contextual-spacing="false" fo:keep-with-next="always"/>
    </style:style>
    <style:style style:name="P86" style:family="paragraph" style:parent-style-name="Standard">
      <style:paragraph-properties fo:margin-left="0.248in" fo:margin-top="0.1665in" fo:margin-bottom="0in" style:contextual-spacing="false" fo:keep-with-next="always"/>
    </style:style>
    <style:style style:name="P87" style:family="paragraph" style:parent-style-name="Standard">
      <style:paragraph-properties fo:margin-top="0.0835in" fo:margin-bottom="0in" style:contextual-spacing="false" fo:text-align="center" style:justify-single-word="false"/>
      <style:text-properties fo:language="en" fo:country="GB" style:font-size-complex="11pt"/>
    </style:style>
    <style:style style:name="P88" style:family="paragraph" style:parent-style-name="Standard" style:list-style-name="WWNum11">
      <style:paragraph-properties fo:margin-left="0.248in" fo:margin-top="0.0835in" fo:margin-bottom="0in" style:contextual-spacing="false" fo:text-indent="-0.248in" style:auto-text-indent="false"/>
    </style:style>
    <style:style style:name="P89" style:family="paragraph" style:parent-style-name="Standard">
      <style:paragraph-properties fo:margin-left="0.248in" fo:margin-top="0.0835in" fo:margin-bottom="0in" style:contextual-spacing="false"/>
      <style:text-properties fo:language="en" fo:country="GB" style:font-size-complex="11pt"/>
    </style:style>
    <style:style style:name="P90" style:family="paragraph" style:parent-style-name="Standard">
      <style:paragraph-properties fo:margin-left="0.25in" fo:margin-top="0.0835in" fo:margin-bottom="0in" style:contextual-spacing="false" fo:text-align="center" style:justify-single-word="false"/>
    </style:style>
    <style:style style:name="P91" style:family="paragraph" style:parent-style-name="Standard">
      <style:paragraph-properties fo:margin-left="0.25in" fo:margin-top="0.0835in" fo:margin-bottom="0in" style:contextual-spacing="false"/>
      <style:text-properties fo:language="en" fo:country="GB" style:font-size-complex="11pt"/>
    </style:style>
    <style:style style:name="P92" style:family="paragraph" style:parent-style-name="Standard">
      <style:paragraph-properties fo:margin-left="0.248in" fo:margin-top="0.0835in" fo:margin-bottom="0in" style:contextual-spacing="false" fo:keep-with-next="always"/>
    </style:style>
    <style:style style:name="P93" style:family="paragraph" style:parent-style-name="Standard">
      <style:paragraph-properties fo:margin-top="0.0835in" fo:margin-bottom="0in" style:contextual-spacing="false" fo:text-align="center" style:justify-single-word="false"/>
      <style:text-properties fo:language="en" fo:country="GB" fo:font-weight="bold" style:font-weight-asian="bold" style:font-size-complex="11pt" style:font-weight-complex="bold"/>
    </style:style>
    <style:style style:name="P94" style:family="paragraph" style:parent-style-name="Standard">
      <style:paragraph-properties fo:margin-top="0.0835in" fo:margin-bottom="0in" style:contextual-spacing="false" fo:text-indent="0.248in" style:auto-text-indent="false"/>
    </style:style>
    <style:style style:name="P95" style:family="paragraph" style:parent-style-name="Standard" style:list-style-name="WWNum11">
      <style:paragraph-properties fo:margin-top="0.0835in" fo:margin-bottom="0in" style:contextual-spacing="false"/>
    </style:style>
    <style:style style:name="P96" style:family="paragraph" style:parent-style-name="Standard">
      <style:paragraph-properties fo:margin-top="0.0835in" fo:margin-bottom="0in" style:contextual-spacing="false" fo:text-indent="0.25in" style:auto-text-indent="false"/>
    </style:style>
    <style:style style:name="P97" style:family="paragraph" style:parent-style-name="Standard" style:list-style-name="WWNum11">
      <style:paragraph-properties fo:margin-left="0.248in" fo:margin-top="0.1665in" fo:margin-bottom="0in" style:contextual-spacing="false" fo:text-indent="-0.248in" style:auto-text-indent="false"/>
    </style:style>
    <style:style style:name="P98" style:family="paragraph" style:parent-style-name="Standard">
      <style:paragraph-properties fo:margin-top="0.0835in" fo:margin-bottom="0in" style:contextual-spacing="false" fo:text-indent="0.248in" style:auto-text-indent="false" fo:keep-with-next="always"/>
    </style:style>
    <style:style style:name="P99" style:family="paragraph" style:parent-style-name="Standard">
      <style:paragraph-properties fo:margin-top="0.0835in" fo:margin-bottom="0in" style:contextual-spacing="false"/>
      <style:text-properties fo:language="en" fo:country="GB" style:font-size-complex="11pt"/>
    </style:style>
    <style:style style:name="P100" style:family="paragraph" style:parent-style-name="Standard">
      <style:paragraph-properties fo:margin-left="0.25in" fo:margin-top="0.0835in" fo:margin-bottom="0in" style:contextual-spacing="false"/>
    </style:style>
    <style:style style:name="P101"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2pt" fo:language="en" fo:country="GB" fo:font-weight="bold" style:font-size-asian="32pt" style:font-weight-asian="bold" style:font-size-complex="32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font-size="16pt" fo:language="en" fo:country="US" fo:font-weight="bold" style:font-size-asian="16pt" style:font-weight-asian="bold" style:font-size-complex="16pt"/>
    </style:style>
    <style:style style:name="T8" style:family="text">
      <style:text-properties fo:font-size="20pt" fo:language="en" fo:country="US" fo:font-weight="bold" style:font-size-asian="20pt" style:font-weight-asian="bold" style:font-size-complex="16pt"/>
    </style:style>
    <style:style style:name="T9" style:family="text">
      <style:text-properties fo:font-size="11pt" fo:language="en" fo:country="GB" fo:font-weight="normal" style:font-size-asian="11pt" style:language-asian="en" style:country-asian="GB" style:font-weight-asian="normal" style:font-name-complex="Arial1" style:font-size-complex="11pt"/>
    </style:style>
    <style:style style:name="T10" style:family="text">
      <style:text-properties text:display="true"/>
    </style:style>
    <style:style style:name="T11" style:family="text">
      <style:text-properties fo:font-size="11pt" fo:language="en" fo:country="GB" fo:font-style="normal" style:font-size-asian="11pt" style:language-asian="en" style:country-asian="GB" style:font-style-asian="normal" style:font-name-complex="Arial1" style:font-size-complex="11pt"/>
    </style:style>
    <style:style style:name="T12" style:family="text">
      <style:text-properties fo:language="en" fo:country="US"/>
    </style:style>
    <style:style style:name="T13" style:family="text">
      <style:text-properties fo:language="en" fo:country="GB" fo:font-weight="bold" style:font-weight-asian="bold" style:font-weight-complex="bold"/>
    </style:style>
    <style:style style:name="T14" style:family="text">
      <style:text-properties fo:language="en" fo:country="GB" fo:font-style="italic" style:font-style-asian="italic" style:font-style-complex="italic"/>
    </style:style>
    <style:style style:name="T15" style:family="text">
      <style:text-properties fo:language="en" fo:country="GB" fo:font-weight="bold" style:font-weight-asian="bold"/>
    </style:style>
    <style:style style:name="T16" style:family="text">
      <style:text-properties fo:font-size="14pt" fo:language="en" fo:country="GB" fo:font-weight="bold" style:font-size-asian="14pt" style:font-weight-asian="bold" style:font-size-complex="14pt" style:font-weight-complex="bold"/>
    </style:style>
    <style:style style:name="T17" style:family="text">
      <style:text-properties style:font-name="Courier New" fo:language="en" fo:country="GB" style:font-name-complex="Courier New1"/>
    </style:style>
    <style:style style:name="T18" style:family="text">
      <style:text-properties fo:language="en" fo:country="US" fo:font-style="italic" style:font-style-asian="italic"/>
    </style:style>
    <style:style style:name="T19" style:family="text">
      <style:text-properties fo:language="en" fo:country="US" fo:font-weight="bold" style:font-weight-asian="bold"/>
    </style:style>
    <style:style style:name="T20" style:family="text">
      <style:text-properties fo:font-weight="bold" style:font-weight-asian="bold"/>
    </style:style>
    <style:style style:name="T21" style:family="text">
      <style:text-properties fo:font-size="10pt" style:font-size-asian="10pt" style:font-size-complex="10pt"/>
    </style:style>
    <style:style style:name="T22" style:family="text">
      <style:text-properties fo:font-size="10pt" fo:language="fr" fo:country="FR" style:font-size-asian="10pt" style:font-size-complex="10pt"/>
    </style:style>
    <style:style style:name="T23"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24" style:family="text">
      <style:text-properties fo:language="en" fo:country="GB" fo:font-style="italic" fo:font-weight="bold" style:font-style-asian="italic" style:font-weight-asian="bold"/>
    </style:style>
    <style:style style:name="T25" style:family="text">
      <style:text-properties fo:font-size="8pt" fo:language="en" fo:country="GB" fo:font-style="italic" style:font-size-asian="8pt" style:font-style-asian="italic"/>
    </style:style>
    <style:style style:name="T26" style:family="text">
      <style:text-properties fo:font-size="10pt" fo:language="en" fo:country="GB" style:font-size-asian="10pt"/>
    </style:style>
    <style:style style:name="T27" style:family="text">
      <style:text-properties fo:language="en" fo:country="GB" style:font-weight-complex="bold"/>
    </style:style>
    <style:style style:name="T28" style:family="text">
      <style:text-properties fo:language="en" fo:country="GB" style:text-underline-style="solid" style:text-underline-width="auto" style:text-underline-color="font-color"/>
    </style:style>
    <style:style style:name="T29" style:family="text">
      <style:text-properties style:font-name="Courier New" fo:font-size="10pt" fo:language="en" fo:country="GB" style:font-size-asian="10pt" style:font-name-complex="Courier New1" style:font-size-complex="10pt"/>
    </style:style>
    <style:style style:name="T30" style:family="text">
      <style:text-properties style:font-name="Courier New" fo:font-size="10pt" style:font-size-asian="10pt" style:font-name-complex="Courier New1" style:font-size-complex="10pt"/>
    </style:style>
    <style:style style:name="T31" style:family="text">
      <style:text-properties fo:font-size="10pt" fo:language="en" fo:country="GB" fo:font-weight="bold" style:font-size-asian="10pt" style:font-weight-asian="bold" style:font-name-complex="Courier New1" style:font-size-complex="10pt"/>
    </style:style>
    <style:style style:name="T32" style:family="text">
      <style:text-properties fo:font-size="10pt" fo:font-weight="bold" style:font-size-asian="10pt" style:font-weight-asian="bold" style:font-name-complex="Courier New1" style:font-size-complex="10pt"/>
    </style:style>
    <style:style style:name="T33" style:family="text">
      <style:text-properties fo:color="#ff0000" loext:opacity="100%" fo:language="en" fo:country="GB"/>
    </style:style>
    <style:style style:name="T34" style:family="text">
      <style:text-properties fo:font-size="10pt" fo:language="en" fo:country="GB" fo:font-style="italic" fo:font-weight="bold" style:font-size-asian="10pt" style:font-style-asian="italic" style:font-weight-asian="bold" style:font-name-complex="Courier New1" style:font-size-complex="10pt"/>
    </style:style>
    <style:style style:name="T35" style:family="text">
      <style:text-properties fo:language="en" fo:country="GB" style:font-size-complex="11pt"/>
    </style:style>
    <style:style style:name="T36" style:family="text">
      <style:text-properties fo:language="en" fo:country="GB" fo:font-weight="bold" style:font-weight-asian="bold" style:font-size-complex="11pt" style:font-weight-complex="bold"/>
    </style:style>
    <style:style style:name="T37" style:family="text">
      <style:text-properties fo:language="en" fo:country="GB" style:font-size-complex="11pt" style:font-weight-complex="bold"/>
    </style:style>
    <style:style style:name="T38" style:family="text">
      <style:text-properties fo:language="en" fo:country="GB" style:language-asian="en" style:country-asian="GB"/>
    </style:style>
    <style:style style:name="fr1" style:family="graphic" style:parent-style-name="Frame">
      <style:graphic-properties fo:margin-left="0.1252in" fo:margin-right="0.1252in" fo:margin-top="0in" fo:margin-bottom="0in" style:run-through="foreground" style:wrap="run-through" style:number-wrapped-paragraphs="no-limit" style:vertical-pos="top" style:vertical-rel="baseline" style:horizontal-pos="from-left" style:horizontal-rel="paragraph" fo:background-color="#f8f8f8" style:background-transparency="0%" draw:fill="solid" draw:fill-color="#f8f8f8" draw:opacity="100%" fo:padding-left="0.1in" fo:padding-right="0.1in" fo:padding-top="0.05in" fo:padding-bottom="0.05in" fo:border="0.06pt solid #000000" style:shadow="#808080 0.0244in 0.0244in" draw:shadow-opacity="100%"/>
    </style:style>
    <style:style style:name="fr2" style:family="graphic" style:parent-style-name="Frame">
      <style:graphic-properties fo:margin-left="0.1252in" fo:margin-right="0.1252in" fo:margin-top="0in" fo:margin-bottom="0in" style:run-through="foreground" style:wrap="run-through" style:number-wrapped-paragraphs="no-limit" style:vertical-pos="top" style:vertical-rel="baseline" style:horizontal-pos="from-left" style:horizontal-rel="paragraph" fo:background-color="#f2f2f2" style:background-transparency="0%" draw:fill="solid" draw:fill-color="#f2f2f2" draw:opacity="100%" fo:padding-left="0.1in" fo:padding-right="0.1in" fo:padding-top="0.05in" fo:padding-bottom="0.05in" fo:border="0.06pt solid #000000"/>
    </style:style>
    <style:style style:name="fr3"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4"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415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solid" svg:stroke-width="0in" svg:stroke-color="#000000" draw:stroke-linejoin="miter" svg:stroke-linecap="butt" draw:fill="solid" draw:fill-color="#f8f8f8" draw:textarea-vertical-align="top" draw:auto-grow-height="false" fo:min-height="3.4in" fo:min-width="4.4252in" fo:padding-top="0.05in" fo:padding-bottom="0.05in" fo:padding-left="0.1in" fo:padding-right="0.1in" fo:wrap-option="wra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text:anchor-type="as-char" draw:z-index="2" draw:style-name="gr1" draw:text-style-name="P3" svg:width="5.8059in" svg:height="1.778in"><draw:image xlink:href="Pictures/1000000100000846000002729EF3B20B.png" xlink:type="simple" xlink:show="embed" xlink:actuate="onLoad" draw:mime-type="image/png"><text:p/></draw:image></draw:frame></text:p>
      <text:p text:style-name="P1" loext:marker-style-name="T1"/>
      <text:p text:style-name="P1" loext:marker-style-name="T1"/>
      <text:p text:style-name="P1" loext:marker-style-name="T1"/>
      <text:p text:style-name="P2" loext:marker-style-name="T2"><text:span text:style-name="T2">Using Audacity for <text:line-break/>Audio-Text Synchronization</text:span><text:span text:style-name="T2"/></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2" loext:marker-style-name="T3"><draw:frame text:anchor-type="as-char" draw:z-index="3" draw:name="Picture 28" draw:style-name="gr2" draw:text-style-name="P3" svg:width="0.6949in" svg:height="0.7689in"><draw:image xlink:href="Pictures/10000000000000600000006CCBDB454E.png" xlink:type="simple" xlink:show="embed" xlink:actuate="onLoad" draw:mime-type="image/png"><text:p/></draw:image></draw:frame></text:p>
      <text:p text:style-name="P4" loext:marker-style-name="T3"/>
      <text:p text:style-name="P4" loext:marker-style-name="T3"/>
      <text:p text:style-name="P5" loext:marker-style-name="T4"/>
      <text:p text:style-name="P6" loext:marker-style-name="T4"/>
      <text:p text:style-name="P6" loext:marker-style-name="T4"><text:bookmark-start text:name="_Hlk500233973"/></text:p>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7" loext:marker-style-name="T4"/>
      <text:p text:style-name="P2" loext:marker-style-name="T5"><text:span text:style-name="T5">Scripture App Builder: Using Audacity for </text:span><text:span text:style-name="T5"/></text:p>
      <text:p text:style-name="P2" loext:marker-style-name="T5"><text:span text:style-name="T5">Audio-Text Synchronization</text:span><text:span text:style-name="T5"/></text:p>
      <text:p text:style-name="P7" loext:marker-style-name="T4"/>
      <text:p text:style-name="P2" loext:marker-style-name="T4"><text:span text:style-name="T4">© 2017, SIL International</text:span><text:span text:style-name="T4"/></text:p>
      <text:p text:style-name="P7" loext:marker-style-name="T4"/>
      <text:p text:style-name="P2" loext:marker-style-name="T6"><text:span text:style-name="T6">Last updated: 5 December 2017</text:span><text:span text:style-name="T6"/></text:p>
      <text:p text:style-name="P7" loext:marker-style-name="T4"/>
      <text:p text:style-name="P7" loext:marker-style-name="T4"/>
      <text:p text:style-name="P7" loext:marker-style-name="T4"/>
      <text:p text:style-name="P7" loext:marker-style-name="T4"/>
      <text:p text:style-name="P7" loext:marker-style-name="T4"/>
      <text:p text:style-name="P2">You are free to print this manual for personal use and for training workshops.</text:p>
      <text:p text:style-name="P2"/>
      <text:p text:style-name="P2">The latest version is available at</text:p>
      <text:p text:style-name="P2" loext:marker-style-name="T4"><text:a xlink:type="simple" xlink:href="http://software.sil.org/scriptureappbuilder/resources/" text:style-name="Internet_20_link" text:visited-style-name="Visited_20_Internet_20_Link"><text:span text:style-name="Internet_20_link"><text:span text:style-name="T4">http://software.sil.org/scriptureappbuilder/resources/</text:span></text:span></text:a><text:span text:style-name="T4"> <text:s/></text:span></text:p>
      <text:p text:style-name="P7" loext:marker-style-name="T4"/>
      <text:p text:style-name="P2" loext:marker-style-name="T4"><text:span text:style-name="T4">and on the Help menu of Scripture App Builder.</text:span><text:span text:style-name="T4"/></text:p>
      <text:p text:style-name="P6" loext:marker-style-name="T4"/>
      <text:p text:style-name="P8" loext:marker-style-name="T7"><text:bookmark-end text:name="_Hlk500233973"/><text:span text:style-name="T4"><text:tab/></text:span><text:span text:style-name="T8">Contents</text:span></text:p>
      <text:p text:style-name="P9" loext:marker-style-name="T7"><text:bookmark-start text:name="_GoBac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500235211" text:style-name="Index_20_Link" text:visited-style-name="Index_20_Link"><text:bookmark-end text:name="_GoBack"/><text:span text:style-name="T4">1.</text:span><text:span text:style-name="T9"><text:tab/></text:span><text:span text:style-name="T4">Introduction</text:span><text:span text:style-name="T10"><text:tab/>4</text:span></text:a></text:p>
          <text:p text:style-name="Contents_20_1" loext:marker-style-name="T9"><text:a xlink:type="simple" xlink:href="#_Toc500235212" text:style-name="Index_20_Link" text:visited-style-name="Index_20_Link"><text:span text:style-name="T4">2.</text:span><text:span text:style-name="T9"><text:tab/></text:span><text:span text:style-name="T4">Getting Started</text:span><text:span text:style-name="T10"><text:tab/>7</text:span></text:a></text:p>
          <text:p text:style-name="Contents_20_2" loext:marker-style-name="T11"><text:a xlink:type="simple" xlink:href="#_Toc500235213" text:style-name="Index_20_Link" text:visited-style-name="Index_20_Link">2.1.<text:span text:style-name="T11"><text:tab/></text:span>Phrase Lists<text:span text:style-name="T10"><text:tab/>7</text:span></text:a></text:p>
          <text:p text:style-name="Contents_20_2" loext:marker-style-name="T11"><text:a xlink:type="simple" xlink:href="#_Toc500235214" text:style-name="Index_20_Link" text:visited-style-name="Index_20_Link">2.2.<text:span text:style-name="T11"><text:tab/></text:span>Installing Audacity<text:span text:style-name="T10"><text:tab/>8</text:span></text:a></text:p>
          <text:p text:style-name="Contents_20_1" loext:marker-style-name="T9"><text:a xlink:type="simple" xlink:href="#_Toc500235215" text:style-name="Index_20_Link" text:visited-style-name="Index_20_Link"><text:span text:style-name="T4">3.</text:span><text:span text:style-name="T9"><text:tab/></text:span><text:span text:style-name="T4">Producing Timing Files</text:span><text:span text:style-name="T10"><text:tab/>9</text:span></text:a></text:p>
          <text:p text:style-name="Contents_20_1" loext:marker-style-name="T9"><text:a xlink:type="simple" xlink:href="#_Toc500235216" text:style-name="Index_20_Link" text:visited-style-name="Index_20_Link"><text:span text:style-name="T4">4.</text:span><text:span text:style-name="T9"><text:tab/></text:span><text:span text:style-name="T4">Timing Labels Assistant</text:span><text:span text:style-name="T10"><text:tab/>14</text:span></text:a></text:p>
          <text:p text:style-name="Contents_20_1" loext:marker-style-name="T9"><text:a xlink:type="simple" xlink:href="#_Toc500235217" text:style-name="Index_20_Link" text:visited-style-name="Index_20_Link"><text:span text:style-name="T4">5.</text:span><text:span text:style-name="T9"><text:tab/></text:span><text:span text:style-name="T4">Usability Tips</text:span><text:span text:style-name="T10"><text:tab/>15</text:span></text:a></text:p>
          <text:p text:style-name="Contents_20_2" loext:marker-style-name="T11"><text:a xlink:type="simple" xlink:href="#_Toc500235218" text:style-name="Index_20_Link" text:visited-style-name="Index_20_Link"><text:span text:style-name="T4">5.1.</text:span><text:span text:style-name="T11"><text:tab/></text:span><text:span text:style-name="T4">Tip #1: Change the keyboard binding for the spacebar</text:span><text:span text:style-name="T10"><text:tab/>15</text:span></text:a></text:p>
          <text:p text:style-name="Contents_20_2" loext:marker-style-name="T11"><text:a xlink:type="simple" xlink:href="#_Toc500235219" text:style-name="Index_20_Link" text:visited-style-name="Index_20_Link"><text:span text:style-name="T4">5.2.</text:span><text:span text:style-name="T11"><text:tab/></text:span><text:span text:style-name="T4">Tip #2: Change the keyboard binding for adding a label</text:span><text:span text:style-name="T10"><text:tab/>16</text:span></text:a></text:p>
          <text:p text:style-name="Contents_20_1" loext:marker-style-name="T9"><text:a xlink:type="simple" xlink:href="#_Toc500235220" text:style-name="Index_20_Link" text:visited-style-name="Index_20_Link"><text:span text:style-name="T4">6.</text:span><text:span text:style-name="T9"><text:tab/></text:span><text:span text:style-name="T4">FAQ</text:span><text:span text:style-name="T10"><text:tab/>19</text:span></text:a></text:p>
          <text:p text:style-name="Contents_20_2" loext:marker-style-name="T11"><text:a xlink:type="simple" xlink:href="#_Toc500235221" text:style-name="Index_20_Link" text:visited-style-name="Index_20_Link"><text:span text:style-name="T4">6.1.</text:span><text:span text:style-name="T11"><text:tab/></text:span><text:span text:style-name="T4">How can I change the punctuation characters which are recognised as ‘end of phrase’ marks?</text:span><text:span text:style-name="T10"><text:tab/>19</text:span></text:a></text:p>
          <text:p text:style-name="Contents_20_2" loext:marker-style-name="T11"><text:a xlink:type="simple" xlink:href="#_Toc500235222" text:style-name="Index_20_Link" text:visited-style-name="Index_20_Link"><text:span text:style-name="T4">6.2.</text:span><text:span text:style-name="T11"><text:tab/></text:span><text:span text:style-name="T4">How can I get the app to highlight text in chapters without any verse numbers?</text:span><text:span text:style-name="T10"><text:tab/>19</text:span></text:a></text:p>
          <text:p text:style-name="Contents_20_2" loext:marker-style-name="T11"><text:a xlink:type="simple" xlink:href="#_Toc500235223" text:style-name="Index_20_Link" text:visited-style-name="Index_20_Link"><text:span text:style-name="T4">6.3.</text:span><text:span text:style-name="T11"><text:tab/></text:span><text:span text:style-name="T4">Can I get the app to split on commas for some verses and not others?</text:span><text:span text:style-name="T10"><text:tab/>20</text:span></text:a></text:p>
          <text:p text:style-name="Contents_20_2" loext:marker-style-name="T11"><text:a xlink:type="simple" xlink:href="#_Toc500235224" text:style-name="Index_20_Link" text:visited-style-name="Index_20_Link"><text:span text:style-name="T4">6.4.</text:span><text:span text:style-name="T11"><text:tab/></text:span><text:span text:style-name="T4">How can I get it to highlight section headings?</text:span><text:span text:style-name="T10"><text:tab/>21</text:span></text:a></text:p>
          <text:p text:style-name="Contents_20_2" loext:marker-style-name="T11"><text:a xlink:type="simple" xlink:href="#_Toc500235225" text:style-name="Index_20_Link" text:visited-style-name="Index_20_Link"><text:span text:style-name="T4">6.5.</text:span><text:span text:style-name="T11"><text:tab/></text:span><text:span text:style-name="T4">How can I define text-audio highlighting for book introductions?</text:span><text:span text:style-name="T10"><text:tab/>21</text:span></text:a></text:p>
          <text:p text:style-name="Contents_20_2" loext:marker-style-name="T11"><text:a xlink:type="simple" xlink:href="#_Toc500235226" text:style-name="Index_20_Link" text:visited-style-name="Index_20_Link"><text:span text:style-name="T4">6.6.</text:span><text:span text:style-name="T11"><text:tab/></text:span><text:span text:style-name="T4">There are parts of the audio where I don’t want any text highlighted. How can I turn off the highlighting for a few moments between verses?</text:span><text:span text:style-name="T10"><text:tab/>22</text:span></text:a></text:p>
          <text:p text:style-name="Contents_20_2" loext:marker-style-name="T11"><text:a xlink:type="simple" xlink:href="#_Toc500235227" text:style-name="Index_20_Link" text:visited-style-name="Index_20_Link"><text:span text:style-name="T4">6.7.</text:span><text:span text:style-name="T11"><text:tab/></text:span><text:span text:style-name="T4">I’d like to give someone else the task of creating timing files. Is there any way of them testing these without needing to know how to build the app?</text:span><text:span text:style-name="T10"><text:tab/>22</text:span></text:a></text:p>
          <text:p text:style-name="Contents_20_1" loext:marker-style-name="T9"><text:a xlink:type="simple" xlink:href="#_Toc500235228" text:style-name="Index_20_Link" text:visited-style-name="Index_20_Link"><text:span text:style-name="T4">7.</text:span><text:span text:style-name="T9"><text:tab/></text:span><text:span text:style-name="T4">Appendix – How to Install Audacity</text:span><text:span text:style-name="T10"><text:tab/>24</text:span></text:a></text:p>
        </text:index-body>
      </text:table-of-content>
      <text:p text:style-name="P10" loext:marker-style-name="T12"/>
      <text:p text:style-name="P11" loext:marker-style-name="T12"/>
      <text:list xml:id="list955989948" text:style-name="WWNum13">
        <text:list-item>
          <text:h text:style-name="P12" text:outline-level="1" loext:marker-style-name="T4"><text:bookmark-start text:name="_Toc500235211"/><text:span text:style-name="T4">Introduction</text:span><text:bookmark-end text:name="_Toc500235211"/><text:span text:style-name="T4"/></text:h>
        </text:list-item>
      </text:list>
      <text:p text:style-name="P6" loext:marker-style-name="T4"/>
      <text:p text:style-name="Standard" loext:marker-style-name="T4"><text:span text:style-name="T4">To add audio-text synchronization to apps built with Scripture App Builder, you need to create a </text:span><text:span text:style-name="T13">timing file</text:span><text:span text:style-name="T4"> to go alongside each audio MP3 file. The timing files provide the information the app needs to highlight phrases in the text as the audio is playing. </text:span></text:p>
      <text:p text:style-name="P6" loext:marker-style-name="T4"/>
      <text:p text:style-name="Standard" loext:marker-style-name="T4"><text:span text:style-name="T4">You can choose between three different methods to create the timing files:</text:span><text:span text:style-name="T4"/></text:p>
      <text:list text:style-name="WWNum23">
        <text:list-item>
          <text:p text:style-name="P13" loext:marker-style-name="T4"><text:span text:style-name="T13">Audacity</text:span><text:span text:style-name="T4">: listen to an audio file in the Audacity audio editor and lay down a labels track, placing a label at the start of each phrase.</text:span></text:p>
        </text:list-item>
        <text:list-item>
          <text:p text:style-name="P13" loext:marker-style-name="T4"><text:span text:style-name="T13">aeneas</text:span><text:span text:style-name="T4">: an automated method of synchronizing text and audio.</text:span></text:p>
        </text:list-item>
        <text:list-item>
          <text:p text:style-name="P13" loext:marker-style-name="T4"><text:span text:style-name="T13">HearThis</text:span><text:span text:style-name="T4">: record the audio line by line using HearThis and export timing files at the same time as producing the MP3 files</text:span></text:p>
        </text:list-item>
      </text:list>
      <text:p text:style-name="P14" loext:marker-style-name="T4"/>
      <text:p text:style-name="Standard" loext:marker-style-name="T4"><text:span text:style-name="T4">This document takes you through the first of these methods: using Audacity to create the timing files. Instructions on the other two methods can be found in the user manuals </text:span><text:span text:style-name="T14">Using HearThis for Audio Recording</text:span><text:span text:style-name="T4"> and </text:span><text:span text:style-name="T14">Using aeneas for Audio-Text Synchronization</text:span><text:span text:style-name="T4">.</text:span></text:p>
      <text:p text:style-name="Standard" loext:marker-style-name="T4"><text:span text:style-name="T4"><text:line-break/></text:span><text:span text:style-name="T4"/></text:p>
      <text:p text:style-name="P15" loext:marker-style-name="T4"><text:span text:style-name="T13">PLEASE NOTE</text:span><text:span text:style-name="T4">: <text:line-break/>Many users of Scripture App Builder are finding that </text:span><text:span text:style-name="T15">aeneas</text:span><text:span text:style-name="T4"> is providing very accurate synchronization results, so we do recommend you try it out. Synchronising the text and audio of a whole New Testament could take you a month using Audacity, but less than an hour using aeneas!</text:span></text:p>
      <text:p text:style-name="P16" loext:marker-style-name="T4"/>
      <text:p text:style-name="P16" loext:marker-style-name="T4"/>
      <text:p text:style-name="P17" loext:marker-style-name="T16"><text:span text:style-name="T16">One timing file for each audio file</text:span><text:span text:style-name="T16"/></text:p>
      <text:p text:style-name="Standard" loext:marker-style-name="T12"><text:span text:style-name="T12">To synchronize audio and text in your app, you will need:</text:span><text:span text:style-name="T12"/></text:p>
      <text:list text:style-name="WWNum26">
        <text:list-item>
          <text:p text:style-name="P18" loext:marker-style-name="T12"><text:span text:style-name="T12">one MP3 audio file and one timing file per chapter, or</text:span><text:span text:style-name="T12"/></text:p>
        </text:list-item>
        <text:list-item>
          <text:p text:style-name="P19" loext:marker-style-name="T12"><text:span text:style-name="T12">one MP3 audio file and one timing file per picture story book.</text:span><text:span text:style-name="T12"/></text:p>
        </text:list-item>
      </text:list>
      <text:p text:style-name="P20" loext:marker-style-name="T12"><text:span text:style-name="T12">For example, if you have a book ‘Matthew’ with 28 chapters, you will need 28 audio files and 28 timing files. If you have a picture story book with 8 pages, you need a single audio file which covers all 8 pages together with a single timing file.</text:span><text:span text:style-name="T12"/></text:p>
      <text:p text:style-name="P21" loext:marker-style-name="T16"><text:span text:style-name="T4">Example: if you have an audio file for Matthew chapter 1, MAT_01.mp3, you need to create a corresponding timing file, e.g. MAT_01.txt.</text:span><text:span text:style-name="T16"/></text:p>
      <text:p text:style-name="P20" loext:marker-style-name="T12"><text:span text:style-name="T12">Note: If you have several audio files per chapter or several chapters in one audio file, you will need to concatenate or split your files to create files of one chapter each before creating the timing files. This could be done in Audacity.</text:span><text:span text:style-name="T12"/></text:p>
      <text:p text:style-name="P22" loext:marker-style-name="T4"/>
      <text:p text:style-name="P23" loext:marker-style-name="T16"><text:span text:style-name="T16">Timing levels</text:span><text:span text:style-name="T16"/></text:p>
      <text:p text:style-name="P24" loext:marker-style-name="T4"><text:span text:style-name="T4">You can choose the level at which the text is highlighted:</text:span><text:span text:style-name="T4"/></text:p>
      <text:list text:style-name="WWNum14">
        <text:list-item>
          <text:p text:style-name="P25" loext:marker-style-name="T4"><text:span text:style-name="T4">verse by verse, or</text:span><text:span text:style-name="T4"/></text:p>
        </text:list-item>
        <text:list-item>
          <text:p text:style-name="P26" loext:marker-style-name="T4"><text:span text:style-name="T4">phrase by phrase.</text:span><text:span text:style-name="T4"/></text:p>
        </text:list-item>
      </text:list>
      <text:p text:style-name="P6" loext:marker-style-name="T4"/>
      <text:p text:style-name="Standard" loext:marker-style-name="T4"><text:span text:style-name="T4">There is also the possibility of splitting a phrase into smaller units.</text:span><text:span text:style-name="T4"/></text:p>
      <text:p text:style-name="P27" loext:marker-style-name="T4"><text:span text:style-name="T15">Verse by verse highlighting</text:span><text:span text:style-name="T4"> will highlight a complete verse at once: from the current verse number up to just before the next verse number. </text:span></text:p>
      <text:p text:style-name="P20" loext:marker-style-name="T4"><text:span text:style-name="T4">A verse-by-verse timing file will look like this:</text:span><text:span text:style-name="T4"/></text:p>
      <text:p text:style-name="P28" loext:marker-style-name="T4"><draw:custom-shape text:anchor-type="as-char" draw:z-index="4" draw:style-name="gr3" draw:text-style-name="P29" svg:width="4.6252in" svg:height="3.5004in"><text:p text:style-name="Frame_20_contents" loext:marker-style-name="T17"><text:span text:style-name="T17">8.252945<text:tab/><text:tab/>8.252945<text:tab/><text:tab/>1</text:span><text:span text:style-name="T17"/></text:p><text:p text:style-name="Frame_20_contents" loext:marker-style-name="T17"><text:span text:style-name="T17">16.401422<text:tab/><text:tab/>16.401422<text:tab/><text:tab/>2</text:span><text:span text:style-name="T17"/></text:p><text:p text:style-name="Frame_20_contents" loext:marker-style-name="T17"><text:span text:style-name="T17">27.235258<text:tab/><text:tab/>27.235258<text:tab/><text:tab/>3</text:span><text:span text:style-name="T17"/></text:p><text:p text:style-name="Frame_20_contents" loext:marker-style-name="T17"><text:span text:style-name="T17">33.809408<text:tab/><text:tab/>33.809408<text:tab/><text:tab/>4-5</text:span><text:span text:style-name="T17"/></text:p><text:p text:style-name="Frame_20_contents" loext:marker-style-name="T17"><text:span text:style-name="T17">66.545898<text:tab/><text:tab/>66.545898<text:tab/><text:tab/>6</text:span><text:span text:style-name="T17"/></text:p><text:p text:style-name="Frame_20_contents" loext:marker-style-name="T17"><text:span text:style-name="T17">74.952265<text:tab/><text:tab/>74.952265<text:tab/><text:tab/>7</text:span><text:span text:style-name="T17"/></text:p><text:p text:style-name="Frame_20_contents" loext:marker-style-name="T17"><text:span text:style-name="T17">96.749997<text:tab/><text:tab/>96.749997<text:tab/><text:tab/>8</text:span><text:span text:style-name="T17"/></text:p><text:p text:style-name="Frame_20_contents" loext:marker-style-name="T17"><text:span text:style-name="T17">111.571459<text:tab/>111.571459<text:tab/>9</text:span><text:span text:style-name="T17"/></text:p><text:p text:style-name="Frame_20_contents" loext:marker-style-name="T17"><text:span text:style-name="T17">127.398309<text:tab/>127.398309<text:tab/>10</text:span><text:span text:style-name="T17"/></text:p><text:p text:style-name="Frame_20_contents" loext:marker-style-name="T17"><text:span text:style-name="T17">130.636807<text:tab/>130.636807<text:tab/>11</text:span><text:span text:style-name="T17"/></text:p><text:p text:style-name="Frame_20_contents" loext:marker-style-name="T17"><text:span text:style-name="T17">149.545453<text:tab/>149.545453<text:tab/>12</text:span><text:span text:style-name="T17"/></text:p><text:p text:style-name="Frame_20_contents" loext:marker-style-name="T17"><text:span text:style-name="T17">157.938255<text:tab/>157.938255<text:tab/>13</text:span><text:span text:style-name="T17"/></text:p><text:p text:style-name="Frame_20_contents" loext:marker-style-name="T17"><text:span text:style-name="T17">172.479752<text:tab/>172.479752<text:tab/>14</text:span><text:span text:style-name="T17"/></text:p><text:p text:style-name="Frame_20_contents" loext:marker-style-name="T17"><text:span text:style-name="T17">190.809003<text:tab/>190.809003<text:tab/>15</text:span><text:span text:style-name="T17"/></text:p><text:p text:style-name="Frame_20_contents" loext:marker-style-name="T17"><text:span text:style-name="T17">206.453448<text:tab/>206.453448<text:tab/>16</text:span><text:span text:style-name="T17"/></text:p><text:p text:style-name="Frame_20_contents" loext:marker-style-name="T17"><text:span text:style-name="T17">217.292729<text:tab/>217.292729<text:tab/>17</text:span><text:span text:style-name="T17"/></text:p><text:p text:style-name="Frame_20_contents" loext:marker-style-name="T17"><text:span text:style-name="T17">229.985550<text:tab/>229.985550<text:tab/>18</text:span></text:p><draw:enhanced-geometry svg:viewBox="0 0 21600 21600" draw:type="mso-spt202" draw:enhanced-path="M 0 0 L 21600 0 21600 21600 0 21600 0 0 Z N"/></draw:custom-shape></text:p>
      <text:p text:style-name="P22" loext:marker-style-name="T4"/>
      <text:p text:style-name="P20" loext:marker-style-name="T4"><text:span text:style-name="T4">The first and second columns indicate the time in seconds. The third column contains the verse number.</text:span><text:span text:style-name="T4"/></text:p>
      <text:p text:style-name="P22" loext:marker-style-name="T4"/>
      <text:p text:style-name="P30" loext:marker-style-name="T4"><text:span text:style-name="T15">Phrase by phrase highlighting</text:span><text:span text:style-name="T4"> will highlight phrases within a verse. Phrases can be between punctuation marks, e.g. up to the next “.” or “,”. You can define the set of punctuation characters that mark the end of a phrase. Individual poetic lines can also be highlighted one by one, for example in a psalm or a song.</text:span></text:p>
      <text:p text:style-name="P20" loext:marker-style-name="T4"><text:span text:style-name="T4">A phrase-by-phrase timing file will look like this:</text:span><text:span text:style-name="T4"/></text:p>
      <text:p text:style-name="P28" loext:marker-style-name="T4"><draw:frame draw:style-name="fr1" draw:name="Frame2" text:anchor-type="as-char" svg:width="4.6252in" svg:height="2.9898in"><draw:text-box><text:p text:style-name="P31" loext:marker-style-name="T17"><text:span text:style-name="T17">3.188682<text:tab/>3.188682<text:tab/>1a</text:span><text:span text:style-name="T17"/></text:p><text:p text:style-name="P31" loext:marker-style-name="T17"><text:span text:style-name="T17">7.415084<text:tab/>7.415084<text:tab/>1b</text:span><text:span text:style-name="T17"/></text:p><text:p text:style-name="P31" loext:marker-style-name="T17"><text:span text:style-name="T17">12.934091<text:tab/>12.934091<text:tab/>1c</text:span><text:span text:style-name="T17"/></text:p><text:p text:style-name="P31" loext:marker-style-name="T17"><text:span text:style-name="T17">16.746603<text:tab/>16.746603<text:tab/>2a</text:span><text:span text:style-name="T17"/></text:p><text:p text:style-name="P31" loext:marker-style-name="T17"><text:span text:style-name="T17">19.829615<text:tab/>19.829615<text:tab/>2b</text:span><text:span text:style-name="T17"/></text:p><text:p text:style-name="P31" loext:marker-style-name="T17"><text:span text:style-name="T17">20.905796<text:tab/>20.905796<text:tab/>2c</text:span><text:span text:style-name="T17"/></text:p><text:p text:style-name="P31" loext:marker-style-name="T17"><text:span text:style-name="T17">21.884018<text:tab/>21.884018<text:tab/>3a</text:span><text:span text:style-name="T17"/></text:p><text:p text:style-name="P31" loext:marker-style-name="T17"><text:span text:style-name="T17">22.858863<text:tab/>22.858863<text:tab/>3b</text:span><text:span text:style-name="T17"/></text:p><text:p text:style-name="P31" loext:marker-style-name="T17"><text:span text:style-name="T17">25.613723<text:tab/>25.613723<text:tab/>4a</text:span><text:span text:style-name="T17"/></text:p><text:p text:style-name="P31" loext:marker-style-name="T17"><text:span text:style-name="T17">27.108508<text:tab/>27.108508<text:tab/>4b</text:span><text:span text:style-name="T17"/></text:p><text:p text:style-name="P31" loext:marker-style-name="T17"><text:span text:style-name="T17">30.192832<text:tab/>30.192832<text:tab/>4c</text:span><text:span text:style-name="T17"/></text:p><text:p text:style-name="P31" loext:marker-style-name="T17"><text:span text:style-name="T17">31.388587<text:tab/>31.388587<text:tab/>4d</text:span><text:span text:style-name="T17"/></text:p><text:p text:style-name="P31" loext:marker-style-name="T17"><text:span text:style-name="T17">32.683989<text:tab/>32.683989<text:tab/>5a</text:span><text:span text:style-name="T17"/></text:p><text:p text:style-name="P31" loext:marker-style-name="T17"><text:span text:style-name="T17">36.440027<text:tab/>36.440027<text:tab/>5b</text:span><text:span text:style-name="T17"/></text:p><text:p text:style-name="P31" loext:marker-style-name="T17"><text:span text:style-name="T17">38.297624<text:tab/>38.297624<text:tab/>5c</text:span></text:p></draw:text-box></draw:frame></text:p>
      <text:p text:style-name="P32" loext:marker-style-name="T4"/>
      <text:p text:style-name="P33" loext:marker-style-name="T4"><text:span text:style-name="T4">or like this:</text:span><text:span text:style-name="T4"/></text:p>
      <text:p text:style-name="P7" loext:marker-style-name="T4"/>
      <text:p text:style-name="P2" loext:marker-style-name="T4"><draw:frame draw:style-name="fr1" draw:name="Frame3" text:anchor-type="as-char" svg:width="4.6252in" svg:height="2.9898in"><draw:text-box><text:p text:style-name="P31" loext:marker-style-name="T17"><text:span text:style-name="T17">3.188682<text:tab/>3.188682<text:tab/>1</text:span><text:span text:style-name="T17"/></text:p><text:p text:style-name="P31" loext:marker-style-name="T17"><text:span text:style-name="T17">7.415084<text:tab/>7.415084<text:tab/></text:span><text:span text:style-name="T17"/></text:p><text:p text:style-name="P31" loext:marker-style-name="T17"><text:span text:style-name="T17">12.934091<text:tab/>12.934091<text:tab/></text:span><text:span text:style-name="T17"/></text:p><text:p text:style-name="P31" loext:marker-style-name="T17"><text:span text:style-name="T17">16.746603<text:tab/>16.746603<text:tab/>2</text:span><text:span text:style-name="T17"/></text:p><text:p text:style-name="P31" loext:marker-style-name="T17"><text:span text:style-name="T17">19.829615<text:tab/>19.829615<text:tab/></text:span><text:span text:style-name="T17"/></text:p><text:p text:style-name="P31" loext:marker-style-name="T17"><text:span text:style-name="T17">20.905796<text:tab/>20.905796<text:tab/></text:span><text:span text:style-name="T17"/></text:p><text:p text:style-name="P31" loext:marker-style-name="T17"><text:span text:style-name="T17">21.884018<text:tab/>21.884018<text:tab/>3</text:span><text:span text:style-name="T17"/></text:p><text:p text:style-name="P31" loext:marker-style-name="T17"><text:span text:style-name="T17">22.858863<text:tab/>22.858863<text:tab/></text:span><text:span text:style-name="T17"/></text:p><text:p text:style-name="P31" loext:marker-style-name="T17"><text:span text:style-name="T17">25.613723<text:tab/>25.613723<text:tab/>4</text:span><text:span text:style-name="T17"/></text:p><text:p text:style-name="P31" loext:marker-style-name="T17"><text:span text:style-name="T17">27.108508<text:tab/>27.108508<text:tab/></text:span><text:span text:style-name="T17"/></text:p><text:p text:style-name="P31" loext:marker-style-name="T17"><text:span text:style-name="T17">30.192832<text:tab/>30.192832<text:tab/></text:span><text:span text:style-name="T17"/></text:p><text:p text:style-name="P31" loext:marker-style-name="T17"><text:span text:style-name="T17">31.388587<text:tab/>31.388587<text:tab/></text:span><text:span text:style-name="T17"/></text:p><text:p text:style-name="P31" loext:marker-style-name="T17"><text:span text:style-name="T17">32.683989<text:tab/>32.683989<text:tab/>5</text:span><text:span text:style-name="T17"/></text:p><text:p text:style-name="P31" loext:marker-style-name="T17"><text:span text:style-name="T17">36.440027<text:tab/>36.440027<text:tab/></text:span><text:span text:style-name="T17"/></text:p><text:p text:style-name="P31" loext:marker-style-name="T17"><text:span text:style-name="T17">38.297624<text:tab/>38.297624<text:tab/></text:span></text:p></draw:text-box></draw:frame></text:p>
      <text:p text:style-name="P7" loext:marker-style-name="T4"/>
      <text:p text:style-name="Standard" loext:marker-style-name="T4"><text:span text:style-name="T4">As in verse-by-verse timing files, the number represents the verse. The lines without verse numbers represent the mid-verse phrase breaks.</text:span><text:span text:style-name="T4"/></text:p>
      <text:p text:style-name="P6" loext:marker-style-name="T4"/>
      <text:p text:style-name="Standard" loext:marker-style-name="T4"><text:span text:style-name="T4">In early versions of Scripture App Builder, it was necessary to specify phrases using 1a, 1b, 1c (the first, second and third phrases in verse 1). But now it is sufficient to leave the timing label blank between verses and SAB will fill in the a, b, c when it reads in the file.</text:span><text:span text:style-name="T4"/></text:p>
      <text:p text:style-name="P6" loext:marker-style-name="T4"/>
      <text:p text:style-name="P6" loext:marker-style-name="T4"/>
      <text:p text:style-name="Standard" loext:marker-style-name="T4"><text:span text:style-name="T15">Word level highlighting</text:span><text:span text:style-name="T4">: If you want to split a phrase after one or more words, you can use word-level highlighting for that phrase. For this, the labels in the timing files should contain an underscore and then the index of the word, e.g.</text:span></text:p>
      <text:p text:style-name="P6" loext:marker-style-name="T4"/>
      <text:p text:style-name="P34" loext:marker-style-name="T4"><text:span text:style-name="T15">1_4</text:span><text:span text:style-name="T4"> <text:tab/>starts at the 4th word of verse 1<text:line-break/></text:span><text:span text:style-name="T15">2a_5</text:span><text:span text:style-name="T4"> <text:tab/>starts at the 5th word of phrase 2a<text:line-break/></text:span><text:span text:style-name="T15">2a_9</text:span><text:span text:style-name="T4"><text:tab/>starts at the 9th word of phrase 2a</text:span></text:p>
      <text:p text:style-name="P6" loext:marker-style-name="T4"/>
      <text:p text:style-name="P30" loext:marker-style-name="T4"><text:span text:style-name="T4">A timing file with word-level phrase breaks might look like the following example:</text:span><text:span text:style-name="T4"/></text:p>
      <text:p text:style-name="P6" loext:marker-style-name="T4"/>
      <text:p text:style-name="P2" loext:marker-style-name="T4"><draw:frame draw:style-name="fr1" draw:name="Frame4" text:anchor-type="as-char" svg:width="4.6252in" svg:height="3.7535in"><draw:text-box><text:p text:style-name="P31" loext:marker-style-name="T17"><text:span text:style-name="T17">3.188682<text:tab/>3.188682<text:tab/>1</text:span><text:span text:style-name="T17"/></text:p><text:p text:style-name="P31" loext:marker-style-name="T17"><text:span text:style-name="T17">7.415084<text:tab/>7.415084<text:tab/>1_4</text:span><text:span text:style-name="T17"/></text:p><text:p text:style-name="P31" loext:marker-style-name="T17"><text:span text:style-name="T17">12.934091<text:tab/>12.934091<text:tab/>1_11</text:span><text:span text:style-name="T17"/></text:p><text:p text:style-name="P31" loext:marker-style-name="T17"><text:span text:style-name="T17">16.746603<text:tab/>16.746603<text:tab/>2a</text:span><text:span text:style-name="T17"/></text:p><text:p text:style-name="P31" loext:marker-style-name="T17"><text:span text:style-name="T17">17.356305<text:tab/>17.356305<text:tab/>2a_5</text:span><text:span text:style-name="T17"/></text:p><text:p text:style-name="P31" loext:marker-style-name="T17"><text:span text:style-name="T17">18.853311<text:tab/>18.853311<text:tab/>2a_9</text:span><text:span text:style-name="T17"/></text:p><text:p text:style-name="P31" loext:marker-style-name="T17"><text:span text:style-name="T17">19.829615<text:tab/>19.829615<text:tab/>2b</text:span><text:span text:style-name="T17"/></text:p><text:p text:style-name="P31" loext:marker-style-name="T17"><text:span text:style-name="T17">20.905796<text:tab/>20.905796<text:tab/>2c</text:span><text:span text:style-name="T17"/></text:p><text:p text:style-name="P31" loext:marker-style-name="T17"><text:span text:style-name="T17">21.884018<text:tab/>21.884018<text:tab/>3</text:span><text:span text:style-name="T17"/></text:p><text:p text:style-name="P31" loext:marker-style-name="T17"><text:span text:style-name="T17">22.858863<text:tab/>22.858863<text:tab/></text:span><text:span text:style-name="T17"/></text:p><text:p text:style-name="P31" loext:marker-style-name="T17"><text:span text:style-name="T17">25.613723<text:tab/>25.613723<text:tab/>4a</text:span><text:span text:style-name="T17"/></text:p><text:p text:style-name="P31" loext:marker-style-name="T17"><text:span text:style-name="T17">27.108508<text:tab/>27.108508<text:tab/>4b</text:span><text:span text:style-name="T17"/></text:p><text:p text:style-name="P31" loext:marker-style-name="T17"><text:span text:style-name="T17">28.839213<text:tab/>28.839213<text:tab/>4b_6</text:span><text:span text:style-name="T17"/></text:p><text:p text:style-name="P31" loext:marker-style-name="T17"><text:span text:style-name="T17">29.158316<text:tab/>29.158316<text:tab/>4b_10</text:span><text:span text:style-name="T17"/></text:p><text:p text:style-name="P31" loext:marker-style-name="T17"><text:span text:style-name="T17">30.192832<text:tab/>30.192832<text:tab/>4c</text:span><text:span text:style-name="T17"/></text:p><text:p text:style-name="P31" loext:marker-style-name="T17"><text:span text:style-name="T17">31.388587<text:tab/>31.388587<text:tab/>4d</text:span><text:span text:style-name="T17"/></text:p><text:p text:style-name="P31" loext:marker-style-name="T17"><text:span text:style-name="T17">32.683989<text:tab/>32.683989<text:tab/>5</text:span><text:span text:style-name="T17"/></text:p><text:p text:style-name="P31" loext:marker-style-name="T17"><text:span text:style-name="T17">36.440027<text:tab/>36.440027<text:tab/></text:span><text:span text:style-name="T17"/></text:p><text:p text:style-name="P31" loext:marker-style-name="T17"><text:span text:style-name="T17">38.297624<text:tab/>38.297624<text:tab/></text:span></text:p></draw:text-box></draw:frame></text:p>
      <text:p text:style-name="P6" loext:marker-style-name="T4"/>
      <text:p text:style-name="P6" loext:marker-style-name="T4"/>
      <text:p text:style-name="P6" loext:marker-style-name="T4"/>
      <text:list xml:id="list131424368950353" text:continue-list="list955989948" text:style-name="WWNum13">
        <text:list-item>
          <text:h text:style-name="P12" text:outline-level="1" loext:marker-style-name="T4"><text:bookmark-start text:name="_Toc500235212"/><text:span text:style-name="T4">Getting Started</text:span><text:bookmark-end text:name="_Toc500235212"/><text:span text:style-name="T4"/></text:h>
          <text:list>
            <text:list-item>
              <text:h text:style-name="P35" text:outline-level="2"><text:bookmark-start text:name="_Toc500235213"/><text:span text:style-name="T12">Phrase Lists</text:span><text:bookmark-end text:name="_Toc500235213"/></text:h>
            </text:list-item>
          </text:list>
        </text:list-item>
      </text:list>
      <text:p text:style-name="Standard" loext:marker-style-name="T12"><text:span text:style-name="T12">To help you identify when to mark a timing break, we recommend you create </text:span><text:span text:style-name="T18">Phrase Lists</text:span><text:span text:style-name="T12">. These will arrange the phrases line by line for you.</text:span></text:p>
      <text:p text:style-name="P10" loext:marker-style-name="T12"/>
      <text:p text:style-name="Standard" loext:marker-style-name="T12"><text:span text:style-name="T12">To create phrase lists for each of the chapters in your app:</text:span><text:span text:style-name="T12"/></text:p>
      <text:list text:style-name="WWNum15">
        <text:list-item>
          <text:p text:style-name="P36" loext:marker-style-name="T12"><text:span text:style-name="T12">Launch </text:span><text:span text:style-name="T19">Scripture App Builder</text:span><text:span text:style-name="T12">.</text:span></text:p>
        </text:list-item>
        <text:list-item>
          <text:p text:style-name="P37" loext:marker-style-name="T12"><text:span text:style-name="T12">Navigate to the </text:span><text:span text:style-name="T19">Book Collection</text:span><text:span text:style-name="T12"> page for your app.</text:span></text:p>
        </text:list-item>
        <text:list-item>
          <text:p text:style-name="P37" loext:marker-style-name="T12"><text:span text:style-name="T12">Go to the </text:span><text:span text:style-name="T19">Audio Synchronization</text:span><text:span text:style-name="T12"> tab.</text:span></text:p>
        </text:list-item>
        <text:list-item>
          <text:p text:style-name="P37" loext:marker-style-name="T12"><text:span text:style-name="T12">Click on </text:span><text:span text:style-name="T19">Create Phrase Lists</text:span><text:span text:style-name="T12"> and follow the instructions in the wizard.</text:span></text:p>
        </text:list-item>
      </text:list>
      <text:p text:style-name="P10" loext:marker-style-name="T12"/>
      <text:p text:style-name="Standard" loext:marker-style-name="T12"><text:span text:style-name="T12">A set of Word documents (.docx), comma-separated files (.csv) or tab-separated files will be created, one for each chapter.</text:span><text:span text:style-name="T12"/></text:p>
      <text:p text:style-name="P10" loext:marker-style-name="T12"/>
      <text:p text:style-name="Standard" loext:marker-style-name="T12"><text:span text:style-name="T12">A phrase list document looks like the following:</text:span><text:span text:style-name="T12"/></text:p>
      <text:p text:style-name="P10" loext:marker-style-name="T12"/>
      <text:p text:style-name="P2"><draw:frame draw:style-name="fr2" draw:name="Frame5" text:anchor-type="as-char" svg:width="2in"><draw:text-box fo:min-height="2in"><text:p text:style-name="style0"><text:span text:style-name="T20">Matiyu 2</text:span></text:p><text:p text:style-name="style0">(Matthew 2)</text:p><text:p text:style-name="style0"/><table:table table:name="Table1" table:style-name="Table1"><table:table-column table:style-name="Table1.A"/><table:table-column table:style-name="Table1.B"/><table:table-row table:style-name="Table1.1"><table:table-cell table:style-name="Table1.A1" office:value-type="string"><text:p text:style-name="style0" loext:marker-style-name="T21"><text:span text:style-name="T21">1</text:span><text:span text:style-name="T21"/></text:p></table:table-cell><table:table-cell table:style-name="Table1.A1" office:value-type="string"><text:p text:style-name="style0" loext:marker-style-name="T21"><text:span text:style-name="T21">Isa hayandi Betelehem,</text:span><text:span text:style-name="T21"/></text:p></table:table-cell></table:table-row><table:table-row table:style-name="Table1.1"><table:table-cell table:style-name="Table1.A1" office:value-type="string"><text:p text:style-name="P38" loext:marker-style-name="T21"/></table:table-cell><table:table-cell table:style-name="Table1.A1" office:value-type="string"><text:p text:style-name="style0" loext:marker-style-name="T21"><text:span text:style-name="T21">Žude gandaa ra,</text:span><text:span text:style-name="T21"/></text:p></table:table-cell></table:table-row><table:table-row table:style-name="Table1.1"><table:table-cell table:style-name="Table1.A1" office:value-type="string"><text:p text:style-name="P38" loext:marker-style-name="T21"/></table:table-cell><table:table-cell table:style-name="Table1.A1" office:value-type="string"><text:p text:style-name="style0" loext:marker-style-name="T21"><text:span text:style-name="T21">kokoyoo kaŋ se i ga nee Herod zamanoo ra.</text:span><text:span text:style-name="T21"/></text:p></table:table-cell></table:table-row><table:table-row table:style-name="Table1.1"><table:table-cell table:style-name="Table1.A1" office:value-type="string"><text:p text:style-name="P38" loext:marker-style-name="T21"/></table:table-cell><table:table-cell table:style-name="Table1.A1" office:value-type="string"><text:p text:style-name="style0" loext:marker-style-name="T21"><text:span text:style-name="T21">Handaray bayraykoyniyaŋ ne ka hun waynahunay ka kaa Žerizalem,</text:span><text:span text:style-name="T21"/></text:p></table:table-cell></table:table-row><table:table-row table:style-name="Table1.1"><table:table-cell table:style-name="Table1.A1" office:value-type="string"><text:p text:style-name="style0" loext:marker-style-name="T21"><text:span text:style-name="T21">2</text:span><text:span text:style-name="T21"/></text:p></table:table-cell><table:table-cell table:style-name="Table1.A1" office:value-type="string"><text:p text:style-name="style0" loext:marker-style-name="T21"><text:span text:style-name="T21">i nee:</text:span><text:span text:style-name="T21"/></text:p></table:table-cell></table:table-row><table:table-row table:style-name="Table1.1"><table:table-cell table:style-name="Table1.A1" office:value-type="string"><text:p text:style-name="P38" loext:marker-style-name="T21"/></table:table-cell><table:table-cell table:style-name="Table1.A1" office:value-type="string"><text:p text:style-name="style0" loext:marker-style-name="T21"><text:span text:style-name="T21">«Man Alyahuudey kokoyoo kaŋ hayandi?</text:span><text:span text:style-name="T21"/></text:p></table:table-cell></table:table-row><table:table-row table:style-name="Table1.1"><table:table-cell table:style-name="Table1.A1" office:value-type="string"><text:p text:style-name="P38" loext:marker-style-name="T21"/></table:table-cell><table:table-cell table:style-name="Table1.A1" office:value-type="string"><text:p text:style-name="style0" loext:marker-style-name="T21"><text:span text:style-name="T21">Ir dii nga handaraa waynahunay.</text:span><text:span text:style-name="T21"/></text:p></table:table-cell></table:table-row><table:table-row table:style-name="Table1.1"><table:table-cell table:style-name="Table1.A1" office:value-type="string"><text:p text:style-name="P38" loext:marker-style-name="T21"/></table:table-cell><table:table-cell table:style-name="Table1.A1" office:value-type="string"><text:p text:style-name="style0" loext:marker-style-name="T21"><text:span text:style-name="T21">Ir kaa ka sujudʼa se.»</text:span><text:span text:style-name="T21"/></text:p></table:table-cell></table:table-row><table:table-row table:style-name="Table1.1"><table:table-cell table:style-name="Table1.A1" office:value-type="string"><text:p text:style-name="style0" loext:marker-style-name="T21"><text:span text:style-name="T21">3</text:span><text:span text:style-name="T21"/></text:p></table:table-cell><table:table-cell table:style-name="Table1.A1" office:value-type="string"><text:p text:style-name="style0" loext:marker-style-name="T21"><text:span text:style-name="T21">Kaŋ kokoyoo Herod maa woo,</text:span><text:span text:style-name="T21"/></text:p></table:table-cell></table:table-row><table:table-row table:style-name="Table1.1"><table:table-cell table:style-name="Table1.A1" office:value-type="string"><text:p text:style-name="P38" loext:marker-style-name="T21"/></table:table-cell><table:table-cell table:style-name="Table1.A1" office:value-type="string"><text:p text:style-name="style0" loext:marker-style-name="T21"><text:span text:style-name="T21">a zalba,</text:span><text:span text:style-name="T21"/></text:p></table:table-cell></table:table-row><table:table-row table:style-name="Table1.1"><table:table-cell table:style-name="Table1.A1" office:value-type="string"><text:p text:style-name="P38" loext:marker-style-name="T21"/></table:table-cell><table:table-cell table:style-name="Table1.A1" office:value-type="string"><text:p text:style-name="style0" loext:marker-style-name="T22"><text:span text:style-name="T22">de </text:span><text:span text:style-name="T21">Žerizalem kul zalbʼa bande.</text:span></text:p></table:table-cell></table:table-row><table:table-row table:style-name="Table1.1"><table:table-cell table:style-name="Table1.A1" office:value-type="string"><text:p text:style-name="style0" loext:marker-style-name="T21"><text:span text:style-name="T21">4</text:span><text:span text:style-name="T21"/></text:p></table:table-cell><table:table-cell table:style-name="Table1.A1" office:value-type="string"><text:p text:style-name="style0" loext:marker-style-name="T21"><text:span text:style-name="T21">A na jamaa sargari juwalkey jineborey nda Citaaboo baykey marga hala i ma nga bayrandi nongoo kaŋ ra Almasihu ga hima ka hayandi.</text:span><text:span text:style-name="T21"/></text:p></table:table-cell></table:table-row><table:table-row table:style-name="Table1.1"><table:table-cell table:style-name="Table1.A1" office:value-type="string"><text:p text:style-name="style0" loext:marker-style-name="T21"><text:span text:style-name="T21">5</text:span><text:span text:style-name="T21"/></text:p></table:table-cell><table:table-cell table:style-name="Table1.A1" office:value-type="string"><text:p text:style-name="style0" loext:marker-style-name="T21"><text:span text:style-name="T21">I nee a se:</text:span><text:span text:style-name="T21"/></text:p></table:table-cell></table:table-row><table:table-row table:style-name="Table1.1"><table:table-cell table:style-name="Table1.A1" office:value-type="string"><text:p text:style-name="P38" loext:marker-style-name="T21"/></table:table-cell><table:table-cell table:style-name="Table1.A1" office:value-type="string"><text:p text:style-name="style0" loext:marker-style-name="T21"><text:span text:style-name="T21">«Betelehem kaŋ goo Žude,</text:span><text:span text:style-name="T21"/></text:p></table:table-cell></table:table-row><table:table-row table:style-name="Table1.1"><table:table-cell table:style-name="Table1.A1" office:value-type="string"><text:p text:style-name="P38" loext:marker-style-name="T21"/></table:table-cell><table:table-cell table:style-name="Table1.A1" office:value-type="string"><text:p text:style-name="style0" loext:marker-style-name="T21"><text:span text:style-name="T21">zama hayaa ne kaŋ annaboo nʼa hantum:</text:span><text:span text:style-name="T21"/></text:p></table:table-cell></table:table-row></table:table><text:p text:style-name="Frame_20_contents"/></draw:text-box></draw:frame></text:p>
      <text:p text:style-name="P6" loext:marker-style-name="T4"/>
      <text:p text:style-name="Standard" loext:marker-style-name="T4"><text:span text:style-name="T4">Each row in the phrase list document represents a separate timing phrase which will need to be marked.</text:span><text:span text:style-name="T4"/></text:p>
      <text:p text:style-name="P6" loext:marker-style-name="T4"/>
      <text:p text:style-name="Standard" loext:marker-style-name="T4"><text:span text:style-name="T4">You can define which characters are recognised as phrase ending characters in the </text:span><text:span text:style-name="T15">Features</text:span><text:span text:style-name="T4"> </text:span><text:span text:style-name="T23"></text:span><text:span text:style-name="T4"> </text:span><text:span text:style-name="T15">Audio</text:span><text:span text:style-name="T4"> page of Scripture App Builder. By default, it is: a full stop/period (.), a question mark (?), an exclamation mark (!), a colon (:) and a comma (,).</text:span></text:p>
      <text:p text:style-name="P6" loext:marker-style-name="T4"/>
      <text:p text:style-name="P6" loext:marker-style-name="T4"/>
      <text:list text:continue-list="list131424368950353" text:style-name="WWNum13">
        <text:list-item>
          <text:list>
            <text:list-item>
              <text:h text:style-name="P35" text:outline-level="2"><text:bookmark-start text:name="_Toc500235214"/><text:span text:style-name="T12">Installing</text:span> Audacity<text:bookmark-end text:name="_Toc500235214"/></text:h>
            </text:list-item>
          </text:list>
        </text:list-item>
      </text:list>
      <text:p text:style-name="P39" loext:marker-style-name="T4"><text:span text:style-name="T4">Install the </text:span><text:span text:style-name="T15">Audacity</text:span><text:span text:style-name="T4"> sound-editing program if you do not already have it. Please see </text:span><text:span text:style-name="T15">Appendix: How to install Audacity</text:span><text:span text:style-name="T4">.</text:span></text:p>
      <text:p text:style-name="P40" loext:marker-style-name="T4"/>
      <text:p text:style-name="P41" loext:marker-style-name="T4"><draw:frame text:anchor-type="as-char" draw:z-index="5" draw:style-name="gr2" draw:text-style-name="P3" svg:width="1.9079in" svg:height="0.7594in"><draw:image xlink:href="Pictures/10000000000000FD000000645817885E.jpg" xlink:type="simple" xlink:show="embed" xlink:actuate="onLoad" draw:mime-type="image/jpeg"><text:p/></draw:image></draw:frame></text:p>
      <text:p text:style-name="P6" loext:marker-style-name="T4"/>
      <text:list xml:id="list131423010989585" text:continue-numbering="true" text:style-name="WWNum13">
        <text:list-item>
          <text:h text:style-name="P42" text:outline-level="1" loext:marker-style-name="T4"><text:bookmark-start text:name="_Toc500235215"/><text:span text:style-name="T4">Producing Timing Files</text:span><text:bookmark-end text:name="_Toc500235215"/><text:span text:style-name="T4"/></text:h>
        </text:list-item>
      </text:list>
      <text:p text:style-name="P43" loext:marker-style-name="T4"/>
      <text:list text:style-name="WWNum5">
        <text:list-item>
          <text:p text:style-name="P44" loext:marker-style-name="T4"><text:span text:style-name="T4">Launch Audacity.</text:span><text:span text:style-name="T4"/></text:p>
        </text:list-item>
      </text:list>
      <text:p text:style-name="P43" loext:marker-style-name="T4"/>
      <text:list text:continue-numbering="true" text:style-name="WWNum5">
        <text:list-item>
          <text:p text:style-name="P44" loext:marker-style-name="T4"><text:span text:style-name="T4">Open the MP3 file using </text:span><text:span text:style-name="T15">File</text:span><text:span text:style-name="T4"> </text:span><text:span text:style-name="T23"></text:span><text:span text:style-name="T4"> </text:span><text:span text:style-name="T15">Open</text:span><text:span text:style-name="T4"> on the main menu.</text:span></text:p>
        </text:list-item>
      </text:list>
      <text:p text:style-name="P45" loext:marker-style-name="T4"/>
      <text:list text:continue-numbering="true" text:style-name="WWNum5">
        <text:list-item>
          <text:p text:style-name="P46" loext:marker-style-name="T4"><text:span text:style-name="T4">If the file is stereo with two tracks, it can be helpful to reduce it to mono for this process so it doesn’t take up so much room on your screen. Do this with </text:span><text:span text:style-name="T15">Tracks </text:span><text:span text:style-name="T23"></text:span><text:span text:style-name="T15"> Stereo Track to Mono</text:span><text:span text:style-name="T4">.</text:span></text:p>
        </text:list-item>
      </text:list>
      <text:p text:style-name="P45" loext:marker-style-name="T4"/>
      <text:list text:continue-numbering="true" text:style-name="WWNum5">
        <text:list-item>
          <text:p text:style-name="P46" loext:marker-style-name="T4"><text:span text:style-name="T4">Zoom in a couple of times so it is easier to see the gaps between the audio waveforms.</text:span><text:span text:style-name="T4"/></text:p>
        </text:list-item>
      </text:list>
      <text:p text:style-name="P6" loext:marker-style-name="T4"/>
      <text:p text:style-name="P2" loext:marker-style-name="T4"><draw:frame text:anchor-type="as-char" draw:z-index="6" draw:style-name="gr2" draw:text-style-name="P3" svg:width="5.6858in" svg:height="3.1949in"><draw:image xlink:href="Pictures/100000000000032F000001C91C8C43CD.png" xlink:type="simple" xlink:show="embed" xlink:actuate="onLoad" draw:mime-type="image/png"><text:p/></draw:image></draw:frame></text:p>
      <text:p text:style-name="P6" loext:marker-style-name="T4"/>
      <text:list text:continue-numbering="true" text:style-name="WWNum5">
        <text:list-item>
          <text:p text:style-name="P47" loext:marker-style-name="T4"><text:span text:style-name="T4">Have the Scripture text or Phrase List open to the chapter you will be listening to. </text:span><text:span text:style-name="T4"/></text:p>
        </text:list-item>
      </text:list>
      <text:p text:style-name="P40" loext:marker-style-name="T4"/>
      <text:p text:style-name="P48" loext:marker-style-name="T3"><text:span text:style-name="T3">You could display the text in a different window (i.e. have Audacity take up the left part of the screen and the Scripture text on the right, or have the screens arranged at the top and bottom of the screen), but this can be awkward since you will need to scroll the text from time to time and then click in the Audacity window to give it focus again. While you are doing this you might lose your place and miss a verse break. What can work better is if you have a printed text in front of you or if the text is already on a smartphone or tablet. Then you can concentrate more fully on the text and avoid the complication of switching between windows.</text:span><text:span text:style-name="T3"/></text:p>
      <text:p text:style-name="P6" loext:marker-style-name="T4"/>
      <text:p text:style-name="P6" loext:marker-style-name="T4"/>
      <text:list text:continue-numbering="true" text:style-name="WWNum5">
        <text:list-item>
          <text:p text:style-name="P46" loext:marker-style-name="T4"><text:span text:style-name="T4">Move the cursor to just before the beginning of the first verse (i.e. after any titles or chapter headings). </text:span><text:span text:style-name="T4"/></text:p>
        </text:list-item>
      </text:list>
      <text:p text:style-name="P6" loext:marker-style-name="T4"/>
      <text:list text:continue-numbering="true" text:style-name="WWNum5">
        <text:list-item>
          <text:p text:style-name="P49" loext:marker-style-name="T4"><text:span text:style-name="T4">Place the first label marker using </text:span><text:span text:style-name="T15">CTRL-B</text:span><text:span text:style-name="T4">. A label track will be created.</text:span></text:p>
        </text:list-item>
      </text:list>
      <text:p text:style-name="P40" loext:marker-style-name="T4"/>
      <text:p text:style-name="P50" loext:marker-style-name="T3"><text:span text:style-name="T3">If you are using a Mac, the shortcut to use is </text:span><text:span text:style-name="T24">Command B</text:span><text:span text:style-name="T3">.</text:span></text:p>
      <text:p text:style-name="P40" loext:marker-style-name="T4"/>
      <text:p text:style-name="P2" loext:marker-style-name="T4"><draw:frame text:anchor-type="as-char" draw:z-index="7" draw:style-name="gr2" draw:text-style-name="P3" svg:width="5.8614in" svg:height="3.3248in"><draw:image xlink:href="Pictures/100000000000032F000001C923B1E5AD.png" xlink:type="simple" xlink:show="embed" xlink:actuate="onLoad" draw:mime-type="image/png"><text:p/></draw:image></draw:frame></text:p>
      <text:p text:style-name="P6" loext:marker-style-name="T4"/>
      <text:p text:style-name="P6" loext:marker-style-name="T4"/>
      <text:list text:continue-numbering="true" text:style-name="WWNum5">
        <text:list-item>
          <text:p text:style-name="P49" loext:marker-style-name="T4"><text:span text:style-name="T4">Type the number “1” in this first label. This indicates that “verse 1 starts here”.</text:span><text:span text:style-name="T4"/></text:p>
        </text:list-item>
      </text:list>
      <text:p text:style-name="P51" loext:marker-style-name="T4"/>
      <text:p text:style-name="P52" loext:marker-style-name="T3"><text:span text:style-name="T3">The cursor should already be in the label, so you just need to press the “1” key after pressing CTRL+B above.</text:span><text:span text:style-name="T3"/></text:p>
      <text:p text:style-name="P53" loext:marker-style-name="T3"/>
      <text:p text:style-name="P6" loext:marker-style-name="T4"/>
      <text:list text:continue-numbering="true" text:style-name="WWNum5">
        <text:list-item>
          <text:p text:style-name="P46" loext:marker-style-name="T4"><text:span text:style-name="T4">Press ‘Play’ to start listening to the audio. As you listen, place a label at each timing break (phrase or verse level) using </text:span><text:span text:style-name="T15">CTRL-M</text:span><text:span text:style-name="T4">.</text:span></text:p>
        </text:list-item>
      </text:list>
      <text:p text:style-name="P6" loext:marker-style-name="T4"/>
      <text:p text:style-name="P54" loext:marker-style-name="T3"><text:span text:style-name="T3">You don't really need to look at Audacity for this. Just follow the text closely and keep pressing CTRL-M at the verse breaks.</text:span><text:span text:style-name="T3"/></text:p>
      <text:p text:style-name="P55" loext:marker-style-name="T25"/>
      <text:p text:style-name="P52" loext:marker-style-name="T3"><text:span text:style-name="T3">If you are using a Mac, the shortcut to use is </text:span><text:span text:style-name="T24">Command </text:span><text:span text:style-name="T3">. – that is Command and period (.) together.</text:span></text:p>
      <text:p text:style-name="P56" loext:marker-style-name="T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7" loext:marker-style-name="T24"/>
          </table:table-cell>
          <table:table-cell table:style-name="Table2.A1" office:value-type="string">
            <text:p text:style-name="P2" loext:marker-style-name="T15"><text:span text:style-name="T15">Windows</text:span><text:span text:style-name="T15"/></text:p>
          </table:table-cell>
          <table:table-cell table:style-name="Table2.A1" office:value-type="string">
            <text:p text:style-name="P2" loext:marker-style-name="T15"><text:span text:style-name="T15">Mac</text:span><text:span text:style-name="T15"/></text:p>
          </table:table-cell>
        </table:table-row>
        <table:table-row table:style-name="Table2.1">
          <table:table-cell table:style-name="Table2.A2" office:value-type="string">
            <text:p text:style-name="Standard" loext:marker-style-name="T4"><text:span text:style-name="T4">Add Label At Selection</text:span><text:span text:style-name="T4"/></text:p>
            <text:p text:style-name="Standard" loext:marker-style-name="T3"><text:span text:style-name="T3"><text:s text:c="2"/>(at cursor position when paused)</text:span><text:span text:style-name="T3"/></text:p>
          </table:table-cell>
          <table:table-cell table:style-name="Table2.A2" office:value-type="string">
            <text:p text:style-name="P2" loext:marker-style-name="T4"><text:span text:style-name="T4">CTRL-B</text:span><text:span text:style-name="T4"/></text:p>
          </table:table-cell>
          <table:table-cell table:style-name="Table2.A2" office:value-type="string">
            <text:p text:style-name="P2" loext:marker-style-name="T4"><text:span text:style-name="T4">Command B</text:span><text:span text:style-name="T4"/></text:p>
          </table:table-cell>
        </table:table-row>
        <table:table-row table:style-name="Table2.1">
          <table:table-cell table:style-name="Table2.A2" office:value-type="string">
            <text:p text:style-name="Standard" loext:marker-style-name="T4"><text:span text:style-name="T4">Add Label At Playback Position</text:span><text:span text:style-name="T4"/></text:p>
            <text:p text:style-name="Standard" loext:marker-style-name="T3"><text:span text:style-name="T3"><text:s text:c="2"/>(at current position when playing audio)</text:span><text:span text:style-name="T3"/></text:p>
          </table:table-cell>
          <table:table-cell table:style-name="Table2.A2" office:value-type="string">
            <text:p text:style-name="P2" loext:marker-style-name="T3"><text:span text:style-name="T4">CTRL-M</text:span><text:span text:style-name="T3"/></text:p>
          </table:table-cell>
          <table:table-cell table:style-name="Table2.A2" office:value-type="string">
            <text:p text:style-name="P2" loext:marker-style-name="T4"><text:span text:style-name="T4">Command .</text:span><text:span text:style-name="T4"/></text:p>
          </table:table-cell>
        </table:table-row>
      </table:table>
      <text:p text:style-name="P58" loext:marker-style-name="T3"><text:span text:style-name="T3">Default key mappings for adding labels</text:span><text:span text:style-name="T3"/></text:p>
      <text:p text:style-name="P56" loext:marker-style-name="T3"/>
      <text:p text:style-name="P54" loext:marker-style-name="T3"><text:span text:style-name="T24">Usability Tip:</text:span><text:span text:style-name="T3"> Instead of pressing two keys together (CTRL-M) to add a label, it is easier if you reassign the key binding to be a single key, such as F1. See Section 4: Usability Tips for more details on how to do this.</text:span></text:p>
      <text:p text:style-name="P59" loext:marker-style-name="T4"/>
      <text:p text:style-name="P59" loext:marker-style-name="T4"/>
      <text:list text:continue-numbering="true" text:style-name="WWNum5">
        <text:list-item>
          <text:p text:style-name="P46" loext:marker-style-name="T4"><text:span text:style-name="T4">When you get to the start of a new verse, type the verse number into the label while the audio is still playing. </text:span><text:span text:style-name="T4"/></text:p>
        </text:list-item>
      </text:list>
      <text:p text:style-name="P6" loext:marker-style-name="T4"/>
      <text:p text:style-name="P54" loext:marker-style-name="T3"><text:span text:style-name="T3">If you are quick, you’ll find there is no need to stop the audio for this. The cursor is in the new label already so all you have to do is type the numbers. If you miss typing a verse number, you can always come back to it at the end.</text:span><text:span text:style-name="T3"/></text:p>
      <text:p text:style-name="P6" loext:marker-style-name="T4"/>
      <text:p text:style-name="P2" loext:marker-style-name="T4"><draw:frame text:anchor-type="as-char" draw:z-index="8" draw:style-name="gr2" draw:text-style-name="P3" svg:width="5.8614in" svg:height="3.3248in"><draw:image xlink:href="Pictures/100000000000032F000001C9CD1547A3.png" xlink:type="simple" xlink:show="embed" xlink:actuate="onLoad" draw:mime-type="image/png"><text:p/></draw:image></draw:frame></text:p>
      <text:p text:style-name="P6" loext:marker-style-name="T4"/>
      <text:p text:style-name="P60" loext:marker-style-name="T4"><text:span text:style-name="T4">If you lose your way, stop playback, move back a few seconds and press play again. </text:span><text:span text:style-name="T4"/></text:p>
      <text:p text:style-name="P61" loext:marker-style-name="T26"/>
      <text:p text:style-name="P60" loext:marker-style-name="T4"><text:span text:style-name="T4">To delete a label you have placed by accident, press the </text:span><text:span text:style-name="T15">DELETE</text:span><text:span text:style-name="T4"> key when the label is selected.</text:span></text:p>
      <text:p text:style-name="P62" loext:marker-style-name="T4"/>
      <text:p text:style-name="P62" loext:marker-style-name="T4"/>
      <text:list text:continue-numbering="true" text:style-name="WWNum5">
        <text:list-item>
          <text:p text:style-name="P46" loext:marker-style-name="T4"><text:span text:style-name="T4">When you have finished placing labels for the whole chapter, go back to each label : </text:span><text:span text:style-name="T4"/></text:p>
          <text:list>
            <text:list-item>
              <text:p text:style-name="P63" loext:marker-style-name="T4"><text:span text:style-name="T4">Move it slightly if you missed the middle of the blank section between verses. Do this by dragging the circle in the middle of the marker.</text:span><text:span text:style-name="T4"/></text:p>
            </text:list-item>
            <text:list-item>
              <text:p text:style-name="P63" loext:marker-style-name="T4"><text:span text:style-name="T4">Type verse numbers into the labels that come at the start of verses (if you didn’t do this earlier):</text:span><text:span text:style-name="T4"/></text:p>
              <text:list>
                <text:list-item>
                  <text:p text:style-name="P63" loext:marker-style-name="T4"><text:span text:style-name="T4">"1" for the label before the first verse, </text:span><text:span text:style-name="T4"/></text:p>
                </text:list-item>
                <text:list-item>
                  <text:p text:style-name="P63" loext:marker-style-name="T4"><text:span text:style-name="T4">"2" for the label before the second verse, </text:span><text:span text:style-name="T4"/></text:p>
                </text:list-item>
                <text:list-item>
                  <text:p text:style-name="P63" loext:marker-style-name="T4"><text:span text:style-name="T4">"6-7" for bridged verses, etc.<text:line-break/></text:span><text:span text:style-name="T4"/></text:p>
                </text:list-item>
              </text:list>
            </text:list-item>
          </text:list>
        </text:list-item>
      </text:list>
      <text:p text:style-name="P41" loext:marker-style-name="T4"><draw:frame text:anchor-type="as-char" draw:z-index="9" draw:style-name="gr2" draw:text-style-name="P3" svg:width="5.8614in" svg:height="3.3248in"><draw:image xlink:href="Pictures/100000000000032F000001C944848F40.png" xlink:type="simple" xlink:show="embed" xlink:actuate="onLoad" draw:mime-type="image/png"><text:p/></draw:image></draw:frame></text:p>
      <text:p text:style-name="P14" loext:marker-style-name="T4"/>
      <text:p text:style-name="P54" loext:marker-style-name="T3"><text:span text:style-name="T3">Another way of adding label captions is via </text:span><text:span text:style-name="T24">Tracks </text:span><text:span text:style-name="T23"></text:span><text:span text:style-name="T24"> Edit Labels...</text:span><text:span text:style-name="T4"> </text:span><text:span text:style-name="T3">This is an easier way to add verse numbers quickly. You can also delete unwanted labels here.<text:line-break/>   </text:span></text:p>
      <text:p text:style-name="P2" loext:marker-style-name="T3"><draw:frame text:anchor-type="as-char" draw:z-index="10" draw:style-name="gr2" draw:text-style-name="P3" svg:width="5.926in" svg:height="2.7504in"><draw:image xlink:href="Pictures/10000000000002D900000152AF435827.png" xlink:type="simple" xlink:show="embed" xlink:actuate="onLoad" draw:mime-type="image/png"><text:p/></draw:image></draw:frame></text:p>
      <text:p text:style-name="P4" loext:marker-style-name="T3"/>
      <text:p text:style-name="P54" loext:marker-style-name="T4"><text:span text:style-name="T4">During this process you will be able to see if you have missed out a verse somewhere or if you have added an unwanted marker that needs to be deleted.</text:span><text:span text:style-name="T4"/></text:p>
      <text:p text:style-name="P59" loext:marker-style-name="T4"/>
      <text:p text:style-name="P56" loext:marker-style-name="T3"/>
      <text:list text:continue-numbering="true" text:style-name="WWNum5">
        <text:list-item>
          <text:p text:style-name="P46" loext:marker-style-name="T4"><text:span text:style-name="T4">Export the label track to a text file using </text:span><text:span text:style-name="T15">File </text:span><text:span text:style-name="T23"></text:span><text:span text:style-name="T15"> Export Labels...</text:span><text:span text:style-name="T4">   Choose a name such as LANG-GEN-01.txt (for Genesis chapter 1), LANG-GEN-02.txt (for Genesis chapter 2), etc., where LANG is the name of the language.</text:span></text:p>
        </text:list-item>
      </text:list>
      <text:p text:style-name="P6" loext:marker-style-name="T4"/>
      <text:list text:continue-numbering="true" text:style-name="WWNum5">
        <text:list-item>
          <text:p text:style-name="P49" loext:marker-style-name="T4"><text:span text:style-name="T4">Open the timing file in a text editor such as Notepad. You should see something like this:</text:span><text:span text:style-name="T4"/></text:p>
        </text:list-item>
      </text:list>
      <text:p text:style-name="P40" loext:marker-style-name="T4"/>
      <text:p text:style-name="P2" loext:marker-style-name="T4"><draw:frame draw:style-name="fr1" draw:name="Frame6" text:anchor-type="as-char" svg:width="4.6252in" svg:height="2.9898in"><draw:text-box><text:p text:style-name="P31" loext:marker-style-name="T17"><text:span text:style-name="T17">3.188682<text:tab/>3.188682<text:tab/>1</text:span><text:span text:style-name="T17"/></text:p><text:p text:style-name="P31" loext:marker-style-name="T17"><text:span text:style-name="T17">7.415084<text:tab/>7.415084<text:tab/></text:span><text:span text:style-name="T17"/></text:p><text:p text:style-name="P31" loext:marker-style-name="T17"><text:span text:style-name="T17">12.934091<text:tab/>12.934091<text:tab/></text:span><text:span text:style-name="T17"/></text:p><text:p text:style-name="P31" loext:marker-style-name="T17"><text:span text:style-name="T17">16.746603<text:tab/>16.746603<text:tab/>2</text:span><text:span text:style-name="T17"/></text:p><text:p text:style-name="P31" loext:marker-style-name="T17"><text:span text:style-name="T17">19.829615<text:tab/>19.829615<text:tab/></text:span><text:span text:style-name="T17"/></text:p><text:p text:style-name="P31" loext:marker-style-name="T17"><text:span text:style-name="T17">20.905796<text:tab/>20.905796<text:tab/></text:span><text:span text:style-name="T17"/></text:p><text:p text:style-name="P31" loext:marker-style-name="T17"><text:span text:style-name="T17">21.884018<text:tab/>21.884018<text:tab/>3</text:span><text:span text:style-name="T17"/></text:p><text:p text:style-name="P31" loext:marker-style-name="T17"><text:span text:style-name="T17">22.858863<text:tab/>22.858863<text:tab/></text:span><text:span text:style-name="T17"/></text:p><text:p text:style-name="P31" loext:marker-style-name="T17"><text:span text:style-name="T17">25.613723<text:tab/>25.613723<text:tab/>4</text:span><text:span text:style-name="T17"/></text:p><text:p text:style-name="P31" loext:marker-style-name="T17"><text:span text:style-name="T17">27.108508<text:tab/>27.108508<text:tab/></text:span><text:span text:style-name="T17"/></text:p><text:p text:style-name="P31" loext:marker-style-name="T17"><text:span text:style-name="T17">30.192832<text:tab/>30.192832<text:tab/></text:span><text:span text:style-name="T17"/></text:p><text:p text:style-name="P31" loext:marker-style-name="T17"><text:span text:style-name="T17">31.388587<text:tab/>31.388587<text:tab/></text:span><text:span text:style-name="T17"/></text:p><text:p text:style-name="P31" loext:marker-style-name="T17"><text:span text:style-name="T17">32.683989<text:tab/>32.683989<text:tab/>5</text:span><text:span text:style-name="T17"/></text:p><text:p text:style-name="P31" loext:marker-style-name="T17"><text:span text:style-name="T17">36.440027<text:tab/>36.440027<text:tab/></text:span><text:span text:style-name="T17"/></text:p><text:p text:style-name="P31" loext:marker-style-name="T17"><text:span text:style-name="T17">38.297624<text:tab/>38.297624<text:tab/></text:span></text:p></draw:text-box></draw:frame></text:p>
      <text:p text:style-name="P6" loext:marker-style-name="T4"/>
      <text:p text:style-name="P6" loext:marker-style-name="T4"/>
      <text:p text:style-name="P6" loext:marker-style-name="T4"/>
      <text:list text:continue-numbering="true" text:style-name="WWNum5">
        <text:list-item>
          <text:p text:style-name="P49" loext:marker-style-name="T4"><text:span text:style-name="T4">The three columns are </text:span><text:span text:style-name="T3">From</text:span><text:span text:style-name="T4">, </text:span><text:span text:style-name="T3">To</text:span><text:span text:style-name="T4"> and </text:span><text:span text:style-name="T3">Label</text:span><text:span text:style-name="T4">. Make sure all the verse numbers are present. If you have missed out a verse number somewhere, fix it in the text file or within Audacity and export again.</text:span></text:p>
        </text:list-item>
      </text:list>
      <text:p text:style-name="P6" loext:marker-style-name="T4"/>
      <text:p text:style-name="P6" loext:marker-style-name="T4"/>
      <text:p text:style-name="P6" loext:marker-style-name="T4"/>
      <text:p text:style-name="Standard" loext:marker-style-name="T4"><text:span text:style-name="T4">The timing file is now ready to be used in an app.</text:span><text:span text:style-name="T4"/></text:p>
      <text:p text:style-name="P6" loext:marker-style-name="T4"/>
      <text:p text:style-name="P6" loext:marker-style-name="T4"/>
      <text:list xml:id="list131423357231695" text:continue-list="list131423010989585" text:style-name="WWNum13">
        <text:list-item>
          <text:h text:style-name="P64" text:outline-level="1" loext:marker-style-name="T4"><text:bookmark-start text:name="_Toc500235216"/><text:span text:style-name="T4">Timing Labels Assistant</text:span><text:bookmark-end text:name="_Toc500235216"/><text:span text:style-name="T4"/></text:h>
        </text:list-item>
      </text:list>
      <text:p text:style-name="P6" loext:marker-style-name="T4"/>
      <text:p text:style-name="Standard" loext:marker-style-name="T4"><text:span text:style-name="T4">If you are using Audacity in Windows, there is a helpful utility program that will make marking labels significantly easier. It is called </text:span><text:span text:style-name="T13">Timing Labels Assistant (TLA)</text:span><text:span text:style-name="T4">.</text:span></text:p>
      <text:p text:style-name="P30" loext:marker-style-name="T4"><text:span text:style-name="T4">TLA is built with </text:span><text:a xlink:type="simple" xlink:href="http://www.autohotkey.com/" text:style-name="Internet_20_link" text:visited-style-name="Visited_20_Internet_20_Link"><text:span text:style-name="Internet_20_link"><text:span text:style-name="T4">AutoHotKey</text:span></text:span></text:a><text:span text:style-name="T4"> to simulate keystrokes in Windows. It allows you to specify a phrases file and will insert the label name (1a, 2b, etc.) for you automatically when you press the key to add the next label.</text:span></text:p>
      <text:p text:style-name="P6" loext:marker-style-name="T4"/>
      <text:p text:style-name="Standard" loext:marker-style-name="T4"><text:span text:style-name="T4">You can find it here: </text:span><text:a xlink:type="simple" xlink:href="https://github.com/indiamcq/timing-labels-assistant" text:style-name="Internet_20_link" text:visited-style-name="Visited_20_Internet_20_Link"><text:span text:style-name="Internet_20_link">https://github.com/indiamcq/timing-labels-assistant</text:span></text:a> </text:p>
      <text:p text:style-name="P6" loext:marker-style-name="T4"/>
      <text:p text:style-name="Standard" loext:marker-style-name="T4"><text:span text:style-name="T4">Download the zip file, </text:span><text:span text:style-name="T13">Timing-Labels-Assistant_v1.2.29.zip</text:span><text:span text:style-name="T4"> (or a later version), and unzip it to a writable folder on your computer (i.e. not in Program Files). The main TLA executable is called </text:span><text:span text:style-name="T13">Timing-Labels-Assistant.exe</text:span><text:span text:style-name="T4">.</text:span></text:p>
      <text:p text:style-name="P6" loext:marker-style-name="T4"/>
      <text:p text:style-name="Standard" loext:marker-style-name="T4"><text:span text:style-name="T4">To use TLA:</text:span><text:span text:style-name="T4"/></text:p>
      <text:list text:style-name="WWNum21">
        <text:list-item>
          <text:p text:style-name="P65" loext:marker-style-name="T4"><text:span text:style-name="T4">Run the </text:span><text:span text:style-name="T13">Create Phrase Lists </text:span><text:span text:style-name="T4">wizard within Scripture App Builder to create a set of tab-delimited .phrases files for the book chapters you want to synchronize. That’s the 3rd option in the choice of file types.</text:span></text:p>
        </text:list-item>
        <text:list-item>
          <text:p text:style-name="P65" loext:marker-style-name="T4"><text:span text:style-name="T4">Open </text:span><text:span text:style-name="T13">Audacity</text:span><text:span text:style-name="T4"> with the audio file to be synchronised and zoom into the waveform 2-3 times.</text:span></text:p>
        </text:list-item>
        <text:list-item>
          <text:p text:style-name="P65" loext:marker-style-name="T4"><text:span text:style-name="T4">Launch </text:span><text:span text:style-name="T13">Timing-Labels-Assistant.exe</text:span><text:span text:style-name="T4">.</text:span></text:p>
        </text:list-item>
        <text:list-item>
          <text:p text:style-name="P65" loext:marker-style-name="T4"><text:span text:style-name="T4">Choose the .phrases file corresponding to the audio file you have open in Audacity. It will be opened for you in Notepad.</text:span><text:span text:style-name="T4"/></text:p>
        </text:list-item>
        <text:list-item>
          <text:p text:style-name="P65" loext:marker-style-name="T4"><text:span text:style-name="T4">Arrange Notepad to the side of your Audacity window so you can see both.</text:span><text:span text:style-name="T4"/></text:p>
        </text:list-item>
        <text:list-item>
          <text:p text:style-name="P65" loext:marker-style-name="T4"><text:span text:style-name="T4">Start playing the audio.</text:span><text:span text:style-name="T4"/></text:p>
        </text:list-item>
        <text:list-item>
          <text:p text:style-name="P65" loext:marker-style-name="T4"><text:span text:style-name="T4">Press the </text:span><text:span text:style-name="T13">TAB</text:span><text:span text:style-name="T4"> key or the </text:span><text:span text:style-name="T13">+</text:span><text:span text:style-name="T4"> key on the numeric keyboard to place a marker. (This much easier than pressing CTRL+M). The markers will appear in the order they are in the .phrases file.</text:span></text:p>
        </text:list-item>
      </text:list>
      <text:p text:style-name="P66" loext:marker-style-name="T4"><text:span text:style-name="T4">If markers do not appear when you press TAB or +, check that CTRL+M is still associated with the command </text:span><text:span text:style-name="T15">Add Label at Playback Position</text:span><text:span text:style-name="T27">. See section 5.2 for more details.</text:span></text:p>
      <text:list text:continue-numbering="true" text:style-name="WWNum21">
        <text:list-item>
          <text:p text:style-name="P65" loext:marker-style-name="T4"><text:span text:style-name="T4">You will hear a beep when the list of markers comes to an end.</text:span><text:span text:style-name="T4"/></text:p>
        </text:list-item>
      </text:list>
      <text:p text:style-name="P6" loext:marker-style-name="T4"/>
      <text:p text:style-name="P6" loext:marker-style-name="T4"/>
      <text:p text:style-name="Standard" loext:marker-style-name="T4"><text:span text:style-name="T4">To restart from a given label:</text:span><text:span text:style-name="T4"/></text:p>
      <text:list text:style-name="WWNum22">
        <text:list-item>
          <text:p text:style-name="P67" loext:marker-style-name="T4"><text:span text:style-name="T4">Click on the icon in the taskbar and select </text:span><text:span text:style-name="T13">Restart timing at label…</text:span><text:span text:style-name="T4">.</text:span></text:p>
        </text:list-item>
        <text:list-item>
          <text:p text:style-name="P68" loext:marker-style-name="T4"><text:span text:style-name="T4">Enter the label you want to start from, e.g. 3b.</text:span><text:span text:style-name="T4"/></text:p>
        </text:list-item>
        <text:list-item>
          <text:p text:style-name="P68" loext:marker-style-name="T4"><text:span text:style-name="T4">Press </text:span><text:span text:style-name="T13">OK</text:span><text:span text:style-name="T4"> and continue from step 6 above.</text:span></text:p>
        </text:list-item>
      </text:list>
      <text:p text:style-name="P6" loext:marker-style-name="T4"/>
      <text:p text:style-name="Standard" loext:marker-style-name="T4"><text:span text:style-name="T4">To exit:</text:span><text:span text:style-name="T4"/></text:p>
      <text:list text:continue-numbering="true" text:style-name="WWNum22">
        <text:list-item>
          <text:p text:style-name="P67" loext:marker-style-name="T4"><text:span text:style-name="T4">Click on the icon in the taskbar and select </text:span><text:span text:style-name="T13">Exit</text:span><text:span text:style-name="T4">.</text:span></text:p>
        </text:list-item>
      </text:list>
      <text:list xml:id="list131422929964744" text:continue-list="list131423357231695" text:style-name="WWNum13">
        <text:list-item>
          <text:h text:style-name="P69" text:outline-level="1" loext:marker-style-name="T4"><text:bookmark-start text:name="_Toc500235217"/><text:span text:style-name="T4">Usability Tips</text:span><text:bookmark-end text:name="_Toc500235217"/><text:span text:style-name="T4"/></text:h>
          <text:list>
            <text:list-item>
              <text:h text:style-name="P35" text:outline-level="2" loext:marker-style-name="T4"><text:bookmark-start text:name="_Toc500235218"/><text:span text:style-name="T4">Tip #1: Change the keyboard binding for the spacebar</text:span><text:bookmark-end text:name="_Toc500235218"/><text:span text:style-name="T4"/></text:h>
            </text:list-item>
          </text:list>
        </text:list-item>
      </text:list>
      <text:p text:style-name="P6" loext:marker-style-name="T4"/>
      <text:p text:style-name="Standard" loext:marker-style-name="T4"><text:span text:style-name="T4">By default, the spacebar is assigned to Play/Stop. This is good, but the problem is that if you stop somewhere and then start again, the playback goes back to the original start position rather than playing from where you stopped. </text:span><text:span text:style-name="T4"/></text:p>
      <text:p text:style-name="P6" loext:marker-style-name="T4"/>
      <text:p text:style-name="Standard" loext:marker-style-name="T4"><text:span text:style-name="T4">To modify this:</text:span><text:span text:style-name="T4"/></text:p>
      <text:p text:style-name="P6" loext:marker-style-name="T4"/>
      <text:list text:style-name="WWNum19">
        <text:list-item>
          <text:p text:style-name="P70" loext:marker-style-name="T4"><text:span text:style-name="T4">Go to </text:span><text:span text:style-name="T15">Edit</text:span><text:span text:style-name="T4"> </text:span><text:span text:style-name="T23"></text:span><text:span text:style-name="T4"> </text:span><text:span text:style-name="T15">Preferences</text:span><text:span text:style-name="T4"> </text:span><text:span text:style-name="T23"></text:span><text:span text:style-name="T4"> </text:span><text:span text:style-name="T15">Keyboard</text:span><text:span text:style-name="T4">.<text:line-break/></text:span></text:p>
        </text:list-item>
        <text:list-item>
          <text:p text:style-name="P70" loext:marker-style-name="T4"><text:span text:style-name="T4">Select the line </text:span><text:span text:style-name="T15">Play/Stop and Set Cursor</text:span><text:span text:style-name="T4">. To find this quickly, type ‘play/stop’ into the Search field at the top.</text:span></text:p>
        </text:list-item>
      </text:list>
      <text:p text:style-name="P6" loext:marker-style-name="T4"/>
      <text:p text:style-name="P54" loext:marker-style-name="T4"><text:span text:style-name="T4">You are looking for the line that ends with ‘…and Set Cursor’ rather than simply ‘Play/Stop’. </text:span><text:span text:style-name="T4"/></text:p>
      <text:p text:style-name="P45" loext:marker-style-name="T4"/>
      <text:p text:style-name="P71" loext:marker-style-name="T4"><draw:frame text:anchor-type="as-char" draw:z-index="11" draw:style-name="gr2" draw:text-style-name="P3" svg:width="5.3059in" svg:height="3.3425in"><draw:image xlink:href="Pictures/1000000000000248000001706D265004.png" xlink:type="simple" xlink:show="embed" xlink:actuate="onLoad" draw:mime-type="image/png"><text:p/></draw:image></draw:frame></text:p>
      <text:p text:style-name="P45" loext:marker-style-name="T4"/>
      <text:list text:continue-numbering="true" text:style-name="WWNum19">
        <text:list-item>
          <text:p text:style-name="P70" loext:marker-style-name="T4"><text:span text:style-name="T4">Change the key binding for this line to Space (rather than Shift+A).</text:span><text:span text:style-name="T4"/></text:p>
        </text:list-item>
      </text:list>
      <text:p text:style-name="P45" loext:marker-style-name="T4"/>
      <text:list text:continue-numbering="true" text:style-name="WWNum19">
        <text:list-item>
          <text:p text:style-name="P70" loext:marker-style-name="T4"><text:span text:style-name="T4">Press </text:span><text:span text:style-name="T15">Set</text:span><text:span text:style-name="T4">.</text:span></text:p>
        </text:list-item>
      </text:list>
      <text:p text:style-name="P6" loext:marker-style-name="T4"/>
      <text:p text:style-name="P72" loext:marker-style-name="T4"/>
      <text:p text:style-name="P7" loext:marker-style-name="T4"/>
      <text:p text:style-name="P7" loext:marker-style-name="T4"/>
      <text:list text:continue-numbering="true" text:style-name="WWNum19">
        <text:list-item>
          <text:p text:style-name="P73" loext:marker-style-name="T4"><text:span text:style-name="T4">You will be asked if you want to make the change. Click </text:span><text:span text:style-name="T15">OK</text:span><text:span text:style-name="T4"> to do this.</text:span></text:p>
        </text:list-item>
      </text:list>
      <text:p text:style-name="P74" loext:marker-style-name="T4"/>
      <text:p text:style-name="P71" loext:marker-style-name="T4"><draw:frame text:anchor-type="as-char" draw:z-index="12" draw:style-name="gr2" draw:text-style-name="P3" svg:width="3.9815in" svg:height="2.7413in"><draw:image xlink:href="Pictures/100000000000017E000001079146D5DD.png" xlink:type="simple" xlink:show="embed" xlink:actuate="onLoad" draw:mime-type="image/png"><text:p/></draw:image></draw:frame></text:p>
      <text:p text:style-name="P45" loext:marker-style-name="T4"/>
      <text:p text:style-name="P45" loext:marker-style-name="T4"/>
      <text:list text:continue-numbering="true" text:style-name="WWNum19">
        <text:list-item>
          <text:p text:style-name="P70" loext:marker-style-name="T4"><text:span text:style-name="T4">Click </text:span><text:span text:style-name="T15">OK</text:span><text:span text:style-name="T4"> to save the changes to the Preferences.</text:span></text:p>
        </text:list-item>
      </text:list>
      <text:p text:style-name="P75" loext:marker-style-name="T4"/>
      <text:p text:style-name="P45" loext:marker-style-name="T4"/>
      <text:list xml:id="list131424450881933" text:continue-list="list131422929964744" text:style-name="WWNum13">
        <text:list-item>
          <text:list>
            <text:list-item>
              <text:h text:style-name="P35" text:outline-level="2" loext:marker-style-name="T4"><text:bookmark-start text:name="_Toc500235219"/><text:span text:style-name="T4">Tip #2: Change the keyboard binding for adding a label</text:span><text:bookmark-end text:name="_Toc500235219"/><text:span text:style-name="T4"/></text:h>
            </text:list-item>
          </text:list>
        </text:list-item>
      </text:list>
      <text:p text:style-name="P6" loext:marker-style-name="T4"/>
      <text:p text:style-name="Standard" loext:marker-style-name="T4"><text:span text:style-name="T4">Instead of pressing two keys together (</text:span><text:span text:style-name="T15">CTRL-M</text:span><text:span text:style-name="T4">) to add a label, it is easier if you reassign the key binding to be a single key, such as </text:span><text:span text:style-name="T15">F1</text:span><text:span text:style-name="T4">. Then you have one hand free to type the labels.</text:span></text:p>
      <text:p text:style-name="P6" loext:marker-style-name="T4"/>
      <text:p text:style-name="Standard" loext:marker-style-name="T4"><text:span text:style-name="T28">NOTE</text:span><text:span text:style-name="T4">: This tip is only useful if you are </text:span><text:span text:style-name="T28">not</text:span><text:span text:style-name="T4"> using </text:span><text:span text:style-name="T14">Timing Labels Assistant (TLA)</text:span><text:span text:style-name="T4">. If you are using TLA, you need to keep CTRL-M as the key combination to add a label.</text:span></text:p>
      <text:p text:style-name="P6" loext:marker-style-name="T4"/>
      <text:p text:style-name="P76" loext:marker-style-name="T4"><text:span text:style-name="T4">To change the keyboard binding for adding a label:</text:span><text:span text:style-name="T4"/></text:p>
      <text:p text:style-name="P6" loext:marker-style-name="T4"/>
      <text:list text:style-name="WWNum16">
        <text:list-item>
          <text:p text:style-name="P77" loext:marker-style-name="T15"><text:span text:style-name="T4">Go to </text:span><text:span text:style-name="T15">Edit</text:span><text:span text:style-name="T4"> </text:span><text:span text:style-name="T23"></text:span><text:span text:style-name="T4"> </text:span><text:span text:style-name="T15">Preferences</text:span><text:span text:style-name="T4"> </text:span><text:span text:style-name="T23"></text:span><text:span text:style-name="T4"> </text:span><text:span text:style-name="T15">Keyboard</text:span><text:span text:style-name="T4">.<text:line-break/></text:span></text:p>
        </text:list-item>
        <text:list-item>
          <text:p text:style-name="P77" loext:marker-style-name="T4"><text:span text:style-name="T4">Select the line </text:span><text:span text:style-name="T15">Add Label at Playback Position</text:span><text:span text:style-name="T4">. To find this quickly, type ‘add label’ into the Search field at the top.</text:span></text:p>
        </text:list-item>
      </text:list>
      <text:p text:style-name="P45" loext:marker-style-name="T4"/>
      <text:p text:style-name="P2" loext:marker-style-name="T4"><draw:frame text:anchor-type="as-char" draw:z-index="13" draw:style-name="gr2" draw:text-style-name="P3" svg:width="5.0835in" svg:height="3.1949in"><draw:image xlink:href="Pictures/100000000000024800000170BF1C90AB.png" xlink:type="simple" xlink:show="embed" xlink:actuate="onLoad" draw:mime-type="image/png"><text:p/></draw:image></draw:frame></text:p>
      <text:p text:style-name="P6" loext:marker-style-name="T4"/>
      <text:list text:continue-numbering="true" text:style-name="WWNum16">
        <text:list-item>
          <text:p text:style-name="P77" loext:marker-style-name="T4"><text:span text:style-name="T4">Type the key you want to use instead of </text:span><text:span text:style-name="T15">CTRL-M</text:span><text:span text:style-name="T4">, such as </text:span><text:span text:style-name="T15">F1</text:span><text:span text:style-name="T4">.</text:span></text:p>
        </text:list-item>
      </text:list>
      <text:p text:style-name="P45" loext:marker-style-name="T4"/>
      <text:list text:continue-numbering="true" text:style-name="WWNum16">
        <text:list-item>
          <text:p text:style-name="P77" loext:marker-style-name="T4"><text:span text:style-name="T4">Press </text:span><text:span text:style-name="T15">Set</text:span><text:span text:style-name="T4">.</text:span></text:p>
        </text:list-item>
      </text:list>
      <text:p text:style-name="P6" loext:marker-style-name="T4"/>
      <text:p text:style-name="P2" loext:marker-style-name="T4"><draw:frame text:anchor-type="as-char" draw:z-index="14" draw:style-name="gr2" draw:text-style-name="P3" svg:width="5.1024in" svg:height="3.2134in"><draw:image xlink:href="Pictures/100000000000024800000170E39B73FE.png" xlink:type="simple" xlink:show="embed" xlink:actuate="onLoad" draw:mime-type="image/png"><text:p/></draw:image></draw:frame></text:p>
      <text:p text:style-name="P7" loext:marker-style-name="T4"/>
      <text:p text:style-name="P7" loext:marker-style-name="T4"/>
      <text:list text:continue-numbering="true" text:style-name="WWNum16">
        <text:list-item>
          <text:p text:style-name="P77" loext:marker-style-name="T4"><text:span text:style-name="T4">If the keyboard shortcut you have chosen is already in use for another function, you will be asked if you want to make the change. Click </text:span><text:span text:style-name="T15">OK</text:span><text:span text:style-name="T4"> to do this.</text:span></text:p>
        </text:list-item>
      </text:list>
      <text:p text:style-name="P45" loext:marker-style-name="T4"/>
      <text:p text:style-name="P71" loext:marker-style-name="T4"><draw:frame text:anchor-type="as-char" draw:z-index="15" draw:style-name="gr2" draw:text-style-name="P3" svg:width="3.9079in" svg:height="2.7413in"><draw:image xlink:href="Pictures/100000000000017700000107BC7F8427.png" xlink:type="simple" xlink:show="embed" xlink:actuate="onLoad" draw:mime-type="image/png"><text:p/></draw:image></draw:frame></text:p>
      <text:p text:style-name="P45" loext:marker-style-name="T4"/>
      <text:p text:style-name="P45" loext:marker-style-name="T4"/>
      <text:list text:continue-numbering="true" text:style-name="WWNum16">
        <text:list-item>
          <text:p text:style-name="P77" loext:marker-style-name="T4"><text:span text:style-name="T4">Click </text:span><text:span text:style-name="T15">OK</text:span><text:span text:style-name="T4"> to save the changes to the Preferences.</text:span></text:p>
        </text:list-item>
      </text:list>
      <text:p text:style-name="P6" loext:marker-style-name="T4"/>
      <text:p text:style-name="P6" loext:marker-style-name="T4"/>
      <text:list text:continue-list="list131424450881933" text:style-name="WWNum13">
        <text:list-item>
          <text:h text:style-name="P69" text:outline-level="1" loext:marker-style-name="T4"><text:bookmark-start text:name="_Toc500235220"/><text:span text:style-name="T4">FAQ</text:span><text:bookmark-end text:name="_Toc500235220"/><text:span text:style-name="T4"/></text:h>
          <text:list>
            <text:list-item>
              <text:h text:style-name="P35" text:outline-level="2" loext:marker-style-name="T4"><text:bookmark-start text:name="_Toc500235221"/><text:span text:style-name="T4">How can I change the punctuation characters which are recognised as ‘end of phrase’ marks?</text:span><text:bookmark-end text:name="_Toc500235221"/><text:span text:style-name="T4"/></text:h>
            </text:list-item>
          </text:list>
        </text:list-item>
      </text:list>
      <text:p text:style-name="P78" loext:marker-style-name="T15"/>
      <text:p text:style-name="Standard" loext:marker-style-name="T4"><text:span text:style-name="T4">You can define which characters are recognised as phrase ending characters in the </text:span><text:span text:style-name="T15">Features</text:span><text:span text:style-name="T4"> </text:span><text:span text:style-name="T23"></text:span><text:span text:style-name="T4"> </text:span><text:span text:style-name="T15">Audio</text:span><text:span text:style-name="T4"> page of Scripture App Builder. </text:span></text:p>
      <text:p text:style-name="P78" loext:marker-style-name="T15"/>
      <text:p text:style-name="Standard" loext:marker-style-name="T4"><text:span text:style-name="T4">You can add Unicode characters here using the format \uABCD where ABCD is the hexadecimal Unicode code point, e.g. \u061F for an Arabic question mark, \u1362 for an Ethiopic full stop.</text:span><text:span text:style-name="T4"/></text:p>
      <text:p text:style-name="P78" loext:marker-style-name="T15"/>
      <text:list xml:id="list131423257948390" text:continue-numbering="true" text:style-name="WWNum13">
        <text:list-item>
          <text:list>
            <text:list-item>
              <text:h text:style-name="P35" text:outline-level="2" loext:marker-style-name="T4"><text:bookmark-start text:name="_Toc500235222"/><text:span text:style-name="T4">How can I get the app to highlight text in chapters without any verse numbers?</text:span><text:bookmark-end text:name="_Toc500235222"/><text:span text:style-name="T4"> </text:span><text:span text:style-name="T4"/></text:h>
            </text:list-item>
          </text:list>
        </text:list-item>
      </text:list>
      <text:p text:style-name="P79" loext:marker-style-name="T15"/>
      <text:p text:style-name="P39" loext:marker-style-name="T4"><text:span text:style-name="T4">If you have a non-Scripture text such as a song book or another kind of reading book, you will not normally have verse numbers. To highlight phrases and lines, label the first phrase or line as “a”, the second as “b”, the third as “c”, etc.</text:span><text:span text:style-name="T4"/></text:p>
      <text:p text:style-name="P6" loext:marker-style-name="T4"/>
      <text:p text:style-name="P76" loext:marker-style-name="T24"><text:span text:style-name="T24">Example:</text:span><text:span text:style-name="T24"/></text:p>
      <text:p text:style-name="P40" loext:marker-style-name="T4"><draw:frame draw:style-name="fr3" draw:name="Frame7" text:anchor-type="char" svg:x="0.25in" svg:y="0.2154in" svg:width="4.8752in" draw:z-index="0"><draw:text-box fo:min-height="1.2118in"><text:p text:style-name="Frame_20_contents" loext:marker-style-name="T29"><text:span text:style-name="T29">\c 10</text:span><text:span text:style-name="T29"/></text:p><text:p text:style-name="Frame_20_contents" loext:marker-style-name="T29"><text:span text:style-name="T29">\s An Fa Ala, Dubatigi</text:span><text:span text:style-name="T29"/></text:p><text:p text:style-name="P80" loext:marker-style-name="T29"/><text:p text:style-name="Frame_20_contents" loext:marker-style-name="T29"><text:span text:style-name="T29">\q An Fa Ala, Dubatigi,</text:span><text:span text:style-name="T29"/></text:p><text:p text:style-name="Frame_20_contents" loext:marker-style-name="T29"><text:span text:style-name="T29">\q An bɛ barika da i ye,</text:span><text:span text:style-name="T29"/></text:p><text:p text:style-name="Frame_20_contents" loext:marker-style-name="T29"><text:span text:style-name="T29">\q Ka i tanu, ka i bato,</text:span><text:span text:style-name="T29"/></text:p><text:p text:style-name="Frame_20_contents" loext:marker-style-name="T30"><text:span text:style-name="T30">\q I ka kan ni bonya ye.</text:span><text:span text:style-name="T30"/></text:p><text:p text:style-name="Frame_20_contents" loext:marker-style-name="T30"><text:span text:style-name="T30">\b</text:span><text:span text:style-name="T30"/></text:p><text:p text:style-name="Frame_20_contents" loext:marker-style-name="T30"><text:span text:style-name="T30">\q2 Kuma duman kɛ ne da la,</text:span><text:span text:style-name="T30"/></text:p><text:p text:style-name="Frame_20_contents" loext:marker-style-name="T30"><text:span text:style-name="T30">\q2 Ka ne Kisibaa ko fɔ.</text:span><text:span text:style-name="T30"/></text:p><text:p text:style-name="Frame_20_contents" loext:marker-style-name="T30"><text:span text:style-name="T30">\q2 Aleluya! Aleluya!</text:span><text:span text:style-name="T30"/></text:p><text:p text:style-name="Frame_20_contents" loext:marker-style-name="T30"><text:span text:style-name="T30">\q2 Yesu ye ne kunmabɔ.</text:span><text:span text:style-name="T30"/></text:p><text:p text:style-name="Frame_20_contents" loext:marker-style-name="T30"/></draw:text-box></draw:frame></text:p>
      <text:p text:style-name="P78" loext:marker-style-name="T15"/>
      <text:p text:style-name="P78" loext:marker-style-name="T15"/>
      <text:p text:style-name="P78" loext:marker-style-name="T15"/>
      <text:p text:style-name="P78" loext:marker-style-name="T15"/>
      <text:p text:style-name="P78" loext:marker-style-name="T15"/>
      <text:p text:style-name="P78" loext:marker-style-name="T15"/>
      <text:p text:style-name="P78" loext:marker-style-name="T15"/>
      <text:p text:style-name="P78" loext:marker-style-name="T15"/>
      <text:p text:style-name="P78" loext:marker-style-name="T15"/>
      <text:p text:style-name="P78" loext:marker-style-name="T15"/>
      <text:p text:style-name="P78" loext:marker-style-name="T15"/>
      <text:p text:style-name="P78" loext:marker-style-name="T15"/>
      <text:p text:style-name="Standard" loext:marker-style-name="T4"><text:span text:style-name="T4">In this song, label the audio as follows:</text:span><text:span text:style-name="T4"/></text:p>
      <text:list xml:id="list1844812298" text:style-name="WWNum8">
        <text:list-item>
          <text:p text:style-name="P81" loext:marker-style-name="T4"><text:span text:style-name="T29">An Fa Ala, Dubatigi, <text:tab/></text:span><text:span text:style-name="T31">(labelled as “a”)</text:span></text:p>
        </text:list-item>
        <text:list-item>
          <text:p text:style-name="P81" loext:marker-style-name="T4"><text:span text:style-name="T29">An bɛ barika da i ye, <text:tab/></text:span><text:span text:style-name="T31">(labelled as “b”)</text:span></text:p>
        </text:list-item>
        <text:list-item>
          <text:p text:style-name="P81" loext:marker-style-name="T4"><text:span text:style-name="T29">Ka i tanu, ka i bato, <text:tab/></text:span><text:span text:style-name="T31">(labelled as “c”)</text:span></text:p>
        </text:list-item>
        <text:list-item>
          <text:p text:style-name="P81" loext:marker-style-name="T4"><text:span text:style-name="T29">I ka kan ni bonya ye.</text:span><text:span text:style-name="T31"> <text:tab/>(labelled as “d”)</text:span></text:p>
        </text:list-item>
        <text:list-item>
          <text:p text:style-name="P81"><text:span text:style-name="T30">Kuma duman kɛ ne da la,<text:tab/></text:span><text:span text:style-name="T32">(labelled as “e”)</text:span></text:p>
        </text:list-item>
        <text:list-item>
          <text:p text:style-name="P81" loext:marker-style-name="T4"><text:span text:style-name="T30">Ka ne Kisibaa ko fɔ. <text:tab/></text:span><text:span text:style-name="T31">(labelled as “f”)</text:span></text:p>
        </text:list-item>
        <text:list-item>
          <text:p text:style-name="P81" loext:marker-style-name="T4"><text:span text:style-name="T29">Aleluya! <text:tab/><text:tab/><text:tab/></text:span><text:span text:style-name="T31">(labelled as “g”)</text:span></text:p>
        </text:list-item>
        <text:list-item>
          <text:p text:style-name="P81" loext:marker-style-name="T4"><text:span text:style-name="T29">Aleluya! <text:tab/><text:tab/><text:tab/></text:span><text:span text:style-name="T31">(labelled as “h”)</text:span></text:p>
        </text:list-item>
        <text:list-item>
          <text:p text:style-name="P81" loext:marker-style-name="T4"><text:span text:style-name="T29">Yesu ye ne kunmabɔ. <text:tab/></text:span><text:span text:style-name="T31">(labelled as “i”)</text:span></text:p>
        </text:list-item>
      </text:list>
      <text:p text:style-name="P6" loext:marker-style-name="T4"/>
      <text:p text:style-name="Standard" loext:marker-style-name="T4"><text:span text:style-name="T4">Note that the “Aleluya! Aleluya!” line is split in two because of the phrase-ending exclamation mark in the middle.</text:span><text:span text:style-name="T4"/></text:p>
      <text:p text:style-name="P6" loext:marker-style-name="T4"/>
      <text:p text:style-name="Standard" loext:marker-style-name="T4"><text:span text:style-name="T4">For a longer chapter, you will soon run out of letters of the alphabet. When you get to “z”, the next label you need to use is “aa”, then “ab”, “ac”, “ad”, etc. When you get to “az”, the next label you need to use is “ba”, then “bb”, “bc”, “bd”, etc. In other words, this follows a similar naming convention to the column names in a spreadsheet.</text:span><text:span text:style-name="T4"/></text:p>
      <text:p text:style-name="P78" loext:marker-style-name="T15"/>
      <text:list xml:id="list131422816176772" text:continue-list="list131423257948390" text:style-name="WWNum13">
        <text:list-item>
          <text:list>
            <text:list-item>
              <text:h text:style-name="P35" text:outline-level="2" loext:marker-style-name="T4"><text:bookmark-start text:name="_Toc500235223"/><text:span text:style-name="T4">Can I get the app to split on commas for some verses and not others?</text:span><text:bookmark-end text:name="_Toc500235223"/><text:span text:style-name="T4"/></text:h>
            </text:list-item>
          </text:list>
        </text:list-item>
      </text:list>
      <text:p text:style-name="Standard" loext:marker-style-name="T4"><text:span text:style-name="T4">You might want to use phrase level highlighting to split up some of the verses and most of the time might be sufficient to split on full stops/periods, question marks and exclamation marks. But in a few verses it would be good if the app can split on commas. </text:span><text:span text:style-name="T4"/></text:p>
      <text:p text:style-name="P6" loext:marker-style-name="T4"/>
      <text:p text:style-name="Standard" loext:marker-style-name="T4"><text:span text:style-name="T4">For those verses where you would like the app to split on commas, simply add a comma at the end of the first phrase level label for the verse, e.g. “3</text:span><text:span text:style-name="T33">,</text:span><text:span text:style-name="T4">” or “6</text:span><text:span text:style-name="T33">,</text:span><text:span text:style-name="T4">” etc. The app will then split that specific verse by commas as well as the other phrase-ending characters you have defined.</text:span></text:p>
      <text:p text:style-name="P6" loext:marker-style-name="T4"/>
      <text:p text:style-name="Standard" loext:marker-style-name="T24"><draw:frame draw:style-name="fr3" draw:name="Frame8" text:anchor-type="char" svg:x="0.25in" svg:y="0.3256in" svg:width="5.3701in" svg:height="1.2965in" draw:z-index="1"><draw:text-box><text:p text:style-name="Frame_20_contents" loext:marker-style-name="T29"><text:span text:style-name="T29">\v 1 Yesu ya se Zhude fiige ki ni, Bɛtilɛhɛmu ni, saannaa Hɛrɔdi caŋa ɲii ni. Wu nizexhɔgɔ ki na, a wɔrɔɔ cɛvɛɛ pii di ba na yìri Kilɛ-nɔhɔ na, na nɔ Zheruzalɛmu ni.</text:span><text:span text:style-name="T29"/></text:p><text:p text:style-name="P80" loext:marker-style-name="T29"/><text:p text:style-name="Frame_20_contents" loext:marker-style-name="T29"><text:span text:style-name="T29">\v 2 A pʼi yegeŋɛ pye na: «Yawutuu wo saan we wʼa se nimɛ ge, mii wu wa wɛ? Wèe ya wu wɔrɔ ɲa, na wèe yaha Kilɛ-nɔhɔ ke na, na ba di ba wu pɛlɛ.»</text:span></text:p></draw:text-box></draw:frame><text:span text:style-name="T24">Example:</text:span><text:span text:style-name="T24"/></text:p>
      <text:p text:style-name="P6" loext:marker-style-name="T4"/>
      <text:p text:style-name="Standard" loext:marker-style-name="T4"><text:span text:style-name="T4">In this chapter, verse 1 can be split into two sections, split by the “.” in the middle:</text:span><text:span text:style-name="T4"/></text:p>
      <text:list text:continue-list="list1844812298" text:style-name="WWNum8">
        <text:list-item>
          <text:p text:style-name="P81" loext:marker-style-name="T4"><text:span text:style-name="T29">Yesu ya se Zhude fiige ki ni, Bɛtilɛhɛmu ni, saannaa Hɛrɔdi caŋa ɲii ni. </text:span><text:span text:style-name="T29"/></text:p>
        </text:list-item>
        <text:list-item>
          <text:p text:style-name="P81" loext:marker-style-name="T4"><text:span text:style-name="T29">Wu nizexhɔgɔ ki na, a wɔrɔɔ cɛvɛɛ pii di ba na yìri Kilɛ-nɔhɔ na, na nɔ Zheruzalɛmu ni.</text:span><text:span text:style-name="T31"> </text:span></text:p>
        </text:list-item>
      </text:list>
      <text:p text:style-name="P6" loext:marker-style-name="T4"/>
      <text:p text:style-name="Standard" loext:marker-style-name="T4"><text:span text:style-name="T4">Or, alternatively, it can be split into six sections, split by both “.” and “,”:</text:span><text:span text:style-name="T4"/></text:p>
      <text:list text:continue-numbering="true" text:style-name="WWNum8">
        <text:list-item>
          <text:p text:style-name="P81" loext:marker-style-name="T3"><text:span text:style-name="T29">Yesu ya se Zhude fiige ki ni, </text:span><text:span text:style-name="T31">(labelled as “1,”) </text:span><text:span text:style-name="T34"><text:s/>– notice the comma after 1a here</text:span></text:p>
        </text:list-item>
        <text:list-item>
          <text:p text:style-name="P81" loext:marker-style-name="T4"><text:span text:style-name="T29">Bɛtilɛhɛmu ni, <text:tab/><text:tab/><text:tab/><text:tab/></text:span><text:span text:style-name="T29"/></text:p>
        </text:list-item>
        <text:list-item>
          <text:p text:style-name="P81" loext:marker-style-name="T4"><text:span text:style-name="T29">saannaa Hɛrɔdi caŋa ɲii ni. <text:tab/><text:tab/></text:span><text:span text:style-name="T29"/></text:p>
        </text:list-item>
        <text:list-item>
          <text:p text:style-name="P81" loext:marker-style-name="T4"><text:span text:style-name="T29">Wu nizexhɔgɔ ki na, <text:tab/><text:tab/><text:tab/></text:span><text:span text:style-name="T29"/></text:p>
        </text:list-item>
        <text:list-item>
          <text:p text:style-name="P81" loext:marker-style-name="T4"><text:span text:style-name="T29">a wɔrɔɔ cɛvɛɛ pii di ba na yìri Kilɛ-nɔhɔ na, </text:span><text:span text:style-name="T29"/></text:p>
        </text:list-item>
        <text:list-item>
          <text:p text:style-name="P81" loext:marker-style-name="T4"><text:span text:style-name="T29">na nɔ Zheruzalɛmu ni.</text:span><text:span text:style-name="T29"/></text:p>
        </text:list-item>
      </text:list>
      <text:p text:style-name="P14" loext:marker-style-name="T4"/>
      <text:p text:style-name="Standard" loext:marker-style-name="T4"><text:span text:style-name="T4">Unless the comma has been added to the normal phrase-ending characters in </text:span><text:span text:style-name="T15">Features</text:span><text:span text:style-name="T4"> </text:span><text:span text:style-name="T23"></text:span><text:span text:style-name="T4"> </text:span><text:span text:style-name="T15">Audio, </text:span><text:span text:style-name="T4">verse 2 will revert to being treated as a whole (labelled as “2”) or split into three with the normal characters. It can be split into six sections if you begin with the label “2,”.</text:span></text:p>
      <text:p text:style-name="P6" loext:marker-style-name="T4"/>
      <text:p text:style-name="P78" loext:marker-style-name="T15"/>
      <text:list text:continue-list="list131422816176772" text:style-name="WWNum13">
        <text:list-item>
          <text:list>
            <text:list-item>
              <text:h text:style-name="P35" text:outline-level="2" loext:marker-style-name="T4"><text:bookmark-start text:name="_Toc500235224"/><text:span text:style-name="T4">How can I get it to highlight section headings?</text:span><text:bookmark-end text:name="_Toc500235224"/><text:span text:style-name="T4"> </text:span><text:span text:style-name="T4"/></text:h>
            </text:list-item>
          </text:list>
        </text:list-item>
      </text:list>
      <text:p text:style-name="P79" loext:marker-style-name="T15"/>
      <text:p text:style-name="P39" loext:marker-style-name="T4"><text:span text:style-name="T4">In some audio files, the section headings are read out by the narrator as well as the verses. To include them in the highlighting, use labels ‘s1’, ‘s2’, ‘s3’, etc., where ‘s1’ is the first section heading, ‘s2’ is the second section heading and so on. </text:span><text:span text:style-name="T4"/></text:p>
      <text:p text:style-name="P40" loext:marker-style-name="T4"/>
      <text:p text:style-name="Standard" loext:marker-style-name="T4"><text:span text:style-name="T4">Note that the ‘s’ is lower-case and there is no space between the ‘s’ and the number.</text:span><text:span text:style-name="T4"/></text:p>
      <text:p text:style-name="P6" loext:marker-style-name="T4"/>
      <text:p text:style-name="Standard" loext:marker-style-name="T4"><text:span text:style-name="T4">Use this same method for other types of headings, e.g. use ‘d’ as the prefix for \d headings, ‘sp’ as the prefix for \sp headings, ‘is’ for \is, etc.</text:span><text:span text:style-name="T4"/></text:p>
      <text:p text:style-name="P6" loext:marker-style-name="T4"/>
      <text:p text:style-name="Standard" loext:marker-style-name="T4"><text:span text:style-name="T4">For </text:span><text:span text:style-name="T15">section headings in picture story books</text:span><text:span text:style-name="T4">, add the page number before the label, e.g. 1s1, 1s2, 1s3 for section headings on the first page; 2s1, 2s2, etc. for section headings on the second page.</text:span></text:p>
      <text:p text:style-name="P6" loext:marker-style-name="T4"/>
      <text:list text:continue-numbering="true" text:style-name="WWNum13">
        <text:list-item>
          <text:list>
            <text:list-item>
              <text:h text:style-name="P35" text:outline-level="2" loext:marker-style-name="T4"><text:bookmark-start text:name="_Toc500235225"/><text:span text:style-name="T4">How can I define text-audio highlighting for book introductions?</text:span><text:bookmark-end text:name="_Toc500235225"/><text:span text:style-name="T4"> </text:span><text:span text:style-name="T4"/></text:h>
            </text:list-item>
          </text:list>
        </text:list-item>
      </text:list>
      <text:p text:style-name="P79" loext:marker-style-name="T15"/>
      <text:p text:style-name="Standard" loext:marker-style-name="T4"><text:span text:style-name="T4">Book introductions do not have verse numbers, so use the procedure outlined in FAQ 2 and 3 above, i.e. using phrase-level highlighting with ‘a’, ‘b’, ‘c’, etc.</text:span><text:span text:style-name="T4"/></text:p>
      <text:p text:style-name="P6" loext:marker-style-name="T4"/>
      <text:p text:style-name="Standard" loext:marker-style-name="T4"><text:span text:style-name="T4">Sub headings within introductions are labelled as described in FAQ 4 above, i.e. ‘is1’, ‘is2’, etc.</text:span><text:span text:style-name="T4"/></text:p>
      <text:p text:style-name="P6" loext:marker-style-name="T4"/>
      <text:p text:style-name="Standard" loext:marker-style-name="T4"><text:span text:style-name="T4">On the Audio tab for books in Scripture App Builder, audio and timing files for introductions need to be marked as Chapter “0”.</text:span><text:span text:style-name="T4"/></text:p>
      <text:p text:style-name="P6" loext:marker-style-name="T4"/>
      <text:p text:style-name="P2" loext:marker-style-name="T4"><draw:frame text:anchor-type="as-char" draw:z-index="16" draw:style-name="gr2" draw:text-style-name="P3" svg:width="5.7224in" svg:height="3.2224in"><draw:image xlink:href="Pictures/1000000000000226000001362E61B54E.png" xlink:type="simple" xlink:show="embed" xlink:actuate="onLoad" draw:mime-type="image/png"><text:p/></draw:image></draw:frame></text:p>
      <text:p text:style-name="P6" loext:marker-style-name="T4"/>
      <text:p text:style-name="P78" loext:marker-style-name="T15"/>
      <text:list xml:id="list131423923668960" text:continue-numbering="true" text:style-name="WWNum13">
        <text:list-item>
          <text:list>
            <text:list-item>
              <text:h text:style-name="P35" text:outline-level="2" loext:marker-style-name="T4"><text:bookmark-start text:name="_Toc500235226"/><text:span text:style-name="T4">There are parts of the audio where I don’t want any text highlighted. How can I turn off the highlighting for a few moments between verses?</text:span><text:bookmark-end text:name="_Toc500235226"/><text:span text:style-name="T4"/></text:h>
            </text:list-item>
          </text:list>
        </text:list-item>
      </text:list>
      <text:p text:style-name="P79" loext:marker-style-name="T15"/>
      <text:p text:style-name="P39" loext:marker-style-name="T4"><text:span text:style-name="T4">You might want to turn off text highlighting during musical interludes or sound effects. To do this, you need to give the labels a range, rather than being at a single point.</text:span><text:span text:style-name="T4"/></text:p>
      <text:p text:style-name="P40" loext:marker-style-name="T4"/>
      <text:p text:style-name="P39" loext:marker-style-name="T4"><text:span text:style-name="T4">Here is an example:</text:span><text:span text:style-name="T4"/></text:p>
      <text:p text:style-name="P40" loext:marker-style-name="T4"/>
      <text:p text:style-name="Standard" loext:marker-style-name="T4"><draw:frame text:anchor-type="as-char" draw:z-index="17" draw:style-name="gr2" draw:text-style-name="P3" svg:width="5.8614in" svg:height="3.3248in"><draw:image xlink:href="Pictures/100000000000032F000001C95B937A69.png" xlink:type="simple" xlink:show="embed" xlink:actuate="onLoad" draw:mime-type="image/png"><text:p/></draw:image></draw:frame></text:p>
      <text:p text:style-name="P6" loext:marker-style-name="T4"/>
      <text:p text:style-name="Standard" loext:marker-style-name="T4"><text:span text:style-name="T4">In the above timing file:</text:span><text:span text:style-name="T4"/></text:p>
      <text:list text:style-name="WWNum7">
        <text:list-item>
          <text:p text:style-name="P82" loext:marker-style-name="T4"><text:span text:style-name="T4">Verse 4 highlighting will start at the 4 label and end at the beginning of the 5 label (as normal).</text:span><text:span text:style-name="T4"/></text:p>
        </text:list-item>
        <text:list-item>
          <text:p text:style-name="P82" loext:marker-style-name="T4"><text:span text:style-name="T4">Verse 5 highlighting will start at the initial point of the 5 label range and continue until the end of the 5 label range.</text:span><text:span text:style-name="T4"/></text:p>
        </text:list-item>
        <text:list-item>
          <text:p text:style-name="P82" loext:marker-style-name="T4"><text:span text:style-name="T4">Nothing will be highlighted between the end of the 5 label range and the 6 label.</text:span><text:span text:style-name="T4"/></text:p>
        </text:list-item>
        <text:list-item>
          <text:p text:style-name="P82" loext:marker-style-name="T4"><text:span text:style-name="T4">Verse 6 highlighting will start at the 6 label.</text:span><text:span text:style-name="T4"/></text:p>
        </text:list-item>
      </text:list>
      <text:p text:style-name="P6" loext:marker-style-name="T4"/>
      <text:p text:style-name="Standard" loext:marker-style-name="T4"><text:span text:style-name="T4">To create a label range, drag the &lt; or &gt; part of the label marker.</text:span><text:span text:style-name="T4"/></text:p>
      <text:p text:style-name="P6" loext:marker-style-name="T4"/>
      <text:p text:style-name="P6" loext:marker-style-name="T4"/>
      <text:list text:continue-list="list131423923668960" text:style-name="WWNum13">
        <text:list-item>
          <text:list>
            <text:list-item>
              <text:h text:style-name="P35" text:outline-level="2" loext:marker-style-name="T4"><text:bookmark-start text:name="_Toc500235227"/><text:span text:style-name="T4">I’d like to give someone else the task of creating timing files. Is there any way of them testing these without needing to know how to build the app?</text:span><text:bookmark-end text:name="_Toc500235227"/><text:span text:style-name="T4"> </text:span><text:span text:style-name="T4"/></text:h>
            </text:list-item>
          </text:list>
        </text:list-item>
      </text:list>
      <text:p text:style-name="P40" loext:marker-style-name="T4"/>
      <text:p text:style-name="P39" loext:marker-style-name="T4"><text:span text:style-name="T4">Yes, if you have chosen Audio Distribution by external folder or download, the MP3 files will be in a folder on the SD card. The app will look for a corresponding timing file in this folder if it doesn’t already have a timing file packaged inside the APK.</text:span><text:span text:style-name="T4"/></text:p>
      <text:p text:style-name="P6" loext:marker-style-name="T4"/>
      <text:p text:style-name="Standard" loext:marker-style-name="T4"><text:span text:style-name="T4">The timing filename in this case should be same as the mp3 file, but with the </text:span><text:span text:style-name="T15">.txt</text:span><text:span text:style-name="T4"> extension rather than </text:span><text:span text:style-name="T15">.mp3</text:span><text:span text:style-name="T4">.</text:span></text:p>
      <text:p text:style-name="P6" loext:marker-style-name="T4"/>
      <text:p text:style-name="Standard" loext:marker-style-name="T4"><text:span text:style-name="T4">So, for example, if you have a file such as </text:span><text:span text:style-name="T15">MYK_MAT_01.mp3</text:span><text:span text:style-name="T4"> in the folder, you can put the file </text:span><text:span text:style-name="T15">MYK_MAT_01.txt</text:span><text:span text:style-name="T4"> in the same place and the app should recognise it. </text:span></text:p>
      <text:p text:style-name="P6" loext:marker-style-name="T4"/>
      <text:p text:style-name="Standard" loext:marker-style-name="T4"><text:span text:style-name="T4">Using this method, others can work on providing timing files for the app and test them, without needing to rebuild the app. Once the timing files are working, you can rebuild the app and package them inside the apk. They are very small so should not increase the size of the apk significantly.</text:span><text:span text:style-name="T4"/></text:p>
      <text:p text:style-name="P6" loext:marker-style-name="T4"/>
      <text:p text:style-name="P6" loext:marker-style-name="T4"/>
      <text:p text:style-name="P6" loext:marker-style-name="T4"/>
      <text:list text:continue-numbering="true" text:style-name="WWNum13">
        <text:list-item>
          <text:h text:style-name="P69" text:outline-level="1" loext:marker-style-name="T4"><text:bookmark-start text:name="_Toc500235228"/><text:span text:style-name="T4">Appendix – How to Install Audacity</text:span><text:bookmark-end text:name="_Toc500235228"/><text:span text:style-name="T4"/></text:h>
        </text:list-item>
      </text:list>
      <text:p text:style-name="P6" loext:marker-style-name="T4"/>
      <text:list text:style-name="WWNum11">
        <text:list-item>
          <text:p text:style-name="P83" loext:marker-style-name="T35"><text:span text:style-name="T35">Download the latest Audacity installation program from the Audacity website: <text:line-break/><text:line-break/><text:tab/><text:tab/></text:span><text:a xlink:type="simple" xlink:href="http://www.audacityteam.org" text:style-name="Internet_20_link" text:visited-style-name="Visited_20_Internet_20_Link"><text:span text:style-name="Internet_20_link"><text:span text:style-name="T36">http://www.audacityteam.org</text:span></text:span></text:a></text:p>
        </text:list-item>
      </text:list>
      <text:p text:style-name="P84" loext:marker-style-name="T35"/>
      <text:p text:style-name="P85" loext:marker-style-name="T35"><text:span text:style-name="T35">For version 2.2.0, the filename is </text:span><text:span text:style-name="T36">audacity-win-2.2.0.exe</text:span><text:span text:style-name="T37">. It is 19 MB in size.</text:span></text:p>
      <text:p text:style-name="P86" loext:marker-style-name="T37"><text:span text:style-name="T37">It might be that a newer version than 2.2.0 is available. If so, download this newer version instead.</text:span><text:span text:style-name="T37"/></text:p>
      <text:p text:style-name="P87" loext:marker-style-name="T35"/>
      <text:list text:continue-numbering="true" text:style-name="WWNum11">
        <text:list-item>
          <text:p text:style-name="P88" loext:marker-style-name="T35"><text:span text:style-name="T35">Double-click </text:span><text:span text:style-name="T36">audacity-win-2.2.0.exe </text:span><text:span text:style-name="T35">to start the installation.</text:span></text:p>
        </text:list-item>
      </text:list>
      <text:p text:style-name="P89" loext:marker-style-name="T35"/>
      <text:list text:continue-numbering="true" text:style-name="WWNum11">
        <text:list-item>
          <text:p text:style-name="P83" loext:marker-style-name="T35"><text:span text:style-name="T35">Select English as the language to use :<text:line-break/></text:span><text:span text:style-name="T35"/></text:p>
        </text:list-item>
      </text:list>
      <text:p text:style-name="P90" loext:marker-style-name="T35"><draw:frame text:anchor-type="as-char" draw:z-index="18" draw:name="Picture 1" draw:style-name="gr2" draw:text-style-name="P3" svg:width="3.1114in" svg:height="1.5835in"><draw:image xlink:href="Pictures/100000000000012B00000098363E8AB6.png" xlink:type="simple" xlink:show="embed" xlink:actuate="onLoad" draw:mime-type="image/png"><text:p/></draw:image></draw:frame></text:p>
      <text:p text:style-name="P91" loext:marker-style-name="T35"/>
      <text:p text:style-name="P92" loext:marker-style-name="T35"><text:span text:style-name="T35">The Setup Wizard opens:</text:span><text:span text:style-name="T35"/></text:p>
      <text:p text:style-name="P41" loext:marker-style-name="T38"><draw:frame text:anchor-type="as-char" draw:z-index="19" draw:style-name="gr2" draw:text-style-name="P3" svg:width="5.1949in" svg:height="4.028in"><draw:image xlink:href="Pictures/10000000000001F300000183854602AE.png" xlink:type="simple" xlink:show="embed" xlink:actuate="onLoad" draw:mime-type="image/png"><text:p/></draw:image></draw:frame></text:p>
      <text:p text:style-name="P93" loext:marker-style-name="T36"/>
      <text:list text:continue-numbering="true" text:style-name="WWNum11">
        <text:list-item>
          <text:p text:style-name="P88" loext:marker-style-name="T35"><text:span text:style-name="T35">Click </text:span><text:span text:style-name="T36">Next</text:span><text:span text:style-name="T35"> to continue.</text:span></text:p>
        </text:list-item>
      </text:list>
      <text:p text:style-name="P94" loext:marker-style-name="T35"><text:span text:style-name="T35">A page of licence information will appear:</text:span><text:span text:style-name="T35"/></text:p>
      <text:p text:style-name="P41" loext:marker-style-name="T36"><draw:frame text:anchor-type="as-char" draw:z-index="20" draw:style-name="gr2" draw:text-style-name="P3" svg:width="5.1949in" svg:height="4.028in"><draw:image xlink:href="Pictures/10000000000001F300000183684571A6.png" xlink:type="simple" xlink:show="embed" xlink:actuate="onLoad" draw:mime-type="image/png"><text:p/></draw:image></draw:frame><text:span text:style-name="T38"><text:line-break/></text:span></text:p>
      <text:list text:continue-numbering="true" text:style-name="WWNum11">
        <text:list-item>
          <text:p text:style-name="P95" loext:marker-style-name="T35"><text:span text:style-name="T35">Click </text:span><text:span text:style-name="T36">Next</text:span><text:span text:style-name="T35"> to continue.</text:span></text:p>
        </text:list-item>
      </text:list>
      <text:p text:style-name="P96" loext:marker-style-name="T35"><text:span text:style-name="T35">You will see the page </text:span><text:span text:style-name="T36">Select Destination Location</text:span><text:span text:style-name="T35">:</text:span></text:p>
      <text:p text:style-name="P41" loext:marker-style-name="T36"><draw:frame text:anchor-type="as-char" draw:z-index="21" draw:style-name="gr2" draw:text-style-name="P3" svg:width="5.1949in" svg:height="4.028in"><draw:image xlink:href="Pictures/10000000000001F300000183465E43E3.png" xlink:type="simple" xlink:show="embed" xlink:actuate="onLoad" draw:mime-type="image/png"><text:p/></draw:image></draw:frame><text:span text:style-name="T38"><text:line-break/></text:span></text:p>
      <text:list text:continue-numbering="true" text:style-name="WWNum11">
        <text:list-item>
          <text:p text:style-name="P95" loext:marker-style-name="T35"><text:span text:style-name="T35">The suggested location in which to install</text:span><text:alphabetical-index-mark text:string-value=" " text:key1="install"/><text:span text:style-name="T35"> Audacity is normally fine, so click </text:span><text:span text:style-name="T36">Next</text:span><text:span text:style-name="T35">.</text:span></text:p>
        </text:list-item>
      </text:list>
      <text:p text:style-name="P96" loext:marker-style-name="T35"><text:span text:style-name="T35">You’ll see the </text:span><text:span text:style-name="T36">Select Additional Tasks</text:span><text:span text:style-name="T35"> page:<text:line-break/></text:span></text:p>
      <text:p text:style-name="P2" loext:marker-style-name="T35"><draw:frame text:anchor-type="as-char" draw:z-index="22" draw:style-name="gr2" draw:text-style-name="P3" svg:width="5.1949in" svg:height="4.028in"><draw:image xlink:href="Pictures/10000000000001F3000001833CE2F20D.png" xlink:type="simple" xlink:show="embed" xlink:actuate="onLoad" draw:mime-type="image/png"><text:p/></draw:image></draw:frame></text:p>
      <text:list text:continue-numbering="true" text:style-name="WWNum11">
        <text:list-item>
          <text:p text:style-name="P97" loext:marker-style-name="T35"><text:span text:style-name="T35">Click </text:span><text:span text:style-name="T36">Next</text:span><text:span text:style-name="T35"> to continue.</text:span></text:p>
        </text:list-item>
      </text:list>
      <text:p text:style-name="P96" loext:marker-style-name="T35"><text:span text:style-name="T35">You’ll then see the </text:span><text:span text:style-name="T36">Ready to Install</text:span><text:span text:style-name="T35"> page:<text:line-break/></text:span></text:p>
      <text:p text:style-name="P2" loext:marker-style-name="T36"><draw:frame text:anchor-type="as-char" draw:z-index="23" draw:style-name="gr2" draw:text-style-name="P3" svg:width="5.1949in" svg:height="4.028in"><draw:image xlink:href="Pictures/10000000000001F300000183FB6552FC.png" xlink:type="simple" xlink:show="embed" xlink:actuate="onLoad" draw:mime-type="image/png"><text:p/></draw:image></draw:frame><text:span text:style-name="T38"><text:line-break/></text:span></text:p>
      <text:list text:continue-numbering="true" text:style-name="WWNum11">
        <text:list-item>
          <text:p text:style-name="P95" loext:marker-style-name="T35"><text:span text:style-name="T35">Click </text:span><text:span text:style-name="T36">Install</text:span><text:span text:style-name="T35"> to begin the installation.<text:line-break/></text:span></text:p>
        </text:list-item>
      </text:list>
      <text:p text:style-name="P41" loext:marker-style-name="T35"><draw:frame text:anchor-type="as-char" draw:z-index="24" draw:style-name="gr2" draw:text-style-name="P3" svg:width="5.1949in" svg:height="4.028in"><draw:image xlink:href="Pictures/10000000000001F30000018324F8F924.png" xlink:type="simple" xlink:show="embed" xlink:actuate="onLoad" draw:mime-type="image/png"><text:p/></draw:image></draw:frame></text:p>
      <text:p text:style-name="P98" loext:marker-style-name="T35"><text:span text:style-name="T35">When the installation is complete, you will see a page of information:<text:line-break/></text:span><text:span text:style-name="T35"/></text:p>
      <text:p text:style-name="P41" loext:marker-style-name="T35"><draw:frame text:anchor-type="as-char" draw:z-index="25" draw:style-name="gr2" draw:text-style-name="P3" svg:width="5.1949in" svg:height="4.028in"><draw:image xlink:href="Pictures/10000000000001F30000018351ED4511.png" xlink:type="simple" xlink:show="embed" xlink:actuate="onLoad" draw:mime-type="image/png"><text:p/></draw:image></draw:frame><text:span text:style-name="T38"><text:line-break/></text:span></text:p>
      <text:list text:continue-numbering="true" text:style-name="WWNum11">
        <text:list-item>
          <text:p text:style-name="P95" loext:marker-style-name="T35"><text:span text:style-name="T35">Click </text:span><text:span text:style-name="T36">Next</text:span><text:span text:style-name="T35"> to continue.</text:span></text:p>
        </text:list-item>
      </text:list>
      <text:p text:style-name="P99" loext:marker-style-name="T35"/>
      <text:p text:style-name="P100" loext:marker-style-name="T35"><text:span text:style-name="T35">You will then see the final page of the Setup Wizard:</text:span><text:span text:style-name="T35"/></text:p>
      <text:p text:style-name="P41" loext:marker-style-name="T36"><draw:frame text:anchor-type="as-char" draw:z-index="26" draw:style-name="gr2" draw:text-style-name="P3" svg:width="5.1949in" svg:height="4.028in"><draw:image xlink:href="Pictures/10000000000001F300000183ED2BD124.png" xlink:type="simple" xlink:show="embed" xlink:actuate="onLoad" draw:mime-type="image/png"><text:p/></draw:image></draw:frame></text:p>
      <text:p text:style-name="P93" loext:marker-style-name="T36"/>
      <text:list text:continue-numbering="true" text:style-name="WWNum11">
        <text:list-item>
          <text:p text:style-name="P95" loext:marker-style-name="T35"><text:span text:style-name="T35">Click </text:span><text:span text:style-name="T36">Finish</text:span><text:span text:style-name="T35"> to close the Setup Wizard and launch Audacity.</text:span></text:p>
        </text:list-item>
      </text:list>
      <text:p text:style-name="P99" loext:marker-style-name="T35"/>
      <text:p text:style-name="P100" loext:marker-style-name="T35"><text:span text:style-name="T35">Audacity is now ready to use.</text:span><text:span text:style-name="T35"/></text:p>
      <text:p text:style-name="P6"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haris SIL" svg:font-family="'Charis SIL'" style:font-family-generic="roman" style:font-pitch="variable"/>
    <style:font-face style:name="Charis SIL1" svg:font-family="'Charis SIL'"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WWNum13" style:class="chapter">
      <style:paragraph-properties fo:margin-top="0.1665in" fo:margin-bottom="0.0417in" style:contextual-spacing="false" fo:keep-with-next="always"/>
      <style:text-properties fo:font-size="18pt" fo:font-weight="bold" style:letter-kerning="true" style:font-size-asian="18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WWNum13" style:list-level="2" style:class="chapter">
      <style:paragraph-properties fo:margin-top="0.1665in" fo:margin-bottom="0.0417in" style:contextual-spacing="false" fo:keep-with-next="always"/>
      <style:text-properties fo:font-size="13pt" fo:font-style="italic" fo:font-weight="bold" style:font-size-asian="13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5984in" fo:margin-top="0.1665in" fo:margin-bottom="0in" style:contextual-spacing="false" fo:text-indent="-0.4335in" style:auto-text-indent="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style0" style:family="paragraph">
      <style:paragraph-properties fo:margin-top="0in" fo:margin-bottom="0in" style:contextual-spacing="false" fo:text-align="left" style:justify-single-word="false" fo:orphans="0" fo:widows="0" fo:hyphenation-ladder-count="no-limit" fo:hyphenation-keep="auto" loext:hyphenation-keep-type="column" loext:hyphenation-keep-line="false" style:writing-mode="lr-tb">
        <style:tab-stops>
          <style:tab-stop style:position="0.4925in"/>
        </style:tab-stops>
      </style:paragraph-properties>
      <style:text-properties style:font-name="Charis SIL" fo:font-family="'Charis SIL'" style:font-family-generic="roman" style:font-pitch="variable" fo:font-size="12pt" style:font-size-asian="12pt" style:language-asian="zh" style:country-asian="CN" style:font-name-complex="Charis SIL1" style:font-family-complex="'Charis SI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AQ" style:family="paragraph" style:parent-style-name="Standard" style:list-style-name="WWNum13" style:list-level="3"/>
    <style:style style:name="List_20_Paragraph" style:display-name="List Paragraph" style:family="paragraph" style:parent-style-name="Standard">
      <style:paragraph-properties fo:margin-left="0.5in" fo:margin-top="0in" fo:margin-bottom="0in" style:contextual-spacing="tru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language="fr" fo:country="FR" fo:font-weight="bold" style:letter-kerning="true" style:font-size-asian="16pt" style:language-asian="fr" style:country-asian="FR"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mbria" fo:font-family="Cambria" style:font-family-generic="roman" style:font-pitch="variable" fo:font-size="14pt" fo:language="fr" fo:country="FR" fo:font-style="italic" fo:font-weight="bold" style:font-size-asian="14pt" style:language-asian="fr" style:country-asian="FR"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name-complex="Times New Roman1" style:font-family-complex="'Times New Roman'" style:font-family-generic-complex="system" style:font-pitch-complex="variable"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fo:font-weight="normal" style:font-weight-asian="normal"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fo:language="en" fo:country="GB"/>
    </style:style>
    <style:style style:name="ListLabel_20_236" style:display-name="ListLabel 236" style:family="text"/>
    <style:style style:name="ListLabel_20_237" style:display-name="ListLabel 237" style:family="text">
      <style:text-properties fo:language="en" fo:country="GB" fo:font-weight="bold" style:font-weight-asian="bold" style:font-size-complex="11pt" style:font-weight-complex="bold"/>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i">
        <style:list-level-properties text:list-level-position-and-space-mode="label-alignment">
          <style:list-level-label-alignment text:label-followed-by="listtab" text:list-tab-stop-position="0.9917in" fo:text-indent="-0.5in" fo:margin-left="0.9917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i">
        <style:list-level-properties text:list-level-position-and-space-mode="label-alignment">
          <style:list-level-label-alignment text:label-followed-by="listtab" text:list-tab-stop-position="0.9917in" fo:text-indent="-0.5in" fo:margin-left="0.9917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prefix="("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5083in" fo:text-indent="-0.25in" fo:margin-left="0.5083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0083in" fo:text-indent="-0.1252in" fo:margin-left="1.0083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083in" fo:text-indent="-0.25in" fo:margin-left="1.5083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0083in" fo:text-indent="-0.25in" fo:margin-left="2.0083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5083in" fo:text-indent="-0.1252in" fo:margin-left="2.508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0083in" fo:text-indent="-0.25in" fo:margin-left="3.0083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5083in" fo:text-indent="-0.25in" fo:margin-left="3.5083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0083in" fo:text-indent="-0.1252in" fo:margin-left="4.00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Symbol" style:font-charset="x-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text:list-tab-stop-position="1.5in" fo:text-indent="-0.55in" fo:margin-left="1.3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text:list-tab-stop-position="2.25in" fo:text-indent="-0.75in" fo:margin-left="2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text:list-tab-stop-position="2.75in" fo:text-indent="-0.85in" fo:margin-left="2.35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text:list-tab-stop-position="3in" fo:text-indent="-1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text:list-tab-stop-position="1.5in" fo:text-indent="-0.55in" fo:margin-left="1.3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text:list-tab-stop-position="2.25in" fo:text-indent="-0.75in" fo:margin-left="2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text:list-tab-stop-position="2.75in" fo:text-indent="-0.85in" fo:margin-left="2.35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text:list-tab-stop-position="3in" fo:text-indent="-1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453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528in" fo:margin-left="0in" fo:margin-right="0in" fo:margin-top="0.413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10" text:anchor-type="paragraph" svg:y="0.0008in" draw:z-index="34"><draw:text-box fo:min-height="0in" fo:min-width="0.0161in"><text:p text:style-name="MP1" loext:marker-style-name="Page Number"><text:span text:style-name="Page_20_Number"><text:page-number text:select-page="current">8</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Using Audacity for Audio-Text Synchronization</dc:title>
    <meta:initial-creator>Richard Margetts</meta:initial-creator>
    <dc:creator>Richard Margetts</dc:creator>
    <meta:editing-cycles>106</meta:editing-cycles>
    <meta:print-date>2017-12-05T11:04:00</meta:print-date>
    <meta:creation-date>2015-05-15T16:26:00</meta:creation-date>
    <dc:date>2017-12-05T11:04:00</dc:date>
    <meta:editing-duration>PT5H23M</meta:editing-duration>
    <meta:generator>LibreOffice/26.2.3.2$Linux_X86_64 LibreOffice_project/620$Build-2</meta:generator>
    <meta:document-statistic meta:table-count="2" meta:image-count="0" meta:object-count="0" meta:page-count="8" meta:paragraph-count="385" meta:word-count="4362" meta:character-count="23937" meta:non-whitespace-character-count="19908"/>
    <meta:user-defined meta:name="AppVersion">16.0000</meta:user-defined>
    <meta:template xlink:type="simple" xlink:actuate="onRequest" xlink:title="Normal.dotm" xlink:href=""/>
  </office:meta>
</office:document-meta>
</file>