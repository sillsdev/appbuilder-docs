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10000005894FF691E.png" manifest:media-type="image/png"/>
  <manifest:file-entry manifest:full-path="Pictures/10000001000000C1000000584E770229.png" manifest:media-type="image/png"/>
  <manifest:file-entry manifest:full-path="Pictures/10000000000002E9000001D599A36772.png" manifest:media-type="image/png"/>
  <manifest:file-entry manifest:full-path="Pictures/10000000000002AE000002246DEDE302.png" manifest:media-type="image/png"/>
  <manifest:file-entry manifest:full-path="Pictures/1000E2DC000013FC00000919886D2CB0.emf" manifest:media-type="image/x-emf"/>
  <manifest:file-entry manifest:full-path="Pictures/1000E2DC000013FC000009198FED82DF.emf" manifest:media-type="image/x-emf"/>
  <manifest:file-entry manifest:full-path="Pictures/10000000000000FD000000645817885E.jpg" manifest:media-type="image/jpeg"/>
  <manifest:file-entry manifest:full-path="Pictures/10000001000000C100000058E5193464.png" manifest:media-type="image/png"/>
  <manifest:file-entry manifest:full-path="Pictures/10000000000002AE00000224BF2C3CDD.png" manifest:media-type="image/png"/>
  <manifest:file-entry manifest:full-path="Pictures/1000000100000846000002729EF3B20B.png" manifest:media-type="image/png"/>
  <manifest:file-entry manifest:full-path="Pictures/10000000000002E9000001D5247FC0FE.png" manifest:media-type="image/png"/>
  <manifest:file-entry manifest:full-path="Pictures/10000000000000600000006CCBDB454E.png" manifest:media-type="image/png"/>
  <manifest:file-entry manifest:full-path="Pictures/1000000100000148000000808C519CE0.png" manifest:media-type="image/png"/>
  <manifest:file-entry manifest:full-path="Pictures/10000000000001F3000001847B3E6D30.png" manifest:media-type="image/png"/>
  <manifest:file-entry manifest:full-path="Pictures/10000000000002950000022D5453DD12.png" manifest:media-type="image/png"/>
  <manifest:file-entry manifest:full-path="Pictures/10000000000000FB00000044B83E41CB.png" manifest:media-type="image/png"/>
  <manifest:file-entry manifest:full-path="Pictures/10000001000003990000005FD5E32EC9.png" manifest:media-type="image/png"/>
  <manifest:file-entry manifest:full-path="Pictures/1004819400005F37000009C9CF9D50BF.emf" manifest:media-type="image/x-emf"/>
  <manifest:file-entry manifest:full-path="Pictures/10000000000002DF0000023787A05FD9.png" manifest:media-type="image/png"/>
  <manifest:file-entry manifest:full-path="Pictures/100A865C00005F37000016E0240B3C8C.emf" manifest:media-type="image/x-emf"/>
  <manifest:file-entry manifest:full-path="Pictures/100AB2840000350D000029C188FED0E4.emf" manifest:media-type="image/x-emf"/>
  <manifest:file-entry manifest:full-path="Pictures/1000000100000399000000DD652900E4.png" manifest:media-type="image/png"/>
  <manifest:file-entry manifest:full-path="Pictures/10000001000002010000019440BEA9DD.png" manifest:media-type="image/png"/>
  <manifest:file-entry manifest:full-path="Pictures/1000E2DC000013FC00000919097D1E9A.emf" manifest:media-type="image/x-emf"/>
  <manifest:file-entry manifest:full-path="Pictures/10000000000001850000018C163B9F0C.png" manifest:media-type="image/png"/>
  <manifest:file-entry manifest:full-path="Pictures/10000000000002DF00000237846D59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3" style:family="paragraph">
      <loext:graphic-properties draw:fill="none"/>
      <style:paragraph-properties fo:text-align="center"/>
    </style:style>
    <style:style style:name="P4" style:family="paragraph" style:parent-style-name="Standard">
      <style:paragraph-properties fo:text-align="center" style:justify-single-word="false"/>
      <style:text-properties fo:language="en" fo:country="GB" fo:font-style="italic" style:font-style-asian="italic"/>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fo:break-before="page"/>
    </style:style>
    <style:style style:name="P7" style:family="paragraph" style:parent-style-name="Standard">
      <style:paragraph-properties fo:text-align="center" style:justify-single-word="false"/>
      <style:text-properties fo:font-size="16pt" fo:language="en" fo:country="US" fo:font-weight="bold" style:font-size-asian="16pt" style:font-weight-asian="bold" style:font-size-complex="16pt"/>
    </style:style>
    <style:style style:name="P8" style:family="paragraph" style:parent-style-name="Heading_20_1">
      <style:paragraph-properties fo:margin-left="0.248in" fo:text-indent="-0.248in" style:auto-text-indent="false" fo:break-before="page"/>
    </style:style>
    <style:style style:name="P9" style:family="paragraph" style:parent-style-name="Heading_20_1">
      <style:paragraph-properties fo:margin-left="0.248in" fo:text-indent="-0.248in" style:auto-text-indent="false"/>
    </style:style>
    <style:style style:name="P10" style:family="paragraph" style:parent-style-name="Standard" style:list-style-name="WWNum8"/>
    <style:style style:name="P11" style:family="paragraph" style:parent-style-name="Standard">
      <style:paragraph-properties fo:margin-left="0.4917in"/>
      <style:text-properties fo:language="en" fo:country="US"/>
    </style:style>
    <style:style style:name="P12" style:family="paragraph" style:parent-style-name="Standard">
      <style:paragraph-properties fo:margin-left="0.4917in"/>
    </style:style>
    <style:style style:name="P13" style:family="paragraph" style:parent-style-name="Standard">
      <style:paragraph-properties fo:margin-left="0.25in"/>
    </style:style>
    <style:style style:name="P14" style:family="paragraph" style:parent-style-name="Standard">
      <style:paragraph-properties fo:margin-top="0.0835in" fo:margin-bottom="0in" style:contextual-spacing="false" fo:text-indent="0.4917in" style:auto-text-indent="false" fo:keep-with-next="always"/>
    </style:style>
    <style:style style:name="P15" style:family="paragraph" style:parent-style-name="Standard">
      <style:paragraph-properties fo:margin-left="0.4917in" fo:margin-top="0.0835in" fo:margin-bottom="0in" style:contextual-spacing="false" fo:keep-with-next="always"/>
    </style:style>
    <style:style style:name="P16" style:family="paragraph" style:parent-style-name="Standard">
      <style:paragraph-properties fo:margin-left="0.25in" fo:margin-top="0.0835in" fo:margin-bottom="0in" style:contextual-spacing="false" fo:text-indent="0.2417in" style:auto-text-indent="false" fo:keep-with-next="always"/>
    </style:style>
    <style:style style:name="P17" style:family="paragraph" style:parent-style-name="Standard">
      <style:paragraph-properties fo:margin-left="0.7335in" fo:margin-top="0.0835in" fo:margin-bottom="0in" style:contextual-spacing="false" fo:text-indent="0.25in" style:auto-text-indent="false" fo:keep-with-next="always"/>
    </style:style>
    <style:style style:name="P18" style:family="paragraph" style:parent-style-name="Standard">
      <style:paragraph-properties fo:margin-left="1in" fo:margin-top="0.0835in" fo:margin-bottom="0in" style:contextual-spacing="false" fo:text-indent="0.4752in" style:auto-text-indent="false" fo:keep-with-next="always"/>
    </style:style>
    <style:style style:name="P19" style:family="paragraph" style:parent-style-name="Standard">
      <style:paragraph-properties fo:margin-left="0.4925in" fo:margin-top="0.1665in" fo:margin-bottom="0in" style:contextual-spacing="false" fo:keep-with-next="always"/>
    </style:style>
    <style:style style:name="P20" style:family="paragraph" style:parent-style-name="Heading_20_2">
      <style:paragraph-properties fo:margin-left="0.3543in" fo:text-indent="-0.3543in" style:auto-text-indent="false"/>
    </style:style>
    <style:style style:name="P21" style:family="paragraph">
      <loext:graphic-properties draw:fill="none"/>
    </style:style>
    <style:style style:name="P22" style:family="paragraph">
      <loext:graphic-properties draw:fill="solid" draw:fill-color="#ff0000"/>
    </style:style>
    <style:style style:name="P23" style:family="paragraph" style:parent-style-name="Standard">
      <style:paragraph-properties fo:text-align="center" style:justify-single-word="false"/>
      <style:text-properties fo:language="en" fo:country="US"/>
    </style:style>
    <style:style style:name="P24" style:family="paragraph" style:parent-style-name="Frame_20_contents">
      <style:paragraph-properties fo:text-align="center" style:justify-single-word="false"/>
    </style:style>
    <style:style style:name="P25" style:family="paragraph" style:parent-style-name="Standard" style:list-style-name="WWNum11">
      <style:paragraph-properties fo:margin-left="0.4957in" fo:margin-top="0.0835in" fo:margin-bottom="0in" style:contextual-spacing="false" fo:text-indent="-0.248in" style:auto-text-indent="false"/>
    </style:style>
    <style:style style:name="P26" style:family="paragraph" style:parent-style-name="Standard" style:list-style-name="WWNum10"/>
    <style:style style:name="P27" style:family="paragraph" style:parent-style-name="Standard">
      <style:paragraph-properties fo:margin-left="0.25in"/>
      <style:text-properties fo:language="en" fo:country="US"/>
    </style:style>
    <style:style style:name="P28" style:family="paragraph" style:parent-style-name="Standard" style:list-style-name="WWNum6">
      <style:paragraph-properties fo:margin-left="0.4957in" fo:margin-top="0.0835in" fo:margin-bottom="0in" style:contextual-spacing="false" fo:text-indent="-0.248in" style:auto-text-indent="false"/>
    </style:style>
    <style:style style:name="P29" style:family="paragraph" style:parent-style-name="Standard">
      <style:paragraph-properties fo:margin-top="0.0835in" fo:margin-bottom="0in" style:contextual-spacing="false" fo:text-align="center" style:justify-single-word="false"/>
    </style:style>
    <style:style style:name="P30" style:family="paragraph" style:parent-style-name="Standard" style:list-style-name="WWNum3">
      <style:paragraph-properties fo:margin-left="0.4957in" fo:margin-top="0.0835in" fo:margin-bottom="0in" style:contextual-spacing="false" fo:text-indent="-0.248in" style:auto-text-indent="false"/>
    </style:style>
    <style:style style:name="P31" style:family="paragraph" style:parent-style-name="Standard">
      <style:paragraph-properties fo:text-align="center" style:justify-single-word="false" fo:keep-with-next="always"/>
    </style:style>
    <style:style style:name="P32" style:family="paragraph" style:parent-style-name="Standard" style:list-style-name="WWNum5">
      <style:paragraph-properties fo:margin-left="0.4957in" fo:margin-top="0.0835in" fo:margin-bottom="0in" style:contextual-spacing="false" fo:text-indent="-0.248in" style:auto-text-indent="false"/>
    </style:style>
    <style:style style:name="P33" style:family="paragraph" style:parent-style-name="Standard" style:list-style-name="WWNum4">
      <style:paragraph-properties fo:margin-left="0.4957in" fo:margin-top="0.0835in" fo:margin-bottom="0in" style:contextual-spacing="false" fo:text-indent="-0.248in" style:auto-text-indent="false"/>
    </style:style>
    <style:style style:name="P34" style:family="paragraph" style:parent-style-name="Standard" style:list-style-name="WWNum7"/>
    <style:style style:name="P35" style:family="paragraph" style:parent-style-name="Standard" style:list-style-name="WWNum7">
      <style:paragraph-properties fo:margin-left="0.4957in" fo:margin-top="0.0835in" fo:margin-bottom="0in" style:contextual-spacing="false" fo:text-indent="-0.248in" style:auto-text-indent="false"/>
    </style:style>
    <style:style style:name="P36" style:family="paragraph" style:parent-style-name="Standard" style:list-style-name="WWNum9"/>
    <style:style style:name="P37" style:family="paragraph" style:parent-style-name="Standard" style:list-style-name="WWNum9">
      <style:paragraph-properties fo:margin-left="0.9957in" fo:margin-top="0.0835in" fo:margin-bottom="0in" style:contextual-spacing="false" fo:text-indent="-0.248in" style:auto-text-indent="false"/>
    </style:style>
    <style:style style:name="P38" style:family="paragraph" style:parent-style-name="Standard">
      <style:paragraph-properties fo:margin-top="0.0835in" fo:margin-bottom="0in" style:contextual-spacing="false"/>
      <style:text-properties fo:language="en" fo:country="US"/>
    </style:style>
    <style:style style:name="P39" style:family="paragraph" style:parent-style-name="Standard">
      <style:paragraph-properties fo:margin-left="0.4917in" fo:margin-top="0.0835in" fo:margin-bottom="0in" style:contextual-spacing="false"/>
    </style:style>
    <style:style style:name="P40" style:family="paragraph" style:parent-style-name="Standard">
      <style:paragraph-properties fo:margin-left="0.4917in" fo:margin-top="0.0835in" fo:margin-bottom="0in" style:contextual-spacing="false"/>
      <style:text-properties fo:language="en" fo:country="US"/>
    </style:style>
    <style:style style:name="P41" style:family="paragraph" style:parent-style-name="Standard">
      <style:paragraph-properties fo:margin-top="0.0835in" fo:margin-bottom="0in" style:contextual-spacing="false"/>
    </style:style>
    <style:style style:name="P42" style:family="paragraph" style:parent-style-name="Standard" style:list-style-name="WWNum14">
      <style:paragraph-properties fo:margin-top="0.0835in" fo:margin-bottom="0in" style:contextual-spacing="false"/>
    </style:style>
    <style:style style:name="P43" style:family="paragraph" style:parent-style-name="Standard" style:list-style-name="WWNum13">
      <style:paragraph-properties fo:margin-top="0.0835in" fo:margin-bottom="0in" style:contextual-spacing="false"/>
    </style:style>
    <style:style style:name="P44" style:family="paragraph" style:parent-style-name="Standard" style:list-style-name="WWNum15">
      <style:paragraph-properties fo:margin-top="0.0835in" fo:margin-bottom="0in" style:contextual-spacing="false"/>
    </style:style>
    <style:style style:name="P45" style:family="paragraph" style:parent-style-name="Standard">
      <style:paragraph-properties fo:margin-left="0.4917in" fo:margin-top="0.0835in" fo:margin-bottom="0in" style:contextual-spacing="false" fo:text-indent="0.4917in" style:auto-text-indent="false"/>
    </style:style>
    <style:style style:name="P46" style:family="paragraph" style:parent-style-name="Standard">
      <style:paragraph-properties fo:margin-left="0.4917in" fo:margin-top="0.0835in" fo:margin-bottom="0in" style:contextual-spacing="false" fo:text-indent="0.4917in" style:auto-text-indent="false"/>
      <style:text-properties fo:language="en" fo:country="US"/>
    </style:style>
    <style:style style:name="P47" style:family="paragraph" style:parent-style-name="Standard">
      <style:paragraph-properties fo:margin-left="0.25in" fo:margin-top="0.0835in" fo:margin-bottom="0in" style:contextual-spacing="false"/>
      <style:text-properties fo:language="en" fo:country="US"/>
    </style:style>
    <style:style style:name="P48" style:family="paragraph" style:parent-style-name="Standard">
      <style:paragraph-properties fo:margin-left="0.25in" fo:margin-top="0.0835in" fo:margin-bottom="0in" style:contextual-spacing="false"/>
    </style:style>
    <style:style style:name="P49" style:family="paragraph" style:parent-style-name="Standard" style:list-style-name="WWNum12">
      <style:paragraph-properties fo:margin-left="0.4957in" fo:text-indent="-0.248in" style:auto-text-indent="false"/>
    </style:style>
    <style:style style:name="P50" style:family="paragraph" style:parent-style-name="Standard" style:list-style-name="WWNum12">
      <style:paragraph-properties fo:margin-left="0.4957in" fo:margin-top="0.1665in" fo:margin-bottom="0in" style:contextual-spacing="false" fo:text-indent="-0.248in" style:auto-text-indent="false"/>
    </style:style>
    <style:style style:name="P51" style:family="paragraph" style:parent-style-name="Standard">
      <style:paragraph-properties fo:margin-top="0.1665in" fo:margin-bottom="0in" style:contextual-spacing="false" fo:text-align="center" style:justify-single-word="false"/>
    </style:style>
    <style:style style:name="P52" style:family="paragraph" style:parent-style-name="Standard">
      <style:paragraph-properties fo:margin-top="0.1665in" fo:margin-bottom="0in" style:contextual-spacing="false" fo:text-align="center" style:justify-single-word="false"/>
      <style:text-properties fo:language="en" fo:country="US"/>
    </style:style>
    <style:style style:name="P53" style:family="paragraph" style:parent-style-name="Standard">
      <style:paragraph-properties fo:margin-left="0.248in" fo:margin-top="0.1665in" fo:margin-bottom="0in" style:contextual-spacing="false"/>
      <style:text-properties fo:language="en" fo:country="US"/>
    </style:style>
    <style:style style:name="P54" style:family="paragraph" style:parent-style-name="Standard" style:list-style-name="WWNum12">
      <style:paragraph-properties fo:margin-top="0.0835in" fo:margin-bottom="0in" style:contextual-spacing="false"/>
    </style:style>
    <style:style style:name="P55"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US"/>
    </style:style>
    <style:style style:name="T5" style:family="text">
      <style:text-properties fo:font-size="20pt" fo:language="en" fo:country="US" fo:font-weight="bold" style:font-size-asian="20pt" style:font-weight-asian="bold" style:font-size-complex="20pt"/>
    </style:style>
    <style:style style:name="T6" style:family="text">
      <style:text-properties fo:font-size="16pt" fo:language="en" fo:country="US" fo:font-weight="bold" style:font-size-asian="16pt" style:font-weight-asian="bold" style:font-size-complex="16pt"/>
    </style:style>
    <style:style style:name="T7" style:family="text">
      <style:text-properties fo:font-size="11pt" fo:language="en" fo:country="GB" fo:font-weight="normal" style:font-size-asian="11pt" style:language-asian="en" style:country-asian="GB" style:font-weight-asian="normal" style:font-size-complex="11pt"/>
    </style:style>
    <style:style style:name="T8" style:family="text">
      <style:text-properties text:display="true"/>
    </style:style>
    <style:style style:name="T9" style:family="text">
      <style:text-properties fo:font-size="11pt" fo:language="en" fo:country="GB" fo:font-style="normal" style:font-size-asian="11pt" style:language-asian="en" style:country-asian="GB" style:font-style-asian="normal" style:font-size-complex="11pt"/>
    </style:style>
    <style:style style:name="T10" style:family="text">
      <style:text-properties fo:language="en" fo:country="US" fo:font-weight="bold" style:font-weight-asian="bold"/>
    </style:style>
    <style:style style:name="T11" style:family="text">
      <style:text-properties fo:language="en" fo:country="GB" fo:font-weight="bold" style:font-weight-asian="bold" style:font-size-complex="11pt" style:font-weight-complex="bold"/>
    </style:style>
    <style:style style:name="T12" style:family="text">
      <style:text-properties fo:language="en" fo:country="GB" style:font-size-complex="11pt"/>
    </style:style>
    <style:style style:name="T13" style:family="text">
      <style:text-properties fo:font-weight="bold" style:font-weight-asian="bold" style:font-weight-complex="bold"/>
    </style:style>
    <style:style style:name="T14" style:family="text">
      <style:text-properties fo:language="en" fo:country="GB" style:font-size-complex="11pt" style:font-weight-complex="bold"/>
    </style:style>
    <style:style style:name="T15" style:family="text">
      <style:text-properties fo:language="en" fo:country="GB"/>
    </style:style>
    <style:style style:name="T16" style:family="text">
      <style:text-properties fo:font-size="11pt" fo:language="en" fo:country="US" style:font-size-asian="11pt" style:font-size-complex="11pt"/>
    </style:style>
    <style:style style:name="T17" style:family="text">
      <style:text-properties fo:font-size="11pt" style:font-size-asian="11pt" style:font-size-complex="11pt"/>
    </style:style>
    <style:style style:name="T18" style:family="text">
      <style:text-properties fo:language="en" fo:country="US" style:text-underline-style="solid" style:text-underline-width="auto" style:text-underline-color="font-color"/>
    </style:style>
    <style:style style:name="T19" style:family="text">
      <style:text-properties officeooo:rsid="000a97be"/>
    </style:style>
    <style:style style:name="T20" style:family="text">
      <style:text-properties fo:font-size="11pt" fo:language="en" fo:country="US" fo:font-style="italic" style:font-size-asian="11pt" style:font-style-asian="italic" style:font-size-complex="11pt"/>
    </style:style>
    <style:style style:name="T21"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22" style:family="text">
      <style:text-properties fo:language="en" fo:country="GB" fo:font-weight="bold" style:font-weight-asian="bold" style:font-size-complex="11pt"/>
    </style:style>
    <style:style style:name="T23" style:family="text">
      <style:text-properties fo:language="en" fo:country="US" fo:font-style="italic" fo:font-weight="bold" style:font-style-asian="italic" style:font-weight-asian="bold"/>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0.06pt solid #000000"/>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415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2138in" fo:min-width="1.55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in" svg:stroke-color="#000000" draw:stroke-linejoin="miter" svg:stroke-linecap="butt" draw:fill="solid" draw:fill-color="#ff0000" draw:textarea-vertical-align="top" draw:auto-grow-height="false" fo:min-height="0.25in" fo:min-width="0.6252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in" svg:stroke-color="#000000" draw:stroke-linejoin="miter" svg:stroke-linecap="butt" draw:fill="solid" draw:fill-color="#ff0000" draw:textarea-vertical-align="top" draw:auto-grow-height="false" fo:min-height="0.1252in" fo:min-width="0.5472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1" loext:marker-style-name="T1"><draw:frame text:anchor-type="as-char" draw:z-index="18" draw:name="Shape1" draw:style-name="gr1" draw:text-style-name="P3" svg:width="5.8024in" svg:height="1.7815in"><draw:image xlink:href="Pictures/1000000100000846000002729EF3B20B.png" xlink:type="simple" xlink:show="embed" xlink:actuate="onLoad" draw:mime-type="image/png"><text:p/></draw:image></draw:frame></text:p>
      <text:p text:style-name="P2" loext:marker-style-name="T1"/>
      <text:p text:style-name="P2" loext:marker-style-name="T1"/>
      <text:p text:style-name="P2" loext:marker-style-name="T1"/>
      <text:p text:style-name="P1" loext:marker-style-name="T2"><text:span text:style-name="T2">Using HearThis <text:line-break/>for Audio Recording</text:span><text:span text:style-name="T2"/></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1" loext:marker-style-name="T3"><draw:frame text:anchor-type="as-char" draw:z-index="34" draw:name="Picture 28" draw:style-name="gr2" draw:text-style-name="P3" svg:width="0.6878in" svg:height="0.7606in"><draw:image xlink:href="Pictures/10000000000000600000006CCBDB454E.png" xlink:type="simple" xlink:show="embed" xlink:actuate="onLoad" draw:mime-type="image/png"><text:p/></draw:image></draw:frame></text:p>
      <text:p text:style-name="P4" loext:marker-style-name="T3"/>
      <text:p text:style-name="P4" loext:marker-style-name="T3"/>
      <text:p text:style-name="P1" loext:marker-style-name="T3"><text:span text:style-name="T3">Last updated: 15 August 2016</text:span><text:span text:style-name="T3"/></text:p>
      <text:p text:style-name="P5" loext:marker-style-name="T4"/>
      <text:p text:style-name="P6" loext:marker-style-name="T5"><text:bookmark text:name="_GoBack"/><text:span text:style-name="T5">Contents</text:span><text:span text:style-name="T5"/></text:p>
      <text:p text:style-name="P7" loext:marker-style-name="T6"/>
      <text:p text:style-name="P7" loext:marker-style-name="T6"/>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7"><text:a xlink:type="simple" xlink:href="#_Toc459024683" text:style-name="Index_20_Link" text:visited-style-name="Index_20_Link"><text:span text:style-name="T4">1.</text:span><text:span text:style-name="T7"><text:tab/></text:span><text:span text:style-name="T4">Introducing HearThis</text:span><text:span text:style-name="T8"><text:tab/>3</text:span></text:a></text:p>
          <text:p text:style-name="Contents_20_1" loext:marker-style-name="T7"><text:a xlink:type="simple" xlink:href="#_Toc459024684" text:style-name="Index_20_Link" text:visited-style-name="Index_20_Link"><text:span text:style-name="T4">2.</text:span><text:span text:style-name="T7"><text:tab/></text:span><text:span text:style-name="T4">Installing HearThis</text:span><text:span text:style-name="T8"><text:tab/>3</text:span></text:a></text:p>
          <text:p text:style-name="Contents_20_1" loext:marker-style-name="T7"><text:a xlink:type="simple" xlink:href="#_Toc459024685" text:style-name="Index_20_Link" text:visited-style-name="Index_20_Link"><text:span text:style-name="T4">3.</text:span><text:span text:style-name="T7"><text:tab/></text:span><text:span text:style-name="T4">Setting up your microphone and recording environment</text:span><text:span text:style-name="T8"><text:tab/>5</text:span></text:a></text:p>
          <text:p text:style-name="Contents_20_2" loext:marker-style-name="T9"><text:a xlink:type="simple" xlink:href="#_Toc459024686" text:style-name="Index_20_Link" text:visited-style-name="Index_20_Link">3.1.<text:span text:style-name="T9"><text:tab/></text:span>Prepare your room to be a recording studio<text:span text:style-name="T8"><text:tab/>5</text:span></text:a></text:p>
          <text:p text:style-name="Contents_20_2" loext:marker-style-name="T9"><text:a xlink:type="simple" xlink:href="#_Toc459024687" text:style-name="Index_20_Link" text:visited-style-name="Index_20_Link">3.2.<text:span text:style-name="T9"><text:tab/></text:span>Choose a good microphone<text:span text:style-name="T8"><text:tab/>5</text:span></text:a></text:p>
          <text:p text:style-name="Contents_20_2" loext:marker-style-name="T9"><text:a xlink:type="simple" xlink:href="#_Toc459024688" text:style-name="Index_20_Link" text:visited-style-name="Index_20_Link">3.3.<text:span text:style-name="T9"><text:tab/></text:span>Set up the microphone to be the recording device on your computer<text:span text:style-name="T8"><text:tab/>5</text:span></text:a></text:p>
          <text:p text:style-name="Contents_20_1" loext:marker-style-name="T7"><text:a xlink:type="simple" xlink:href="#_Toc459024689" text:style-name="Index_20_Link" text:visited-style-name="Index_20_Link"><text:span text:style-name="T4">4.</text:span><text:span text:style-name="T7"><text:tab/></text:span><text:span text:style-name="T4">Recording audio with HearThis</text:span><text:span text:style-name="T8"><text:tab/>6</text:span></text:a></text:p>
          <text:p text:style-name="Contents_20_2" loext:marker-style-name="T9"><text:a xlink:type="simple" xlink:href="#_Toc459024690" text:style-name="Index_20_Link" text:visited-style-name="Index_20_Link">4.1.<text:span text:style-name="T9"><text:tab/></text:span>The HearThis screen<text:span text:style-name="T8"><text:tab/>6</text:span></text:a></text:p>
          <text:p text:style-name="Contents_20_2" loext:marker-style-name="T9"><text:a xlink:type="simple" xlink:href="#_Toc459024691" text:style-name="Index_20_Link" text:visited-style-name="Index_20_Link">4.2.<text:span text:style-name="T9"><text:tab/></text:span>Choose the Paratext project<text:span text:style-name="T8"><text:tab/>6</text:span></text:a></text:p>
          <text:p text:style-name="Contents_20_2" loext:marker-style-name="T9"><text:a xlink:type="simple" xlink:href="#_Toc459024692" text:style-name="Index_20_Link" text:visited-style-name="Index_20_Link">4.3.<text:span text:style-name="T9"><text:tab/></text:span>Choose the book and chapter to record<text:span text:style-name="T8"><text:tab/>7</text:span></text:a></text:p>
          <text:p text:style-name="Contents_20_2" loext:marker-style-name="T9"><text:a xlink:type="simple" xlink:href="#_Toc459024693" text:style-name="Index_20_Link" text:visited-style-name="Index_20_Link">4.4.<text:span text:style-name="T9"><text:tab/></text:span>Choose the parts of the text you want to record<text:span text:style-name="T8"><text:tab/>8</text:span></text:a></text:p>
          <text:p text:style-name="Contents_20_2" loext:marker-style-name="T9"><text:a xlink:type="simple" xlink:href="#_Toc459024694" text:style-name="Index_20_Link" text:visited-style-name="Index_20_Link">4.5.<text:span text:style-name="T9"><text:tab/></text:span>Recording the selected chapter<text:span text:style-name="T8"><text:tab/>9</text:span></text:a></text:p>
          <text:p text:style-name="Contents_20_1" loext:marker-style-name="T7"><text:a xlink:type="simple" xlink:href="#_Toc459024695" text:style-name="Index_20_Link" text:visited-style-name="Index_20_Link"><text:span text:style-name="T4">5.</text:span><text:span text:style-name="T7"><text:tab/></text:span><text:span text:style-name="T4">Publishing audio for use in Scripture App Builder</text:span><text:span text:style-name="T8"><text:tab/>11</text:span></text:a></text:p>
          <text:p text:style-name="Contents_20_1" loext:marker-style-name="T7"><text:a xlink:type="simple" xlink:href="#_Toc459024696" text:style-name="Index_20_Link" text:visited-style-name="Index_20_Link"><text:span text:style-name="T4">6.</text:span><text:span text:style-name="T7"><text:tab/></text:span><text:span text:style-name="T4">Listen to your audio and make any edits if necessary</text:span><text:span text:style-name="T8"><text:tab/>13</text:span></text:a></text:p>
          <text:p text:style-name="Contents_20_2" loext:marker-style-name="T9"><text:a xlink:type="simple" xlink:href="#_Toc459024697" text:style-name="Index_20_Link" text:visited-style-name="Index_20_Link">6.1.<text:span text:style-name="T9"><text:tab/></text:span>Listening for errors<text:span text:style-name="T8"><text:tab/>13</text:span></text:a></text:p>
          <text:p text:style-name="Contents_20_2" loext:marker-style-name="T9"><text:a xlink:type="simple" xlink:href="#_Toc459024698" text:style-name="Index_20_Link" text:visited-style-name="Index_20_Link">6.2.<text:span text:style-name="T9"><text:tab/></text:span>Editing audio files using Audacity<text:span text:style-name="T8"><text:tab/>13</text:span></text:a></text:p>
          <text:p text:style-name="Contents_20_1" loext:marker-style-name="T7"><text:a xlink:type="simple" xlink:href="#_Toc459024699" text:style-name="Index_20_Link" text:visited-style-name="Index_20_Link"><text:span text:style-name="T4">7.</text:span><text:span text:style-name="T7"><text:tab/></text:span><text:span text:style-name="T4">Using HearThis generated files in Scripture App Builder</text:span><text:span text:style-name="T8"><text:tab/>15</text:span></text:a></text:p>
        </text:index-body>
      </text:table-of-content>
      <text:p text:style-name="P5" loext:marker-style-name="T4"/>
      <text:h text:style-name="P8" text:outline-level="1" loext:marker-style-name="T4"><text:bookmark-start text:name="_Toc459024683"/><text:span text:style-name="T4">Introducing HearThis</text:span><text:bookmark-end text:name="_Toc459024683"/><text:span text:style-name="T4"/></text:h>
      <text:p text:style-name="Standard" loext:marker-style-name="T4"><text:span text:style-name="T4"><text:line-break/>HearThis provides a do-it-yourself alternative for communities wanting to get translated Scripture text into audio form. It is designed to make Bible recording easy!</text:span><text:span text:style-name="T4"/></text:p>
      <text:p text:style-name="P5" loext:marker-style-name="T4"/>
      <text:p text:style-name="P5" loext:marker-style-name="T4"/>
      <text:p text:style-name="P1" loext:marker-style-name="T4"><draw:frame text:anchor-type="as-char" draw:z-index="35" draw:name="Shape2" draw:style-name="gr2" draw:text-style-name="P3" svg:width="2.063in" svg:height="0.8024in"><draw:image xlink:href="Pictures/1000000100000148000000808C519CE0.png" xlink:type="simple" xlink:show="embed" xlink:actuate="onLoad" draw:mime-type="image/png"><text:p/></draw:image></draw:frame></text:p>
      <text:p text:style-name="P5" loext:marker-style-name="T4"/>
      <text:p text:style-name="P5" loext:marker-style-name="T4"/>
      <text:p text:style-name="Standard" loext:marker-style-name="T4"><text:span text:style-name="T4">HearThis automatically finds your Paratext translations and walks you through recording it, one bit at a time. <text:s/>Not a great reader? Need to read it again? <text:s/>Just press on the record button and try again, until you get it right. <text:s/>Then click the arrow, and see the next thing you need to read.</text:span><text:span text:style-name="T4"/></text:p>
      <text:p text:style-name="P5" loext:marker-style-name="T4"/>
      <text:p text:style-name="Standard" loext:marker-style-name="T4"><text:span text:style-name="T4">HearThis can produce all the files needed for adding audio when using Scripture App Builder – including the timing files for audio-text synchronization.</text:span><text:span text:style-name="T4"/></text:p>
      <text:p text:style-name="P5" loext:marker-style-name="T4"/>
      <text:p text:style-name="P5" loext:marker-style-name="T4"/>
      <text:p text:style-name="P5" loext:marker-style-name="T4"/>
      <text:h text:style-name="P9" text:outline-level="1" loext:marker-style-name="T4"><text:bookmark-start text:name="_Toc459024684"/><text:span text:style-name="T4">Installing HearThis</text:span><text:bookmark-end text:name="_Toc459024684"/><text:span text:style-name="T4"/></text:h>
      <text:p text:style-name="P5" loext:marker-style-name="T4"/>
      <text:p text:style-name="Standard" loext:marker-style-name="T4"><text:span text:style-name="T4">To install HearThis on your computer, do the following:</text:span><text:span text:style-name="T4"/></text:p>
      <text:p text:style-name="P5" loext:marker-style-name="T4"/>
      <text:list text:style-name="WWNum8">
        <text:list-item>
          <text:p text:style-name="P10" loext:marker-style-name="T4"><text:span text:style-name="T4">Go to the HearThis website, </text:span><text:a xlink:type="simple" xlink:href="http://software.sil.org/hearthis" text:style-name="Internet_20_link" text:visited-style-name="Visited_20_Internet_20_Link"><text:span text:style-name="Internet_20_link">http://software.sil.org/hearthis</text:span></text:a><text:span text:style-name="T4">, select the </text:span><text:span text:style-name="T10">Download</text:span><text:span text:style-name="T4"> page, and download HearThis.</text:span></text:p>
        </text:list-item>
      </text:list>
      <text:p text:style-name="P11" loext:marker-style-name="T4"/>
      <text:p text:style-name="P12" loext:marker-style-name="T4"><text:span text:style-name="T4">The filename is of the form: <text:tab/></text:span><text:span text:style-name="T10">HearThisInstaller-1.x.x.msi</text:span><text:span text:style-name="T4"><text:tab/></text:span></text:p>
      <text:p text:style-name="P13" loext:marker-style-name="T4"><text:span text:style-name="T4"><text:line-break/></text:span><text:span text:style-name="T4"/></text:p>
      <text:list text:continue-numbering="true" text:style-name="WWNum8">
        <text:list-item>
          <text:p text:style-name="P10" loext:marker-style-name="T4"><text:span text:style-name="T4">Double-click the installer after it has downloaded and follow the instructions in the Setup wizard.</text:span><text:span text:style-name="T4"/></text:p>
        </text:list-item>
      </text:list>
      <text:p text:style-name="P5" loext:marker-style-name="T4"/>
      <text:p text:style-name="P1" loext:marker-style-name="T4"><text:soft-page-break/><draw:frame text:anchor-type="as-char" draw:z-index="36" draw:name="Shape3" draw:style-name="gr2" draw:text-style-name="P3" svg:width="5.198in" svg:height="4.0421in"><draw:image xlink:href="Pictures/10000000000001F3000001847B3E6D30.png" xlink:type="simple" xlink:show="embed" xlink:actuate="onLoad" draw:mime-type="image/png"><text:p/></draw:image></draw:frame></text:p>
      <text:p text:style-name="P5" loext:marker-style-name="T4"/>
      <text:p text:style-name="P5" loext:marker-style-name="T4"/>
      <text:list text:continue-numbering="true" text:style-name="WWNum8">
        <text:list-item>
          <text:p text:style-name="P10" loext:marker-style-name="T4"><text:span text:style-name="T4">To enable HearThis to write its output as MP3 files, you need to install an additional plug-in called </text:span><text:span text:style-name="T10">Lame</text:span><text:span text:style-name="T4">. (If you use the sound editor Audacity, it is possible that you already have Lame installed.)</text:span></text:p>
        </text:list-item>
      </text:list>
      <text:p text:style-name="P5" loext:marker-style-name="T4"/>
      <text:p text:style-name="P14" loext:marker-style-name="T11"><text:span text:style-name="T12">Download the latest Lame installation program from the Lame website: <text:line-break/><text:line-break/><text:tab/><text:tab/></text:span><text:a xlink:type="simple" xlink:href="http://lame.buanzo.org/" text:style-name="Internet_20_link" text:visited-style-name="Visited_20_Internet_20_Link"><text:span text:style-name="Internet_20_link"><text:span text:style-name="T11">http://lame.buanzo.org</text:span></text:span></text:a><text:span text:style-name="T11"> </text:span></text:p>
      <text:p text:style-name="P15" loext:marker-style-name="T12"><text:span text:style-name="T12"><text:line-break/>Look for the file under the sub-heading </text:span><text:span text:style-name="T11">‘TO DOWNLOAD Lame and FFmpeg for Windows’</text:span><text:span text:style-name="T12">.</text:span></text:p>
      <text:p text:style-name="P16" loext:marker-style-name="T12"><text:span text:style-name="T12">The filename to download will be called something like:</text:span><text:span text:style-name="T12"/></text:p>
      <text:p text:style-name="P17" loext:marker-style-name="T11"><text:span text:style-name="T13">Lame_v3.99.3_for_Windows.exe</text:span><text:span text:style-name="T11"/></text:p>
      <text:p text:style-name="P18" loext:marker-style-name="T11"><draw:frame text:anchor-type="as-char" draw:z-index="37" draw:name="Shape4" draw:style-name="gr2" draw:text-style-name="P3" svg:width="2.615in" svg:height="0.698in"><draw:image xlink:href="Pictures/10000000000000FB00000044B83E41CB.png" xlink:type="simple" xlink:show="embed" xlink:actuate="onLoad" draw:mime-type="image/png"><text:p/></draw:image></draw:frame></text:p>
      <text:p text:style-name="P15" loext:marker-style-name="T14"><text:span text:style-name="T14">It might be that a newer version than 3.99.3 is available. If so, download this newer version instead. This should be a quick download since the file is small (around 500 KB).</text:span><text:span text:style-name="T14"/></text:p>
      <text:p text:style-name="P19" loext:marker-style-name="T14"><text:span text:style-name="T12">Double-click this downloaded .exe file to start the installation and follow the instructions in the Setup Wizard.</text:span><text:span text:style-name="T14"/></text:p>
      <text:p text:style-name="P5" loext:marker-style-name="T4"/>
      <text:h text:style-name="P8" text:outline-level="1" loext:marker-style-name="T4"><text:bookmark-start text:name="_Toc459024685"/><text:span text:style-name="T4">Setting up your microphone and recording environment</text:span><text:bookmark-end text:name="_Toc459024685"/><text:span text:style-name="T4"/></text:h>
      <text:h text:style-name="P20" text:outline-level="2" loext:marker-style-name="T4"><text:bookmark-start text:name="_Toc459024686"/><text:span text:style-name="T4">Prepare your room to be a recording studio</text:span><text:bookmark-end text:name="_Toc459024686"/><text:span text:style-name="T4"/></text:h>
      <text:p text:style-name="Standard" loext:marker-style-name="T4"><text:span text:style-name="T4">Choose a place to record which is quiet and where you will receive few interruptions. To dampen the echo in a small office, you could place foam mattresses and blankets around the room.</text:span><text:span text:style-name="T4"/></text:p>
      <text:p text:style-name="P5" loext:marker-style-name="T4"/>
      <text:p text:style-name="Standard" loext:marker-style-name="T4"><text:span text:style-name="T4">Turn off any fans or any noisy air-conditioning units. Keep away from fridges or ticking clocks. Avoid tapping your feet or swaying from side to side on a squeaky chair!</text:span><text:span text:style-name="T4"/></text:p>
      <text:p text:style-name="P5" loext:marker-style-name="T4"/>
      <text:h text:style-name="P20" text:outline-level="2" loext:marker-style-name="T4"><text:bookmark-start text:name="_Toc459024687"/><text:span text:style-name="T4">Choose a good microphone</text:span><text:bookmark-end text:name="_Toc459024687"/><text:span text:style-name="T4"/></text:h>
      <text:p text:style-name="Standard" loext:marker-style-name="T4"><text:span text:style-name="T4">HearThis will work with any microphone, whether it is the in-built microphone in your laptop computer, a headset microphone or a professional quality external microphone.</text:span><text:span text:style-name="T4"/></text:p>
      <text:p text:style-name="P5" loext:marker-style-name="T4"/>
      <text:p text:style-name="Standard" loext:marker-style-name="T15"><text:span text:style-name="T4">For a good quality recording, you will want to reduce background noise. For this reason, it is best not to use the internal microphone in your computer. It picks up too much computer noise. </text:span><text:span text:style-name="T15">If you are going to do serious recording work, it is worth investing in a good microphone. In general, the more you spend on a microphone, the better the quality of the audio recording. </text:span></text:p>
      <text:p text:style-name="P5" loext:marker-style-name="T4"/>
      <text:p text:style-name="Standard" loext:marker-style-name="T4"><text:span text:style-name="T4">Do not hold the microphone in your hand. Instead put it on a stand or use a good quality headset microphone.</text:span><text:span text:style-name="T4"/></text:p>
      <text:p text:style-name="P5" loext:marker-style-name="T4"/>
      <text:h text:style-name="P20" text:outline-level="2" loext:marker-style-name="T4"><text:bookmark-start text:name="_Toc459024688"/><text:span text:style-name="T4">Set up the microphone to be the recording device on your computer</text:span><text:bookmark-end text:name="_Toc459024688"/><text:span text:style-name="T4"/></text:h>
      <text:p text:style-name="Standard" loext:marker-style-name="T4"><text:span text:style-name="T4">Attach the microphone to your computer and ensure it is selected as the main recording device. If you don’t do this properly, you might find that your computer still uses the internal microphone rather than the external one.</text:span><text:span text:style-name="T4"/></text:p>
      <text:p text:style-name="P5" loext:marker-style-name="T4"/>
      <text:p text:style-name="Standard" loext:marker-style-name="T4"><text:span text:style-name="T4">To modify the recording device to use, right-click on the Speaker/Volume icon at the bottom right of your computer screen and select </text:span><text:span text:style-name="T10">Recording devices</text:span><text:span text:style-name="T4">. Here you can enable and disable devices.</text:span></text:p>
      <text:p text:style-name="P5" loext:marker-style-name="T4"/>
      <text:p text:style-name="P1" loext:marker-style-name="T4"><draw:frame text:anchor-type="as-char" draw:z-index="38" draw:name="Shape5" draw:style-name="gr2" draw:text-style-name="P3" svg:width="2.9276in" svg:height="2.4689in"><draw:image xlink:href="Pictures/10000000000002950000022D5453DD12.png" xlink:type="simple" xlink:show="embed" xlink:actuate="onLoad" draw:mime-type="image/png"><text:p/></draw:image></draw:frame></text:p>
      <text:h text:style-name="P8" text:outline-level="1" loext:marker-style-name="T4"><text:bookmark-start text:name="_Toc459024689"/><text:span text:style-name="T4">Recording audio with HearThis</text:span><text:bookmark-end text:name="_Toc459024689"/><text:span text:style-name="T4"/></text:h>
      <text:h text:style-name="P20" text:outline-level="2" loext:marker-style-name="T4"><text:bookmark-start text:name="_Toc459024690"/><text:span text:style-name="T4">The HearThis screen</text:span><text:bookmark-end text:name="_Toc459024690"/><text:span text:style-name="T4"/></text:h>
      <text:p text:style-name="Standard" loext:marker-style-name="T4"><text:span text:style-name="T4">The main HearThis screen presents you with all the controls you need to select books and chapters and to record phrases.</text:span><text:span text:style-name="T4"/></text:p>
      <text:p text:style-name="P5" loext:marker-style-name="T4"/>
      <text:p text:style-name="P5" loext:marker-style-name="T4"><draw:custom-shape text:anchor-type="char" draw:z-index="17" draw:name="Shape6" draw:style-name="gr3" draw:text-style-name="P21" svg:width="1.7504in" svg:height="0.3142in" svg:x="3.75in" svg:y="0.098in"><text:p text:style-name="Frame_20_contents" loext:marker-style-name="T16"><text:span text:style-name="T16">Publish Sound Files</text:span></text:p><draw:enhanced-geometry svg:viewBox="0 0 21600 21600" draw:type="mso-spt202" draw:enhanced-path="M 0 0 L 21600 0 21600 21600 0 21600 0 0 Z N"/></draw:custom-shape><draw:frame draw:style-name="fr1" draw:name="Frame2" text:anchor-type="char" svg:x="0.6252in" svg:y="0.1602in" svg:width="1.75in" svg:height="0.3138in" draw:z-index="10"><draw:text-box><text:p text:style-name="Frame_20_contents" loext:marker-style-name="T17"><text:span text:style-name="T16">Choose </text:span><text:span text:style-name="T17">Paratext Project</text:span></text:p></draw:text-box></draw:frame></text:p>
      <text:p text:style-name="P5" loext:marker-style-name="T4"><draw:custom-shape text:anchor-type="char" draw:z-index="4" draw:name="Shape8" draw:style-name="gr4" draw:text-style-name="P22" svg:width="0.6252in" svg:height="0.2504in" draw:transform="rotate (-1.79175501009738) translate (1.55763888888889in 0.25694444444444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p>
      <text:p text:style-name="P5" loext:marker-style-name="T4"><draw:custom-shape text:anchor-type="char" draw:z-index="16" draw:name="Shape7" draw:style-name="gr4" draw:text-style-name="P22" svg:width="0.6252in" svg:height="0.2504in" draw:transform="rotate (-1.79175501009738) translate (4.66180555555556in 0.0590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p>
      <text:p text:style-name="P5" loext:marker-style-name="T4"/>
      <text:p text:style-name="P1" loext:marker-style-name="T4"><draw:custom-shape text:anchor-type="char" draw:z-index="19" draw:name="Shape9" draw:style-name="gr4" draw:text-style-name="P22" svg:width="0.6252in" svg:height="0.2504in" draw:transform="rotate (1.79175501009738) translate (4.85277777777778in 3.76180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draw:style-name="fr1" draw:name="Frame3" text:anchor-type="char" svg:x="-0.0311in" svg:y="0.0453in" svg:width="0.8752in" svg:height="0.5in" draw:z-index="14"><draw:text-box><text:p text:style-name="Frame_20_contents" loext:marker-style-name="T17"><text:span text:style-name="T17">Book </text:span><text:span text:style-name="T16">selector</text:span></text:p></draw:text-box></draw:frame><draw:frame draw:style-name="fr1" draw:name="Frame4" text:anchor-type="char" svg:x="-0.0417in" svg:y="1.4618in" svg:width="0.8752in" svg:height="0.5in" draw:z-index="15"><draw:text-box><text:p text:style-name="Frame_20_contents" loext:marker-style-name="T16"><text:span text:style-name="T16">Chapter selector</text:span></text:p></draw:text-box></draw:frame><draw:custom-shape text:anchor-type="char" draw:z-index="6" draw:name="Shape10" draw:style-name="gr4" draw:text-style-name="P22" svg:width="0.6252in" svg:height="0.2504in" draw:transform="rotate (0.370184334347997) translate (0.375in 1.33402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draw:style-name="fr1" draw:name="Frame5" text:anchor-type="char" svg:x="-0.0626in" svg:y="2.6598in" svg:width="0.8752in" svg:height="1in" draw:z-index="13"><draw:text-box><text:p text:style-name="Frame_20_contents" loext:marker-style-name="T17"><text:span text:style-name="T16">Current</text:span><text:span text:style-name="T17"> phrase to record</text:span></text:p></draw:text-box></draw:frame><draw:custom-shape text:anchor-type="char" draw:z-index="7" draw:name="Shape11" draw:style-name="gr4" draw:text-style-name="P22" svg:width="0.6252in" svg:height="0.2504in" draw:transform="rotate (0.565661210571362) translate (0.375in 2.4486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draw:style-name="fr1" draw:name="Frame6" text:anchor-type="char" svg:x="5.1252in" svg:y="2.7118in" svg:width="1.75in" svg:height="0.5in" draw:z-index="11"><draw:text-box><text:p text:style-name="Frame_20_contents" loext:marker-style-name="T16"><text:span text:style-name="T16">Play, Record <text:line-break/>and Next buttons</text:span></text:p></draw:text-box></draw:frame><draw:custom-shape text:anchor-type="char" draw:z-index="9" draw:name="Shape12" draw:style-name="gr4" draw:text-style-name="P22" svg:width="0.6252in" svg:height="0.2504in" draw:transform="rotate (0.934100215667365) translate (0.708333333333333in 3.57152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text:anchor-type="char" draw:z-index="8" draw:name="Shape13" draw:style-name="gr4" draw:text-style-name="P22" svg:width="0.6252in" svg:height="0.2504in" draw:transform="rotate (2.44311188694166) translate (5.22847222222222in 2.6541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text:anchor-type="char" draw:z-index="5" draw:name="Shape14" draw:style-name="gr4" draw:text-style-name="P22" svg:width="0.6252in" svg:height="0.2504in" draw:transform="rotate (-0.309621409303795) translate (0.399305555555556in 0.436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text:anchor-type="as-char" draw:z-index="3" draw:name="Shape15" draw:style-name="gr2" draw:text-style-name="P3" svg:width="4.2087in" svg:height="3.2504in"><draw:image xlink:href="Pictures/10000000000002DF0000023787A05FD9.png" xlink:type="simple" xlink:show="embed" xlink:actuate="onLoad" draw:mime-type="image/png"><text:p/></draw:image></draw:frame></text:p>
      <text:p text:style-name="P23" loext:marker-style-name="T4"/>
      <text:p text:style-name="P23" loext:marker-style-name="T4"/>
      <text:p text:style-name="P23" loext:marker-style-name="T4"><draw:frame draw:style-name="fr1" draw:name="Frame7" text:anchor-type="char" svg:x="4.3646in" svg:y="0.0311in" svg:width="1.75in" svg:height="0.5in" draw:z-index="21"><draw:text-box><text:p text:style-name="Frame_20_contents" loext:marker-style-name="T17"><text:span text:style-name="T17">Input microphone level</text:span></text:p></draw:text-box></draw:frame><draw:frame draw:style-name="fr1" draw:name="Frame8" text:anchor-type="char" svg:x="0.1252in" svg:y="0.0626in" svg:width="1.75in" svg:height="0.5in" draw:z-index="12"><draw:text-box><text:p text:style-name="Frame_20_contents" loext:marker-style-name="T16"><text:span text:style-name="T16">Font size: make text smaller or larger</text:span></text:p></draw:text-box></draw:frame></text:p>
      <text:p text:style-name="P5" loext:marker-style-name="T4"/>
      <text:p text:style-name="P5" loext:marker-style-name="T4"/>
      <text:p text:style-name="P5" loext:marker-style-name="T4"/>
      <text:p text:style-name="P5" loext:marker-style-name="T4"/>
      <text:p text:style-name="Standard" loext:marker-style-name="T4"><text:span text:style-name="T4">Use the font size buttons on the bottom left of the screen to adjust the text size so it will be easy to read.</text:span><text:span text:style-name="T4"/></text:p>
      <text:p text:style-name="P5" loext:marker-style-name="T4"/>
      <text:p text:style-name="Standard" loext:marker-style-name="T4"><text:span text:style-name="T4">The top left button is a </text:span><text:span text:style-name="T10">Save</text:span><text:span text:style-name="T4"> button, but it does nothing. Your recordings are saved automatically. Clicking the Save button will remind you of this.</text:span></text:p>
      <text:p text:style-name="P5" loext:marker-style-name="T4"/>
      <text:p text:style-name="P5" loext:marker-style-name="T4"/>
      <text:h text:style-name="P20" text:outline-level="2" loext:marker-style-name="T4"><text:bookmark-start text:name="_Toc459024691"/><text:span text:style-name="T4">Choose the Paratext project</text:span><text:bookmark-end text:name="_Toc459024691"/><text:span text:style-name="T4"/></text:h>
      <text:p text:style-name="Standard" loext:marker-style-name="T4"><text:span text:style-name="T4">When you start HearThis for the first time, you will be asked to select a Paratext project.</text:span><text:span text:style-name="T4"/></text:p>
      <text:p text:style-name="P5" loext:marker-style-name="T4"/>
      <text:p text:style-name="P1" loext:marker-style-name="T4"><text:soft-page-break/><draw:frame text:anchor-type="as-char" draw:z-index="39" draw:name="Shape16" draw:style-name="gr2" draw:text-style-name="P3" svg:width="4.0106in" svg:height="3.1461in"><draw:image xlink:href="Pictures/100AB2840000350D000029C188FED0E4.emf" xlink:type="simple" xlink:show="embed" xlink:actuate="onLoad" draw:mime-type="image/x-emf"><text:p/></draw:image><draw:image xlink:href="Pictures/10000001000002010000019440BEA9DD.png" xlink:type="simple" xlink:show="embed" xlink:actuate="onLoad" draw:mime-type="image/png"/></draw:frame></text:p>
      <text:p text:style-name="P5" loext:marker-style-name="T4"/>
      <text:p text:style-name="P5" loext:marker-style-name="T4"/>
      <text:p text:style-name="Standard" loext:marker-style-name="T4"><text:span text:style-name="T4">If you are already on the main HearThis screen, click the </text:span><text:span text:style-name="T10">Choose Paratext Project</text:span><text:span text:style-name="T4"> button at the top left of the screen to select the project you want to record.</text:span></text:p>
      <text:p text:style-name="P5" loext:marker-style-name="T4"/>
      <text:p text:style-name="P5" loext:marker-style-name="T4"/>
      <text:h text:style-name="P20" text:outline-level="2" loext:marker-style-name="T4"><text:bookmark-start text:name="_Toc459024692"/><text:span text:style-name="T4">Choose the book and chapter to record</text:span><text:bookmark-end text:name="_Toc459024692"/><text:span text:style-name="T4"/></text:h>
      <text:p text:style-name="Standard" loext:marker-style-name="T4"><text:span text:style-name="T4">You can select the book and chapter to record by clicking on the appropriate blue or gray boxes at the top of the screen.</text:span><text:span text:style-name="T4"/></text:p>
      <text:p text:style-name="P5" loext:marker-style-name="T4"><draw:frame draw:style-name="fr1" draw:name="Frame9" text:anchor-type="char" svg:x="2.448in" svg:y="0.0654in" svg:width="1.75in" svg:height="0.3138in" draw:z-index="28"><draw:text-box><text:p text:style-name="P24" loext:marker-style-name="T17"><text:span text:style-name="T17">Books</text:span></text:p></draw:text-box></draw:frame></text:p>
      <text:p text:style-name="P5" loext:marker-style-name="T4"><draw:custom-shape text:anchor-type="char" draw:z-index="25" draw:name="Shape17" draw:style-name="gr4" draw:text-style-name="P22" svg:width="0.6252in" svg:height="0.2504in" draw:transform="rotate (-2.2162190841824) translate (3.26319444444444in 0.231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p>
      <text:p text:style-name="P5" loext:marker-style-name="T4"/>
      <text:p text:style-name="P1" loext:marker-style-name="T4"><draw:custom-shape text:anchor-type="char" draw:z-index="26" draw:name="Shape18" draw:style-name="gr4" draw:text-style-name="P22" svg:width="0.6252in" svg:height="0.2504in" draw:transform="rotate (1.03759824031063) translate (2.1875in 1.67013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text:anchor-type="as-char" draw:z-index="2" draw:name="Shape19" draw:style-name="gr2" draw:text-style-name="P3" svg:width="5.9898in" svg:height="1.4378in"><draw:image xlink:href="Pictures/100A865C00005F37000016E0240B3C8C.emf" xlink:type="simple" xlink:show="embed" xlink:actuate="onLoad" draw:mime-type="image/x-emf"><text:p/></draw:image><draw:image xlink:href="Pictures/1000000100000399000000DD652900E4.png" xlink:type="simple" xlink:show="embed" xlink:actuate="onLoad" draw:mime-type="image/png"/></draw:frame></text:p>
      <text:p text:style-name="P23" loext:marker-style-name="T4"/>
      <text:p text:style-name="P23" loext:marker-style-name="T4"><draw:frame draw:style-name="fr1" draw:name="Frame10" text:anchor-type="char" svg:x="1.5in" svg:y="0.0854in" svg:width="1.75in" svg:height="0.3138in" draw:z-index="29"><draw:text-box><text:p text:style-name="P24" loext:marker-style-name="T16"><text:span text:style-name="T16">Chapters</text:span></text:p></draw:text-box></draw:frame></text:p>
      <text:p text:style-name="P5" loext:marker-style-name="T4"/>
      <text:p text:style-name="P5" loext:marker-style-name="T4"/>
      <text:p text:style-name="Standard" loext:marker-style-name="T4"><text:span text:style-name="T4">The top set of boxes represents the books of the Bible, with Old Testament books on the first line of boxes and New Testament books on the second line of boxes. Genesis is the first box on the first line and Revelation is the final box on the second line.</text:span><text:span text:style-name="T4"/></text:p>
      <text:p text:style-name="P5" loext:marker-style-name="T4"/>
      <text:p text:style-name="Standard" loext:marker-style-name="T4"><text:span text:style-name="T4">The second set of boxes represents the chapters in the selected book. If the book has an introduction, it is the first box. Then comes chapter 1, 2, 3, etc.</text:span><text:span text:style-name="T4"/></text:p>
      <text:p text:style-name="P5" loext:marker-style-name="T4"/>
      <text:p text:style-name="P5" loext:marker-style-name="T4"/>
      <text:h text:style-name="P20" text:outline-level="2" loext:marker-style-name="T4"><text:bookmark-start text:name="_Toc459024693"/><text:soft-page-break/><text:span text:style-name="T4">Choose the parts of the text you want to record</text:span><text:bookmark-end text:name="_Toc459024693"/><text:span text:style-name="T4"/></text:h>
      <text:p text:style-name="Standard" loext:marker-style-name="T4"><text:span text:style-name="T4">Before you start recording you need to decide which parts of the text you want to record. For example, some people like to record the section headings in a Scripture text but other people prefer to omit them and just read the verses.</text:span><text:span text:style-name="T4"/></text:p>
      <text:p text:style-name="P5" loext:marker-style-name="T4"/>
      <text:p text:style-name="Standard" loext:marker-style-name="T4"><text:span text:style-name="T4">Section headings are very useful in a printed text, but there are some cases in which they could be less useful in an audio recording. For example:</text:span><text:span text:style-name="T4"/></text:p>
      <text:list text:style-name="WWNum11">
        <text:list-item>
          <text:p text:style-name="P25" loext:marker-style-name="T4"><text:span text:style-name="T4">where section headings are complete phrases that might sound like they are part of the Scripture text, yet out of order;</text:span><text:span text:style-name="T4"/></text:p>
        </text:list-item>
        <text:list-item>
          <text:p text:style-name="P25" loext:marker-style-name="T4"><text:span text:style-name="T4">where section headings give away the punch line of the story before the story is told, e.g. “Jesus calms the storm”. You might want new hearers to be drawn into the drama of the story without knowing already how it ends.</text:span><text:span text:style-name="T4"/></text:p>
        </text:list-item>
      </text:list>
      <text:p text:style-name="Standard" loext:marker-style-name="T4"><text:span text:style-name="T4"><text:line-break/></text:span><text:span text:style-name="T4"/></text:p>
      <text:p text:style-name="Standard" loext:marker-style-name="T4"><text:span text:style-name="T4">To choose the markers to include or omit:</text:span><text:span text:style-name="T4"/></text:p>
      <text:p text:style-name="P5" loext:marker-style-name="T4"/>
      <text:list text:style-name="WWNum10">
        <text:list-item>
          <text:p text:style-name="P26" loext:marker-style-name="T4"><text:span text:style-name="T4">Click the </text:span><text:span text:style-name="T10">Settings</text:span><text:span text:style-name="T4"> button on the top right of the HearThis screen (the one with the spanner icon).</text:span></text:p>
        </text:list-item>
      </text:list>
      <text:p text:style-name="P27" loext:marker-style-name="T4"/>
      <text:list text:continue-numbering="true" text:style-name="WWNum10">
        <text:list-item>
          <text:p text:style-name="P26" loext:marker-style-name="T4"><text:span text:style-name="T4">Check the styles that you want to </text:span><text:span text:style-name="T18">omit</text:span><text:span text:style-name="T4"> from the recording.</text:span></text:p>
        </text:list-item>
      </text:list>
      <text:p text:style-name="P5" loext:marker-style-name="T4"/>
      <text:p text:style-name="P12" loext:marker-style-name="T4"><text:span text:style-name="T4">For example, in the screen below, we have checked “s – Heading” which means not to record section headings.</text:span><text:span text:style-name="T4"/></text:p>
      <text:p text:style-name="P5" loext:marker-style-name="T4"/>
      <text:p text:style-name="P1" loext:marker-style-name="T4"><draw:custom-shape text:anchor-type="char" draw:z-index="30" draw:name="Shape20" draw:style-name="gr4" draw:text-style-name="P22" svg:width="0.6252in" svg:height="0.2504in" draw:transform="rotate (0.445058959258554) translate (0.71875in 2.081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T19">3</text:span><draw:frame text:anchor-type="as-char" draw:z-index="29" draw:name="Shape21" draw:style-name="gr2" draw:text-style-name="P3" svg:width="4.0421in" svg:height="4.1252in"><draw:image xlink:href="Pictures/10000000000001850000018C163B9F0C.png" xlink:type="simple" xlink:show="embed" xlink:actuate="onLoad" draw:mime-type="image/png"><text:p/></draw:image></draw:frame></text:p>
      <text:p text:style-name="P5" loext:marker-style-name="T4"/>
      <text:list text:continue-numbering="true" text:style-name="WWNum10">
        <text:list-item>
          <text:p text:style-name="P26" loext:marker-style-name="T4"><text:span text:style-name="T4">Click </text:span><text:span text:style-name="T10">OK</text:span><text:span text:style-name="T4"> to save your selected settings.</text:span></text:p>
        </text:list-item>
      </text:list>
      <text:p text:style-name="P5" loext:marker-style-name="T4"><text:soft-page-break/></text:p>
      <text:h text:style-name="P20" text:outline-level="2" loext:marker-style-name="T4"><text:bookmark-start text:name="_Toc459024694"/><text:span text:style-name="T4">Recording the selected chapter</text:span><text:bookmark-end text:name="_Toc459024694"/><text:span text:style-name="T4"/></text:h>
      <text:p text:style-name="Standard" loext:marker-style-name="T4"><text:span text:style-name="T4">The phrases you need to record are displayed in the bottom half of the screen:</text:span><text:span text:style-name="T4"/></text:p>
      <text:list text:style-name="WWNum6">
        <text:list-item>
          <text:p text:style-name="P28" loext:marker-style-name="T4"><text:span text:style-name="T4">The current phrase to record is displayed in YELLOW.</text:span><text:span text:style-name="T4"/></text:p>
        </text:list-item>
        <text:list-item>
          <text:p text:style-name="P28" loext:marker-style-name="T4"><text:span text:style-name="T4">The phrases displayed in WHITE show you the context of the current phrase, i.e. the phrases that come before and after it.</text:span><text:span text:style-name="T4"/></text:p>
        </text:list-item>
      </text:list>
      <text:p text:style-name="P5" loext:marker-style-name="T4"/>
      <text:p text:style-name="P5" loext:marker-style-name="T4"/>
      <text:p text:style-name="Standard" loext:marker-style-name="T4"><draw:frame text:anchor-type="as-char" draw:z-index="40" draw:name="Shape22" draw:style-name="gr2" draw:text-style-name="P3" svg:width="5.9689in" svg:height="4.6043in"><draw:image xlink:href="Pictures/10000000000002DF00000237846D5932.png" xlink:type="simple" xlink:show="embed" xlink:actuate="onLoad" draw:mime-type="image/png"><text:p/></draw:image></draw:frame></text:p>
      <text:p text:style-name="P29" loext:marker-style-name="T20"><text:span text:style-name="T20">The text in yellow is the current phrase to be recorded.</text:span><text:span text:style-name="T20"/></text:p>
      <text:p text:style-name="P5" loext:marker-style-name="T4"/>
      <text:p text:style-name="P5" loext:marker-style-name="T4"/>
      <text:p text:style-name="Standard" loext:marker-style-name="T4"><text:span text:style-name="T4">To start recording the current yellow phrase, either:</text:span><text:span text:style-name="T4"/></text:p>
      <text:list text:style-name="WWNum3">
        <text:list-item>
          <text:p text:style-name="P30" loext:marker-style-name="T4"><text:span text:style-name="T4">press and hold down the SPACE bar, or</text:span><text:span text:style-name="T4"/></text:p>
        </text:list-item>
        <text:list-item>
          <text:p text:style-name="P30" loext:marker-style-name="T4"><text:span text:style-name="T4">click the round record button and keep the mouse button pressed down.</text:span><text:span text:style-name="T4"/></text:p>
        </text:list-item>
      </text:list>
      <text:p text:style-name="P5" loext:marker-style-name="T4"/>
      <text:p text:style-name="P1" loext:marker-style-name="T4"><draw:frame text:anchor-type="as-char" draw:z-index="41" draw:name="Shape23" draw:style-name="gr2" draw:text-style-name="P3" svg:width="1.5106in" svg:height="0.6878in"><draw:image xlink:href="Pictures/1000E2DC000013FC00000919097D1E9A.emf" xlink:type="simple" xlink:show="embed" xlink:actuate="onLoad" draw:mime-type="image/x-emf"><text:p/></draw:image><draw:image xlink:href="Pictures/10000001000000C100000058E5193464.png" xlink:type="simple" xlink:show="embed" xlink:actuate="onLoad" draw:mime-type="image/png"/></draw:frame></text:p>
      <text:p text:style-name="P29" loext:marker-style-name="T20"><text:span text:style-name="T20">The round button is the Record button. Press it and hold it down to record.</text:span><text:span text:style-name="T20"/></text:p>
      <text:p text:style-name="P5" loext:marker-style-name="T4"/>
      <text:p text:style-name="P5" loext:marker-style-name="T4"/>
      <text:p text:style-name="Standard" loext:marker-style-name="T4"><text:soft-page-break/><text:span text:style-name="T4">When recording starts, the round button will first turn RED and after a second it will turn GREEN. </text:span><text:span text:style-name="T18">Do not speak until you see the GREEN, otherwise the first part of what you say will be cut off</text:span><text:span text:style-name="T4">. </text:span></text:p>
      <text:p text:style-name="P5" loext:marker-style-name="T4"/>
      <text:p text:style-name="P1" loext:marker-style-name="T4"><draw:frame text:anchor-type="as-char" draw:z-index="42" draw:name="Shape24" draw:style-name="gr2" draw:text-style-name="P3" svg:width="1.5106in" svg:height="0.6878in"><draw:image xlink:href="Pictures/1000E2DC000013FC000009198FED82DF.emf" xlink:type="simple" xlink:show="embed" xlink:actuate="onLoad" draw:mime-type="image/x-emf"><text:p/></draw:image><draw:image xlink:href="Pictures/10000001000000C1000000584E770229.png" xlink:type="simple" xlink:show="embed" xlink:actuate="onLoad" draw:mime-type="image/png"/></draw:frame></text:p>
      <text:p text:style-name="P29" loext:marker-style-name="T20"><text:span text:style-name="T20">The Record button turns red when you first press it.</text:span><text:span text:style-name="T20"/></text:p>
      <text:p text:style-name="P23" loext:marker-style-name="T4"/>
      <text:p text:style-name="P31" loext:marker-style-name="T4"><draw:frame text:anchor-type="as-char" draw:z-index="43" draw:name="Shape25" draw:style-name="gr2" draw:text-style-name="P3" svg:width="1.5106in" svg:height="0.6878in"><draw:image xlink:href="Pictures/1000E2DC000013FC00000919886D2CB0.emf" xlink:type="simple" xlink:show="embed" xlink:actuate="onLoad" draw:mime-type="image/x-emf"><text:p/></draw:image><draw:image xlink:href="Pictures/10000001000000C10000005894FF691E.png" xlink:type="simple" xlink:show="embed" xlink:actuate="onLoad" draw:mime-type="image/png"/></draw:frame></text:p>
      <text:p text:style-name="P29" loext:marker-style-name="T20"><text:span text:style-name="T20">After a second of holding down the button, it turns green indicating that you can begin speaking.</text:span><text:span text:style-name="T20"/></text:p>
      <text:p text:style-name="P5" loext:marker-style-name="T4"/>
      <text:p text:style-name="P5" loext:marker-style-name="T4"/>
      <text:p text:style-name="Standard" loext:marker-style-name="T4"><text:span text:style-name="T4">When you have finished speaking, release the space bar or mouse button. Try to do this as quietly as possible so you don’t get a click in the recording.</text:span><text:span text:style-name="T4"/></text:p>
      <text:p text:style-name="P5" loext:marker-style-name="T4"/>
      <text:p text:style-name="Standard" loext:marker-style-name="T4"><text:span text:style-name="T4">To listen to the phrase you have just recorded, either:</text:span><text:span text:style-name="T4"/></text:p>
      <text:list text:style-name="WWNum5">
        <text:list-item>
          <text:p text:style-name="P32" loext:marker-style-name="T4"><text:span text:style-name="T4">click on the PLAY button, or</text:span><text:span text:style-name="T4"/></text:p>
        </text:list-item>
        <text:list-item>
          <text:p text:style-name="P32" loext:marker-style-name="T4"><text:span text:style-name="T4">press the . (period) key.</text:span><text:span text:style-name="T4"/></text:p>
        </text:list-item>
      </text:list>
      <text:p text:style-name="P5" loext:marker-style-name="T4"/>
      <text:p text:style-name="P5" loext:marker-style-name="T4"/>
      <text:p text:style-name="Standard" loext:marker-style-name="T4"><text:span text:style-name="T4">Do you like what you have recorded? </text:span><text:span text:style-name="T4"/></text:p>
      <text:list text:style-name="WWNum4">
        <text:list-item>
          <text:p text:style-name="P33" loext:marker-style-name="T4"><text:span text:style-name="T4">If </text:span><text:span text:style-name="T18">yes</text:span><text:span text:style-name="T4">, continue to the next phrase by clicking the Right arrow or using the right arrow key.</text:span></text:p>
        </text:list-item>
        <text:list-item>
          <text:p text:style-name="P33" loext:marker-style-name="T4"><text:span text:style-name="T4">If </text:span><text:span text:style-name="T18">no</text:span><text:span text:style-name="T4">, rerecord the same phrase by clicking on the record button again. Your previous recording of this phrase will be deleted.</text:span></text:p>
        </text:list-item>
      </text:list>
      <text:p text:style-name="P5" loext:marker-style-name="T4"/>
      <text:p text:style-name="Standard" loext:marker-style-name="T4"><text:span text:style-name="T4">Follow these steps for each phrase in the chapter. </text:span><text:span text:style-name="T4"/></text:p>
      <text:p text:style-name="P5" loext:marker-style-name="T4"/>
      <text:p text:style-name="Standard" loext:marker-style-name="T4"><text:span text:style-name="T4">You don’t need to listen to each phase after recording it unless you want to. Listening to a recorded phrase can be helpful if you are not sure whether or not you were fluent enough or whether you pronounced all the words with the right expression.</text:span><text:span text:style-name="T4"/></text:p>
      <text:p text:style-name="P5" loext:marker-style-name="T4"/>
      <text:p text:style-name="P5" loext:marker-style-name="T4"/>
      <text:p text:style-name="Standard" loext:marker-style-name="T4"><text:span text:style-name="T4">As you record each verse you will see a small horizontal blue line appear the Verse selector. To go back to a verse, click on one of these blue lines.</text:span><text:span text:style-name="T4"/></text:p>
      <text:p text:style-name="P5" loext:marker-style-name="T4"/>
      <text:p text:style-name="Standard" loext:marker-style-name="T4"><draw:custom-shape text:anchor-type="char" draw:z-index="31" draw:name="Shape26" draw:style-name="gr4" draw:text-style-name="P22" svg:width="0.6252in" svg:height="0.2504in" draw:transform="rotate (1.03759824031063) translate (0.727083333333333in 0.979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draw:style-name="fr1" draw:name="Frame11" text:anchor-type="char" svg:x="0.0008in" svg:y="1.0244in" svg:width="1.75in" svg:height="0.3138in" draw:z-index="33"><draw:text-box><text:p text:style-name="P24" loext:marker-style-name="T16"><text:span text:style-name="T16">Verses already recorded</text:span></text:p></draw:text-box></draw:frame><draw:frame text:anchor-type="as-char" draw:z-index="0" draw:name="Shape27" draw:style-name="gr2" draw:text-style-name="P3" svg:width="5.9898in" svg:height="0.615in"><draw:image xlink:href="Pictures/1004819400005F37000009C9CF9D50BF.emf" xlink:type="simple" xlink:show="embed" xlink:actuate="onLoad" draw:mime-type="image/x-emf"><text:p/></draw:image><draw:image xlink:href="Pictures/10000001000003990000005FD5E32EC9.png" xlink:type="simple" xlink:show="embed" xlink:actuate="onLoad" draw:mime-type="image/png"/></draw:frame></text:p>
      <text:h text:style-name="P8" text:outline-level="1" loext:marker-style-name="T4"><text:bookmark-start text:name="_Toc459024695"/><text:span text:style-name="T4">Publishing audio for use in Scripture App Builder</text:span><text:bookmark-end text:name="_Toc459024695"/><text:span text:style-name="T4"/></text:h>
      <text:p text:style-name="P5" loext:marker-style-name="T4"/>
      <text:p text:style-name="Standard" loext:marker-style-name="T4"><text:span text:style-name="T4">HearThis records each phrase in a separate file. In order for your recording to be usable by Scripture App Builder, you need to “publish” the recording. In the publishing process, HearThis will do two things:</text:span><text:span text:style-name="T4"/></text:p>
      <text:p text:style-name="P5" loext:marker-style-name="T4"/>
      <text:list text:style-name="WWNum7">
        <text:list-item>
          <text:p text:style-name="P34" loext:marker-style-name="T4"><text:span text:style-name="T4">It will concatenate all the recorded phrases together in separate MP3 audio files for each chapter.</text:span><text:span text:style-name="T4"/></text:p>
        </text:list-item>
        <text:list-item>
          <text:p text:style-name="P35" loext:marker-style-name="T4"><text:span text:style-name="T4">It will create timing files for each chapter, the files that Scripture App Builder needs for the audio-text synchronization.</text:span><text:span text:style-name="T4"/></text:p>
        </text:list-item>
      </text:list>
      <text:p text:style-name="P5" loext:marker-style-name="T4"/>
      <text:p text:style-name="P5" loext:marker-style-name="T4"/>
      <text:p text:style-name="Standard" loext:marker-style-name="T4"><text:span text:style-name="T4">To publish your recorded audio files for Scripture App Builder:</text:span><text:span text:style-name="T4"/></text:p>
      <text:p text:style-name="P5" loext:marker-style-name="T4"/>
      <text:list text:style-name="WWNum9">
        <text:list-item>
          <text:p text:style-name="P36" loext:marker-style-name="T4"><text:span text:style-name="T4">Click the </text:span><text:span text:style-name="T10">Publish</text:span><text:span text:style-name="T4"> button at the top right of the HearThis screen.</text:span></text:p>
        </text:list-item>
      </text:list>
      <text:p text:style-name="P5" loext:marker-style-name="T4"/>
      <text:p text:style-name="P12" loext:marker-style-name="T4"><text:span text:style-name="T4">The Publish Sound Files window will appear.</text:span><text:span text:style-name="T4"/></text:p>
      <text:p text:style-name="P11" loext:marker-style-name="T4"/>
      <text:p text:style-name="P11" loext:marker-style-name="T4"/>
      <text:p text:style-name="P1" loext:marker-style-name="T4"><draw:custom-shape text:anchor-type="char" draw:z-index="24" draw:name="Shape28" draw:style-name="gr4" draw:text-style-name="P22" svg:width="0.6252in" svg:height="0.2504in" draw:transform="rotate (-2.78083309720257) translate (5.92291666666667in 0.77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text:anchor-type="char" draw:z-index="23" draw:name="Shape29" draw:style-name="gr4" draw:text-style-name="P22" svg:width="0.6252in" svg:height="0.2504in" draw:transform="rotate (0.565661210571362) translate (0.0625in 1.45486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text:anchor-type="as-char" draw:z-index="1" draw:name="Shape30" draw:style-name="gr2" draw:text-style-name="P3" svg:width="5.2189in" svg:height="4.1669in"><draw:image xlink:href="Pictures/10000000000002AE00000224BF2C3CDD.png" xlink:type="simple" xlink:show="embed" xlink:actuate="onLoad" draw:mime-type="image/png"><text:p/></draw:image></draw:frame></text:p>
      <text:p text:style-name="P5" loext:marker-style-name="T4"/>
      <text:p text:style-name="P5" loext:marker-style-name="T4"/>
      <text:list text:continue-numbering="true" text:style-name="WWNum9">
        <text:list-item>
          <text:p text:style-name="P36" loext:marker-style-name="T4"><text:span text:style-name="T4">For Audio Format, choose </text:span><text:span text:style-name="T10">Scripture App Builder</text:span><text:span text:style-name="T4">.</text:span></text:p>
        </text:list-item>
      </text:list>
      <text:p text:style-name="P27" loext:marker-style-name="T4"/>
      <text:list text:continue-numbering="true" text:style-name="WWNum9">
        <text:list-item>
          <text:p text:style-name="P36" loext:marker-style-name="T4"><text:span text:style-name="T4">For Verse Index Format, choose </text:span><text:span text:style-name="T10">Audacity Label File (Scripture App Builder)</text:span><text:span text:style-name="T4"> and check the box </text:span><text:span text:style-name="T10">Include labels for phrase-level clips</text:span><text:span text:style-name="T4">.</text:span></text:p>
        </text:list-item>
      </text:list>
      <text:p text:style-name="P5" loext:marker-style-name="T4"/>
      <text:list text:continue-numbering="true" text:style-name="WWNum9">
        <text:list-item>
          <text:p text:style-name="P36" loext:marker-style-name="T4"><text:soft-page-break/><text:span text:style-name="T4">Click the </text:span><text:span text:style-name="T10">Publish</text:span><text:span text:style-name="T4"> button.</text:span></text:p>
        </text:list-item>
      </text:list>
      <text:p text:style-name="P5" loext:marker-style-name="T4"/>
      <text:p text:style-name="P12" loext:marker-style-name="T4"><text:span text:style-name="T4">HearThis will work on joining the recorded audio clips together and producing the timing files for audio-text synchronization.</text:span><text:span text:style-name="T4"/></text:p>
      <text:p text:style-name="P11" loext:marker-style-name="T4"/>
      <text:p text:style-name="P5" loext:marker-style-name="T4"/>
      <text:list text:continue-numbering="true" text:style-name="WWNum9">
        <text:list-item>
          <text:p text:style-name="P36" loext:marker-style-name="T4"><text:span text:style-name="T4">When the process is completed, you should see “Done” in the message box and a link to the output files in the Destination folder. Click on the Destination link to see the files.</text:span><text:span text:style-name="T4"/></text:p>
        </text:list-item>
      </text:list>
      <text:p text:style-name="P5" loext:marker-style-name="T4"/>
      <text:p text:style-name="P1" loext:marker-style-name="T4"><draw:custom-shape text:anchor-type="char" draw:z-index="22" draw:name="Shape31" draw:style-name="gr5" draw:text-style-name="P22" svg:width="0.6252in" svg:height="0.2504in" draw:transform="rotate (0.594808209079668) translate (0.172222222222222in 2.58680555555556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text:anchor-type="as-char" draw:z-index="21" draw:name="Shape32" draw:style-name="gr2" draw:text-style-name="P3" svg:width="4.9276in" svg:height="3.9378in"><draw:image xlink:href="Pictures/10000000000002AE000002246DEDE302.png" xlink:type="simple" xlink:show="embed" xlink:actuate="onLoad" draw:mime-type="image/png"><text:p/></draw:image></draw:frame></text:p>
      <text:p text:style-name="P11" loext:marker-style-name="T4"/>
      <text:p text:style-name="P23" loext:marker-style-name="T4"/>
      <text:list text:continue-numbering="true" text:style-name="WWNum9">
        <text:list-item>
          <text:p text:style-name="P36" loext:marker-style-name="T4"><text:span text:style-name="T4">Use Windows Explorer to look in the output folders. You should see two files for each chapter: </text:span><text:span text:style-name="T4"/></text:p>
          <text:list>
            <text:list-item>
              <text:p text:style-name="P37" loext:marker-style-name="T4"><text:span text:style-name="T4">the </text:span><text:span text:style-name="T10">audio MP3 file</text:span><text:span text:style-name="T4">, with a name such as XYZ-GEN-001.mp3, where XYZ is the Paratext project code and GEN is the code for the book of the Bible, in this case Genesis.</text:span></text:p>
            </text:list-item>
            <text:list-item>
              <text:p text:style-name="P37" loext:marker-style-name="T4"><text:span text:style-name="T4">the corresponding </text:span><text:span text:style-name="T10">timing file</text:span><text:span text:style-name="T4">, with a name such as XYZ-GEN-001.txt.</text:span></text:p>
            </text:list-item>
          </text:list>
        </text:list-item>
      </text:list>
      <text:p text:style-name="P38" loext:marker-style-name="T4"/>
      <text:p text:style-name="P39" loext:marker-style-name="T4"><text:span text:style-name="T4">These are the files you need to add to you app project within Scripture App Builder. See the next sections for more details.</text:span><text:span text:style-name="T4"/></text:p>
      <text:p text:style-name="P40" loext:marker-style-name="T4"/>
      <text:h text:style-name="P8" text:outline-level="1" loext:marker-style-name="T4"><text:bookmark-start text:name="_Toc459024696"/><text:span text:style-name="T4">Listen to your audio and make any edits if necessary</text:span><text:bookmark-end text:name="_Toc459024696"/><text:span text:style-name="T4"/></text:h>
      <text:h text:style-name="P20" text:outline-level="2" loext:marker-style-name="T4"><text:bookmark-start text:name="_Toc459024697"/><text:span text:style-name="T4">Listening for errors</text:span><text:bookmark-end text:name="_Toc459024697"/><text:span text:style-name="T4"/></text:h>
      <text:p text:style-name="P41" loext:marker-style-name="T4"><text:span text:style-name="T4">After HearThis has generated the audio files for each chapter, it is a good idea to play them and listen carefully to check that there are no problems. The best way of doing this is to wear headphones so you can pick up any unwanted sounds that you might not be able to hear through your computer speakers.</text:span><text:span text:style-name="T4"/></text:p>
      <text:p text:style-name="P38" loext:marker-style-name="T4"/>
      <text:p text:style-name="P41" loext:marker-style-name="T4"><text:span text:style-name="T4">To play an MP3 audio file on your computer:</text:span><text:span text:style-name="T4"/></text:p>
      <text:list text:style-name="WWNum14">
        <text:list-item>
          <text:p text:style-name="P42" loext:marker-style-name="T4"><text:span text:style-name="T4">Select the file you want to play in Windows Explorer.</text:span><text:span text:style-name="T4"/></text:p>
        </text:list-item>
        <text:list-item>
          <text:p text:style-name="P42" loext:marker-style-name="T4"><text:span text:style-name="T4">Double-click it to play it with your default Media Player.</text:span><text:span text:style-name="T4"/></text:p>
        </text:list-item>
      </text:list>
      <text:p text:style-name="P38" loext:marker-style-name="T4"/>
      <text:p text:style-name="P41" loext:marker-style-name="T4"><text:span text:style-name="T4">It is often the case that you will find some small edits you need to make before you can make the audio available to others.</text:span><text:span text:style-name="T4"/></text:p>
      <text:list text:style-name="WWNum13">
        <text:list-item>
          <text:p text:style-name="P43" loext:marker-style-name="T4"><text:span text:style-name="T4">If the edits are </text:span><text:span text:style-name="T10">errors in reading to correct</text:span><text:span text:style-name="T4">, it is probably best to go back to HearThis, find the phrase which was read incorrectly and re-record it. After this, follow the process in section 5 (Publishing audio for use in Scripture App Builder) to produce the MP3 files again.</text:span></text:p>
        </text:list-item>
        <text:list-item>
          <text:p text:style-name="P43" loext:marker-style-name="T4"><text:span text:style-name="T4">If the edits are </text:span><text:span text:style-name="T10">short background noises</text:span><text:span text:style-name="T4"> </text:span><text:span text:style-name="T10">to remove</text:span><text:span text:style-name="T4"> or if you want to </text:span><text:span text:style-name="T10">make pauses between phrases longer or shorter </text:span><text:span text:style-name="T4">you might be able to make these changes in the Audacity audio editing program without re-recording anything. But if you hear short background noises at the same time as someone is speaking (such as dogs barking, doors slamming), it would be best to go back to HearThis and re-record the affected sections.</text:span></text:p>
        </text:list-item>
      </text:list>
      <text:p text:style-name="P38" loext:marker-style-name="T4"/>
      <text:h text:style-name="P20" text:outline-level="2" loext:marker-style-name="T4"><text:bookmark-start text:name="_Toc459024698"/><text:span text:style-name="T4">Editing audio files using Audacity</text:span><text:bookmark-end text:name="_Toc459024698"/><text:span text:style-name="T4"/></text:h>
      <text:p text:style-name="P41" loext:marker-style-name="T4"><text:span text:style-name="T4">To edit files generated by HearThis in Audacity:</text:span><text:span text:style-name="T4"/></text:p>
      <text:list text:style-name="WWNum15">
        <text:list-item>
          <text:p text:style-name="P44" loext:marker-style-name="T4"><text:span text:style-name="T4">Launch </text:span><text:span text:style-name="T10">Audacity</text:span><text:span text:style-name="T4">. If you don’t already have it installed on your computer you can download it here:</text:span></text:p>
        </text:list-item>
      </text:list>
      <text:p text:style-name="P45" loext:marker-style-name="T4"><text:a xlink:type="simple" xlink:href="http://www.audacityteam.org/" text:style-name="Internet_20_link" text:visited-style-name="Visited_20_Internet_20_Link"><text:span text:style-name="Internet_20_link">http://www.audacityteam.org</text:span></text:a> <text:span text:style-name="T4"><text:line-break/></text:span></text:p>
      <text:p text:style-name="P45" loext:marker-style-name="T4"><draw:frame text:anchor-type="as-char" draw:z-index="44" draw:name="Shape33" draw:style-name="gr2" draw:text-style-name="P3" svg:width="1.8961in" svg:height="0.7606in"><draw:image xlink:href="Pictures/10000000000000FD000000645817885E.jpg" xlink:type="simple" xlink:show="embed" xlink:actuate="onLoad" draw:mime-type="image/jpeg"><text:p/></draw:image></draw:frame></text:p>
      <text:p text:style-name="P46" loext:marker-style-name="T4"/>
      <text:list text:continue-numbering="true" text:style-name="WWNum15">
        <text:list-item>
          <text:p text:style-name="P44" loext:marker-style-name="T4"><text:span text:style-name="T4">Select </text:span><text:span text:style-name="T10">File</text:span><text:span text:style-name="T4"> </text:span><text:span text:style-name="T21"></text:span><text:span text:style-name="T12"> </text:span><text:span text:style-name="T10">Open…</text:span><text:span text:style-name="T4"> on the main menu and find the audio MP3 file you want to edit. Click </text:span><text:span text:style-name="T10">Open</text:span><text:span text:style-name="T4"> when you have selected the filename.</text:span></text:p>
        </text:list-item>
      </text:list>
      <text:p text:style-name="P39" loext:marker-style-name="T4"><text:span text:style-name="T4">The audio file will be loaded into Audacity.</text:span><text:span text:style-name="T4"/></text:p>
      <text:list text:continue-numbering="true" text:style-name="WWNum15">
        <text:list-item>
          <text:p text:style-name="P44" loext:marker-style-name="T4"><text:soft-page-break/><text:span text:style-name="T4">Select </text:span><text:span text:style-name="T10">File</text:span><text:span text:style-name="T4"> </text:span><text:span text:style-name="T21"></text:span><text:span text:style-name="T12"> </text:span><text:span text:style-name="T10">Import Labels…</text:span><text:span text:style-name="T4"> and select and import the corresponding timing text (.txt) file. For example, if you are editing XYZ-GEN-001.mp3, you want to import the labels file XYZ-GEN-001.txt.</text:span></text:p>
        </text:list-item>
      </text:list>
      <text:p text:style-name="P39" loext:marker-style-name="T4"><text:span text:style-name="T4">It is important that you edit the MP3 file and its corresponding timing text file together. Otherwise the timing file will get out of synch with any changes you make to the audio.</text:span><text:span text:style-name="T4"/></text:p>
      <text:list text:continue-numbering="true" text:style-name="WWNum15">
        <text:list-item>
          <text:p text:style-name="P44" loext:marker-style-name="T4"><text:span text:style-name="T4">Make sure </text:span><text:span text:style-name="T10">Tracks</text:span><text:span text:style-name="T4"> </text:span><text:span text:style-name="T21"></text:span><text:span text:style-name="T12"> </text:span><text:span text:style-name="T10">Sync-Lock Tracks</text:span><text:span text:style-name="T4"> is selected. This will ensure that the audio and label tracks are locked together and that when you delete a section from the audio track, a corresponding section is deleted from the label track. Or when you add a section to the audio track, a corresponding section is added to the label track.</text:span></text:p>
        </text:list-item>
        <text:list-item>
          <text:p text:style-name="P44" loext:marker-style-name="T4"><text:span text:style-name="T4">Make the edits you need to, e.g. deleting clicks, adjusting the length of pauses, etc.</text:span><text:span text:style-name="T4"/></text:p>
        </text:list-item>
      </text:list>
      <text:p text:style-name="P47" loext:marker-style-name="T4"/>
      <text:p text:style-name="P48" loext:marker-style-name="T4"><text:span text:style-name="T4">When you have finished editing remember to export both the audio and timings files:</text:span><text:span text:style-name="T4"/></text:p>
      <text:list text:continue-numbering="true" text:style-name="WWNum15">
        <text:list-item>
          <text:p text:style-name="P44" loext:marker-style-name="T4"><text:span text:style-name="T4">Export the audio file, using </text:span><text:span text:style-name="T10">File</text:span><text:span text:style-name="T4"> </text:span><text:span text:style-name="T21"></text:span><text:span text:style-name="T12"> </text:span><text:span text:style-name="T22">Export Audio…</text:span><text:span text:style-name="T12">, choosing to Save as type </text:span><text:span text:style-name="T22">MP3 Files</text:span><text:span text:style-name="T12">. </text:span></text:p>
        </text:list-item>
        <text:list-item>
          <text:p text:style-name="P44" loext:marker-style-name="T4"><text:span text:style-name="T12">Export the timing labels file, using </text:span><text:span text:style-name="T22">File</text:span><text:span text:style-name="T12"> </text:span><text:span text:style-name="T21"></text:span><text:span text:style-name="T12"> </text:span><text:span text:style-name="T22">Export Labels…</text:span></text:p>
        </text:list-item>
      </text:list>
      <text:p text:style-name="P38" loext:marker-style-name="T4"/>
      <text:p text:style-name="P38" loext:marker-style-name="T4"/>
      <text:p text:style-name="P41" loext:marker-style-name="T4"><text:span text:style-name="T4">If you are new to Audacity, a free manual for beginners can be found here:<text:line-break/></text:span><text:span text:style-name="T4"/></text:p>
      <text:p text:style-name="P41" loext:marker-style-name="T23"><text:span text:style-name="T23">How to do Recording on your Computer: A Beginner's Guide to Audacity</text:span><text:span text:style-name="T23"/></text:p>
      <text:p text:style-name="P41" loext:marker-style-name="T4"><text:a xlink:type="simple" xlink:href="http://www.scripture-engagement.org/content/how-do-recording-your-computer" text:style-name="Internet_20_link" text:visited-style-name="Visited_20_Internet_20_Link"><text:span text:style-name="Internet_20_link"><text:span text:style-name="T4">http://www.scripture-engagement.org/content/how-do-recording-your-computer</text:span></text:span></text:a><text:span text:style-name="T4"> </text:span></text:p>
      <text:h text:style-name="P8" text:outline-level="1" loext:marker-style-name="T4"><text:bookmark-start text:name="_Toc459024699"/><text:span text:style-name="T4">Using HearThis generated files in Scripture App Builder</text:span><text:bookmark-end text:name="_Toc459024699"/><text:span text:style-name="T4"/></text:h>
      <text:p text:style-name="P38" loext:marker-style-name="T4"/>
      <text:p text:style-name="P41" loext:marker-style-name="T4"><text:span text:style-name="T4">To use the audio MP3 and timing files from HearThis to build an app in Scripture App Builder, do the following:<text:line-break/></text:span><text:span text:style-name="T4"/></text:p>
      <text:list text:style-name="WWNum12">
        <text:list-item>
          <text:p text:style-name="P49" loext:marker-style-name="T4"><text:span text:style-name="T4">Create a new app project in Scripture App Builder or open an existing app project.</text:span><text:span text:style-name="T4"/></text:p>
        </text:list-item>
        <text:list-item>
          <text:p text:style-name="P50" loext:marker-style-name="T4"><text:span text:style-name="T4">Ensure the project contains the Scripture books you need.</text:span><text:span text:style-name="T4"/></text:p>
        </text:list-item>
        <text:list-item>
          <text:p text:style-name="P50" loext:marker-style-name="T4"><text:span text:style-name="T4">Go to the </text:span><text:span text:style-name="T10">Audio Files</text:span><text:span text:style-name="T4"> page of the book collection.</text:span></text:p>
        </text:list-item>
        <text:list-item>
          <text:p text:style-name="P50" loext:marker-style-name="T4"><text:span text:style-name="T4">Click the </text:span><text:span text:style-name="T10">Add Audio…</text:span><text:span text:style-name="T4"> button and select all of the audio </text:span><text:span text:style-name="T18">and</text:span><text:span text:style-name="T4"> timing files from the HearThis output, i.e. the MP3 and the TXT files.</text:span></text:p>
        </text:list-item>
      </text:list>
      <text:p text:style-name="P51" loext:marker-style-name="T4"><draw:frame text:anchor-type="as-char" draw:z-index="45" draw:name="Shape34" draw:style-name="gr2" draw:text-style-name="P3" svg:width="5.9898in" svg:height="3.7606in"><draw:image xlink:href="Pictures/10000000000002E9000001D599A36772.png" xlink:type="simple" xlink:show="embed" xlink:actuate="onLoad" draw:mime-type="image/png"><text:p/></draw:image></draw:frame></text:p>
      <text:p text:style-name="P52" loext:marker-style-name="T4"/>
      <text:list text:continue-numbering="true" text:style-name="WWNum12">
        <text:list-item>
          <text:p text:style-name="P50" loext:marker-style-name="T4"><text:span text:style-name="T4">Go to the </text:span><text:span text:style-name="T10">Audio Distribution</text:span><text:span text:style-name="T4"> page of the book collection and choose the method of distributing the audio. The default is “Package inside the APK file”.</text:span></text:p>
        </text:list-item>
      </text:list>
      <text:p text:style-name="P53" loext:marker-style-name="T4"/>
      <text:list text:continue-numbering="true" text:style-name="WWNum12">
        <text:list-item>
          <text:p text:style-name="P50" loext:marker-style-name="T4"><text:span text:style-name="T4">Go to the </text:span><text:span text:style-name="T10">Features </text:span><text:span text:style-name="T21"></text:span><text:span text:style-name="T4"> </text:span><text:span text:style-name="T10">Audio page</text:span><text:span text:style-name="T4"> and specify the phrase-ending characters to correspond to the phrase-ending characters HearThis used. <text:line-break/><text:line-break/></text:span><text:span text:style-name="T18">Important:</text:span><text:span text:style-name="T4"> By default HearThis uses sentence-ending characters (full stop/period, question mark, exclamation mark), but it does not split phrases by commas in the middle of sentences. So you will need to delete the comma if it </text:span><text:soft-page-break/><text:span text:style-name="T4">you see it on the SAB features page – otherwise your text and audio will not be synchronized correctly.<text:line-break/></text:span></text:p>
        </text:list-item>
      </text:list>
      <text:p text:style-name="P29" loext:marker-style-name="T4"><draw:custom-shape text:anchor-type="char" draw:z-index="33" draw:name="Shape35" draw:style-name="gr4" draw:text-style-name="P22" svg:width="0.6252in" svg:height="0.2504in" draw:transform="rotate (-2.78083309720257) translate (5.54791666666667in 1.85486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text:anchor-type="as-char" draw:z-index="46" draw:name="Shape36" draw:style-name="gr2" draw:text-style-name="P3" svg:width="5.9898in" svg:height="3.7606in"><draw:image xlink:href="Pictures/10000000000002E9000001D5247FC0FE.png" xlink:type="simple" xlink:show="embed" xlink:actuate="onLoad" draw:mime-type="image/png"><text:p/></draw:image></draw:frame></text:p>
      <text:p text:style-name="P38" loext:marker-style-name="T4"/>
      <text:list text:continue-numbering="true" text:style-name="WWNum12">
        <text:list-item>
          <text:p text:style-name="P54" loext:marker-style-name="T4"><text:span text:style-name="T4">Build your app and try it out!</text:span><text:span text:style-name="T4"/></text:p>
        </text:list-item>
      </text:list>
      <text:p text:style-name="P38" loext:marker-style-name="T4"/>
      <text:p text:style-name="P38" loext:marker-style-name="T4"/>
      <text:p text:style-name="P38"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3543in" fo:margin-top="0.1665in" fo:margin-bottom="0.0417in" style:contextual-spacing="false" fo:text-indent="-0.3543in" style:auto-text-indent="false" fo:keep-with-next="always">
        <style:tab-stops>
          <style:tab-stop style:position="0.3154in"/>
        </style:tab-stops>
      </style:paragraph-properties>
      <style:text-properties fo:font-weight="bold"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6252in" fo:margin-top="0.0835in" fo:margin-bottom="0in" style:contextual-spacing="false" fo:text-indent="-0.4598in" style:auto-text-indent="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name-asian="Times New Roman1" style:font-family-asian="'Times New Roman'" style:font-family-generic-asian="system" style:font-pitch-asian="variable" style:font-size-asian="16pt" style:language-asian="fr" style:country-asian="FR"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language="fr" fo:country="FR" fo:font-style="italic" fo:font-weight="bold" style:font-name-asian="Times New Roman1" style:font-family-asian="'Times New Roman'" style:font-family-generic-asian="system" style:font-pitch-asian="variable" style:font-size-asian="14pt" style:language-asian="fr" style:country-asian="FR"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mbria" fo:font-family="Cambria" style:font-family-generic="roman" style:font-pitch="variable" fo:font-size="13pt" fo:language="fr" fo:country="FR" fo:font-weight="bold" style:font-name-asian="Times New Roman1" style:font-family-asian="'Times New Roman'" style:font-family-generic-asian="system" style:font-pitch-asian="variable" style:font-size-asian="13pt" style:language-asian="fr" style:country-asian="FR"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style style:name="ListLabel_20_137" style:display-name="ListLabel 137" style:family="text">
      <style:text-properties fo:language="en" fo:country="GB" fo:font-weight="bold" style:font-weight-asian="bold" style:font-size-complex="11pt" style:font-weight-complex="bold"/>
    </style:style>
    <style:style style:name="ListLabel_20_138" style:display-name="ListLabel 138" style:family="text">
      <style:text-properties fo:language="en" fo:country="US"/>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13" text:anchor-type="paragraph" svg:y="0.0008in" draw:z-index="62"><draw:text-box fo:min-height="0.0161in" fo:min-width="0.0161in"><text:p text:style-name="MP1"><text:span text:style-name="Page_20_Number"><text:page-number text:select-page="current">1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Using HearThis for Audio Recording</dc:title>
    <meta:initial-creator>Richard Margetts</meta:initial-creator>
    <meta:editing-cycles>15</meta:editing-cycles>
    <meta:print-date>2016-08-15T10:42:00</meta:print-date>
    <meta:creation-date>2015-05-15T16:25:00</meta:creation-date>
    <dc:date>2026-06-03T13:44:25.103920792</dc:date>
    <meta:editing-duration>PT18M19S</meta:editing-duration>
    <meta:generator>LibreOffice/26.2.3.2$Linux_X86_64 LibreOffice_project/620$Build-2</meta:generator>
    <meta:document-statistic meta:table-count="0" meta:image-count="0" meta:object-count="0" meta:page-count="16" meta:paragraph-count="175" meta:word-count="2565" meta:character-count="14462" meta:non-whitespace-character-count="12079"/>
    <meta:user-defined meta:name="AppVersion">16.0000</meta:user-defined>
    <meta:template xlink:type="simple" xlink:actuate="onRequest" xlink:title="Normal.dotm" xlink:href=""/>
  </office:meta>
</office:document-meta>
</file>