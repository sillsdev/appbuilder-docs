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61000003777016FF66.png" manifest:media-type="image/png"/>
  <manifest:file-entry manifest:full-path="Pictures/10000001000005600000038DB208906E.png" manifest:media-type="image/png"/>
  <manifest:file-entry manifest:full-path="Pictures/1000000100000564000002D5CCF78E17.png" manifest:media-type="image/png"/>
  <manifest:file-entry manifest:full-path="Pictures/100000010000044D000003F825F5D9B9.png" manifest:media-type="image/png"/>
  <manifest:file-entry manifest:full-path="Pictures/100000010000040A0000044DBA175B06.png" manifest:media-type="image/png"/>
  <manifest:file-entry manifest:full-path="Pictures/10000001000002E70000044C5299718C.png" manifest:media-type="image/png"/>
  <manifest:file-entry manifest:full-path="Pictures/100000010000044C00000233B4CBFE81.png" manifest:media-type="image/png"/>
  <manifest:file-entry manifest:full-path="Pictures/1000000100000228000001ACDD465328.png" manifest:media-type="image/png"/>
  <manifest:file-entry manifest:full-path="Pictures/1000000100000234000000A4F72C7BA1.png" manifest:media-type="image/png"/>
  <manifest:file-entry manifest:full-path="Pictures/10000001000002070000009C808BEE25.png" manifest:media-type="image/png"/>
  <manifest:file-entry manifest:full-path="Pictures/1000000100000224000001CEC2A72D79.png" manifest:media-type="image/png"/>
  <manifest:file-entry manifest:full-path="Pictures/10000001000001FD00000116E6E59501.png" manifest:media-type="image/png"/>
  <manifest:file-entry manifest:full-path="Pictures/10000001000002D8000001CCF0060A39.png" manifest:media-type="image/png"/>
  <manifest:file-entry manifest:full-path="Pictures/10000001000005620000022E479ED9DD.png" manifest:media-type="image/png"/>
  <manifest:file-entry manifest:full-path="Pictures/10000001000004DD000002330E9B6D6A.png" manifest:media-type="image/png"/>
  <manifest:file-entry manifest:full-path="Pictures/10000001000001D00000014933D33F87.tif" manifest:media-type="image/tiff"/>
  <manifest:file-entry manifest:full-path="Pictures/1000000100000561000003B6042725EA.png" manifest:media-type="image/png"/>
  <manifest:file-entry manifest:full-path="Pictures/10000001000001D90000014DD23B4DC2.tif" manifest:media-type="image/tiff"/>
  <manifest:file-entry manifest:full-path="Pictures/10000001000001F600000162EB0EAA44.tif" manifest:media-type="image/tiff"/>
  <manifest:file-entry manifest:full-path="Pictures/1000000100000094000000A5C6F1C763.png" manifest:media-type="image/png"/>
  <manifest:file-entry manifest:full-path="Pictures/10000001000005610000029CCD34C93B.png" manifest:media-type="image/png"/>
  <manifest:file-entry manifest:full-path="Pictures/10000001000001CE0000013C19B87C8F.tif" manifest:media-type="image/tiff"/>
  <manifest:file-entry manifest:full-path="Pictures/10000001000002C20000009AB34A9DC8.png" manifest:media-type="image/png"/>
  <manifest:file-entry manifest:full-path="Pictures/1000000100000188000000C6B75A4EA4.tif" manifest:media-type="image/tiff"/>
  <manifest:file-entry manifest:full-path="Pictures/10000001000002CF00000094317AA322.png" manifest:media-type="image/png"/>
  <manifest:file-entry manifest:full-path="Pictures/1000000100000228000001DFCE146D18.png" manifest:media-type="image/png"/>
  <manifest:file-entry manifest:full-path="Pictures/100000010000001C0000002296E3C9AD.png" manifest:media-type="image/png"/>
  <manifest:file-entry manifest:full-path="Pictures/1000000100000205000000A8235BD6D4.png" manifest:media-type="image/png"/>
  <manifest:file-entry manifest:full-path="Pictures/1000000100000251000001F5E4EAB25B.png" manifest:media-type="image/png"/>
  <manifest:file-entry manifest:full-path="Pictures/10000001000004D70000025DDCF3B5BB.png" manifest:media-type="image/png"/>
  <manifest:file-entry manifest:full-path="Pictures/10000001000002700000015437DAEF84.png" manifest:media-type="image/png"/>
  <manifest:file-entry manifest:full-path="Pictures/10000001000003FC000003A53BB51DFC.png" manifest:media-type="image/png"/>
  <manifest:file-entry manifest:full-path="Pictures/10000001000004CC000004630FC68EE0.png" manifest:media-type="image/png"/>
  <manifest:file-entry manifest:full-path="Pictures/1000000100000228000001575B613F03.tif" manifest:media-type="image/tiff"/>
  <manifest:file-entry manifest:full-path="Pictures/100000010000022500000156BE5E2A8F.png" manifest:media-type="image/png"/>
  <manifest:file-entry manifest:full-path="Pictures/1000000100000561000002DFAF71798D.png" manifest:media-type="image/png"/>
  <manifest:file-entry manifest:full-path="Pictures/10000001000001D5000001AA4146FACF.png" manifest:media-type="image/png"/>
  <manifest:file-entry manifest:full-path="Pictures/10000001000002AB000001634B4F0C2B.png" manifest:media-type="image/png"/>
  <manifest:file-entry manifest:full-path="Pictures/10000001000001E7000000ED4A29DE07.png" manifest:media-type="image/png"/>
  <manifest:file-entry manifest:full-path="Pictures/10000001000003630000016CDAB2D706.png" manifest:media-type="image/png"/>
  <manifest:file-entry manifest:full-path="Pictures/10000001000006850000048DE77F53FD.png" manifest:media-type="image/png"/>
  <manifest:file-entry manifest:full-path="Pictures/10000001000001FF0000012AB712E6CB.png" manifest:media-type="image/png"/>
  <manifest:file-entry manifest:full-path="Pictures/100000010000023B000001124673708A.png" manifest:media-type="image/png"/>
  <manifest:file-entry manifest:full-path="Pictures/100000010000024B000001EADDEE00E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alibri1" svg:font-family="Calibri" style:font-family-generic="system" style:font-pitch="variable"/>
    <style:font-face style:name="Courier New" svg:font-family="'Courier New'" style:font-family-generic="swiss" style:font-pitch="variable"/>
    <style:font-face style:name="Courier New1" svg:font-family="'Courier New'"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新細明體" svg:font-family="新細明體" style:font-family-generic="system" style:font-pitch="variable"/>
  </office:font-face-decls>
  <office:automatic-styles>
    <style:style style:name="Table1" style:family="table">
      <style:table-properties style:width="3.9375in" fo:margin-top="0in" fo:margin-bottom="0in" table:align="center" style:writing-mode="lr-tb"/>
    </style:style>
    <style:style style:name="Table1.A" style:family="table-column">
      <style:table-column-properties style:column-width="1.575in"/>
    </style:style>
    <style:style style:name="Table1.B" style:family="table-column">
      <style:table-column-properties style:column-width="1.1813in"/>
    </style:style>
    <style:style style:name="Table1.1" style:family="table-row">
      <style:table-row-properties fo:keep-together="auto"/>
    </style:style>
    <style:style style:name="Table1.A1" style:family="table-cell">
      <style:table-cell-properties fo:padding-left="0.075in" fo:padding-right="0.075in" fo:padding-top="0.0396in" fo:padding-bottom="0.0396in" fo:border="0.5pt solid #000000" style:writing-mode="lr-tb"/>
    </style:style>
    <style:style style:name="Table2" style:family="table">
      <style:table-properties style:width="4.9222in" fo:margin-left="0.3153in" fo:margin-top="0in" fo:margin-bottom="0in" table:align="left" style:writing-mode="lr-tb"/>
    </style:style>
    <style:style style:name="Table2.A" style:family="table-column">
      <style:table-column-properties style:column-width="1.4771in"/>
    </style:style>
    <style:style style:name="Table2.B" style:family="table-column">
      <style:table-column-properties style:column-width="3.4451in"/>
    </style:style>
    <style:style style:name="Table2.1" style:family="table-row">
      <style:table-row-properties fo:keep-together="auto"/>
    </style:style>
    <style:style style:name="Table2.A1" style:family="table-cell">
      <style:table-cell-properties fo:background-color="#f2f2f2" fo:padding-left="0.075in" fo:padding-right="0.075in" fo:padding-top="0.0396in" fo:padding-bottom="0.0396in" fo:border="0.5pt solid #000000" style:writing-mode="lr-tb">
        <style:background-image/>
      </style:table-cell-properties>
    </style:style>
    <style:style style:name="Table2.A2" style:family="table-cell">
      <style:table-cell-properties fo:padding-left="0.075in" fo:padding-right="0.075in" fo:padding-top="0.0396in" fo:padding-bottom="0.0396in" fo:border="0.5pt solid #000000" style:writing-mode="lr-tb"/>
    </style:style>
    <style:style style:name="Table2.B2" style:family="table-cell">
      <style:table-cell-properties fo:padding-left="0.075in" fo:padding-right="0.075in" fo:padding-top="0.0396in" fo:padding-bottom="0.0396in" fo:border="0.5pt solid #000000" style:writing-mode="lr-tb"/>
    </style:style>
    <style:style style:name="Table2.A3" style:family="table-cell">
      <style:table-cell-properties fo:padding-left="0.075in" fo:padding-right="0.075in" fo:padding-top="0.0396in" fo:padding-bottom="0.0396in" fo:border="0.5pt solid #000000" style:writing-mode="lr-tb"/>
    </style:style>
    <style:style style:name="Table2.B3" style:family="table-cell">
      <style:table-cell-properties fo:padding-left="0.075in" fo:padding-right="0.075in" fo:padding-top="0.0396in" fo:padding-bottom="0.0396in" fo:border="0.5pt solid #000000" style:writing-mode="lr-tb"/>
    </style:style>
    <style:style style:name="Table2.A4" style:family="table-cell">
      <style:table-cell-properties fo:padding-left="0.075in" fo:padding-right="0.075in" fo:padding-top="0.0396in" fo:padding-bottom="0.0396in" fo:border="0.5pt solid #000000" style:writing-mode="lr-tb"/>
    </style:style>
    <style:style style:name="Table2.B4" style:family="table-cell">
      <style:table-cell-properties fo:padding-left="0.075in" fo:padding-right="0.075in" fo:padding-top="0.0396in" fo:padding-bottom="0.0396in" fo:border="0.5pt solid #000000" style:writing-mode="lr-tb"/>
    </style:style>
    <style:style style:name="Table2.A5" style:family="table-cell">
      <style:table-cell-properties fo:padding-left="0.075in" fo:padding-right="0.075in" fo:padding-top="0.0396in" fo:padding-bottom="0.0396in" fo:border="0.5pt solid #000000" style:writing-mode="lr-tb"/>
    </style:style>
    <style:style style:name="Table2.B5" style:family="table-cell">
      <style:table-cell-properties fo:padding-left="0.075in" fo:padding-right="0.075in" fo:padding-top="0.0396in" fo:padding-bottom="0.0396in" fo:border="0.5pt solid #000000" style:writing-mode="lr-tb"/>
    </style:style>
    <style:style style:name="Table2.A6" style:family="table-cell">
      <style:table-cell-properties fo:padding-left="0.075in" fo:padding-right="0.075in" fo:padding-top="0.0396in" fo:padding-bottom="0.0396in" fo:border="0.5pt solid #000000" style:writing-mode="lr-tb"/>
    </style:style>
    <style:style style:name="Table2.B6" style:family="table-cell">
      <style:table-cell-properties fo:padding-left="0.075in" fo:padding-right="0.075in" fo:padding-top="0.0396in" fo:padding-bottom="0.0396in" fo:border="0.5pt solid #000000" style:writing-mode="lr-tb"/>
    </style:style>
    <style:style style:name="Table2.A7" style:family="table-cell">
      <style:table-cell-properties fo:padding-left="0.075in" fo:padding-right="0.075in" fo:padding-top="0.0396in" fo:padding-bottom="0.0396in" fo:border="0.5pt solid #000000" style:writing-mode="lr-tb"/>
    </style:style>
    <style:style style:name="Table2.B7" style:family="table-cell">
      <style:table-cell-properties fo:padding-left="0.075in" fo:padding-right="0.075in" fo:padding-top="0.0396in" fo:padding-bottom="0.0396in" fo:border="0.5pt solid #000000" style:writing-mode="lr-tb"/>
    </style:style>
    <style:style style:name="Table2.A8" style:family="table-cell">
      <style:table-cell-properties fo:padding-left="0.075in" fo:padding-right="0.075in" fo:padding-top="0.0396in" fo:padding-bottom="0.0396in" fo:border="0.5pt solid #000000" style:writing-mode="lr-tb"/>
    </style:style>
    <style:style style:name="Table2.B8" style:family="table-cell">
      <style:table-cell-properties fo:padding-left="0.075in" fo:padding-right="0.075in" fo:padding-top="0.0396in" fo:padding-bottom="0.0396in" fo:border="0.5pt solid #000000" style:writing-mode="lr-tb"/>
    </style:style>
    <style:style style:name="Table2.A9" style:family="table-cell">
      <style:table-cell-properties fo:padding-left="0.075in" fo:padding-right="0.075in" fo:padding-top="0.0396in" fo:padding-bottom="0.0396in" fo:border="0.5pt solid #000000" style:writing-mode="lr-tb"/>
    </style:style>
    <style:style style:name="Table2.B9" style:family="table-cell">
      <style:table-cell-properties fo:padding-left="0.075in" fo:padding-right="0.075in" fo:padding-top="0.0396in" fo:padding-bottom="0.0396in" fo:border="0.5pt solid #000000" style:writing-mode="lr-tb"/>
    </style:style>
    <style:style style:name="Table2.A10" style:family="table-cell">
      <style:table-cell-properties fo:padding-left="0.075in" fo:padding-right="0.075in" fo:padding-top="0.0396in" fo:padding-bottom="0.0396in" fo:border="0.5pt solid #000000" style:writing-mode="lr-tb"/>
    </style:style>
    <style:style style:name="Table2.B10" style:family="table-cell">
      <style:table-cell-properties fo:padding-left="0.075in" fo:padding-right="0.075in" fo:padding-top="0.0396in" fo:padding-bottom="0.0396in" fo:border="0.5pt solid #000000" style:writing-mode="lr-tb"/>
    </style:style>
    <style:style style:name="Table2.A11" style:family="table-cell">
      <style:table-cell-properties fo:padding-left="0.075in" fo:padding-right="0.075in" fo:padding-top="0.0396in" fo:padding-bottom="0.0396in" fo:border="0.5pt solid #000000" style:writing-mode="lr-tb"/>
    </style:style>
    <style:style style:name="Table2.B11" style:family="table-cell">
      <style:table-cell-properties fo:padding-left="0.075in" fo:padding-right="0.075in" fo:padding-top="0.0396in" fo:padding-bottom="0.0396in" fo:border="0.5pt solid #000000" style:writing-mode="lr-tb"/>
    </style:style>
    <style:style style:name="Table2.A12" style:family="table-cell">
      <style:table-cell-properties fo:padding-left="0.075in" fo:padding-right="0.075in" fo:padding-top="0.0396in" fo:padding-bottom="0.0396in" fo:border="0.5pt solid #000000" style:writing-mode="lr-tb"/>
    </style:style>
    <style:style style:name="Table2.B12" style:family="table-cell">
      <style:table-cell-properties fo:padding-left="0.075in" fo:padding-right="0.075in" fo:padding-top="0.0396in" fo:padding-bottom="0.0396in" fo:border="0.5pt solid #000000" style:writing-mode="lr-tb"/>
    </style:style>
    <style:style style:name="Table2.A13" style:family="table-cell">
      <style:table-cell-properties fo:padding-left="0.075in" fo:padding-right="0.075in" fo:padding-top="0.0396in" fo:padding-bottom="0.0396in" fo:border="0.5pt solid #000000" style:writing-mode="lr-tb"/>
    </style:style>
    <style:style style:name="Table2.B13" style:family="table-cell">
      <style:table-cell-properties fo:padding-left="0.075in" fo:padding-right="0.075in" fo:padding-top="0.0396in" fo:padding-bottom="0.0396in" fo:border="0.5pt solid #000000" style:writing-mode="lr-tb"/>
    </style:style>
    <style:style style:name="Table3" style:family="table">
      <style:table-properties style:width="5.9896in" fo:margin-left="-0.0069in" fo:margin-top="0in" fo:margin-bottom="0in" table:align="left" style:writing-mode="page"/>
    </style:style>
    <style:style style:name="Table3.A" style:family="table-column">
      <style:table-column-properties style:column-width="1.75in"/>
    </style:style>
    <style:style style:name="Table3.B" style:family="table-column">
      <style:table-column-properties style:column-width="4.2396in"/>
    </style:style>
    <style:style style:name="Table3.1" style:family="table-row">
      <style:table-row-properties fo:keep-together="auto"/>
    </style:style>
    <style:style style:name="Table3.A1" style:family="table-cell">
      <style:table-cell-properties fo:padding-left="0.0694in" fo:padding-right="0.0694in" fo:padding-top="0.0694in" fo:padding-bottom="0.0417in" fo:border="1pt solid #000000"/>
    </style:style>
    <style:style style:name="Table3.B1" style:family="table-cell">
      <style:table-cell-properties fo:padding-left="0.0694in" fo:padding-right="0.0694in" fo:padding-top="0.0694in" fo:padding-bottom="0.0417in" fo:border-left="0.75pt solid #000000" fo:border-right="1pt solid #000000" fo:border-top="1pt solid #000000" fo:border-bottom="1pt solid #000000"/>
    </style:style>
    <style:style style:name="Table3.A2" style:family="table-cell">
      <style:table-cell-properties fo:padding-left="0.0694in" fo:padding-right="0.0694in" fo:padding-top="0.0694in" fo:padding-bottom="0.0417in" fo:border-left="1pt solid #000000" fo:border-right="1pt solid #000000" fo:border-top="0.75pt solid #000000" fo:border-bottom="1pt solid #000000"/>
    </style:style>
    <style:style style:name="Table3.B2" style:family="table-cell">
      <style:table-cell-properties fo:padding-left="0.0694in" fo:padding-right="0.0694in" fo:padding-top="0.0694in" fo:padding-bottom="0.0417in" fo:border-left="0.75pt solid #000000" fo:border-right="1pt solid #000000" fo:border-top="0.75pt solid #000000" fo:border-bottom="1pt solid #000000"/>
    </style:style>
    <style:style style:name="P1" style:family="paragraph" style:parent-style-name="Standard" style:master-page-name="Standard">
      <style:paragraph-properties fo:text-align="center" style:justify-single-word="false" style:page-number="1"/>
      <style:text-properties style:font-name="Calibri" fo:font-size="24pt" fo:language="en" fo:country="GB" fo:font-weight="bold" style:font-size-asian="24pt" style:font-weight-asian="bold" style:font-size-complex="24pt"/>
    </style:style>
    <style:style style:name="P2" style:family="paragraph" style:parent-style-name="Standard">
      <style:paragraph-properties fo:text-align="center" style:justify-single-word="false"/>
      <style:text-properties style:font-name="Calibri" fo:font-size="24pt" fo:language="en" fo:country="GB" fo:font-weight="bold" style:font-size-asian="24pt" style:font-weight-asian="bold" style:font-size-complex="24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Calibri" fo:language="en" fo:country="GB" fo:font-style="italic" style:font-style-asian="italic" style:font-name-complex="Calibri1"/>
    </style:style>
    <style:style style:name="P5" style:family="paragraph" style:parent-style-name="Standard">
      <style:paragraph-properties fo:text-align="center" style:justify-single-word="false"/>
      <style:text-properties style:font-name="Calibri"/>
    </style:style>
    <style:style style:name="P6" style:family="paragraph" style:parent-style-name="Standard">
      <style:paragraph-properties fo:text-align="center" style:justify-single-word="false"/>
      <style:text-properties style:font-name="Calibri" fo:font-size="16pt" fo:font-weight="bold" style:font-size-asian="16pt" style:font-weight-asian="bold"/>
    </style:style>
    <style:style style:name="P7" style:family="paragraph">
      <loext:graphic-properties draw:fill="solid" draw:fill-color="#ffffff"/>
      <style:paragraph-properties fo:text-align="left"/>
      <style:text-properties fo:font-size="18pt"/>
    </style:style>
    <style:style style:name="P8" style:family="paragraph" style:parent-style-name="Standard">
      <style:text-properties style:font-name="Calibri" fo:language="en" fo:country="GB"/>
    </style:style>
    <style:style style:name="P9" style:family="paragraph" style:parent-style-name="Standard">
      <style:paragraph-properties fo:margin-top="0in" fo:margin-bottom="0in" style:contextual-spacing="false" fo:break-before="page"/>
      <style:text-properties style:font-name="Calibri" fo:language="en" fo:country="GB"/>
    </style:style>
    <style:style style:name="P10" style:family="paragraph" style:parent-style-name="Standard">
      <style:paragraph-properties fo:text-align="center" style:justify-single-word="false"/>
      <style:text-properties style:font-name="Calibri" fo:language="en" fo:country="GB"/>
    </style:style>
    <style:style style:name="P11" style:family="paragraph" style:parent-style-name="Standard">
      <style:text-properties style:font-name="Calibri" fo:font-size="16pt" fo:font-weight="bold" style:font-size-asian="16pt" style:font-weight-asian="bold"/>
    </style:style>
    <style:style style:name="P12" style:family="paragraph" style:parent-style-name="Standard">
      <style:paragraph-properties fo:margin-top="0in" fo:margin-bottom="0in" style:contextual-spacing="false" fo:text-align="center" style:justify-single-word="false" fo:break-before="page"/>
    </style:style>
    <style:style style:name="P13" style:family="paragraph" style:parent-style-name="Standard">
      <style:paragraph-properties fo:text-align="center" style:justify-single-word="false"/>
      <style:text-properties style:font-name="Calibri" style:font-name-complex="Calibri1"/>
    </style:style>
    <style:style style:name="P14" style:family="paragraph" style:parent-style-name="Contents_20_3">
      <style:paragraph-properties>
        <style:tab-stops>
          <style:tab-stop style:position="1in"/>
          <style:tab-stop style:position="6.261in" style:type="right" style:leader-style="dotted" style:leader-text="."/>
        </style:tab-stops>
      </style:paragraph-properties>
    </style:style>
    <style:style style:name="P15" style:family="paragraph" style:parent-style-name="Heading_20_1">
      <style:paragraph-properties fo:margin-left="0.248in" fo:text-indent="-0.248in" style:auto-text-indent="false" fo:break-before="page"/>
    </style:style>
    <style:style style:name="P16" style:family="paragraph" style:parent-style-name="Standard">
      <style:text-properties style:font-name-complex="Calibri1" style:font-size-complex="12pt"/>
    </style:style>
    <style:style style:name="P17" style:family="paragraph" style:parent-style-name="Standard">
      <style:paragraph-properties fo:margin-top="0in" fo:margin-bottom="0in" style:contextual-spacing="false" fo:line-height="100%" fo:text-align="left" style:justify-single-word="false" fo:orphans="2" fo:widows="2"/>
      <style:text-properties fo:color="#000000" loext:opacity="100%" fo:font-size="11pt" fo:language="en" fo:country="US" style:letter-kerning="false" style:font-name-asian="Arial1" style:language-asian="en" style:country-asian="US" style:font-name-complex="Arial1" style:font-size-complex="11pt" style:language-complex="ar" style:country-complex="SA"/>
    </style:style>
    <style:style style:name="P18" style:family="paragraph" style:parent-style-name="Standard">
      <style:paragraph-properties fo:margin-top="0in" fo:margin-bottom="0in" style:contextual-spacing="false" fo:line-height="100%" fo:text-align="center" style:justify-single-word="false" fo:orphans="2" fo:widows="2"/>
      <style:text-properties fo:color="#000000" loext:opacity="100%" fo:font-size="11pt" fo:language="en" fo:country="US" style:letter-kerning="false" style:font-name-asian="Arial1" style:language-asian="en" style:country-asian="US" style:font-name-complex="Arial1" style:font-size-complex="11pt" style:language-complex="ar" style:country-complex="SA"/>
    </style:style>
    <style:style style:name="P19" style:family="paragraph" style:parent-style-name="Standard">
      <style:paragraph-properties fo:margin-top="0.028in" fo:margin-bottom="0in" style:contextual-spacing="false" fo:line-height="100%" fo:text-align="center" style:justify-single-word="false" fo:orphans="2" fo:widows="2"/>
      <style:text-properties fo:color="#000000" loext:opacity="100%" fo:font-size="11pt" fo:language="en" fo:country="US" style:letter-kerning="false" style:font-name-asian="Arial1" style:language-asian="en" style:country-asian="US" style:font-name-complex="Arial1" style:font-size-complex="11pt" style:language-complex="ar" style:country-complex="SA"/>
    </style:style>
    <style:style style:name="P20" style:family="paragraph" style:parent-style-name="Standard">
      <style:paragraph-properties fo:margin-top="0.028in" fo:margin-bottom="0in" style:contextual-spacing="false" fo:line-height="100%" fo:text-align="center" style:justify-single-word="false" fo:orphans="2" fo:widows="2"/>
      <style:text-properties fo:color="#000000" loext:opacity="100%" fo:font-size="12pt" fo:language="en" fo:country="US" style:letter-kerning="false" style:font-name-asian="Arial1" style:font-size-asian="12pt" style:language-asian="en" style:country-asian="US" style:font-name-complex="Calibri1" style:font-size-complex="12pt" style:language-complex="ar" style:country-complex="SA"/>
    </style:style>
    <style:style style:name="P21" style:family="paragraph" style:parent-style-name="Standard">
      <style:paragraph-properties fo:margin-top="0.0835in" fo:margin-bottom="0in" style:contextual-spacing="false"/>
    </style:style>
    <style:style style:name="P22" style:family="paragraph" style:parent-style-name="No_20_Spacing">
      <style:paragraph-properties fo:keep-with-next="always"/>
    </style:style>
    <style:style style:name="P23" style:family="paragraph" style:parent-style-name="Standard" style:list-style-name="WWNum15">
      <style:paragraph-properties fo:margin-left="0.4957in" fo:margin-top="0.1665in" fo:margin-bottom="0in" style:contextual-spacing="false" fo:text-indent="-0.248in" style:auto-text-indent="false" fo:keep-with-next="always"/>
    </style:style>
    <style:style style:name="P24" style:family="paragraph" style:parent-style-name="Standard">
      <style:paragraph-properties fo:margin-left="1in" fo:margin-top="0.0417in" fo:margin-bottom="0in" style:contextual-spacing="false" fo:keep-with-next="always"/>
    </style:style>
    <style:style style:name="P25" style:family="paragraph" style:parent-style-name="Standard" style:list-style-name="WWNum15">
      <style:paragraph-properties fo:margin-left="0.4957in" fo:margin-top="0.1665in" fo:margin-bottom="0in" style:contextual-spacing="false" fo:text-indent="-0.248in" style:auto-text-indent="false"/>
    </style:style>
    <style:style style:name="P26" style:family="paragraph" style:parent-style-name="Standard">
      <style:text-properties style:font-name="Calibri" fo:language="en" fo:country="GB" style:language-asian="fr" style:country-asian="FR"/>
    </style:style>
    <style:style style:name="P27" style:family="paragraph" style:parent-style-name="Standard">
      <style:paragraph-properties fo:margin-top="0in" fo:margin-bottom="0.0835in" style:contextual-spacing="false"/>
    </style:style>
    <style:style style:name="P28" style:family="paragraph" style:parent-style-name="No_20_Spacing" style:list-style-name="WWNum11"/>
    <style:style style:name="P29" style:family="paragraph" style:parent-style-name="Heading_20_2">
      <style:paragraph-properties fo:margin-left="0.3937in" fo:text-indent="-0.3937in" style:auto-text-indent="false"/>
    </style:style>
    <style:style style:name="P30" style:family="paragraph" style:parent-style-name="Standard">
      <style:paragraph-properties fo:margin-top="0.1665in" fo:margin-bottom="0in" style:contextual-spacing="false" fo:keep-with-next="always"/>
    </style:style>
    <style:style style:name="P31" style:family="paragraph" style:parent-style-name="List_20_Paragraph" style:list-style-name="WWNum43">
      <style:paragraph-properties fo:margin-top="0.1665in" fo:margin-bottom="0in" style:contextual-spacing="false" fo:line-height="100%"/>
    </style:style>
    <style:style style:name="P32" style:family="paragraph" style:parent-style-name="Standard">
      <style:paragraph-properties fo:keep-with-next="always"/>
      <style:text-properties fo:font-size="7pt" fo:language="en" fo:country="GB" style:font-size-asian="7pt"/>
    </style:style>
    <style:style style:name="P33" style:family="paragraph" style:parent-style-name="Standard">
      <style:paragraph-properties fo:margin-left="0.5in"/>
    </style:style>
    <style:style style:name="P34" style:family="paragraph" style:parent-style-name="Standard">
      <style:paragraph-properties fo:margin-left="0.4898in"/>
    </style:style>
    <style:style style:name="P35" style:family="paragraph" style:parent-style-name="List_20_Paragraph" style:list-style-name="WWNum43">
      <style:paragraph-properties fo:line-height="100%"/>
    </style:style>
    <style:style style:name="P36" style:family="paragraph" style:parent-style-name="List_20_Paragraph">
      <style:paragraph-properties fo:line-height="100%"/>
      <style:text-properties fo:language="en" fo:country="GB"/>
    </style:style>
    <style:style style:name="P37" style:family="paragraph" style:parent-style-name="Standard">
      <style:text-properties fo:language="en" fo:country="GB"/>
    </style:style>
    <style:style style:name="P38" style:family="paragraph" style:parent-style-name="List_20_Paragraph" style:list-style-name="WWNum44">
      <style:paragraph-properties fo:line-height="100%"/>
    </style:style>
    <style:style style:name="P39" style:family="paragraph" style:parent-style-name="List_20_Paragraph">
      <style:paragraph-properties fo:line-height="100%"/>
    </style:style>
    <style:style style:name="P40" style:family="paragraph" style:parent-style-name="List_20_Paragraph">
      <style:text-properties fo:language="en" fo:country="GB"/>
    </style:style>
    <style:style style:name="P41" style:family="paragraph" style:parent-style-name="List_20_Paragraph">
      <style:paragraph-properties fo:keep-with-next="always"/>
    </style:style>
    <style:style style:name="P42" style:family="paragraph" style:parent-style-name="List_20_Paragraph">
      <style:paragraph-properties fo:margin-left="1in"/>
    </style:style>
    <style:style style:name="P43" style:family="paragraph" style:parent-style-name="Standard">
      <style:paragraph-properties fo:margin-left="1in"/>
    </style:style>
    <style:style style:name="P44" style:family="paragraph" style:parent-style-name="Standard">
      <loext:graphic-properties draw:fill="solid" draw:fill-color="#f2f2f2"/>
      <style:paragraph-properties fo:margin-left="0.5in" fo:background-color="#f2f2f2" fo:padding="0.0835in" fo:border="0.51pt solid #ffffff" style:shadow="none"/>
    </style:style>
    <style:style style:name="P45" style:family="paragraph" style:parent-style-name="No_20_Spacing">
      <style:paragraph-properties fo:margin-left="0.5in"/>
      <style:text-properties style:font-name="Calibri" style:font-name-complex="Calibri1"/>
    </style:style>
    <style:style style:name="P46" style:family="paragraph" style:parent-style-name="Heading_20_2">
      <style:paragraph-properties fo:margin-left="0.3126in" fo:margin-top="0.1665in" fo:margin-bottom="0.0417in" style:contextual-spacing="false" fo:text-indent="-0.2992in" style:auto-text-indent="false">
        <style:tab-stops>
          <style:tab-stop style:position="0.3752in"/>
        </style:tab-stops>
      </style:paragraph-properties>
    </style:style>
    <style:style style:name="P47" style:family="paragraph" style:parent-style-name="List_20_Paragraph" style:list-style-name="WWNum41">
      <style:paragraph-properties fo:margin-top="0.1665in" fo:margin-bottom="0in" style:contextual-spacing="false" fo:line-height="100%"/>
    </style:style>
    <style:style style:name="P48" style:family="paragraph" style:parent-style-name="List_20_Paragraph">
      <style:paragraph-properties fo:margin-top="0.0835in" fo:margin-bottom="0in" style:contextual-spacing="false"/>
    </style:style>
    <style:style style:name="P49" style:family="paragraph" style:parent-style-name="Standard" style:list-style-name="WWNum28">
      <style:paragraph-properties fo:line-height="100%"/>
    </style:style>
    <style:style style:name="P50" style:family="paragraph" style:parent-style-name="Standard">
      <style:paragraph-properties fo:margin-left="0.25in"/>
      <style:text-properties fo:language="en" fo:country="GB"/>
    </style:style>
    <style:style style:name="P51" style:family="paragraph" style:parent-style-name="Standard" style:list-style-name="WWNum28">
      <style:paragraph-properties fo:margin-left="0.5in" fo:line-height="100%" fo:text-indent="-0.248in" style:auto-text-indent="false" fo:keep-with-next="always"/>
    </style:style>
    <style:style style:name="P52" style:family="paragraph" style:parent-style-name="Standard">
      <style:paragraph-properties fo:margin-left="0.252in"/>
    </style:style>
    <style:style style:name="P53" style:family="paragraph" style:parent-style-name="Standard">
      <style:paragraph-properties fo:margin-left="0.5in"/>
      <style:text-properties fo:language="en" fo:country="GB"/>
    </style:style>
    <style:style style:name="P54" style:family="paragraph" style:parent-style-name="Standard">
      <style:paragraph-properties fo:margin-left="0.5in" fo:keep-with-next="always"/>
      <style:text-properties fo:language="en" fo:country="GB"/>
    </style:style>
    <style:style style:name="P55" style:family="paragraph" style:parent-style-name="Standard">
      <style:paragraph-properties fo:margin-left="0.5in" fo:keep-with-next="always"/>
    </style:style>
    <style:style style:name="P56" style:family="paragraph" style:parent-style-name="Standard">
      <style:paragraph-properties fo:keep-with-next="always"/>
      <style:text-properties fo:language="en" fo:country="GB"/>
    </style:style>
    <style:style style:name="P57" style:family="paragraph" style:parent-style-name="Standard">
      <style:paragraph-properties fo:margin-left="0.4925in" fo:margin-top="0in" fo:margin-bottom="0.0835in" style:contextual-spacing="false" fo:keep-with-next="always"/>
    </style:style>
    <style:style style:name="P58" style:family="paragraph" style:parent-style-name="List_20_Paragraph" style:list-style-name="WWNum42">
      <style:paragraph-properties fo:line-height="100%" fo:keep-with-next="always"/>
    </style:style>
    <style:style style:name="P59" style:family="paragraph" style:parent-style-name="Standard">
      <style:paragraph-properties fo:margin-top="0.0835in" fo:margin-bottom="0.0835in" style:contextual-spacing="false"/>
    </style:style>
    <style:style style:name="P60" style:family="paragraph" style:parent-style-name="List_20_Paragraph" style:list-style-name="WWNum12"/>
    <style:style style:name="P61" style:family="paragraph" style:parent-style-name="Command_20_Line">
      <style:paragraph-properties fo:margin-left="0.5in" fo:margin-top="0.0835in" fo:margin-bottom="0.0835in" style:contextual-spacing="false"/>
    </style:style>
    <style:style style:name="P62" style:family="paragraph" style:parent-style-name="Standard">
      <style:paragraph-properties fo:line-height="100%"/>
    </style:style>
    <style:style style:name="P63" style:family="paragraph" style:parent-style-name="Standard">
      <style:paragraph-properties fo:margin-top="0in" fo:margin-bottom="0.3335in" style:contextual-spacing="false"/>
    </style:style>
    <style:style style:name="P64" style:family="paragraph" style:parent-style-name="Standard">
      <style:paragraph-properties fo:text-align="center" style:justify-single-word="false"/>
      <style:text-properties fo:language="en" fo:country="GB"/>
    </style:style>
    <style:style style:name="P65" style:family="paragraph" style:parent-style-name="Standard">
      <style:paragraph-properties fo:margin-top="0.0835in" fo:margin-bottom="0in" style:contextual-spacing="false" fo:keep-with-next="always"/>
    </style:style>
    <style:style style:name="P66" style:family="paragraph" style:parent-style-name="Standard" style:list-style-name="WWNum25">
      <style:paragraph-properties fo:margin-top="0.0835in" fo:margin-bottom="0in" style:contextual-spacing="false"/>
    </style:style>
    <style:style style:name="P67" style:family="paragraph" style:parent-style-name="List_20_Paragraph">
      <style:paragraph-properties fo:margin-left="0.25in" fo:margin-top="0.0835in" fo:margin-bottom="0in" style:contextual-spacing="true" fo:text-indent="0.25in" style:auto-text-indent="false" fo:keep-with-next="always"/>
    </style:style>
    <style:style style:name="P68" style:family="paragraph" style:parent-style-name="Standard" style:list-style-name="WWNum25">
      <style:paragraph-properties fo:margin-left="0.4957in" fo:margin-top="0.1665in" fo:margin-bottom="0in" style:contextual-spacing="false" fo:text-indent="-0.248in" style:auto-text-indent="false"/>
    </style:style>
    <style:style style:name="P69" style:family="paragraph" style:parent-style-name="Standard" style:list-style-name="WWNum25">
      <style:paragraph-properties fo:margin-left="0.4957in" fo:margin-top="0.0835in" fo:margin-bottom="0.0835in" style:contextual-spacing="false" fo:text-indent="-0.248in" style:auto-text-indent="false"/>
    </style:style>
    <style:style style:name="P70" style:family="paragraph" style:parent-style-name="Standard">
      <style:paragraph-properties fo:text-align="center" style:justify-single-word="false" fo:text-indent="0.5in" style:auto-text-indent="false"/>
    </style:style>
    <style:style style:name="P71" style:family="paragraph" style:parent-style-name="Standard">
      <style:paragraph-properties fo:text-indent="0.5in" style:auto-text-indent="false"/>
      <style:text-properties style:font-name="Calibri"/>
    </style:style>
    <style:style style:name="P72" style:family="paragraph" style:parent-style-name="Standard" style:list-style-name="WWNum25">
      <style:paragraph-properties fo:margin-top="0.0835in" fo:margin-bottom="0.0835in" style:contextual-spacing="false"/>
    </style:style>
    <style:style style:name="P73" style:family="paragraph" style:parent-style-name="Standard">
      <style:text-properties style:font-name="Calibri"/>
    </style:style>
    <style:style style:name="P74" style:family="paragraph" style:parent-style-name="Standard">
      <style:text-properties fo:color="#000000" loext:opacity="100%" style:font-name-complex="Calibri1" style:font-size-complex="12pt" fo:background-color="#ffffff">
        <loext:char-complex-color loext:theme-type="dark1" loext:color-type="theme"/>
      </style:text-properties>
    </style:style>
    <style:style style:name="P75" style:family="paragraph" style:parent-style-name="List_20_Paragraph" style:list-style-name="WWNum16">
      <style:paragraph-properties fo:margin-left="0.4925in" fo:margin-top="0.0835in" fo:margin-bottom="0in" style:contextual-spacing="false" fo:text-indent="-0.2445in" style:auto-text-indent="false"/>
    </style:style>
    <style:style style:name="P76" style:family="paragraph" style:parent-style-name="List_20_Paragraph" style:list-style-name="WWNum16">
      <style:paragraph-properties fo:margin-left="0.5in" fo:margin-top="0.0835in" fo:margin-bottom="0in" style:contextual-spacing="false" fo:text-indent="0.248in" style:auto-text-indent="false"/>
    </style:style>
    <style:style style:name="P77" style:family="paragraph" style:parent-style-name="Standard">
      <style:paragraph-properties fo:margin-top="0.0835in" fo:margin-bottom="0in" style:contextual-spacing="false" fo:text-align="center" style:justify-single-word="false"/>
    </style:style>
    <style:style style:name="P78" style:family="paragraph" style:parent-style-name="Standard">
      <style:text-properties style:font-name="Calibri" style:language-asian="fr" style:country-asian="FR"/>
    </style:style>
    <style:style style:name="P79" style:family="paragraph" style:parent-style-name="List_20_Paragraph" style:list-style-name="WWNum37">
      <style:paragraph-properties fo:margin-top="0.0835in" fo:margin-bottom="0in" style:contextual-spacing="false"/>
    </style:style>
    <style:style style:name="P80" style:family="paragraph" style:parent-style-name="List_20_Paragraph" style:list-style-name="WWNum37">
      <style:paragraph-properties fo:margin-left="0.5in" fo:margin-top="0.0835in" fo:margin-bottom="0in" style:contextual-spacing="false" fo:text-indent="0.248in" style:auto-text-indent="false"/>
    </style:style>
    <style:style style:name="P81" style:family="paragraph" style:parent-style-name="Heading_20_2">
      <style:paragraph-properties fo:margin-left="0.3937in" fo:margin-top="0in" fo:margin-bottom="0.0417in" style:contextual-spacing="false" fo:text-indent="-0.3937in" style:auto-text-indent="false" fo:break-before="page"/>
    </style:style>
    <style:style style:name="P82" style:family="paragraph" style:parent-style-name="Standard">
      <style:paragraph-properties fo:keep-together="always" fo:keep-with-next="always"/>
    </style:style>
    <style:style style:name="P83" style:family="paragraph" style:parent-style-name="Standard">
      <style:paragraph-properties fo:margin-top="0in" fo:margin-bottom="0in" style:contextual-spacing="true"/>
      <style:text-properties style:font-name-complex="Calibri1" style:font-size-complex="12pt"/>
    </style:style>
    <style:style style:name="P84" style:family="paragraph" style:parent-style-name="Standard" style:list-style-name="WWNum13">
      <style:paragraph-properties fo:margin-left="0.4957in" fo:margin-top="0.0835in" fo:margin-bottom="0in" style:contextual-spacing="false" fo:text-indent="-0.248in" style:auto-text-indent="false"/>
    </style:style>
    <style:style style:name="P85" style:family="paragraph" style:parent-style-name="Standard">
      <style:paragraph-properties fo:margin-top="0.0835in" fo:margin-bottom="0in" style:contextual-spacing="false" fo:keep-together="always" fo:keep-with-next="always"/>
    </style:style>
    <style:style style:name="P86" style:family="paragraph" style:parent-style-name="Standard">
      <style:paragraph-properties fo:margin-top="0.1665in" fo:margin-bottom="0in" style:contextual-spacing="false"/>
    </style:style>
    <style:style style:name="P87" style:family="paragraph" style:parent-style-name="Standard" style:list-style-name="WWNum1">
      <style:paragraph-properties fo:margin-left="0.4957in" fo:margin-top="0.0835in" fo:margin-bottom="0in" style:contextual-spacing="false" fo:text-indent="-0.248in" style:auto-text-indent="false"/>
    </style:style>
    <style:style style:name="P88" style:family="paragraph" style:parent-style-name="Standard">
      <style:paragraph-properties fo:margin-left="0.4957in" fo:margin-top="0.0835in" fo:margin-bottom="0in" style:contextual-spacing="false"/>
    </style:style>
    <style:style style:name="P89" style:family="paragraph" style:parent-style-name="No_20_Spacing">
      <style:paragraph-properties fo:keep-together="always" fo:keep-with-next="always"/>
    </style:style>
    <style:style style:name="P90" style:family="paragraph" style:parent-style-name="No_20_Spacing" style:list-style-name="WWNum40">
      <style:paragraph-properties fo:keep-together="always" fo:keep-with-next="always"/>
    </style:style>
    <style:style style:name="P91" style:family="paragraph" style:parent-style-name="Standard">
      <style:paragraph-properties fo:margin-top="0.1665in" fo:margin-bottom="0in" style:contextual-spacing="false" fo:keep-together="always" fo:keep-with-next="always"/>
    </style:style>
    <style:style style:name="P92" style:family="paragraph" style:parent-style-name="Standard" style:list-style-name="WWNum14">
      <style:paragraph-properties fo:margin-top="0.0835in" fo:margin-bottom="0in" style:contextual-spacing="false"/>
    </style:style>
    <style:style style:name="P93" style:family="paragraph" style:parent-style-name="Standard">
      <style:paragraph-properties fo:keep-with-next="always"/>
    </style:style>
    <style:style style:name="P94" style:family="paragraph" style:parent-style-name="Standard" style:list-style-name="WWNum17">
      <style:paragraph-properties fo:margin-top="0.0835in" fo:margin-bottom="0in" style:contextual-spacing="false"/>
    </style:style>
    <style:style style:name="P95" style:family="paragraph" style:parent-style-name="Standard">
      <style:paragraph-properties fo:margin-left="0.5in" fo:margin-top="0.0835in" fo:margin-bottom="0in" style:contextual-spacing="false"/>
    </style:style>
    <style:style style:name="P96" style:family="paragraph" style:parent-style-name="Standard">
      <style:paragraph-properties fo:keep-with-next="always"/>
      <style:text-properties style:font-name-complex="Calibri1" style:font-size-complex="12pt"/>
    </style:style>
    <style:style style:name="P97" style:family="paragraph" style:parent-style-name="Standard" style:list-style-name="WWNum18">
      <style:paragraph-properties fo:margin-top="0.0835in" fo:margin-bottom="0in" style:contextual-spacing="false"/>
    </style:style>
    <style:style style:name="P98" style:family="paragraph" style:parent-style-name="Standard">
      <style:paragraph-properties fo:margin-top="0.3335in" fo:margin-bottom="0in" style:contextual-spacing="false"/>
    </style:style>
    <style:style style:name="P99" style:family="paragraph" style:parent-style-name="Standard">
      <style:paragraph-properties fo:margin-top="0.0835in" fo:margin-bottom="0in" style:contextual-spacing="false" fo:text-align="justify" style:justify-single-word="false"/>
    </style:style>
    <style:style style:name="P100" style:family="paragraph" style:parent-style-name="Standard">
      <style:text-properties style:language-asian="fr" style:country-asian="FR"/>
    </style:style>
    <style:style style:name="P101" style:family="paragraph" style:parent-style-name="Standard">
      <style:paragraph-properties fo:margin-left="0.4957in" fo:margin-top="0.0835in" fo:margin-bottom="0in" style:contextual-spacing="false"/>
      <style:text-properties style:font-name-complex="Calibri1" style:font-size-complex="12pt"/>
    </style:style>
    <style:style style:name="P102" style:family="paragraph" style:parent-style-name="Standard">
      <style:paragraph-properties fo:margin-top="0in" fo:margin-bottom="0in" style:contextual-spacing="false" fo:break-before="page"/>
      <style:text-properties style:language-asian="fr" style:country-asian="FR"/>
    </style:style>
    <style:style style:name="P103" style:family="paragraph" style:parent-style-name="Standard">
      <style:paragraph-properties fo:margin-left="0.248in" fo:margin-top="0.1665in" fo:margin-bottom="0in" style:contextual-spacing="false" fo:text-indent="0.248in" style:auto-text-indent="false"/>
    </style:style>
    <style:style style:name="P104" style:family="paragraph" style:parent-style-name="Standard">
      <style:paragraph-properties fo:margin-left="0.4957in" fo:margin-top="0.1665in" fo:margin-bottom="0in" style:contextual-spacing="false"/>
    </style:style>
    <style:style style:name="P105" style:family="paragraph" style:parent-style-name="Standard">
      <style:paragraph-properties fo:margin-left="0.5in" fo:margin-top="0.1665in" fo:margin-bottom="0in" style:contextual-spacing="false" fo:keep-together="always" fo:keep-with-next="always"/>
    </style:style>
    <style:style style:name="P106" style:family="paragraph" style:parent-style-name="Standard">
      <style:paragraph-properties fo:margin-left="0.5in" fo:margin-top="0.1665in" fo:margin-bottom="0in" style:contextual-spacing="false" fo:keep-together="always" fo:keep-with-next="always"/>
      <style:text-properties style:font-name-complex="Calibri1" style:font-size-complex="12pt"/>
    </style:style>
    <style:style style:name="P107" style:family="paragraph" style:parent-style-name="Standard" style:list-style-name="WWNum22">
      <style:paragraph-properties fo:margin-top="0.0835in" fo:margin-bottom="0in" style:contextual-spacing="false"/>
    </style:style>
    <style:style style:name="P108" style:family="paragraph" style:parent-style-name="Standard">
      <style:paragraph-properties fo:text-indent="0.5in" style:auto-text-indent="false"/>
    </style:style>
    <style:style style:name="P109" style:family="paragraph" style:parent-style-name="Standard" style:list-style-name="WWNum22">
      <style:paragraph-properties fo:margin-left="0.4957in" fo:margin-top="0.1665in" fo:margin-bottom="0in" style:contextual-spacing="false" fo:text-indent="-0.248in" style:auto-text-indent="false"/>
    </style:style>
    <style:style style:name="P110" style:family="paragraph" style:parent-style-name="Standard" style:list-style-name="WWNum22">
      <style:paragraph-properties fo:margin-left="0.4957in" fo:margin-top="0in" fo:margin-bottom="0.0835in" style:contextual-spacing="false" fo:text-indent="-0.248in" style:auto-text-indent="false" fo:break-before="page"/>
    </style:style>
    <style:style style:name="P111" style:family="paragraph" style:parent-style-name="Standard" style:list-style-name="WWNum22">
      <style:paragraph-properties fo:margin-left="0.4957in" fo:margin-top="0.1665in" fo:margin-bottom="0.1665in" style:contextual-spacing="false" fo:text-indent="-0.248in" style:auto-text-indent="false"/>
    </style:style>
    <style:style style:name="P112" style:family="paragraph" style:parent-style-name="Heading_20_1" style:list-style-name="">
      <style:paragraph-properties fo:margin-left="0in" fo:text-indent="0in" style:auto-text-indent="false"/>
    </style:style>
    <style:style style:name="P113" style:family="paragraph" style:parent-style-name="No_20_Spacing" style:list-style-name="WWNum23"/>
    <style:style style:name="P114" style:family="paragraph" style:parent-style-name="No_20_Spacing">
      <style:paragraph-properties fo:margin-left="0.5in" fo:margin-top="0.0835in" fo:margin-bottom="0in" style:contextual-spacing="false"/>
    </style:style>
    <style:style style:name="P115" style:family="paragraph" style:parent-style-name="No_20_Spacing" style:list-style-name="WWNum23">
      <style:paragraph-properties fo:margin-left="0.4957in" fo:margin-top="0.25in" fo:margin-bottom="0in" style:contextual-spacing="false" fo:text-indent="-0.248in" style:auto-text-indent="false"/>
    </style:style>
    <style:style style:name="P116" style:family="paragraph" style:parent-style-name="No_20_Spacing" style:list-style-name="WWNum24">
      <style:paragraph-properties fo:margin-left="0.4957in" fo:margin-top="0.1665in" fo:margin-bottom="0in" style:contextual-spacing="false" fo:text-indent="-0.248in" style:auto-text-indent="false"/>
    </style:style>
    <style:style style:name="P117" style:family="paragraph" style:parent-style-name="No_20_Spacing" style:list-style-name="WWNum24">
      <style:paragraph-properties fo:margin-top="0.1665in" fo:margin-bottom="0in" style:contextual-spacing="false"/>
    </style:style>
    <style:style style:name="P118" style:family="paragraph" style:parent-style-name="No_20_Spacing" style:list-style-name="WWNum24">
      <style:paragraph-properties fo:margin-left="0.4957in" fo:margin-top="0.0835in" fo:margin-bottom="0in" style:contextual-spacing="false" fo:text-indent="-0.248in" style:auto-text-indent="false"/>
    </style:style>
    <style:style style:name="P119" style:family="paragraph" style:parent-style-name="Standard">
      <style:text-properties fo:language="en" fo:country="GB" style:language-asian="fr" style:country-asian="FR"/>
    </style:style>
    <style:style style:name="P120" style:family="paragraph" style:parent-style-name="List_20_Paragraph" style:list-style-name="WWNum9">
      <style:paragraph-properties fo:margin-left="0.5in" fo:margin-top="0.0835in" fo:margin-bottom="0in" style:contextual-spacing="false" fo:text-indent="0.248in" style:auto-text-indent="false"/>
    </style:style>
    <style:style style:name="P121" style:family="paragraph" style:parent-style-name="List_20_Paragraph" style:list-style-name="WWNum9"/>
    <style:style style:name="P122" style:family="paragraph" style:parent-style-name="List_20_Paragraph">
      <style:paragraph-properties fo:margin-left="0.25in"/>
      <style:text-properties style:font-name-complex="Calibri1" style:font-size-complex="12pt"/>
    </style:style>
    <style:style style:name="P123" style:family="paragraph" style:parent-style-name="Standard">
      <style:paragraph-properties fo:margin-top="0.25in" fo:margin-bottom="0.0835in" style:contextual-spacing="false"/>
    </style:style>
    <style:style style:name="P124" style:family="paragraph" style:parent-style-name="Standard">
      <style:paragraph-properties fo:margin-top="0.1665in" fo:margin-bottom="0.0835in" style:contextual-spacing="false"/>
    </style:style>
    <style:style style:name="P125" style:family="paragraph" style:parent-style-name="Standard">
      <style:paragraph-properties fo:margin-top="0.1665in" fo:margin-bottom="0.1665in" style:contextual-spacing="false"/>
    </style:style>
    <style:style style:name="P126" style:family="paragraph" style:parent-style-name="Standard">
      <style:paragraph-properties fo:margin-top="0in" fo:margin-bottom="0.0835in" style:contextual-spacing="false" fo:break-before="page"/>
    </style:style>
    <style:style style:name="P127" style:family="paragraph" style:parent-style-name="Standard">
      <style:paragraph-properties fo:line-height="100%" fo:text-align="center" style:justify-single-word="false"/>
    </style:style>
    <style:style style:name="P128" style:family="paragraph" style:parent-style-name="Standard">
      <style:paragraph-properties fo:line-height="100%"/>
      <style:text-properties style:font-name="Courier New" fo:font-size="10pt" style:font-size-asian="10pt" style:font-name-complex="Courier New1"/>
    </style:style>
    <style:style style:name="P129" style:family="paragraph" style:parent-style-name="Standard">
      <style:paragraph-properties fo:line-height="100%"/>
      <style:text-properties style:font-name="Calibri" style:font-name-complex="Calibri1"/>
    </style:style>
    <style:style style:name="P130" style:family="paragraph" style:parent-style-name="Standard">
      <style:paragraph-properties fo:margin-top="0.1665in" fo:margin-bottom="0.0417in" style:contextual-spacing="false" fo:line-height="100%" fo:keep-with-next="always"/>
    </style:style>
    <style:style style:name="P131" style:family="paragraph" style:parent-style-name="Standard">
      <style:paragraph-properties fo:margin-left="0.3902in" fo:margin-top="0.25in" fo:margin-bottom="0.0417in" style:contextual-spacing="false" fo:line-height="100%" fo:text-indent="-0.3902in" style:auto-text-indent="false" fo:keep-with-next="always">
        <style:tab-stops>
          <style:tab-stop style:position="0.3937in"/>
        </style:tab-stops>
      </style:paragraph-properties>
    </style:style>
    <style:style style:name="P132" style:family="paragraph" style:parent-style-name="Standard">
      <style:text-properties style:font-size-complex="12pt"/>
    </style:style>
    <style:style style:name="P133" style:family="paragraph" style:parent-style-name="Standard">
      <style:paragraph-properties fo:keep-together="always" fo:keep-with-next="always"/>
      <style:text-properties style:font-name-complex="Calibri1" style:font-size-complex="12pt"/>
    </style:style>
    <style:style style:name="P134" style:family="paragraph" style:parent-style-name="Standard">
      <style:paragraph-properties fo:keep-together="always" fo:keep-with-next="always"/>
      <style:text-properties style:font-size-complex="12pt"/>
    </style:style>
    <style:style style:name="P135" style:family="paragraph" style:parent-style-name="Standard">
      <style:paragraph-properties fo:keep-together="always" fo:keep-with-next="always"/>
      <style:text-properties style:font-name="Calibri"/>
    </style:style>
    <style:style style:name="P136" style:family="paragraph" style:parent-style-name="Standard">
      <style:text-properties style:use-window-font-color="true" loext:opacity="0%" fo:font-size="14pt" fo:font-weight="bold" style:font-name-asian="Times New Roman1" style:font-size-asian="14pt" style:language-asian="fr" style:country-asian="FR" style:font-weight-asian="bold" style:font-size-complex="14pt" style:font-style-complex="italic" style:font-weight-complex="bold"/>
    </style:style>
    <style:style style:name="P137" style:family="paragraph" style:parent-style-name="Standard">
      <style:paragraph-properties fo:margin-left="0.3902in" fo:margin-top="0in" fo:margin-bottom="0.0417in" style:contextual-spacing="false" fo:line-height="100%" fo:text-indent="-0.3902in" style:auto-text-indent="false" fo:break-before="page" fo:keep-with-next="always">
        <style:tab-stops>
          <style:tab-stop style:position="0.3937in"/>
        </style:tab-stops>
      </style:paragraph-properties>
    </style:style>
    <style:style style:name="P138" style:family="paragraph" style:parent-style-name="Standard">
      <style:paragraph-properties fo:keep-together="always" fo:keep-with-next="always"/>
      <style:text-properties style:font-name="Calibri" style:language-asian="fr" style:country-asian="FR"/>
    </style:style>
    <style:style style:name="P139" style:family="paragraph" style:parent-style-name="Standard">
      <style:paragraph-properties fo:margin-left="0.3937in"/>
    </style:style>
    <style:style style:name="T1" style:family="text">
      <style:text-properties style:font-name="Calibri" fo:font-size="24pt" fo:language="en" fo:country="GB" fo:font-weight="bold" style:font-size-asian="24pt" style:font-weight-asian="bold" style:font-size-complex="24pt"/>
    </style:style>
    <style:style style:name="T2" style:family="text">
      <style:text-properties style:font-name="Calibri" fo:font-size="36pt" fo:language="en" fo:country="GB" fo:font-weight="bold" style:font-size-asian="36pt" style:font-weight-asian="bold" style:font-name-complex="Calibri1" style:font-size-complex="20pt"/>
    </style:style>
    <style:style style:name="T3" style:family="text">
      <style:text-properties style:font-name="Calibri" fo:language="en" fo:country="GB" fo:font-style="italic" style:font-style-asian="italic" style:font-name-complex="Calibri1"/>
    </style:style>
    <style:style style:name="T4" style:family="text">
      <style:text-properties style:font-name="Calibri"/>
    </style:style>
    <style:style style:name="T5" style:family="text">
      <style:text-properties style:font-name="Calibri" fo:font-size="16pt" fo:font-weight="bold" style:font-size-asian="16pt" style:font-weight-asian="bold"/>
    </style:style>
    <style:style style:name="T6" style:family="text">
      <style:text-properties style:font-name="Calibri" fo:language="en" fo:country="GB"/>
    </style:style>
    <style:style style:name="T7" style:family="text">
      <style:text-properties style:font-name="Calibri" fo:font-size="16pt" fo:language="en" fo:country="GB" style:font-size-asian="16pt"/>
    </style:style>
    <style:style style:name="T8" style:family="text">
      <style:text-properties style:font-name="Calibri" fo:language="en" fo:country="GB" fo:font-style="italic" style:font-style-asian="italic"/>
    </style:style>
    <style:style style:name="T9" style:family="text">
      <style:text-properties style:font-name="Calibri" style:font-name-complex="Calibri1"/>
    </style:style>
    <style:style style:name="T10" style:family="text">
      <style:text-properties style:use-window-font-color="true" loext:opacity="0%" fo:font-weight="normal" style:letter-kerning="true" style:font-name-asian="新細明體" style:font-weight-asian="normal" style:font-name-complex="Arial1" style:font-size-complex="12pt"/>
    </style:style>
    <style:style style:name="T11" style:family="text">
      <style:text-properties style:font-name-complex="Times New Roman1"/>
    </style:style>
    <style:style style:name="T12" style:family="text">
      <style:text-properties text:display="true"/>
    </style:style>
    <style:style style:name="T13" style:family="text">
      <style:text-properties style:use-window-font-color="true" loext:opacity="0%" style:letter-kerning="true" style:font-name-asian="新細明體" style:font-name-complex="Arial1" style:font-size-complex="12pt"/>
    </style:style>
    <style:style style:name="T14" style:family="text">
      <style:text-properties fo:language="en" fo:country="GB"/>
    </style:style>
    <style:style style:name="T15" style:family="text">
      <style:text-properties style:use-window-font-color="true" loext:opacity="0%" style:font-name="Calibri" style:letter-kerning="true" style:font-name-asian="新細明體" style:font-name-complex="Arial1" style:font-size-complex="12pt"/>
    </style:style>
    <style:style style:name="T16" style:family="text">
      <style:text-properties fo:language="en" fo:country="GB" style:font-name-complex="Times New Roman1"/>
    </style:style>
    <style:style style:name="T17" style:family="text">
      <style:text-properties fo:language="en" fo:country="GB" style:letter-kerning="true" style:font-name-asian="Times New Roman1" style:language-asian="fr" style:country-asian="FR" style:font-name-complex="Times New Roman1" style:font-weight-complex="bold"/>
    </style:style>
    <style:style style:name="T18" style:family="text">
      <style:text-properties fo:language="en" fo:country="GB" style:letter-kerning="true" style:font-name-asian="Times New Roman1" style:language-asian="fr" style:country-asian="FR" style:font-weight-complex="bold"/>
    </style:style>
    <style:style style:name="T19" style:family="text">
      <style:text-properties fo:font-weight="bold" style:font-name-asian="Times New Roman1" style:language-asian="fr" style:country-asian="FR" style:font-weight-asian="bold" style:font-style-complex="italic" style:font-weight-complex="bold"/>
    </style:style>
    <style:style style:name="T20" style:family="text">
      <style:text-properties style:font-name-complex="Calibri1" style:font-size-complex="12pt"/>
    </style:style>
    <style:style style:name="T21" style:family="text">
      <style:text-properties fo:font-size="12pt" fo:font-weight="bold" style:font-size-asian="12pt" style:font-weight-asian="bold" style:font-name-complex="Calibri1" style:font-size-complex="12pt"/>
    </style:style>
    <style:style style:name="T22" style:family="text">
      <style:text-properties fo:font-size="12pt" style:font-size-asian="12pt" style:font-name-complex="Calibri1" style:font-size-complex="12pt"/>
    </style:style>
    <style:style style:name="T23" style:family="text">
      <style:text-properties fo:font-family="Wingdings" style:font-family-generic="swiss" style:font-pitch="variable" style:font-charset="x-symbol" fo:font-size="12pt" style:font-family-asian="Wingdings" style:font-family-generic-asian="system" style:font-pitch-asian="variable" style:font-size-asian="12pt" style:font-family-complex="Wingdings" style:font-family-generic-complex="system" style:font-pitch-complex="variable" style:font-size-complex="12pt"/>
    </style:style>
    <style:style style:name="T24" style:family="text">
      <style:text-properties fo:font-family="Wingdings" style:font-family-generic="swiss" style:font-pitch="variable" style:font-charset="x-symbol" fo:font-size="12pt" style:font-family-asian="Wingdings" style:font-family-generic-asian="system" style:font-pitch-asian="variable" style:font-size-asian="12pt" style:font-name-complex="Calibri1" style:font-size-complex="12pt"/>
    </style:style>
    <style:style style:name="T25" style:family="text">
      <style:text-properties fo:language="en" fo:country="GB" style:language-asian="fr" style:country-asian="FR"/>
    </style:style>
    <style:style style:name="T26" style:family="text">
      <style:text-properties fo:font-weight="bold" style:font-weight-asian="bold" style:font-name-complex="Calibri1" style:font-size-complex="12pt" style:font-weight-complex="bold"/>
    </style:style>
    <style:style style:name="T27" style:family="text">
      <style:text-properties style:font-name="Calibri" fo:language="en" fo:country="GB" style:language-asian="fr" style:country-asian="FR"/>
    </style:style>
    <style:style style:name="T28" style:family="text">
      <style:text-properties style:font-name="Calibri" style:font-name-complex="Calibri1" style:font-size-complex="12pt"/>
    </style:style>
    <style:style style:name="T29" style:family="text">
      <style:text-properties fo:language="en" fo:country="GB" fo:font-weight="bold" style:font-weight-asian="bold" style:font-weight-complex="bold"/>
    </style:style>
    <style:style style:name="T30" style:family="text">
      <style:text-properties fo:font-size="7pt" fo:language="en" fo:country="GB" style:font-size-asian="7pt"/>
    </style:style>
    <style:style style:name="T31" style:family="text">
      <style:text-properties fo:language="en" fo:country="GB" style:text-underline-style="solid" style:text-underline-width="auto" style:text-underline-color="font-color" fo:font-weight="bold" style:font-weight-asian="bold" style:font-weight-complex="bold"/>
    </style:style>
    <style:style style:name="T32" style:family="text">
      <style:text-properties fo:language="en" fo:country="GB" style:text-underline-style="solid" style:text-underline-width="auto" style:text-underline-color="font-color" fo:font-weight="bold" style:font-weight-asian="bold"/>
    </style:style>
    <style:style style:name="T33" style:family="text">
      <style:text-properties fo:language="en" fo:country="GB" fo:font-weight="bold" style:font-weight-asian="bold"/>
    </style:style>
    <style:style style:name="T34" style:family="text">
      <style:text-properties fo:font-family="Wingdings" style:font-family-generic="swiss" style:font-pitch="variable" fo:language="en" fo:country="GB" style:font-family-asian="Wingdings" style:font-family-generic-asian="system" style:font-pitch-asian="variable" style:font-family-complex="Wingdings" style:font-family-generic-complex="system" style:font-pitch-complex="variable"/>
    </style:style>
    <style:style style:name="T35" style:family="text">
      <style:text-properties fo:language="en" fo:country="GB" fo:font-style="italic" fo:font-weight="bold" style:font-style-asian="italic" style:font-weight-asian="bold" style:font-style-complex="italic"/>
    </style:style>
    <style:style style:name="T36" style:family="text">
      <style:text-properties fo:font-weight="bold" style:font-weight-asian="bold"/>
    </style:style>
    <style:style style:name="T37" style:family="text">
      <style:text-properties fo:language="en" fo:country="GB" style:text-underline-style="solid" style:text-underline-width="auto" style:text-underline-color="font-color"/>
    </style:style>
    <style:style style:name="T38" style:family="text">
      <style:text-properties fo:font-size="10pt" fo:language="en" fo:country="GB" fo:font-weight="bold" style:font-size-asian="10pt" style:font-weight-asian="bold"/>
    </style:style>
    <style:style style:name="T39" style:family="text">
      <style:text-properties fo:font-size="10pt" fo:language="en" fo:country="GB" style:font-size-asian="10pt"/>
    </style:style>
    <style:style style:name="T40" style:family="text">
      <style:text-properties style:font-name-complex="Calibri1"/>
    </style:style>
    <style:style style:name="T41" style:family="text">
      <style:text-properties fo:font-weight="bold" style:font-weight-asian="bold" style:font-name-complex="Calibri1"/>
    </style:style>
    <style:style style:name="T42" style:family="text">
      <style:text-properties style:font-name-complex="Calibri1" style:font-size-complex="12pt" fo:background-color="#ffffff"/>
    </style:style>
    <style:style style:name="T43" style:family="text">
      <style:text-properties style:font-name="Calibri" style:language-asian="fr" style:country-asian="FR"/>
    </style:style>
    <style:style style:name="T44" style:family="text">
      <style:text-properties fo:color="#333333" loext:opacity="100%" style:font-name="Courier New" fo:font-size="10pt" fo:background-color="#f8f8f8" loext:char-shading-value="0" style:font-name-asian="Times New Roman1" style:font-size-asian="10pt" style:language-asian="zh" style:country-asian="TW" style:font-name-complex="Courier New1" style:font-size-complex="10.5pt"/>
    </style:style>
    <style:style style:name="T45" style:family="text">
      <style:text-properties fo:color="#333333" loext:opacity="100%" style:font-name="Courier New" fo:font-size="10pt" style:font-name-asian="Times New Roman1" style:font-size-asian="10pt" style:language-asian="zh" style:country-asian="TW" style:font-name-complex="Courier New1" style:font-size-complex="10.5pt" style:font-weight-complex="bold"/>
    </style:style>
    <style:style style:name="T46" style:family="text">
      <style:text-properties style:use-window-font-color="true" loext:opacity="0%" style:font-name="Times New Roman" style:font-name-asian="Times New Roman1" style:language-asian="zh" style:country-asian="TW" style:font-name-complex="Times New Roman1" style:font-size-complex="12pt"/>
    </style:style>
    <style:style style:name="T47" style:family="text">
      <style:text-properties style:font-name="Courier New" style:font-name-complex="Courier New1" style:font-size-complex="12pt"/>
    </style:style>
    <style:style style:name="T48" style:family="text">
      <style:text-properties fo:font-weight="bold" style:font-weight-asian="bold" style:font-name-complex="Calibri1" style:font-size-complex="12pt"/>
    </style:style>
    <style:style style:name="T49" style:family="text">
      <style:text-properties fo:color="#333333" loext:opacity="100%" style:font-name-complex="Calibri1" style:font-size-complex="12pt" fo:background-color="#ffffff"/>
    </style:style>
    <style:style style:name="T50" style:family="text">
      <style:text-properties fo:color="#000000" loext:opacity="100%" style:font-name-complex="Calibri1" style:font-size-complex="12pt" fo:background-color="#ffffff">
        <loext:char-complex-color loext:theme-type="dark1" loext:color-type="theme"/>
      </style:text-properties>
    </style:style>
    <style:style style:name="T51" style:family="text">
      <style:text-properties fo:color="#000000" loext:opacity="100%" style:font-name-complex="Calibri1" style:font-size-complex="12pt">
        <loext:char-complex-color loext:theme-type="dark1" loext:color-type="theme"/>
      </style:text-properties>
    </style:style>
    <style:style style:name="T52" style:family="text">
      <style:text-properties style:font-name="Calibri" fo:font-weight="bold" style:language-asian="fr" style:country-asian="FR" style:font-weight-asian="bold"/>
    </style:style>
    <style:style style:name="T53" style:family="text">
      <style:text-properties fo:font-family="Wingdings" style:font-family-generic="swiss" style:font-pitch="variable" style:font-charset="x-symbol" fo:font-size="10pt" style:font-family-asian="Wingdings" style:font-family-generic-asian="system" style:font-pitch-asian="variable" style:font-size-asian="10pt" style:font-family-complex="Wingdings" style:font-family-generic-complex="system" style:font-pitch-complex="variable"/>
    </style:style>
    <style:style style:name="T54" style:family="text">
      <style:text-properties fo:color="#1155cc" loext:opacity="100%" style:text-underline-style="solid" style:text-underline-width="auto" style:text-underline-color="font-color" style:font-name-complex="Calibri1" style:font-size-complex="12pt"/>
    </style:style>
    <style:style style:name="T55" style:family="text">
      <style:text-properties style:language-asian="fr" style:country-asian="FR"/>
    </style:style>
    <style:style style:name="T56" style:family="text">
      <style:text-properties style:text-underline-style="solid" style:text-underline-width="auto" style:text-underline-color="font-color" style:font-name-complex="Calibri1" style:font-size-complex="12pt"/>
    </style:style>
    <style:style style:name="T57" style:family="text">
      <style:text-properties fo:font-size="10pt" style:font-size-asian="10pt"/>
    </style:style>
    <style:style style:name="T58" style:family="text">
      <style:text-properties fo:font-style="italic" style:language-asian="fr" style:country-asian="FR" style:font-style-asian="italic" style:font-style-complex="italic"/>
    </style:style>
    <style:style style:name="T59" style:family="text">
      <style:text-properties fo:language="en" fo:country="GB" fo:font-style="italic" style:font-style-asian="italic" style:font-style-complex="italic"/>
    </style:style>
    <style:style style:name="T60" style:family="text">
      <style:text-properties fo:font-style="italic" fo:font-weight="bold" style:font-style-asian="italic" style:font-weight-asian="bold" style:font-name-complex="Calibri1" style:font-size-complex="12pt" style:font-style-complex="italic" style:font-weight-complex="bold"/>
    </style:style>
    <style:style style:name="T61" style:family="text">
      <style:text-properties fo:font-style="italic" style:font-style-asian="italic" style:font-name-complex="Calibri1" style:font-size-complex="12pt" style:font-style-complex="italic"/>
    </style:style>
    <style:style style:name="T62" style:family="text">
      <style:text-properties fo:font-style="italic" fo:font-weight="bold" style:font-style-asian="italic" style:font-weight-asian="bold" style:font-name-complex="Calibri1" style:font-size-complex="12pt"/>
    </style:style>
    <style:style style:name="T63" style:family="text">
      <style:text-properties fo:font-style="italic" style:font-style-asian="italic" style:font-name-complex="Calibri1" style:font-size-complex="12pt"/>
    </style:style>
    <style:style style:name="T64" style:family="text">
      <style:text-properties fo:font-style="italic" style:font-style-asian="italic"/>
    </style:style>
    <style:style style:name="T65" style:family="text">
      <style:text-properties fo:language="en" fo:country="GB" fo:font-weight="bold" style:language-asian="fr" style:country-asian="FR" style:font-weight-asian="bold"/>
    </style:style>
    <style:style style:name="T66" style:family="text">
      <style:text-properties fo:language="en" fo:country="GB" fo:font-weight="bold" style:language-asian="fr" style:country-asian="FR" style:font-weight-asian="bold" style:font-weight-complex="bold"/>
    </style:style>
    <style:style style:name="T67" style:family="text">
      <style:text-properties fo:language="en" fo:country="GB" fo:font-style="italic" style:language-asian="fr" style:country-asian="FR" style:font-style-asian="italic" style:font-style-complex="italic"/>
    </style:style>
    <style:style style:name="T68" style:family="text">
      <style:text-properties style:font-name="Calibri" fo:font-weight="bold" style:font-weight-asian="bold" style:font-name-complex="Calibri1" style:font-size-complex="12pt"/>
    </style:style>
    <style:style style:name="T69" style:family="text">
      <style:text-properties style:font-name="Courier New" fo:font-size="10pt" style:font-size-asian="10pt" style:font-name-complex="Courier New1"/>
    </style:style>
    <style:style style:name="T70" style:family="text">
      <style:text-properties style:font-name="Courier New" fo:font-size="10pt" style:font-name-asian="Courier New1" style:font-size-asian="10pt" style:font-name-complex="Courier New1"/>
    </style:style>
    <style:style style:name="T71" style:family="text">
      <style:text-properties fo:color="#2a00ff" loext:opacity="100%" style:font-name="Calibri" fo:font-size="10pt" style:font-size-asian="10pt" style:font-size-complex="10pt"/>
    </style:style>
    <style:style style:name="T72" style:family="text">
      <style:text-properties style:font-name="Calibri" fo:font-weight="bold" style:font-weight-asian="bold"/>
    </style:style>
    <style:style style:name="T73" style:family="text">
      <style:text-properties style:font-name="Courier New" fo:font-size="9pt" style:font-name-asian="Courier New1" style:font-size-asian="9pt" style:font-name-complex="Courier New1" style:font-size-complex="9pt"/>
    </style:style>
    <style:style style:name="T74" style:family="text">
      <style:text-properties style:use-window-font-color="true" loext:opacity="0%" fo:font-size="16pt" fo:language="en" fo:country="GB" fo:font-weight="bold" style:letter-kerning="true" style:font-name-asian="Times New Roman1" style:font-size-asian="16pt" style:language-asian="fr" style:country-asian="FR" style:font-weight-asian="bold" style:font-size-complex="16pt" style:font-weight-complex="bold"/>
    </style:style>
    <style:style style:name="T75" style:family="text">
      <style:text-properties style:font-size-complex="12pt"/>
    </style:style>
    <style:style style:name="T76" style:family="text">
      <style:text-properties style:font-name="Calibri" style:font-name-complex="Arial1"/>
    </style:style>
    <style:style style:name="T77" style:family="text">
      <style:text-properties style:font-name="Calibri" fo:font-style="italic" style:font-style-asian="italic" style:font-name-complex="Arial1" style:font-style-complex="italic"/>
    </style:style>
    <style:style style:name="T78" style:family="text">
      <style:text-properties style:use-window-font-color="true" loext:opacity="0%" fo:font-size="14pt" fo:font-weight="bold" style:font-name-asian="Times New Roman1" style:font-size-asian="14pt" style:language-asian="fr" style:country-asian="FR" style:font-weight-asian="bold" style:font-size-complex="14pt" style:font-style-complex="italic" style:font-weight-complex="bold"/>
    </style:style>
    <style:style style:name="T79" style:family="text">
      <style:text-properties fo:color="#0563c1" loext:opacity="100%" style:text-underline-style="solid" style:text-underline-width="auto" style:text-underline-color="font-color" style:font-name-complex="Calibri1">
        <loext:char-complex-color loext:theme-type="hyperlink" loext:color-type="theme"/>
      </style:text-properties>
    </style:style>
    <style:style style:name="T80" style:family="text">
      <style:text-properties style:font-name="Calibri" fo:font-weight="bold" style:language-asian="fr" style:country-asian="FR" style:font-weight-asian="bold" style:font-weight-complex="bold"/>
    </style:style>
    <style:style style:name="T81" style:family="text">
      <style:text-properties style:font-name="Calibri" fo:font-style="italic" style:language-asian="fr" style:country-asian="FR" style:font-style-asian="italic" style:font-style-complex="italic"/>
    </style:style>
    <style:style style:name="T82" style:family="text">
      <style:text-properties fo:font-weight="bold" style:font-weight-asian="bold" style:font-size-complex="12pt" style:font-weight-complex="bold"/>
    </style:style>
    <style:style style:name="T83" style:family="text">
      <style:text-properties fo:font-style="italic" style:font-style-asian="italic" style:font-size-complex="12pt" style:font-style-complex="italic"/>
    </style:style>
    <style:style style:name="fr1" style:family="graphic" style:parent-style-name="Graphics">
      <style:graphic-properties fo:margin-left="0in" fo:margin-right="0in" fo:margin-top="0in" fo:margin-bottom="0in"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style:style style:name="gr1" style:family="graphic">
      <style:graphic-properties draw:stroke="solid" svg:stroke-width="0.0138in" svg:stroke-color="#ffffff" draw:stroke-linejoin="miter" svg:stroke-linecap="butt" draw:fill="solid" draw:fill-color="#ffffff" draw:textarea-vertical-align="top" draw:auto-grow-height="false" fo:min-height="0.1929in" fo:min-width="0.072in" fo:padding-top="0.0492in" fo:padding-bottom="0.0492in" fo:padding-left="0.0984in" fo:padding-right="0.0984in" fo:wrap-option="wrap" loext:decorative="false" fo:margin-left="0in" fo:margin-right="0.0236in" fo:margin-top="0in" fo:margin-bottom="0.0217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light1" loext:color-type="theme"/>
        <loext:fill-complex-color loext:theme-type="light1" loext:color-type="theme"/>
      </style:graphic-properties>
    </style:style>
    <style:style style:name="gr2" style:family="graphic">
      <style:graphic-properties draw:stroke="solid" svg:stroke-width="0.0102in" svg:stroke-color="#000000" draw:stroke-linejoin="miter" draw:fill="solid" draw:fill-color="#ffffff" draw:textarea-vertical-align="top" draw:auto-grow-height="false" fo:min-height="0.0173in" fo:min-width="0.2646in" fo:padding-top="0.0492in" fo:padding-bottom="0.0492in" fo:padding-left="0.0984in" fo:padding-right="0.0984in" fo:wrap-option="wrap" loext:decorative="false" fo:margin-left="0in" fo:margin-right="0in" fo:margin-top="0.1043in" fo:margin-bottom="0.0602in" style:run-through="foreground" style:wrap="run-through" style:number-wrapped-paragraphs="no-limit" style:vertical-pos="from-top" style:vertical-rel="paragraph" style:horizontal-pos="righ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 text:name="_Hlk482021567"/></text:p>
      <text:p text:style-name="P2" loext:marker-style-name="T1"/>
      <text:p text:style-name="P2" loext:marker-style-name="T1"/>
      <text:p text:style-name="P3" loext:marker-style-name="T1"><draw:frame draw:style-name="fr1" draw:name="Picture 4" text:anchor-type="as-char" svg:width="5.3854in" svg:height="1.75in"><draw:image xlink:href="Pictures/1000000100000205000000A8235BD6D4.png" xlink:type="simple" xlink:show="embed" xlink:actuate="onLoad" draw:mime-type="image/png"/><svg:desc>RAB-logo</svg:desc></draw:frame></text:p>
      <text:p text:style-name="P2" loext:marker-style-name="T1"/>
      <text:p text:style-name="P2" loext:marker-style-name="T1"/>
      <text:p text:style-name="P2" loext:marker-style-name="T1"/>
      <text:p text:style-name="P3" loext:marker-style-name="T2"><text:span text:style-name="T2">Installing and <text:line-break/>Building Apps on a Mac</text:span><text:span text:style-name="T2"/></text:p>
      <text:p text:style-name="P4" loext:marker-style-name="T3"/>
      <text:p text:style-name="P4" loext:marker-style-name="T3"/>
      <text:p text:style-name="P3" loext:marker-style-name="T3"><text:span text:style-name="T3"><text:line-break/></text:span><text:span text:style-name="T3"/></text:p>
      <text:p text:style-name="P4" loext:marker-style-name="T3"/>
      <text:p text:style-name="P4" loext:marker-style-name="T3"/>
      <text:p text:style-name="P3" loext:marker-style-name="T3"><draw:frame draw:style-name="fr1" draw:name="Picture 49" text:anchor-type="as-char" svg:width="0.672in" svg:height="0.752in"><draw:image xlink:href="Pictures/1000000100000094000000A5C6F1C763.png" xlink:type="simple" xlink:show="embed" xlink:actuate="onLoad" draw:mime-type="image/png"/><svg:desc>Logo

Description automatically generated</svg:desc></draw:frame></text:p>
      <text:p text:style-name="P5" loext:marker-style-name="T4"/>
      <text:p text:style-name="Standard" loext:marker-style-name="T4"><text:span text:style-name="T4"><text:s/></text:span><text:span text:style-name="T4"/></text:p>
      <text:p text:style-name="P6" loext:marker-style-name="T5"><draw:custom-shape text:anchor-type="char" draw:z-index="0" draw:name="Rectangle 16" draw:style-name="gr1" draw:text-style-name="P7" svg:width="0.2689in" svg:height="0.2913in" svg:x="3.0299in" svg:y="0.5807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 loext:marker-style-name="T6"/>
      <text:p text:style-name="P9" loext:marker-style-name="T6"/>
      <text:p text:style-name="P8" loext:marker-style-name="T6"/>
      <text:p text:style-name="P8" loext:marker-style-name="T6"/>
      <text:p text:style-name="P8" loext:marker-style-name="T6"/>
      <text:p text:style-name="P8" loext:marker-style-name="T6"/>
      <text:p text:style-name="P8" loext:marker-style-name="T6"/>
      <text:p text:style-name="P8" loext:marker-style-name="T6"/>
      <text:p text:style-name="P8" loext:marker-style-name="T6"/>
      <text:p text:style-name="P8" loext:marker-style-name="T6"/>
      <text:p text:style-name="P8" loext:marker-style-name="T6"/>
      <text:p text:style-name="P8" loext:marker-style-name="T6"/>
      <text:p text:style-name="P8" loext:marker-style-name="T6"/>
      <text:p text:style-name="P8" loext:marker-style-name="T6"/>
      <text:p text:style-name="P8" loext:marker-style-name="T6"/>
      <text:p text:style-name="P8" loext:marker-style-name="T6"/>
      <text:p text:style-name="P10" loext:marker-style-name="T6"/>
      <text:p text:style-name="P3" loext:marker-style-name="T7"><text:span text:style-name="T7">Reading App Builder: <text:line-break/>Installing and Building Apps on a Mac</text:span><text:span text:style-name="T7"/></text:p>
      <text:p text:style-name="P10" loext:marker-style-name="T6"/>
      <text:p text:style-name="P3" loext:marker-style-name="T6"><text:span text:style-name="T6">© 2021, SIL International</text:span><text:span text:style-name="T6"/></text:p>
      <text:p text:style-name="P10" loext:marker-style-name="T6"/>
      <text:p text:style-name="P3" loext:marker-style-name="T8"><text:span text:style-name="T8">Last updated: 25 March 2025</text:span><text:span text:style-name="T8"/></text:p>
      <text:p text:style-name="P10" loext:marker-style-name="T6"/>
      <text:p text:style-name="P10" loext:marker-style-name="T6"/>
      <text:p text:style-name="P10" loext:marker-style-name="T6"/>
      <text:p text:style-name="P10" loext:marker-style-name="T6"/>
      <text:p text:style-name="P10" loext:marker-style-name="T6"/>
      <text:p text:style-name="P3" loext:marker-style-name="T4"><text:span text:style-name="T4">You are free to print this manual for personal use and for training workshops.</text:span><text:span text:style-name="T4"/></text:p>
      <text:p text:style-name="P5" loext:marker-style-name="T4"/>
      <text:p text:style-name="P3" loext:marker-style-name="T4"><text:span text:style-name="T4">The latest version is available at</text:span><text:span text:style-name="T4"/></text:p>
      <text:p text:style-name="P3" loext:marker-style-name="T6"><text:a xlink:type="simple" xlink:href="http://software.sil.org/readingappbuilder/resources/" text:style-name="Internet_20_link" text:visited-style-name="Visited_20_Internet_20_Link"><text:span text:style-name="Internet_20_link"><text:span text:style-name="T4">http://software.sil.org/readingappbuilder/resources/</text:span></text:span></text:a><text:span text:style-name="T6"> <text:s/></text:span></text:p>
      <text:p text:style-name="P10" loext:marker-style-name="T6"/>
      <text:p text:style-name="P3" loext:marker-style-name="T6"><text:span text:style-name="T6">and on the Help menu of Reading App Builder.</text:span><text:span text:style-name="T6"/></text:p>
      <text:p text:style-name="P11" loext:marker-style-name="T5"/>
      <text:p text:style-name="P12" loext:marker-style-name="T5"><text:span text:style-name="T5">Contents</text:span><text:span text:style-name="T5"/></text:p>
      <text:p text:style-name="P13" loext:marker-style-name="T9"/>
      <text:p text:style-name="P13" loext:marker-style-name="T9"/>
      <text:p text:style-name="P13" loext:marker-style-name="T9"/>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305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611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9165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loext:marker-style-name="T10"><text:a xlink:type="simple" xlink:href="#_Toc228354434" text:style-name="Index_20_Link" text:visited-style-name="Index_20_Link"><text:span text:style-name="T11">1.</text:span><text:span text:style-name="T10"><text:tab/></text:span>Introduction<text:span text:style-name="T12"><text:tab/>5</text:span></text:a></text:p>
          <text:p text:style-name="Contents_20_1" loext:marker-style-name="T10"><text:a xlink:type="simple" xlink:href="#_Toc228354435" text:style-name="Index_20_Link" text:visited-style-name="Index_20_Link"><text:span text:style-name="T11">2.</text:span><text:span text:style-name="T10"><text:tab/></text:span>Installing Reading App Builder<text:span text:style-name="T12"><text:tab/>5</text:span></text:a></text:p>
          <text:p text:style-name="Contents_20_1" loext:marker-style-name="T10"><text:a xlink:type="simple" xlink:href="#_Toc228354436" text:style-name="Index_20_Link" text:visited-style-name="Index_20_Link"><text:span text:style-name="T11">3.</text:span><text:span text:style-name="T10"><text:tab/></text:span>Installing Prerequisites for Android<text:span text:style-name="T12"><text:tab/>5</text:span></text:a></text:p>
          <text:p text:style-name="Contents_20_2" loext:marker-style-name="T13"><text:a xlink:type="simple" xlink:href="#_Toc228354437" text:style-name="Index_20_Link" text:visited-style-name="Index_20_Link">3.1.<text:span text:style-name="T13"><text:tab/></text:span>Java Development Kit (JDK)<text:span text:style-name="T12"><text:tab/>6</text:span></text:a></text:p>
          <text:p text:style-name="Contents_20_2" loext:marker-style-name="T13"><text:a xlink:type="simple" xlink:href="#_Toc228354438" text:style-name="Index_20_Link" text:visited-style-name="Index_20_Link"><text:span text:style-name="T14">3.2.</text:span><text:span text:style-name="T13"><text:tab/></text:span><text:span text:style-name="T14">Installing Android Software Development Kit (SDK)</text:span><text:span text:style-name="T12"><text:tab/>7</text:span></text:a></text:p>
          <text:p text:style-name="P14" loext:marker-style-name="T15"><text:a xlink:type="simple" xlink:href="#_Toc228354439" text:style-name="Index_20_Link" text:visited-style-name="Index_20_Link"><text:span text:style-name="T16">3.2.1.</text:span><text:span text:style-name="T15"><text:tab/></text:span><text:span text:style-name="T14">Downloading the Android SDK packages from the internet</text:span><text:span text:style-name="T12"><text:tab/>7</text:span></text:a></text:p>
          <text:p text:style-name="P14" loext:marker-style-name="T15"><text:a xlink:type="simple" xlink:href="#_Toc228354440" text:style-name="Index_20_Link" text:visited-style-name="Index_20_Link"><text:span text:style-name="T16">3.2.2.</text:span><text:span text:style-name="T15"><text:tab/></text:span><text:span text:style-name="T14">Copying the Android SDK files from someone else</text:span><text:span text:style-name="T12"><text:tab/>10</text:span></text:a></text:p>
          <text:p text:style-name="Contents_20_1" loext:marker-style-name="T10"><text:a xlink:type="simple" xlink:href="#_Toc228354441" text:style-name="Index_20_Link" text:visited-style-name="Index_20_Link"><text:span text:style-name="T11">4.</text:span><text:span text:style-name="T10"><text:tab/></text:span>Installing Prerequisites for iOS<text:span text:style-name="T12"><text:tab/>10</text:span></text:a></text:p>
          <text:p text:style-name="Contents_20_2" loext:marker-style-name="T13"><text:a xlink:type="simple" xlink:href="#_Toc228354442" text:style-name="Index_20_Link" text:visited-style-name="Index_20_Link">4.1.<text:span text:style-name="T13"><text:tab/></text:span>Install Xcode<text:span text:style-name="T12"><text:tab/>11</text:span></text:a></text:p>
          <text:p text:style-name="Contents_20_2" loext:marker-style-name="T13"><text:a xlink:type="simple" xlink:href="#_Toc228354443" text:style-name="Index_20_Link" text:visited-style-name="Index_20_Link">4.2.<text:span text:style-name="T13"><text:tab/></text:span>Verify Xcode Installation<text:span text:style-name="T12"><text:tab/>11</text:span></text:a></text:p>
          <text:p text:style-name="Contents_20_2" loext:marker-style-name="T13"><text:a xlink:type="simple" xlink:href="#_Toc228354444" text:style-name="Index_20_Link" text:visited-style-name="Index_20_Link">4.3.<text:span text:style-name="T13"><text:tab/></text:span>Install Transporter<text:span text:style-name="T12"><text:tab/>11</text:span></text:a></text:p>
          <text:p text:style-name="Contents_20_1" loext:marker-style-name="T10"><text:a xlink:type="simple" xlink:href="#_Toc228354445" text:style-name="Index_20_Link" text:visited-style-name="Index_20_Link"><text:span text:style-name="T11">5.</text:span><text:span text:style-name="T10"><text:tab/></text:span>Installing Aeneas<text:span text:style-name="T12"><text:tab/>12</text:span></text:a></text:p>
          <text:p text:style-name="Contents_20_1" loext:marker-style-name="T10"><text:a xlink:type="simple" xlink:href="#_Toc228354446" text:style-name="Index_20_Link" text:visited-style-name="Index_20_Link"><text:span text:style-name="T11">6.</text:span><text:span text:style-name="T10"><text:tab/></text:span>Testing App in iOS Simulator<text:span text:style-name="T12"><text:tab/>14</text:span></text:a></text:p>
          <text:p text:style-name="Contents_20_2" loext:marker-style-name="T13"><text:a xlink:type="simple" xlink:href="#_Toc228354447" text:style-name="Index_20_Link" text:visited-style-name="Index_20_Link">6.1.<text:span text:style-name="T13"><text:tab/></text:span>Run the iOS Simulator<text:span text:style-name="T12"><text:tab/>14</text:span></text:a></text:p>
          <text:p text:style-name="Contents_20_2" loext:marker-style-name="T13"><text:a xlink:type="simple" xlink:href="#_Toc228354448" text:style-name="Index_20_Link" text:visited-style-name="Index_20_Link">6.2.<text:span text:style-name="T13"><text:tab/></text:span>Installing Additional Simulators<text:span text:style-name="T12"><text:tab/>15</text:span></text:a></text:p>
          <text:p text:style-name="Contents_20_2" loext:marker-style-name="T13"><text:a xlink:type="simple" xlink:href="#_Toc228354449" text:style-name="Index_20_Link" text:visited-style-name="Index_20_Link">6.3.<text:span text:style-name="T13"><text:tab/></text:span>Manually Installing Apps into the Simulator<text:span text:style-name="T12"><text:tab/>15</text:span></text:a></text:p>
          <text:p text:style-name="Contents_20_1" loext:marker-style-name="T10"><text:a xlink:type="simple" xlink:href="#_Toc228354450" text:style-name="Index_20_Link" text:visited-style-name="Index_20_Link"><text:span text:style-name="T11">7.</text:span><text:span text:style-name="T10"><text:tab/></text:span>Creating iOS Certificates and Provisioning Profiles<text:span text:style-name="T12"><text:tab/>15</text:span></text:a></text:p>
          <text:p text:style-name="Contents_20_2" loext:marker-style-name="T13"><text:a xlink:type="simple" xlink:href="#_Toc228354451" text:style-name="Index_20_Link" text:visited-style-name="Index_20_Link">7.1.<text:span text:style-name="T13"><text:tab/></text:span>Enroll in the Apple Developer Program<text:span text:style-name="T12"><text:tab/>15</text:span></text:a></text:p>
          <text:p text:style-name="Contents_20_2" loext:marker-style-name="T13"><text:a xlink:type="simple" xlink:href="#_Toc228354452" text:style-name="Index_20_Link" text:visited-style-name="Index_20_Link">7.2.<text:span text:style-name="T13"><text:tab/></text:span>Create Signing Certificate<text:span text:style-name="T12"><text:tab/>16</text:span></text:a></text:p>
          <text:p text:style-name="Contents_20_2" loext:marker-style-name="T13"><text:a xlink:type="simple" xlink:href="#_Toc228354453" text:style-name="Index_20_Link" text:visited-style-name="Index_20_Link">7.3.<text:span text:style-name="T13"><text:tab/></text:span>Create Provisioning Profile<text:span text:style-name="T12"><text:tab/>17</text:span></text:a></text:p>
          <text:p text:style-name="Contents_20_1" loext:marker-style-name="T10"><text:a xlink:type="simple" xlink:href="#_Toc228354454" text:style-name="Index_20_Link" text:visited-style-name="Index_20_Link"><text:span text:style-name="T11">8.</text:span><text:span text:style-name="T10"><text:tab/></text:span>Building an iOS App<text:span text:style-name="T12"><text:tab/>18</text:span></text:a></text:p>
          <text:p text:style-name="Contents_20_2" loext:marker-style-name="T13"><text:a xlink:type="simple" xlink:href="#_Toc228354455" text:style-name="Index_20_Link" text:visited-style-name="Index_20_Link">8.1.<text:span text:style-name="T13"><text:tab/></text:span>Application builds available for iOS<text:span text:style-name="T12"><text:tab/>18</text:span></text:a></text:p>
          <text:p text:style-name="P14" loext:marker-style-name="T15"><text:a xlink:type="simple" xlink:href="#_Toc228354456" text:style-name="Index_20_Link" text:visited-style-name="Index_20_Link"><text:span text:style-name="T16">8.1.1.</text:span><text:span text:style-name="T15"><text:tab/></text:span><text:span text:style-name="T14">Dedicated App</text:span><text:span text:style-name="T12"><text:tab/>19</text:span></text:a></text:p>
          <text:p text:style-name="P14" loext:marker-style-name="T15"><text:a xlink:type="simple" xlink:href="#_Toc228354457" text:style-name="Index_20_Link" text:visited-style-name="Index_20_Link"><text:span text:style-name="T16">8.1.2.</text:span><text:span text:style-name="T15"><text:tab/></text:span><text:span text:style-name="T14">Container App</text:span><text:span text:style-name="T12"><text:tab/>19</text:span></text:a></text:p>
          <text:p text:style-name="P14" loext:marker-style-name="T15"><text:a xlink:type="simple" xlink:href="#_Toc228354458" text:style-name="Index_20_Link" text:visited-style-name="Index_20_Link"><text:span text:style-name="T16">8.1.3.</text:span><text:span text:style-name="T15"><text:tab/></text:span><text:span text:style-name="T14">Asset Package</text:span><text:span text:style-name="T12"><text:tab/>20</text:span></text:a></text:p>
          <text:p text:style-name="P14" loext:marker-style-name="T15"><text:a xlink:type="simple" xlink:href="#_Toc228354459" text:style-name="Index_20_Link" text:visited-style-name="Index_20_Link"><text:span text:style-name="T16">8.1.4.</text:span><text:span text:style-name="T15"><text:tab/></text:span><text:span text:style-name="T14">Container App Website</text:span><text:span text:style-name="T12"><text:tab/>20</text:span></text:a></text:p>
          <text:p text:style-name="Contents_20_2" loext:marker-style-name="T13"><text:a xlink:type="simple" xlink:href="#_Toc228354460" text:style-name="Index_20_Link" text:visited-style-name="Index_20_Link">8.2.<text:span text:style-name="T13"><text:tab/></text:span>App Type (iOS) Tab<text:span text:style-name="T12"><text:tab/>22</text:span></text:a></text:p>
          <text:p text:style-name="Contents_20_2" loext:marker-style-name="T13"><text:a xlink:type="simple" xlink:href="#_Toc228354461" text:style-name="Index_20_Link" text:visited-style-name="Index_20_Link">8.3.<text:span text:style-name="T13"><text:tab/></text:span>IPA Tab<text:span text:style-name="T12"><text:tab/>23</text:span></text:a></text:p>
          <text:p text:style-name="Contents_20_2" loext:marker-style-name="T13"><text:a xlink:type="simple" xlink:href="#_Toc228354462" text:style-name="Index_20_Link" text:visited-style-name="Index_20_Link">8.4.<text:span text:style-name="T13"><text:tab/></text:span>Signing (iOS) Tab<text:span text:style-name="T12"><text:tab/>24</text:span></text:a></text:p>
          <text:p text:style-name="Contents_20_1" loext:marker-style-name="T10"><text:a xlink:type="simple" xlink:href="#_Toc228354463" text:style-name="Index_20_Link" text:visited-style-name="Index_20_Link"><text:span text:style-name="T11">9.</text:span><text:span text:style-name="T10"><text:tab/></text:span>Testing an iOS App<text:span text:style-name="T12"><text:tab/>27</text:span></text:a></text:p>
          <text:p text:style-name="Contents_20_1" loext:marker-style-name="T10"><text:a xlink:type="simple" xlink:href="#_Toc228354464" text:style-name="Index_20_Link" text:visited-style-name="Index_20_Link"><text:span text:style-name="T11">10.</text:span><text:span text:style-name="T10"><text:tab/></text:span>Using Xcode to Test an iOS App<text:span text:style-name="T12"><text:tab/>27</text:span></text:a></text:p>
          <text:p text:style-name="Contents_20_1" loext:marker-style-name="T10"><text:a xlink:type="simple" xlink:href="#_Toc228354465" text:style-name="Index_20_Link" text:visited-style-name="Index_20_Link"><text:span text:style-name="T11">11.</text:span><text:span text:style-name="T10"><text:tab/></text:span>Using DeployGate to Test an iOS App<text:span text:style-name="T12"><text:tab/>28</text:span></text:a></text:p>
          <text:p text:style-name="Contents_20_2" loext:marker-style-name="T13"><text:a xlink:type="simple" xlink:href="#_Toc228354466" text:style-name="Index_20_Link" text:visited-style-name="Index_20_Link">11.1.<text:span text:style-name="T13"><text:tab/></text:span>Creating a DeployGate Account<text:span text:style-name="T12"><text:tab/>28</text:span></text:a></text:p>
          <text:p text:style-name="Contents_20_2" loext:marker-style-name="T13"><text:a xlink:type="simple" xlink:href="#_Toc228354467" text:style-name="Index_20_Link" text:visited-style-name="Index_20_Link">11.2.<text:span text:style-name="T13"><text:tab/></text:span>Uploading your first app<text:span text:style-name="T12"><text:tab/>28</text:span></text:a></text:p>
          <text:p text:style-name="Contents_20_2" loext:marker-style-name="T13"><text:a xlink:type="simple" xlink:href="#_Toc228354468" text:style-name="Index_20_Link" text:visited-style-name="Index_20_Link">11.3.<text:span text:style-name="T13"><text:tab/></text:span>Registering a Device<text:span text:style-name="T12"><text:tab/>30</text:span></text:a></text:p>
          <text:p text:style-name="Contents_20_1" loext:marker-style-name="T10"><text:a xlink:type="simple" xlink:href="#_Toc228354469" text:style-name="Index_20_Link" text:visited-style-name="Index_20_Link"><text:span text:style-name="T11">12.</text:span><text:span text:style-name="T10"><text:tab/></text:span>Uploading an iOS App to Apple App Store<text:span text:style-name="T12"><text:tab/>36</text:span></text:a></text:p>
          <text:p text:style-name="Contents_20_1" loext:marker-style-name="T10"><text:a xlink:type="simple" xlink:href="#_Toc228354470" text:style-name="Index_20_Link" text:visited-style-name="Index_20_Link"><text:span text:style-name="T11">13.</text:span><text:span text:style-name="T10"><text:tab/></text:span>Using Test Flight to Test an iOS App<text:span text:style-name="T12"><text:tab/>37</text:span></text:a></text:p>
          <text:p text:style-name="Contents_20_1" loext:marker-style-name="T10"><text:a xlink:type="simple" xlink:href="#_Toc228354471" text:style-name="Index_20_Link" text:visited-style-name="Index_20_Link"><text:span text:style-name="T11">14.</text:span><text:span text:style-name="T10"><text:tab/></text:span>Apple Privacy Policy<text:span text:style-name="T12"><text:tab/>38</text:span></text:a></text:p>
          <text:p text:style-name="Contents_20_2" loext:marker-style-name="T13"><text:a xlink:type="simple" xlink:href="#_Toc228354472" text:style-name="Index_20_Link" text:visited-style-name="Index_20_Link"><text:span text:style-name="T14">14.1.</text:span><text:span text:style-name="T13"><text:tab/></text:span><text:span text:style-name="T14">Data Types</text:span><text:span text:style-name="T12"><text:tab/>38</text:span></text:a></text:p>
          <text:p text:style-name="Contents_20_2" loext:marker-style-name="T13"><text:a xlink:type="simple" xlink:href="#_Toc228354473" text:style-name="Index_20_Link" text:visited-style-name="Index_20_Link"><text:span text:style-name="T14">14.2.</text:span><text:span text:style-name="T13"><text:tab/></text:span><text:span text:style-name="T14">Product Interaction</text:span><text:span text:style-name="T12"><text:tab/>38</text:span></text:a></text:p>
          <text:p text:style-name="Contents_20_1" loext:marker-style-name="T10"><text:a xlink:type="simple" xlink:href="#_Toc228354474" text:style-name="Index_20_Link" text:visited-style-name="Index_20_Link"><text:span text:style-name="T11">15.</text:span><text:span text:style-name="T10"><text:tab/></text:span>Building from Terminal<text:span text:style-name="T12"><text:tab/>38</text:span></text:a></text:p>
          <text:p text:style-name="Contents_20_2" loext:marker-style-name="T13"><text:a xlink:type="simple" xlink:href="#_Toc228354475" text:style-name="Index_20_Link" text:visited-style-name="Index_20_Link">15.1.<text:span text:style-name="T13"><text:tab/></text:span>Installing Command Line Interface<text:span text:style-name="T12"><text:tab/>39</text:span></text:a></text:p>
          <text:p text:style-name="Contents_20_2" loext:marker-style-name="T13"><text:a xlink:type="simple" xlink:href="#_Toc228354476" text:style-name="Index_20_Link" text:visited-style-name="Index_20_Link">15.2.<text:span text:style-name="T13"><text:tab/></text:span>Command Line Interface Options<text:span text:style-name="T12"><text:tab/>39</text:span></text:a></text:p>
          <text:p text:style-name="Contents_20_1" loext:marker-style-name="T10"><text:a xlink:type="simple" xlink:href="#_Toc228354477" text:style-name="Index_20_Link" text:visited-style-name="Index_20_Link"><text:span text:style-name="T17">16.</text:span><text:span text:style-name="T10"><text:tab/></text:span><text:span text:style-name="T18">Using Firebase in an iOS App</text:span><text:span text:style-name="T12"><text:tab/>41</text:span></text:a></text:p>
          <text:p text:style-name="Contents_20_2" loext:marker-style-name="T13"><text:a xlink:type="simple" xlink:href="#_Toc228354478" text:style-name="Index_20_Link" text:visited-style-name="Index_20_Link"><text:span text:style-name="T19">16.1.</text:span><text:span text:style-name="T13"><text:tab/></text:span><text:span text:style-name="T19">Adding an iOS App</text:span><text:span text:style-name="T12"><text:tab/>41</text:span></text:a></text:p>
          <text:p text:style-name="Contents_20_2" loext:marker-style-name="T13"><text:a xlink:type="simple" xlink:href="#_Toc228354479" text:style-name="Index_20_Link" text:visited-style-name="Index_20_Link"><text:span text:style-name="T19">16.2.</text:span><text:span text:style-name="T13"><text:tab/></text:span><text:span text:style-name="T19">iOS Configuration for Firebase in SAB</text:span><text:span text:style-name="T12"><text:tab/>45</text:span></text:a></text:p>
          <text:p text:style-name="Contents_20_2" loext:marker-style-name="T13"><text:a xlink:type="simple" xlink:href="#_Toc228354480" text:style-name="Index_20_Link" text:visited-style-name="Index_20_Link"><text:span text:style-name="T19">16.3.</text:span><text:span text:style-name="T13"><text:tab/></text:span><text:span text:style-name="T19">Security Feature Support in iOS App</text:span><text:span text:style-name="T12"><text:tab/>46</text:span></text:a></text:p>
          <text:p text:style-name="Contents_20_2" loext:marker-style-name="T13"><text:a xlink:type="simple" xlink:href="#_Toc228354481" text:style-name="Index_20_Link" text:visited-style-name="Index_20_Link">16.4.<text:span text:style-name="T13"><text:tab/></text:span>Firebase Messaging<text:span text:style-name="T12"><text:tab/>46</text:span></text:a></text:p>
          <text:p text:style-name="Contents_20_2" loext:marker-style-name="T13"><text:a xlink:type="simple" xlink:href="#_Toc228354482" text:style-name="Index_20_Link" text:visited-style-name="Index_20_Link">16.5.<text:span text:style-name="T13"><text:tab/></text:span>Firebase Crashlytics for iOS<text:span text:style-name="T12"><text:tab/>48</text:span></text:a></text:p>
        </text:index-body>
      </text:table-of-content>
      <text:p text:style-name="P5" loext:marker-style-name="T4"/>
      <text:h text:style-name="P15" text:outline-level="1"><text:bookmark text:name="_ib23mk4syx17"/><text:bookmark-start text:name="_Toc228354434"/><text:bookmark-start text:name="_Toc475369911"/>Introduction<text:bookmark-end text:name="_Toc228354434"/><text:bookmark-end text:name="_Toc475369911"/></text:h>
      <text:p text:style-name="Standard" loext:marker-style-name="T20"><text:span text:style-name="T20">This document provides information on how to install Reading App Builder and build apps on an Apple macOS system. It is possible to build an Android app using RAB on Windows, Linux or Mac, but if you want to build an iOS app for the iPhone or iPad, you will need to build it using a Mac computer.</text:span><text:span text:style-name="T20"/></text:p>
      <text:p text:style-name="P16" loext:marker-style-name="T20"/>
      <table:table table:name="Table1" table:style-name="Table1">
        <table:table-column table:style-name="Table1.A"/>
        <table:table-column table:style-name="Table1.B" table:number-columns-repeated="2"/>
        <table:table-row table:style-name="Table1.1">
          <table:table-cell table:style-name="Table1.A1" office:value-type="string">
            <text:p text:style-name="P17" loext:marker-style-name="T21"><text:span text:style-name="T21">App Builder</text:span></text:p>
            <text:p text:style-name="P17" loext:marker-style-name="T21"><text:span text:style-name="T21">Platform</text:span><text:span text:style-name="T21"/></text:p>
          </table:table-cell>
          <table:table-cell table:style-name="Table1.A1" office:value-type="string">
            <text:p text:style-name="P18" loext:marker-style-name="T21"><text:span text:style-name="T21">Build</text:span><text:span text:style-name="T21"/></text:p>
            <text:p text:style-name="P18" loext:marker-style-name="T21"><text:span text:style-name="T21">Android Apps</text:span><text:span text:style-name="T21"/></text:p>
          </table:table-cell>
          <table:table-cell table:style-name="Table1.A1" office:value-type="string">
            <text:p text:style-name="P18" loext:marker-style-name="T21"><text:span text:style-name="T21">Build</text:span><text:span text:style-name="T21"/></text:p>
            <text:p text:style-name="P18" loext:marker-style-name="T21"><text:span text:style-name="T21">iOS Apps</text:span><text:span text:style-name="T21"/></text:p>
          </table:table-cell>
        </table:table-row>
        <table:table-row table:style-name="Table1.1">
          <table:table-cell table:style-name="Table1.A1" office:value-type="string">
            <text:p text:style-name="P17" loext:marker-style-name="T22"><text:span text:style-name="T22">Windows</text:span><text:span text:style-name="T22"/></text:p>
          </table:table-cell>
          <table:table-cell table:style-name="Table1.A1" office:value-type="string">
            <text:p text:style-name="P19" loext:marker-style-name="T22"><text:span text:style-name="T23"></text:span><text:span text:style-name="T24"/></text:p>
          </table:table-cell>
          <table:table-cell table:style-name="Table1.A1" office:value-type="string">
            <text:p text:style-name="P20" loext:marker-style-name="T22"/>
          </table:table-cell>
        </table:table-row>
        <table:table-row table:style-name="Table1.1">
          <table:table-cell table:style-name="Table1.A1" office:value-type="string">
            <text:p text:style-name="P17" loext:marker-style-name="T22"><text:span text:style-name="T22">Linux</text:span><text:span text:style-name="T22"/></text:p>
          </table:table-cell>
          <table:table-cell table:style-name="Table1.A1" office:value-type="string">
            <text:p text:style-name="P19" loext:marker-style-name="T22"><text:span text:style-name="T23"></text:span><text:span text:style-name="T24"/></text:p>
          </table:table-cell>
          <table:table-cell table:style-name="Table1.A1" office:value-type="string">
            <text:p text:style-name="P20" loext:marker-style-name="T22"/>
          </table:table-cell>
        </table:table-row>
        <table:table-row table:style-name="Table1.1">
          <table:table-cell table:style-name="Table1.A1" office:value-type="string">
            <text:p text:style-name="P17" loext:marker-style-name="T22"><text:span text:style-name="T22">macOS</text:span><text:span text:style-name="T22"/></text:p>
          </table:table-cell>
          <table:table-cell table:style-name="Table1.A1" office:value-type="string">
            <text:p text:style-name="P19" loext:marker-style-name="T22"><text:span text:style-name="T23"></text:span><text:span text:style-name="T24"/></text:p>
          </table:table-cell>
          <table:table-cell table:style-name="Table1.A1" office:value-type="string">
            <text:p text:style-name="P19" loext:marker-style-name="T22"><text:span text:style-name="T23"></text:span><text:span text:style-name="T24"/></text:p>
          </table:table-cell>
        </table:table-row>
      </table:table>
      <text:p text:style-name="P16" loext:marker-style-name="T20"/>
      <text:p text:style-name="P21" loext:marker-style-name="T20"><text:span text:style-name="T20">Creating an Android app on a Mac is essentially the same process as it is for Windows or Linux. To create a corresponding iOS app, you will need to enter a few more configuration items. </text:span><text:span text:style-name="T20"/></text:p>
      <text:p text:style-name="P21" loext:marker-style-name="T20"><text:span text:style-name="T20">The apps generated by RAB for iOS will run on iPhones and iPads with iOS 12.2 or higher.</text:span><text:span text:style-name="T20"/></text:p>
      <text:p text:style-name="P16" loext:marker-style-name="T20"/>
      <text:h text:style-name="Heading_20_1" text:outline-level="1"><text:bookmark text:name="_aavgtmmhk0r5"/><text:bookmark-start text:name="_Toc475369912"/><text:bookmark-start text:name="_Toc228354435"/>Installing Reading App Builder<text:bookmark-end text:name="_Toc228354435"/></text:h>
      <text:p text:style-name="P22" loext:marker-style-name="T25"><text:span text:style-name="T25">To install the Reading App Builder program files:</text:span><text:span text:style-name="T25"/></text:p>
      <text:list text:style-name="WWNum15">
        <text:list-item>
          <text:p text:style-name="P23" loext:marker-style-name="T20"><text:span text:style-name="T20">Download the current Mac installer file (dmg) from the RAB website:</text:span><text:span text:style-name="T20"/></text:p>
        </text:list-item>
      </text:list>
      <text:p text:style-name="P24" loext:marker-style-name="T20"><text:a xlink:type="simple" xlink:href="http://software.sil.org/readingappbuilder/download/" text:style-name="Internet_20_link" text:visited-style-name="Visited_20_Internet_20_Link"><text:span text:style-name="Internet_20_link"><text:span text:style-name="T20">http://software.sil.org/readingappbuilder/download/</text:span></text:span></text:a><text:span text:style-name="T20"> </text:span></text:p>
      <text:list text:continue-numbering="true" text:style-name="WWNum15">
        <text:list-item>
          <text:p text:style-name="P23" loext:marker-style-name="T20"><text:span text:style-name="T20">Double click on the file within </text:span><text:span text:style-name="T26">Finder</text:span><text:span text:style-name="T20"> to open the disk image that contains the Reading App Builder application.</text:span></text:p>
        </text:list-item>
        <text:list-item>
          <text:p text:style-name="P25" loext:marker-style-name="T20"><text:span text:style-name="T20">Copy the </text:span><text:span text:style-name="T26">Reading App Builder</text:span><text:span text:style-name="T20"> application to your </text:span><text:span text:style-name="T26">Application</text:span><text:span text:style-name="T20"> folder. This can be done by dragging the Reading App Builder icon from the disk image window to the shortcut of the Applications folder in the same window.</text:span></text:p>
        </text:list-item>
      </text:list>
      <text:p text:style-name="P26" loext:marker-style-name="T27"/>
      <text:h text:style-name="Heading_20_1" text:outline-level="1"><text:bookmark-start text:name="_Toc228354436"/>Installing Prerequisites<text:bookmark-end text:name="_Toc475369912"/> for Android<text:bookmark-end text:name="_Toc228354436"/></text:h>
      <text:p text:style-name="P27" loext:marker-style-name="T20"><text:span text:style-name="T20">If you want to build Android apps, you need to install the following components on your computer:</text:span><text:span text:style-name="T20"/></text:p>
      <text:list text:style-name="WWNum11">
        <text:list-item>
          <text:p text:style-name="P28" loext:marker-style-name="T28"><text:span text:style-name="T28">Java Development Kit (JDK)</text:span><text:span text:style-name="T28"/></text:p>
        </text:list-item>
        <text:list-item>
          <text:p text:style-name="P28" loext:marker-style-name="T28"><text:span text:style-name="T28">Android Software Development Kit (SDK)</text:span><text:span text:style-name="T28"/></text:p>
        </text:list-item>
      </text:list>
      <text:h text:style-name="P29" text:outline-level="2"><text:bookmark text:name="_b03t0hmdkkzk"/><text:bookmark-start text:name="_Toc228354437"/><text:bookmark-start text:name="_Toc475369913"/>Java Development Kit (JDK)<text:bookmark-end text:name="_Toc228354437"/><text:bookmark-end text:name="_Toc475369913"/></text:h>
      <text:p text:style-name="P30" loext:marker-style-name="T14"><text:bookmark-start text:name="_Hlk534311866"/><text:bookmark-start text:name="_Toc475369914"/><text:span text:style-name="T14">You will need version 17 of the Java Development Kit (JDK) to build apps. We recommend you use Zulu, which is a free distribution of OpenJDK from Azul.</text:span><text:bookmark-end text:name="_Hlk534311866"/><text:span text:style-name="T14"/></text:p>
      <text:list text:style-name="WWNum43">
        <text:list-item>
          <text:p text:style-name="P31" loext:marker-style-name="T14"><text:span text:style-name="T14">Go to the </text:span><text:span text:style-name="T29">Download Zulu Builds of OpenJDK</text:span><text:span text:style-name="T14"> website:</text:span></text:p>
        </text:list-item>
      </text:list>
      <text:p text:style-name="P32" loext:marker-style-name="T30"/>
      <text:p text:style-name="P33"><text:a xlink:type="simple" xlink:href="https://www.azul.com/downloads/?version=java-17-lts&amp;os=macos&amp;architecture=arm-64-bit&amp;package=jdk-fx#zulu" text:style-name="Internet_20_link" text:visited-style-name="Visited_20_Internet_20_Link"><text:span text:style-name="Internet_20_link">https://www.azul.com/downloads/?version=java-17-lts&amp;os=macos&amp;architecture=arm-64-bit&amp;package=jdk-fx#zulu</text:span></text:a></text:p>
      <text:p text:style-name="Standard"/>
      <text:p text:style-name="P34" loext:marker-style-name="T14"><text:span text:style-name="T14">There are many downloads on this page, but the above link will filter the ones you see (Java Version: Java 17 LTS; Operating System: MacOS; Architecture: ARM 64-bit; Java Package: Java FX).</text:span><text:span text:style-name="T14"/></text:p>
      <text:p text:style-name="Standard"/>
      <text:p text:style-name="Standard"/>
      <text:list text:continue-numbering="true" text:style-name="WWNum43">
        <text:list-item>
          <text:p text:style-name="P35" loext:marker-style-name="T14"><text:span text:style-name="T14">Scroll down the page until you see the downloads under the heading </text:span><text:span text:style-name="T29">Download Azul Zulu Builds of OpenJDK</text:span><text:span text:style-name="T14">:</text:span></text:p>
        </text:list-item>
      </text:list>
      <text:p text:style-name="P36" loext:marker-style-name="T14"/>
      <text:p text:style-name="Standard" loext:marker-style-name="T14"><draw:frame draw:style-name="fr1" draw:name="Picture 2" text:anchor-type="as-char" svg:width="6.2638in" svg:height="4.372in"><draw:image xlink:href="Pictures/10000001000006850000048DE77F53FD.png" xlink:type="simple" xlink:show="embed" xlink:actuate="onLoad" draw:mime-type="image/png"/></draw:frame></text:p>
      <text:p text:style-name="P37" loext:marker-style-name="T14"/>
      <text:p text:style-name="P37" loext:marker-style-name="T14"/>
      <text:list text:style-name="WWNum44">
        <text:list-item>
          <text:p text:style-name="P38" loext:marker-style-name="T14"><text:span text:style-name="T14">You have a choice between two different architectures: </text:span><text:span text:style-name="T29">x86 64-bit</text:span><text:span text:style-name="T14"> and </text:span><text:span text:style-name="T29">ARM 64-bit</text:span><text:span text:style-name="T14">. You can find the processor type of your machine by clicking on the Apple symbol at the top left of your screen and selecting </text:span><text:span text:style-name="T29">About This Mac</text:span><text:span text:style-name="T14">. If you have an older Mac running with an Intel x86 chip, select x86 (64 bit) otherwise you will need the ARM 64-bit.</text:span></text:p>
        </text:list-item>
      </text:list>
      <text:p text:style-name="P36" loext:marker-style-name="T14"/>
      <text:p text:style-name="P39" loext:marker-style-name="T14"><text:span text:style-name="T14">Once you have identified your device architecture, you have a choice between a </text:span><text:span text:style-name="T29">dmg</text:span><text:span text:style-name="T14"> file, a </text:span><text:span text:style-name="T29">tar.gz</text:span><text:span text:style-name="T14"> file and a </text:span><text:span text:style-name="T29">zip</text:span><text:span text:style-name="T14"> file. </text:span><text:span text:style-name="T29">Download the .dmg file</text:span><text:span text:style-name="T14"> since it comes with its own installer program.</text:span></text:p>
      <text:p text:style-name="P40" loext:marker-style-name="T14"/>
      <text:p text:style-name="P41" loext:marker-style-name="T14"><text:span text:style-name="T14">The file you download will have a filename something like this:</text:span><text:span text:style-name="T14"/></text:p>
      <text:p text:style-name="P42" loext:marker-style-name="T14"><text:span text:style-name="T29">zulu17.64.17-ca-fx-jdk17.0.18-macosx_x64.dmg</text:span><text:span text:style-name="T14"><text:line-break/></text:span></text:p>
      <text:list text:continue-numbering="true" text:style-name="WWNum44">
        <text:list-item>
          <text:p text:style-name="P38" loext:marker-style-name="T14"><text:span text:style-name="T29">Double-click the file</text:span><text:span text:style-name="T14"> </text:span><text:span text:style-name="T29">in Finder </text:span><text:span text:style-name="T14">and follow the instructions in the installation wizard to install it. By default, the installer will install the JDK to the following folder:</text:span></text:p>
        </text:list-item>
      </text:list>
      <text:p text:style-name="P37" loext:marker-style-name="T14"/>
      <text:p text:style-name="P43" loext:marker-style-name="T29"><text:span text:style-name="T29">/Library/Java/JavaVirtualMachines/zulu-17.jdk/Contents/Home</text:span><text:span text:style-name="T29"/></text:p>
      <text:p text:style-name="P37" loext:marker-style-name="T14"/>
      <text:p text:style-name="P44" loext:marker-style-name="T14"><text:span text:style-name="T31">Important</text:span><text:span text:style-name="T14">: If you change the JDK install folder to something other than the default folder, you will need to remember the location of the folder so you can tell Reading App Builder where to find the JDK.</text:span></text:p>
      <text:p text:style-name="P37" loext:marker-style-name="T14"/>
      <text:p text:style-name="P45" loext:marker-style-name="T9"/>
      <text:h text:style-name="P46" text:outline-level="2" loext:marker-style-name="T14"><text:bookmark text:name="_mcyrni6cg1av"/><text:bookmark-start text:name="_Toc228354438"/><text:bookmark-start text:name="_Toc78622942"/><text:bookmark-start text:name="_Toc482020490"/><text:span text:style-name="T14">Installing Android Software Development Kit (SDK)</text:span><text:bookmark-end text:name="_Toc228354438"/><text:bookmark-end text:name="_Toc78622942"/><text:bookmark-end text:name="_Toc482020490"/><text:span text:style-name="T14"/></text:h>
      <text:p text:style-name="P30" loext:marker-style-name="T14"><text:span text:style-name="T14">The Android Software Development Kit (SDK) is needed for building Android apps. There are two ways of installing the Android SDK:</text:span><text:span text:style-name="T14"/></text:p>
      <text:list text:style-name="WWNum41">
        <text:list-item>
          <text:p text:style-name="P47" loext:marker-style-name="T14"><text:span text:style-name="T32">Online</text:span><text:span text:style-name="T33">: Download the Android SDK packages from the internet: </text:span><text:span text:style-name="T14"><text:line-break/>Use the Android SDK Installation wizard to download and install the command line tools and three additional packages. This method will require an internet connection. </text:span></text:p>
        </text:list-item>
      </text:list>
      <text:p text:style-name="P48" loext:marker-style-name="T14"><text:span text:style-name="T14">See 3.2.1 for more details.<text:line-break/></text:span><text:span text:style-name="T14"/></text:p>
      <text:list text:continue-numbering="true" text:style-name="WWNum41">
        <text:list-item>
          <text:p text:style-name="P47" loext:marker-style-name="T14"><text:span text:style-name="T32">Offline</text:span><text:span text:style-name="T33">: Copy the Android SDK files from someone else:</text:span><text:span text:style-name="T14"><text:line-break/>If you know someone who has already downloaded and installed the Android SDK, you can copy all the files from them.</text:span></text:p>
        </text:list-item>
      </text:list>
      <text:p text:style-name="P48" loext:marker-style-name="T14"><text:span text:style-name="T14">This method is especially useful in a training workshop where several people need to install the SDK but have limited internet bandwidth. </text:span><text:span text:style-name="T14"/></text:p>
      <text:p text:style-name="P48" loext:marker-style-name="T14"><text:span text:style-name="T14">See 3.2.2 for more details.</text:span><text:span text:style-name="T14"/></text:p>
      <text:p text:style-name="P37" loext:marker-style-name="T14"/>
      <text:h text:style-name="Heading_20_3" text:outline-level="3" loext:marker-style-name="T14"><text:bookmark-start text:name="_Toc77851809"/><text:bookmark-start text:name="_Toc228354439"/><text:bookmark-start text:name="_Toc78622943"/><text:span text:style-name="T14">Downloading the Android SDK packages from the internet</text:span><text:bookmark-end text:name="_Toc77851809"/><text:bookmark-end text:name="_Toc228354439"/><text:bookmark-end text:name="_Toc78622943"/><text:span text:style-name="T14"/></text:h>
      <text:p text:style-name="Standard" loext:marker-style-name="T14"><text:span text:style-name="T14">To install the Android SDK from the internet: </text:span><text:span text:style-name="T14"/></text:p>
      <text:p text:style-name="P37" loext:marker-style-name="T14"/>
      <text:list text:style-name="WWNum28">
        <text:list-item>
          <text:p text:style-name="P49" loext:marker-style-name="T14"><text:span text:style-name="T14">Launch </text:span><text:span text:style-name="T33">Reading App Builder</text:span><text:span text:style-name="T14">. </text:span></text:p>
        </text:list-item>
      </text:list>
      <text:p text:style-name="P50" loext:marker-style-name="T14"/>
      <text:list text:continue-numbering="true" text:style-name="WWNum28">
        <text:list-item>
          <text:p text:style-name="P49" loext:marker-style-name="T14"><text:span text:style-name="T14">Select </text:span><text:span text:style-name="T33">Reading App Builder</text:span><text:span text:style-name="T14"> </text:span><text:span text:style-name="T34">Ø</text:span><text:span text:style-name="T14"> </text:span><text:span text:style-name="T33">Preferences</text:span><text:span text:style-name="T14"> from the main menu.</text:span></text:p>
        </text:list-item>
      </text:list>
      <text:p text:style-name="P40" loext:marker-style-name="T14"/>
      <text:list text:continue-numbering="true" text:style-name="WWNum28">
        <text:list-item>
          <text:p text:style-name="P49" loext:marker-style-name="T14"><text:span text:style-name="T14">Go to the </text:span><text:span text:style-name="T33">Android SDK</text:span><text:span text:style-name="T14"> tab, which is the second tab.</text:span></text:p>
        </text:list-item>
      </text:list>
      <text:p text:style-name="P50" loext:marker-style-name="T14"/>
      <text:list text:continue-numbering="true" text:style-name="WWNum28">
        <text:list-item>
          <text:p text:style-name="P51" loext:marker-style-name="T14"><text:span text:style-name="T14">Click the </text:span><text:span text:style-name="T29">Install Android SDK</text:span><text:span text:style-name="T14"> button.</text:span></text:p>
        </text:list-item>
      </text:list>
      <text:p text:style-name="P52" loext:marker-style-name="T14"><draw:custom-shape text:anchor-type="char" draw:z-index="1" draw:name="AutoShape 7" draw:style-name="gr2" draw:text-style-name="P7" svg:width="0.548in" svg:height="0.2315in" draw:transform="rotate (0.602662190713642) translate (-0.0000382764654418195in 1.50756233595801in)"><text:p/><draw:enhanced-geometry draw:mirror-horizontal="false" draw:mirror-vertical="false" draw:glue-points="?f5 0 0 ?f7 ?f5 ?f14 ?f13 ?f7" draw:text-areas="?f12 ?f8 ?f13 ?f9" svg:viewBox="0 0 0 0" draw:type="ooxml-leftArrow" draw:modifiers="50000 75000"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position="?f13 ?f8" draw:handle-position-x="?f13" draw:handle-position-y="?f8" draw:handle-range-y-maximum="100000" draw:handle-range-y-minimum="0"/><draw:handle draw:handle-position="?f5 0" draw:handle-position-x="?f5" draw:handle-position-y="0" draw:handle-range-x-maximum="?f1" draw:handle-range-x-minimum="0"/></draw:enhanced-geometry></draw:custom-shape><draw:frame draw:style-name="fr1" draw:name="Picture 61" text:anchor-type="as-char" svg:width="6.2547in" svg:height="4.3209in"><draw:image xlink:href="Pictures/1000000100000561000003B6042725EA.png" xlink:type="simple" xlink:show="embed" xlink:actuate="onLoad" draw:mime-type="image/png"/><svg:desc>Table

Description automatically generated</svg:desc></draw:frame></text:p>
      <text:p text:style-name="P53" loext:marker-style-name="T14"/>
      <text:p text:style-name="P53" loext:marker-style-name="T14"/>
      <text:list text:continue-numbering="true" text:style-name="WWNum28">
        <text:list-item>
          <text:p text:style-name="P51" loext:marker-style-name="T14"><text:span text:style-name="T14">Follow the instructions on each page of the </text:span><text:span text:style-name="T29">Install Android SDK</text:span><text:span text:style-name="T14"> wizard to download each of the Android SDK packages and install them.</text:span></text:p>
        </text:list-item>
      </text:list>
      <text:p text:style-name="P54" loext:marker-style-name="T14"/>
      <text:p text:style-name="P55" loext:marker-style-name="T14"><text:span text:style-name="T14">When you are asked to specify a target folder, a good place is:</text:span><text:span text:style-name="T14"/></text:p>
      <text:p text:style-name="P55" loext:marker-style-name="T14"><text:span text:style-name="T14"><text:s text:c="8"/></text:span><text:span text:style-name="T33">/Users/</text:span><text:span text:style-name="T35">your-name</text:span><text:span text:style-name="T33">/Android-SDK</text:span><text:span text:style-name="T14">.</text:span></text:p>
      <text:p text:style-name="P56" loext:marker-style-name="T14"/>
      <text:p text:style-name="P57" loext:marker-style-name="T14"><text:span text:style-name="T14">Four packages will be downloaded and installed:</text:span><text:span text:style-name="T14"/></text:p>
      <text:list text:style-name="WWNum42">
        <text:list-item>
          <text:p text:style-name="P58" loext:marker-style-name="T14"><text:span text:style-name="T14">Command line tools, </text:span><text:span text:style-name="T14"/></text:p>
        </text:list-item>
        <text:list-item>
          <text:p text:style-name="P58" loext:marker-style-name="T14"><text:span text:style-name="T14">Build Tools, </text:span><text:span text:style-name="T14"/></text:p>
        </text:list-item>
        <text:list-item>
          <text:p text:style-name="P58" loext:marker-style-name="T14"><text:span text:style-name="T14">Platform Tools, and </text:span><text:span text:style-name="T14"/></text:p>
        </text:list-item>
        <text:list-item>
          <text:p text:style-name="P58" loext:marker-style-name="T14"><text:span text:style-name="T14">Platform API.</text:span><text:span text:style-name="T14"/></text:p>
        </text:list-item>
      </text:list>
      <text:p text:style-name="P54" loext:marker-style-name="T14"/>
      <text:p text:style-name="P33" loext:marker-style-name="T14"><text:span text:style-name="T14">If the installation was successful, you will see the version numbers displayed in green.</text:span><text:span text:style-name="T14"/></text:p>
      <text:p text:style-name="P53" loext:marker-style-name="T14"/>
      <text:p text:style-name="P3" loext:marker-style-name="T36"><draw:frame draw:style-name="fr1" draw:name="Picture 7" text:anchor-type="as-char" svg:width="5.25in" svg:height="3.3165in"><draw:image xlink:href="Pictures/10000001000002D8000001CCF0060A39.png" xlink:type="simple" xlink:show="embed" xlink:actuate="onLoad" draw:mime-type="image/png"/></draw:frame></text:p>
      <text:p text:style-name="P37" loext:marker-style-name="T14"/>
      <text:p text:style-name="Standard" loext:marker-style-name="T14"><text:span text:style-name="T14">If any of the Build Tools, Platform Tools or Platform API is listed as “Not Found” (displayed in red), click the </text:span><text:span text:style-name="T29">Install Packages</text:span><text:span text:style-name="T14"> button to install them.</text:span></text:p>
      <text:p text:style-name="P37" loext:marker-style-name="T14"/>
      <text:p text:style-name="Standard" loext:marker-style-name="T14"><text:span text:style-name="T14">Click the </text:span><text:span text:style-name="T29">Check Installation</text:span><text:span text:style-name="T14"> button to confirm that all the packages have been installed correctly.</text:span></text:p>
      <text:p text:style-name="P37" loext:marker-style-name="T14"/>
      <text:p text:style-name="Standard" loext:marker-style-name="T14"><text:span text:style-name="T14">You can skip section 3.2.2 and go straight to section 4.<text:line-break/></text:span><text:span text:style-name="T14"/></text:p>
      <text:h text:style-name="Heading_20_3" text:outline-level="3" loext:marker-style-name="T14"><text:bookmark-start text:name="_Toc77851810"/><text:bookmark-start text:name="_Toc228354440"/><text:bookmark-start text:name="_Toc78622944"/><text:span text:style-name="T14">Copying the Android SDK files from someone else</text:span><text:bookmark-end text:name="_Toc77851810"/><text:bookmark-end text:name="_Toc228354440"/><text:bookmark-end text:name="_Toc78622944"/><text:span text:style-name="T14"/></text:h>
      <text:p text:style-name="Standard" loext:marker-style-name="T14"><text:span text:style-name="T14">If you know someone who has already downloaded and installed the Android SDK and is successfully building apps with it, you can copy all of their Android SDK files to a folder on your computer.</text:span><text:span text:style-name="T14"/></text:p>
      <text:p text:style-name="P21" loext:marker-style-name="T14"><text:span text:style-name="T14">You need to look for the top-level Android SDK folder, such as </text:span><text:span text:style-name="T33">/Users/</text:span><text:span text:style-name="T35">user-name</text:span><text:span text:style-name="T33">/Android-SDK</text:span><text:span text:style-name="T14">, and copy the whole folder and its contents to your computer. A location such as </text:span><text:span text:style-name="T33">/Users/</text:span><text:span text:style-name="T35">your-name</text:span><text:span text:style-name="T33">/Android-SDK</text:span><text:span text:style-name="T14"> is good. If it makes it easier, you can zip the folders and then unzip them onto your computer.</text:span></text:p>
      <text:p text:style-name="P21" loext:marker-style-name="T14"><text:span text:style-name="T14">Note that there is </text:span><text:span text:style-name="T37">no setup program to run</text:span><text:span text:style-name="T14">. Copying the files from one computer to another is sufficient.</text:span></text:p>
      <text:p text:style-name="P37" loext:marker-style-name="T14"/>
      <text:p text:style-name="P21" loext:marker-style-name="T14"><text:span text:style-name="T33">Tip</text:span><text:span text:style-name="T14">: A typical Android SDK folder can be quite large (over 1 GB, depending on which additional packages have been installed). To build an app, you do not actually need all of the Android SDK files. If you want to cut down the number of files, here is a list of the essential and optional folders:</text:span></text:p>
      <text:p text:style-name="P37" loext:marker-style-name="T14"/>
      <table:table table:name="Table2" table:style-name="Table2">
        <table:table-column table:style-name="Table2.A"/>
        <table:table-column table:style-name="Table2.B"/>
        <table:table-header-rows>
          <table:table-row table:style-name="Table2.1">
            <table:table-cell table:style-name="Table2.A1" office:value-type="string">
              <text:p text:style-name="P17" loext:marker-style-name="T38"><text:span text:style-name="T38">Android SDK Folder</text:span><text:span text:style-name="T38"/></text:p>
            </table:table-cell>
            <table:table-cell table:style-name="Table2.A1" office:value-type="string">
              <text:p text:style-name="P17" loext:marker-style-name="T38"><text:span text:style-name="T38">Required for building apps?</text:span><text:span text:style-name="T38"/></text:p>
            </table:table-cell>
          </table:table-row>
        </table:table-header-rows>
        <table:table-row table:style-name="Table2.1">
          <table:table-cell table:style-name="Table2.A2" office:value-type="string">
            <text:p text:style-name="P17" loext:marker-style-name="T39"><text:span text:style-name="T39">cmdline-tools (or tools)</text:span><text:span text:style-name="T39"/></text:p>
          </table:table-cell>
          <table:table-cell table:style-name="Table2.B2" office:value-type="string">
            <text:p text:style-name="P17" loext:marker-style-name="T39"><text:span text:style-name="T39">Yes</text:span><text:span text:style-name="T39"/></text:p>
          </table:table-cell>
        </table:table-row>
        <table:table-row table:style-name="Table2.1">
          <table:table-cell table:style-name="Table2.A3" office:value-type="string">
            <text:p text:style-name="P17" loext:marker-style-name="T39"><text:span text:style-name="T39">build-tools</text:span><text:span text:style-name="T39"/></text:p>
          </table:table-cell>
          <table:table-cell table:style-name="Table2.B3" office:value-type="string">
            <text:p text:style-name="P17" loext:marker-style-name="T39"><text:span text:style-name="T39">Yes <text:s/>(you only need the sub-folder for the latest version)</text:span><text:span text:style-name="T39"/></text:p>
          </table:table-cell>
        </table:table-row>
        <table:table-row table:style-name="Table2.1">
          <table:table-cell table:style-name="Table2.A4" office:value-type="string">
            <text:p text:style-name="P17" loext:marker-style-name="T39"><text:span text:style-name="T39">platforms</text:span><text:span text:style-name="T39"/></text:p>
          </table:table-cell>
          <table:table-cell table:style-name="Table2.B4" office:value-type="string">
            <text:p text:style-name="P17" loext:marker-style-name="T39"><text:span text:style-name="T39">Yes <text:s/>(you only need android-30 for now)</text:span><text:span text:style-name="T39"/></text:p>
          </table:table-cell>
        </table:table-row>
        <table:table-row table:style-name="Table2.1">
          <table:table-cell table:style-name="Table2.A5" office:value-type="string">
            <text:p text:style-name="P17" loext:marker-style-name="T39"><text:span text:style-name="T39">platform-tools</text:span><text:span text:style-name="T39"/></text:p>
          </table:table-cell>
          <table:table-cell table:style-name="Table2.B5" office:value-type="string">
            <text:p text:style-name="P17" loext:marker-style-name="T39"><text:span text:style-name="T39">Yes</text:span><text:span text:style-name="T39"/></text:p>
          </table:table-cell>
        </table:table-row>
        <table:table-row table:style-name="Table2.1">
          <table:table-cell table:style-name="Table2.A6" office:value-type="string">
            <text:p text:style-name="P17" loext:marker-style-name="T39"><text:span text:style-name="T39">add-ons</text:span><text:span text:style-name="T39"/></text:p>
          </table:table-cell>
          <table:table-cell table:style-name="Table2.B6" office:value-type="string">
            <text:p text:style-name="P17" loext:marker-style-name="T39"><text:span text:style-name="T39">No</text:span><text:span text:style-name="T39"/></text:p>
          </table:table-cell>
        </table:table-row>
        <table:table-row table:style-name="Table2.1">
          <table:table-cell table:style-name="Table2.A7" office:value-type="string">
            <text:p text:style-name="P17" loext:marker-style-name="T39"><text:span text:style-name="T39">docs</text:span><text:span text:style-name="T39"/></text:p>
          </table:table-cell>
          <table:table-cell table:style-name="Table2.B7" office:value-type="string">
            <text:p text:style-name="P17" loext:marker-style-name="T39"><text:span text:style-name="T39">No</text:span><text:span text:style-name="T39"/></text:p>
          </table:table-cell>
        </table:table-row>
        <table:table-row table:style-name="Table2.1">
          <table:table-cell table:style-name="Table2.A8" office:value-type="string">
            <text:p text:style-name="P17" loext:marker-style-name="T39"><text:span text:style-name="T39">emulator</text:span><text:span text:style-name="T39"/></text:p>
          </table:table-cell>
          <table:table-cell table:style-name="Table2.B8" office:value-type="string">
            <text:p text:style-name="P17" loext:marker-style-name="T39"><text:span text:style-name="T39">No, unless you want to use an emulator</text:span><text:span text:style-name="T39"/></text:p>
          </table:table-cell>
        </table:table-row>
        <table:table-row table:style-name="Table2.1">
          <table:table-cell table:style-name="Table2.A9" office:value-type="string">
            <text:p text:style-name="P17" loext:marker-style-name="T39"><text:span text:style-name="T39">extras</text:span><text:span text:style-name="T39"/></text:p>
          </table:table-cell>
          <table:table-cell table:style-name="Table2.B9" office:value-type="string">
            <text:p text:style-name="P17" loext:marker-style-name="T39"><text:span text:style-name="T39">No</text:span><text:span text:style-name="T39"/></text:p>
          </table:table-cell>
        </table:table-row>
        <table:table-row table:style-name="Table2.1">
          <table:table-cell table:style-name="Table2.A10" office:value-type="string">
            <text:p text:style-name="P17" loext:marker-style-name="T39"><text:span text:style-name="T39">licenses</text:span><text:span text:style-name="T39"/></text:p>
          </table:table-cell>
          <table:table-cell table:style-name="Table2.B10" office:value-type="string">
            <text:p text:style-name="P17" loext:marker-style-name="T39"><text:span text:style-name="T39">Yes</text:span><text:span text:style-name="T39"/></text:p>
          </table:table-cell>
        </table:table-row>
        <table:table-row table:style-name="Table2.1">
          <table:table-cell table:style-name="Table2.A11" office:value-type="string">
            <text:p text:style-name="P17" loext:marker-style-name="T39"><text:span text:style-name="T39">sources</text:span><text:span text:style-name="T39"/></text:p>
          </table:table-cell>
          <table:table-cell table:style-name="Table2.B11" office:value-type="string">
            <text:p text:style-name="P17" loext:marker-style-name="T39"><text:span text:style-name="T39">No</text:span><text:span text:style-name="T39"/></text:p>
          </table:table-cell>
        </table:table-row>
        <table:table-row table:style-name="Table2.1">
          <table:table-cell table:style-name="Table2.A12" office:value-type="string">
            <text:p text:style-name="P17" loext:marker-style-name="T39"><text:span text:style-name="T39">system-images</text:span><text:span text:style-name="T39"/></text:p>
          </table:table-cell>
          <table:table-cell table:style-name="Table2.B12" office:value-type="string">
            <text:p text:style-name="P17" loext:marker-style-name="T39"><text:span text:style-name="T39">No, unless you want to use an emulator</text:span><text:span text:style-name="T39"/></text:p>
          </table:table-cell>
        </table:table-row>
        <table:table-row table:style-name="Table2.1">
          <table:table-cell table:style-name="Table2.A13" office:value-type="string">
            <text:p text:style-name="P17" loext:marker-style-name="T39"><text:span text:style-name="T39">temp</text:span><text:span text:style-name="T39"/></text:p>
          </table:table-cell>
          <table:table-cell table:style-name="Table2.B13" office:value-type="string">
            <text:p text:style-name="P17" loext:marker-style-name="T39"><text:span text:style-name="T39">No</text:span><text:span text:style-name="T39"/></text:p>
          </table:table-cell>
        </table:table-row>
      </table:table>
      <text:p text:style-name="P37" loext:marker-style-name="T14"/>
      <text:p text:style-name="P37" loext:marker-style-name="T14"/>
      <text:h text:style-name="Heading_20_1" text:outline-level="1"><text:bookmark-end text:name="_Toc475369914"/><text:bookmark-start text:name="_Toc228354441"/>Installing Prerequisites for iOS<text:bookmark-end text:name="_Toc228354441"/></text:h>
      <text:p text:style-name="P59" loext:marker-style-name="T20"><text:bookmark text:name="_gyx6c51bzyd"/><text:bookmark-start text:name="OLE_LINK43"/><text:bookmark-start text:name="OLE_LINK42"/><text:bookmark-start text:name="_Toc508705004"/><text:span text:style-name="T20">If you want to build iOS apps and upload them to the Apple App Store, you need to install the following components: </text:span><text:span text:style-name="T20"/></text:p>
      <text:list text:style-name="WWNum12">
        <text:list-item>
          <text:p text:style-name="P60" loext:marker-style-name="T40"><text:span text:style-name="T41">Xcode</text:span><text:span text:style-name="T41"/></text:p>
        </text:list-item>
        <text:list-item>
          <text:p text:style-name="P60" loext:marker-style-name="T40"><text:span text:style-name="T41">Transporter</text:span><text:span text:style-name="T41"/></text:p>
        </text:list-item>
      </text:list>
      <text:h text:style-name="P29" text:outline-level="2"><text:bookmark text:name="_8y9itz56qcum"/><text:bookmark-start text:name="OLE_LINK41"/><text:bookmark-start text:name="OLE_LINK40"/><text:bookmark-start text:name="_Toc228354442"/><text:bookmark-start text:name="_Toc31750424"/><text:bookmark-start text:name="_Toc475369915"/>Install Xcode<text:bookmark-end text:name="OLE_LINK41"/><text:bookmark-end text:name="OLE_LINK40"/><text:bookmark-end text:name="_Toc228354442"/><text:bookmark-end text:name="_Toc31750424"/><text:bookmark-end text:name="_Toc475369915"/></text:h>
      <text:p text:style-name="Standard" loext:marker-style-name="T20"><text:span text:style-name="T26">Xcode</text:span><text:span text:style-name="T20"> is required to build iOS Apps. </text:span><text:span text:style-name="T42">To install Xcode, simply search for Xcode in the Mac App Store and install it. Open Xcode at least once to agree to the licensing restrictions and install components.</text:span></text:p>
      <text:p text:style-name="P3" loext:marker-style-name="T20"><draw:frame draw:style-name="fr1" draw:name="Picture 5" text:anchor-type="as-char" svg:width="4.5028in" svg:height="0.9835in"><draw:image xlink:href="Pictures/10000001000002C20000009AB34A9DC8.png" xlink:type="simple" xlink:show="embed" xlink:actuate="onLoad" draw:mime-type="image/png"/></draw:frame></text:p>
      <text:h text:style-name="P29" text:outline-level="2"><text:bookmark-start text:name="_Toc228354443"/>Verify Xcode Installation<text:bookmark-end text:name="_Toc228354443"/><text:bookmark-end text:name="_Toc508705004"/></text:h>
      <text:p text:style-name="Standard" loext:marker-style-name="T43"><text:span text:style-name="T43">To verify that you have successfully installed Xcode and that it is will be correctly used by Reading App Builder, open Terminal and run the following command to print the path to the active developer directory:</text:span><text:span text:style-name="T43"/></text:p>
      <text:p text:style-name="P61">xcode-select -p</text:p>
      <text:p text:style-name="Standard" loext:marker-style-name="T44"><text:span text:style-name="T20"><text:line-break/></text:span><text:span text:style-name="T44">$ xcode-</text:span><text:span text:style-name="T45">select</text:span><text:span text:style-name="T44"> -p</text:span></text:p>
      <text:p text:style-name="P62" loext:marker-style-name="T46"><text:span text:style-name="T44">/Applications/Xcode.app/</text:span><text:span text:style-name="T45">Contents</text:span><text:span text:style-name="T44">/Developer</text:span></text:p>
      <text:p text:style-name="P63" loext:marker-style-name="T20"><text:span text:style-name="T20"><text:line-break/>If you have had Xcode Command-line Tools installed previously, it might still be pointing to that installation directory and Reading App Builder will not work correctly.<text:line-break/><text:line-break/></text:span><text:span text:style-name="T44">$ xcode-</text:span><text:span text:style-name="T45">select</text:span><text:span text:style-name="T44"> -p </text:span><text:span text:style-name="T47"><text:line-break/></text:span><text:span text:style-name="T44">/</text:span><text:span text:style-name="T45">Library</text:span><text:span text:style-name="T44">/Developer/CommandLineTools</text:span></text:p>
      <text:p text:style-name="Standard" loext:marker-style-name="T20"><text:span text:style-name="T20">To correct this situation, run the following command to set the active developer directory.</text:span><text:span text:style-name="T20"/></text:p>
      <text:p text:style-name="P61">sudo xcode-select -s /Applications/Xcode.app/Contents/Developer<text:bookmark-end text:name="OLE_LINK43"/><text:bookmark-end text:name="OLE_LINK42"/><text:bookmark text:name="_m0jnku21w8d3"/><text:bookmark-start text:name="_Toc11401436"/><text:bookmark-start text:name="_Toc475369917"/></text:p>
      <text:h text:style-name="P29" text:outline-level="2"><text:bookmark-end text:name="_Toc475369917"/><text:bookmark-end text:name="_Toc11401436"/><text:bookmark-start text:name="_Toc228354444"/><text:bookmark-start text:name="_Toc31750426"/>Install Transporter<text:bookmark-end text:name="_Toc228354444"/><text:bookmark-end text:name="_Toc31750426"/></text:h>
      <text:p text:style-name="Standard" loext:marker-style-name="T20"><text:span text:style-name="T48">Transporter</text:span><text:span text:style-name="T20"> is used to upload iOS apps to App Store Connect. </text:span><text:span text:style-name="T42">To install Transporter, simply search for Transporter in the Mac App Store and install it.</text:span><text:bookmark text:name="_vv76das93ezq"/></text:p>
      <text:p text:style-name="P16" loext:marker-style-name="T20"/>
      <text:p text:style-name="P3" loext:marker-style-name="T14"><draw:frame draw:style-name="fr1" draw:name="Picture 29" text:anchor-type="as-char" svg:width="4.4972in" svg:height="0.9283in"><draw:image xlink:href="Pictures/10000001000002CF00000094317AA322.png" xlink:type="simple" xlink:show="embed" xlink:actuate="onLoad" draw:mime-type="image/png"/></draw:frame></text:p>
      <text:p text:style-name="P64" loext:marker-style-name="T14"/>
      <text:h text:style-name="Heading_20_1" text:outline-level="1"><text:bookmark-start text:name="_Toc228354445"/>Installing Aeneas<text:bookmark-end text:name="_Toc228354445"/></text:h>
      <text:p text:style-name="Standard" loext:marker-style-name="T20"><text:span text:style-name="T20">Aeneas is the audio-text synchronization tool that may be run from within Reading App Builder to create timing files for phrase-by-phrase highlighting. If the apps you are building do not include audio or if the timing files are already available, then there is no need to install it. </text:span><text:span text:style-name="T20"/></text:p>
      <text:p text:style-name="P65" loext:marker-style-name="T20"><text:span text:style-name="T20">To install </text:span><text:span text:style-name="T48">aeneas</text:span><text:span text:style-name="T20">:</text:span></text:p>
      <text:list text:style-name="WWNum25">
        <text:list-item>
          <text:p text:style-name="P66" loext:marker-style-name="T20"><text:span text:style-name="T20">Download the </text:span><text:span text:style-name="T48">aeneas tools</text:span><text:span text:style-name="T20"> for Mac file (dmg) from the RAB website from the section labeled </text:span><text:span text:style-name="T48">Audio Synchronization Tools</text:span><text:span text:style-name="T20">:</text:span></text:p>
        </text:list-item>
      </text:list>
      <text:p text:style-name="P67" loext:marker-style-name="T20"><text:a xlink:type="simple" xlink:href="http://software.sil.org/readingappbuilder/download/" text:style-name="Internet_20_link" text:visited-style-name="Visited_20_Internet_20_Link"><text:span text:style-name="Internet_20_link"><text:span text:style-name="T20">http://software.sil.org/readingappbuilder/download/</text:span></text:span></text:a><text:span text:style-name="T20"> </text:span></text:p>
      <text:list text:continue-numbering="true" text:style-name="WWNum25">
        <text:list-item>
          <text:p text:style-name="P68" loext:marker-style-name="T20"><text:span text:style-name="T20">Double click on the file within Finder to open the disk image that contains the aeneas-mac-setup install package. Control-click on the install package and select </text:span><text:span text:style-name="T48">Open</text:span><text:span text:style-name="T20">. You will get a warning that this package is from an unidentified developer. <text:s/>Press </text:span><text:span text:style-name="T48">Open</text:span><text:span text:style-name="T20">.</text:span></text:p>
        </text:list-item>
        <text:list-item>
          <text:p text:style-name="P69" loext:marker-style-name="T20"><text:span text:style-name="T20">The introduction screen will display. Press </text:span><text:span text:style-name="T48">Continue</text:span><text:span text:style-name="T20">.</text:span></text:p>
        </text:list-item>
      </text:list>
      <text:p text:style-name="P70" loext:marker-style-name="T4"><draw:frame draw:style-name="fr1" draw:name="Picture 54" text:anchor-type="as-char" svg:width="5.1772in" svg:height="3.6492in"><draw:image xlink:href="Pictures/10000001000001F600000162EB0EAA44.tif" xlink:type="simple" xlink:show="embed" xlink:actuate="onLoad" draw:mime-type="image/tiff"/></draw:frame></text:p>
      <text:p text:style-name="P71" loext:marker-style-name="T4"/>
      <text:list text:continue-numbering="true" text:style-name="WWNum25">
        <text:list-item>
          <text:p text:style-name="P69" loext:marker-style-name="T20"><text:span text:style-name="T20">A “Read Me” screen will display next followed by a “License” screen. Press </text:span><text:span text:style-name="T48">Continue</text:span><text:span text:style-name="T20"> on both screens.</text:span></text:p>
        </text:list-item>
        <text:list-item>
          <text:p text:style-name="P69" loext:marker-style-name="T20"><text:span text:style-name="T20">Pressing the </text:span><text:span text:style-name="T48">Continue</text:span><text:span text:style-name="T20"> button on the License screen will bring up a screen asking if you agree to the terms of the license. Press </text:span><text:span text:style-name="T48">Agree</text:span><text:span text:style-name="T20">.</text:span></text:p>
        </text:list-item>
        <text:list-item>
          <text:p text:style-name="P69" loext:marker-style-name="T20"><text:span text:style-name="T20">The “Destination Select” screen selects the default drive. <text:s/>Press </text:span><text:span text:style-name="T48">Continue</text:span><text:span text:style-name="T20">.</text:span></text:p>
        </text:list-item>
        <text:list-item>
          <text:p text:style-name="P69" loext:marker-style-name="T20"><text:span text:style-name="T20">The “Installation Type” screen displays next for a standard install. Press </text:span><text:span text:style-name="T48">Install</text:span><text:span text:style-name="T20">.</text:span></text:p>
        </text:list-item>
      </text:list>
      <text:p text:style-name="P3" loext:marker-style-name="T20"><draw:frame draw:style-name="fr1" draw:name="Picture 55" text:anchor-type="as-char" svg:width="4.9311in" svg:height="3.4744in"><draw:image xlink:href="Pictures/10000001000001D90000014DD23B4DC2.tif" xlink:type="simple" xlink:show="embed" xlink:actuate="onLoad" draw:mime-type="image/tiff"/></draw:frame></text:p>
      <text:p text:style-name="P16" loext:marker-style-name="T20"/>
      <text:list text:continue-numbering="true" text:style-name="WWNum25">
        <text:list-item>
          <text:p text:style-name="P72" loext:marker-style-name="T20"><text:span text:style-name="T20">The installer will prompt for credentials to install the software. <text:s/>Enter a username and password with permissions and press </text:span><text:span text:style-name="T48">Install Software</text:span><text:span text:style-name="T20">.</text:span></text:p>
        </text:list-item>
        <text:list-item>
          <text:p text:style-name="P69" loext:marker-style-name="T20"><text:span text:style-name="T20">At this point the installation will start and will show progress screens until it completes. A terminal window will popup briefly to test the installation. <text:s/>When the application completes successfully, the original screen will show:</text:span><text:span text:style-name="T20"/></text:p>
        </text:list-item>
      </text:list>
      <text:p text:style-name="P3" loext:marker-style-name="T4"><draw:frame draw:style-name="fr1" draw:name="Picture 56" text:anchor-type="as-char" svg:width="4.8063in" svg:height="3.4043in"><draw:image xlink:href="Pictures/10000001000001D00000014933D33F87.tif" xlink:type="simple" xlink:show="embed" xlink:actuate="onLoad" draw:mime-type="image/tiff"/></draw:frame></text:p>
      <text:p text:style-name="P73" loext:marker-style-name="T4"/>
      <text:list text:continue-numbering="true" text:style-name="WWNum25">
        <text:list-item>
          <text:p text:style-name="P69" loext:marker-style-name="T49"><text:span text:style-name="T20">Press </text:span><text:span text:style-name="T48">Close</text:span><text:span text:style-name="T20">. </text:span></text:p>
        </text:list-item>
      </text:list>
      <text:p text:style-name="P74" loext:marker-style-name="T50"/>
      <text:p text:style-name="Standard" loext:marker-style-name="T51"><text:span text:style-name="T50">Aeneas is installed in /usr/local/lib/python2.7/site-packages</text:span><text:span text:style-name="T51">.</text:span></text:p>
      <text:p text:style-name="P73" loext:marker-style-name="T4"/>
      <text:p text:style-name="P16" loext:marker-style-name="T20"/>
      <text:h text:style-name="Heading_20_1" text:outline-level="1"><text:bookmark text:name="_tpsgpqajyijx"/><text:bookmark-start text:name="_Toc475369919"/><text:bookmark-start text:name="_Toc228354446"/>Testing App in iOS Simulator<text:bookmark-end text:name="_Toc228354446"/></text:h>
      <text:p text:style-name="Standard" loext:marker-style-name="T27"><text:span text:style-name="T27">When you want to test your app, you can either use a device or a simulator. <text:s/>To test with a device, you will need a signing certificate and provisioning profile (see next section). To test with a simulator, you will need to download Xcode, the integrated development environment used to build and test iOS and Mac apps. Xcode is available for free in the Mac App Store and is quite large (5.46 GB). RAB requires Xcode 26 or greater (which requires macOS Sequoia). </text:span><text:span text:style-name="T27"/></text:p>
      <text:p text:style-name="P21" loext:marker-style-name="T27"><text:span text:style-name="T27">To install:</text:span><text:span text:style-name="T27"/></text:p>
      <text:list text:style-name="WWNum16">
        <text:list-item>
          <text:p text:style-name="P75" loext:marker-style-name="T20"><text:span text:style-name="T20">Go to </text:span><text:a xlink:type="simple" xlink:href="https://itunes.apple.com/us/app/xcode/id497799835?mt=12" text:style-name="Internet_20_link" text:visited-style-name="Visited_20_Internet_20_Link"><text:span text:style-name="Internet_20_link"><text:span text:style-name="T20">https://itunes.apple.com/us/app/xcode/id497799835?mt=12</text:span></text:span></text:a><text:span text:style-name="T20"> or search for “Xcode” in the App Store app on macOS.</text:span></text:p>
        </text:list-item>
        <text:list-item>
          <text:p text:style-name="P76" loext:marker-style-name="T20"><text:span text:style-name="T20">Install from the App Store</text:span><text:span text:style-name="T20"/></text:p>
        </text:list-item>
        <text:list-item>
          <text:p text:style-name="P76" loext:marker-style-name="T20"><text:span text:style-name="T20">Start Xcode at least once to complete the installation</text:span><text:span text:style-name="T20"/></text:p>
        </text:list-item>
      </text:list>
      <text:h text:style-name="P29" text:outline-level="2"><text:bookmark-start text:name="_Toc228354447"/><text:bookmark-start text:name="OLE_LINK12"/>Run the iOS Simulator<text:bookmark-end text:name="_Toc228354447"/><text:bookmark-end text:name="OLE_LINK12"/></text:h>
      <text:p text:style-name="P65" loext:marker-style-name="T20"><text:span text:style-name="T20">Once you have a project configured and ready to test, click on the </text:span><text:span text:style-name="T48">Run iOS App in Simulator</text:span><text:span text:style-name="T20"> on the toolbar.</text:span></text:p>
      <text:p text:style-name="P77" loext:marker-style-name="T20"><draw:frame draw:style-name="fr1" draw:name="Picture 59" text:anchor-type="as-char" svg:width="4.0563in" svg:height="2.0492in"><draw:image xlink:href="Pictures/1000000100000188000000C6B75A4EA4.tif" xlink:type="simple" xlink:show="embed" xlink:actuate="onLoad" draw:mime-type="image/tiff"/></draw:frame></text:p>
      <text:p text:style-name="P21" loext:marker-style-name="T20"><text:span text:style-name="T20">Select the simulator you would like to run on and click </text:span><text:span text:style-name="T48">Start</text:span><text:span text:style-name="T20">. It takes a little bit of time for the simulator to start. <text:s/>If you want to switch simulators, select a different Simulator from the </text:span><text:span text:style-name="T48">Simulator Type </text:span><text:span text:style-name="T20">combo box and click </text:span><text:span text:style-name="T48">Start</text:span><text:span text:style-name="T20"> again. <text:s/>It will close the previous Simulator and start the new own. <text:s/></text:span></text:p>
      <text:p text:style-name="P21" loext:marker-style-name="T20"><text:span text:style-name="T20">Select the project you want to test (it defaults to the selected project in the Apps list) and click on </text:span><text:span text:style-name="T48">Build</text:span><text:span text:style-name="T20">. <text:s/>This will build the app for the Simulator in a separate terminal window. <text:s/>When the build is complete, you can click on </text:span><text:span text:style-name="T48">Launch</text:span><text:span text:style-name="T20"> to run the app in the Simulator.</text:span></text:p>
      <text:p text:style-name="P21" loext:marker-style-name="T20"><text:span text:style-name="T20">You may close the dialog and make changes to your project. <text:s/>When you restart the Run iOS Simulator dialog again, you will need to Build and Launch again for the changes to be included.</text:span><text:span text:style-name="T20"/></text:p>
      <text:h text:style-name="P29" text:outline-level="2"><text:bookmark-start text:name="_Toc228354448"/><text:bookmark-start text:name="OLE_LINK13"/>Installing Additional Simulators<text:bookmark-end text:name="_Toc228354448"/><text:bookmark-end text:name="OLE_LINK13"/></text:h>
      <text:p text:style-name="P21" loext:marker-style-name="T20"><text:span text:style-name="T20">You may install simulators for previous versions of iOS by launching Xcode and viewing the preferences dialog and selecting the Components tab.</text:span><text:span text:style-name="T20"/></text:p>
      <text:p text:style-name="P21" loext:marker-style-name="T20"><draw:frame draw:style-name="fr1" draw:name="Picture 60" text:anchor-type="as-char" svg:width="4.8063in" svg:height="3.2909in"><draw:image xlink:href="Pictures/10000001000001CE0000013C19B87C8F.tif" xlink:type="simple" xlink:show="embed" xlink:actuate="onLoad" draw:mime-type="image/tiff"/></draw:frame></text:p>
      <text:h text:style-name="P29" text:outline-level="2"><text:bookmark-start text:name="_Toc228354449"/>Manually Installing Apps into the Simulator<text:bookmark-end text:name="_Toc228354449"/></text:h>
      <text:p text:style-name="Standard" loext:marker-style-name="T43"><text:span text:style-name="T43">If there is some problem with launching the simulator from the </text:span><text:span text:style-name="T52">Run iOS Simulator</text:span><text:span text:style-name="T43"> dialog, you can manually install the app by dragging the built app from the Simulator output folder (found in ~/App Builder/Reading Apps/Sim Output) onto the Simulator. <text:s/>To start the Simulator, launch </text:span><text:span text:style-name="T52">Xcode</text:span><text:span text:style-name="T43"> and from the </text:span><text:span text:style-name="T52">Xcode</text:span><text:span text:style-name="T43"> menu select </text:span><text:span text:style-name="T52">Open Developer Tool</text:span><text:span text:style-name="T43"> </text:span><text:span text:style-name="T53"></text:span><text:span text:style-name="T43"> </text:span><text:span text:style-name="T52">Simulator</text:span><text:span text:style-name="T43">. <text:s/>You will still need to rebuild the app from the </text:span><text:span text:style-name="T52">Run iOS Simulator</text:span><text:span text:style-name="T43"> dialog.</text:span></text:p>
      <text:p text:style-name="P78" loext:marker-style-name="T43"/>
      <text:p text:style-name="P78" loext:marker-style-name="T43"/>
      <text:h text:style-name="Heading_20_1" text:outline-level="1"><text:bookmark-start text:name="_Toc228354450"/>Creating iOS Certificates and Provisioning<text:bookmark-end text:name="_Toc475369919"/> Profiles<text:bookmark-end text:name="_Toc228354450"/></text:h>
      <text:h text:style-name="P29" text:outline-level="2"><text:bookmark-start text:name="_Toc228354451"/><text:bookmark-start text:name="OLE_LINK11"/>Enroll in the Apple Developer Program<text:bookmark-end text:name="_Toc228354451"/><text:bookmark-end text:name="OLE_LINK11"/></text:h>
      <text:p text:style-name="Standard" loext:marker-style-name="T20"><text:span text:style-name="T20">To build iOS apps and distribute them through the Apple App Store, you will need to be enrolled in the Apple Developer Program. You can do this as either (i) an individual, or (ii) an organisation. The cost is USD $99 per year.</text:span><text:span text:style-name="T20"/></text:p>
      <text:p text:style-name="P21" loext:marker-style-name="T20"><text:span text:style-name="T20">To enroll:</text:span><text:span text:style-name="T20"/></text:p>
      <text:list text:style-name="WWNum37">
        <text:list-item>
          <text:p text:style-name="P79" loext:marker-style-name="T20"><text:bookmark-start text:name="OLE_LINK10"/><text:span text:style-name="T20">Go to </text:span><text:a xlink:type="simple" xlink:href="https://developer.apple.com/programs/enroll/" text:style-name="ListLabel_20_400" text:visited-style-name="ListLabel_20_400"><text:span text:style-name="T54">https://developer.apple.com/programs/enroll/</text:span></text:a><text:bookmark-end text:name="OLE_LINK10"/></text:p>
        </text:list-item>
        <text:list-item>
          <text:p text:style-name="P80" loext:marker-style-name="T20"><text:span text:style-name="T20">Press the </text:span><text:span text:style-name="T48">Start Your Enrollment</text:span><text:span text:style-name="T20"> button to start.</text:span></text:p>
        </text:list-item>
      </text:list>
      <text:p text:style-name="P16" loext:marker-style-name="T20"/>
      <text:h text:style-name="P81" text:outline-level="2"><text:bookmark-start text:name="_Toc228354452"/>Create Signing Certificate<text:bookmark-end text:name="_Toc228354452"/></text:h>
      <text:p text:style-name="P82" loext:marker-style-name="T20"><text:span text:style-name="T20">When you create an iOS app, it needs to be signed with a certificate. </text:span><text:span text:style-name="T20"/></text:p>
      <text:p text:style-name="P83" loext:marker-style-name="T20"/>
      <text:p text:style-name="Standard" loext:marker-style-name="T20"><text:span text:style-name="T20">To create a certificate:</text:span><text:span text:style-name="T20"/></text:p>
      <text:list text:style-name="WWNum13">
        <text:list-item>
          <text:p text:style-name="P84" loext:marker-style-name="T20"><text:span text:style-name="T20">Go to the </text:span><text:a xlink:type="simple" xlink:href="https://developer.apple.com/" text:style-name="Internet_20_link" text:visited-style-name="Visited_20_Internet_20_Link"><text:span text:style-name="Internet_20_link"><text:span text:style-name="T20">Apple Developer</text:span></text:span></text:a><text:span text:style-name="T20"> website and log in to your account if you are not already.</text:span></text:p>
        </text:list-item>
        <text:list-item>
          <text:p text:style-name="P84" loext:marker-style-name="T20"><text:span text:style-name="T20">Select </text:span><text:span text:style-name="T48">Certificates, Identifiers &amp; Profiles</text:span><text:span text:style-name="T20">.</text:span></text:p>
        </text:list-item>
        <text:list-item>
          <text:p text:style-name="P84" loext:marker-style-name="T20"><text:span text:style-name="T20">Click the</text:span><draw:frame draw:style-name="fr1" draw:name="Picture 27" text:anchor-type="as-char" svg:width="0.1945in" svg:height="0.2362in"><draw:image xlink:href="Pictures/100000010000001C0000002296E3C9AD.png" xlink:type="simple" xlink:show="embed" xlink:actuate="onLoad" draw:mime-type="image/png"/></draw:frame><text:span text:style-name="T20"> button to the right of the </text:span><text:span text:style-name="T48">Certificates</text:span><text:span text:style-name="T20"> header.</text:span></text:p>
        </text:list-item>
        <text:list-item>
          <text:p text:style-name="P84" loext:marker-style-name="T20"><text:span text:style-name="T20">On the </text:span><text:span text:style-name="T48">Create a New Certificates </text:span><text:span text:style-name="T20">page, select </text:span><text:span text:style-name="T48">Apple Distribution</text:span><text:span text:style-name="T20">. Then press the </text:span><text:span text:style-name="T48">Continue</text:span><text:span text:style-name="T20"> button.</text:span></text:p>
        </text:list-item>
        <text:list-item>
          <text:p text:style-name="P84" loext:marker-style-name="T20"><text:span text:style-name="T20">Upload a Certificate Signing Request. Press the </text:span><text:span text:style-name="T48">Learn more</text:span><text:span text:style-name="T20"> link for instructions on how to use Keychain Access on your Mac computer to complete this task. Then press the </text:span><text:span text:style-name="T48">Continue</text:span><text:span text:style-name="T20"> button.</text:span></text:p>
        </text:list-item>
        <text:list-item>
          <text:p text:style-name="P84" loext:marker-style-name="T20"><text:span text:style-name="T20">On the </text:span><text:span text:style-name="T48">Download Your Certificate</text:span><text:span text:style-name="T20"> page, press the </text:span><text:span text:style-name="T48">Download</text:span><text:span text:style-name="T20"> button to download the certificate (distribution.cer) to your Mac.</text:span></text:p>
        </text:list-item>
        <text:list-item>
          <text:p text:style-name="P84" loext:marker-style-name="T20"><text:span text:style-name="T20">Open the Keychain Access application. Choose the </text:span><text:span text:style-name="T48">login</text:span><text:span text:style-name="T20"> item from the Keychains section on the left. Choose the </text:span><text:span text:style-name="T48">File</text:span><text:span text:style-name="T20"> </text:span><text:span text:style-name="T53"></text:span><text:span text:style-name="T20"> </text:span><text:span text:style-name="T48">Import Items…</text:span><text:span text:style-name="T20"> menu item and browse to the Downloads folder and select the certificate (distribution.cer).</text:span></text:p>
        </text:list-item>
      </text:list>
      <text:p text:style-name="P16" loext:marker-style-name="T20"/>
      <text:p text:style-name="Standard" loext:marker-style-name="T20"><text:span text:style-name="T20">Now that the certificate is installed in the Keychain, you will be able to access it from within Reading App Builder.</text:span><text:span text:style-name="T20"/></text:p>
      <text:p text:style-name="P85" loext:marker-style-name="T20"><text:span text:style-name="T20">Note: To work with certificates, you will need the Apple Worldwide Developer Relations (WWDR) Certification Authority. It should have been installed with Xcode. When viewing your certificate in the Keychain Access application, if there is an error stating the certificate is not trusted, then install the certification authority.</text:span><text:span text:style-name="T20"/></text:p>
      <text:p text:style-name="P86" loext:marker-style-name="T20"><text:span text:style-name="T20">To get the certification authority:</text:span><text:span text:style-name="T20"/></text:p>
      <text:list text:style-name="WWNum1">
        <text:list-item>
          <text:p text:style-name="P87" loext:marker-style-name="T20"><text:span text:style-name="T20">Download the Apple WWDR Certification Authority from:<text:line-break/></text:span><text:a xlink:type="simple" xlink:href="https://developer.apple.com/certificationauthority/AppleWWDRCA.cer" text:style-name="Internet_20_link" text:visited-style-name="Visited_20_Internet_20_Link"><text:span text:style-name="Internet_20_link"><text:span text:style-name="T20">https://developer.apple.com/certificationauthority/AppleWWDRCA.cer</text:span></text:span></text:a></text:p>
        </text:list-item>
      </text:list>
      <text:p text:style-name="P88" loext:marker-style-name="T20"><text:span text:style-name="T20">For signing certificates created after January 28, 2021:<text:line-break/></text:span><text:a xlink:type="simple" xlink:href="https://www.apple.com/certificateauthority/AppleWWDRCAG3.cer" text:style-name="Internet_20_link" text:visited-style-name="Visited_20_Internet_20_Link"><text:span text:style-name="Internet_20_link"><text:span text:style-name="T20">https://www.apple.com/certificateauthority/AppleWWDRCAG3.cer</text:span></text:span></text:a><text:span text:style-name="T20"> </text:span></text:p>
      <text:list text:continue-numbering="true" text:style-name="WWNum1">
        <text:list-item>
          <text:p text:style-name="P87" loext:marker-style-name="T20"><text:span text:style-name="T20">Open the Keychain Access application. Choose the </text:span><text:span text:style-name="T48">System</text:span><text:span text:style-name="T20"> item from the Keychains section on the left. Choose the </text:span><text:span text:style-name="T48">File</text:span><text:span text:style-name="T20"> </text:span><text:span text:style-name="T53"></text:span><text:span text:style-name="T20"> </text:span><text:span text:style-name="T48">Import Items…</text:span><text:span text:style-name="T20"> menu item and browse to the Downloads folder and select the certification authority (AppleWWDRCA.cer). You will be prompted for a username and password that has admin privileges in order to modify the </text:span><text:span text:style-name="T48">System</text:span><text:span text:style-name="T20"> Keychain.</text:span></text:p>
        </text:list-item>
        <text:list-item>
          <text:p text:style-name="P87" loext:marker-style-name="T20"><text:span text:style-name="T20">Choose the </text:span><text:span text:style-name="T48">File</text:span><text:span text:style-name="T20"> </text:span><text:span text:style-name="T53"></text:span><text:span text:style-name="T20"> </text:span><text:span text:style-name="T48">Lock Keychain “System” </text:span><text:span text:style-name="T20">menu item.</text:span></text:p>
        </text:list-item>
      </text:list>
      <text:p text:style-name="P16" loext:marker-style-name="T20"/>
      <text:h text:style-name="P29" text:outline-level="2"><text:bookmark-start text:name="_Toc228354453"/>Create Provisioning Profile<text:bookmark-end text:name="_Toc228354453"/></text:h>
      <text:p text:style-name="P89" loext:marker-style-name="T55"><text:span text:style-name="T55">Distribution provisioning profiles are used to for two primary purposes:</text:span><text:span text:style-name="T55"/></text:p>
      <text:list text:style-name="WWNum40">
        <text:list-item>
          <text:p text:style-name="P90" loext:marker-style-name="T55"><text:span text:style-name="T55">AdHoc - to install your app on a limited number of registered devices for testing. </text:span><text:span text:style-name="T55"/></text:p>
        </text:list-item>
        <text:list-item>
          <text:p text:style-name="P90" loext:marker-style-name="T55"><text:span text:style-name="T55">App Store - to submit your app to the App Store.</text:span><text:span text:style-name="T55"/></text:p>
        </text:list-item>
      </text:list>
      <text:p text:style-name="P91" loext:marker-style-name="T48"><text:span text:style-name="T48">Creating a provisioning profile</text:span><text:span text:style-name="T48"/></text:p>
      <text:p text:style-name="P82" loext:marker-style-name="T20"><text:span text:style-name="T20">To create a new AdHoc provisioning profile, you will need an App ID and at least one registered device. To create a new App Store provisioning profile, you will need just the App ID.</text:span><text:span text:style-name="T20"/></text:p>
      <text:p text:style-name="P21" loext:marker-style-name="T20"><text:span text:style-name="T20">To create an </text:span><text:span text:style-name="T56">App ID</text:span><text:span text:style-name="T20">:</text:span></text:p>
      <text:list text:style-name="WWNum14">
        <text:list-item>
          <text:p text:style-name="P92" loext:marker-style-name="T20"><text:span text:style-name="T20">Go to the Apple Developer website and log in to your account if you are not already.</text:span><text:span text:style-name="T20"/></text:p>
        </text:list-item>
        <text:list-item>
          <text:p text:style-name="P92" loext:marker-style-name="T20"><text:span text:style-name="T20">Select </text:span><text:span text:style-name="T48">Certificates, Identifiers &amp; Profiles</text:span><text:span text:style-name="T20">.</text:span></text:p>
        </text:list-item>
        <text:list-item>
          <text:p text:style-name="P92" loext:marker-style-name="T20"><text:span text:style-name="T20">Select </text:span><text:span text:style-name="T48">Identifiers</text:span><text:span text:style-name="T20"> on the left of the page.</text:span></text:p>
        </text:list-item>
        <text:list-item>
          <text:p text:style-name="P92" loext:marker-style-name="T20"><text:span text:style-name="T20">Click the</text:span><draw:frame draw:style-name="fr1" draw:name="Picture 33" text:anchor-type="as-char" svg:width="0.1945in" svg:height="0.2362in"><draw:image xlink:href="Pictures/100000010000001C0000002296E3C9AD.png" xlink:type="simple" xlink:show="embed" xlink:actuate="onLoad" draw:mime-type="image/png"/></draw:frame><text:span text:style-name="T20"> button to the right of the </text:span><text:span text:style-name="T48">Identifiers</text:span><text:span text:style-name="T20"> header.</text:span></text:p>
        </text:list-item>
        <text:list-item>
          <text:p text:style-name="P92" loext:marker-style-name="T20"><text:span text:style-name="T20">Select </text:span><text:span text:style-name="T48">App IDs</text:span><text:span text:style-name="T20"> and click the </text:span><text:span text:style-name="T48">Continue</text:span><text:span text:style-name="T20"> button.</text:span></text:p>
        </text:list-item>
        <text:list-item>
          <text:p text:style-name="P92" loext:marker-style-name="T20"><text:span text:style-name="T20">Select </text:span><text:span text:style-name="T48">App</text:span><text:span text:style-name="T20"> and clock the </text:span><text:span text:style-name="T48">Continue</text:span><text:span text:style-name="T20"> button</text:span></text:p>
        </text:list-item>
        <text:list-item>
          <text:p text:style-name="P92" loext:marker-style-name="T20"><text:bookmark-start text:name="OLE_LINK22"/><text:bookmark-start text:name="OLE_LINK21"/><text:bookmark-start text:name="OLE_LINK20"/><text:bookmark-start text:name="OLE_LINK23"/><text:span text:style-name="T20">Enter a</text:span><text:span text:style-name="T48"> Description</text:span><text:span text:style-name="T20"> of your choice.<text:line-break/>It can be the </text:span><text:span text:style-name="T48">App Name</text:span><text:span text:style-name="T20"> from the </text:span><text:span text:style-name="T48">App</text:span><text:span text:style-name="T20"> </text:span><text:span text:style-name="T53"></text:span><text:span text:style-name="T57"> </text:span><text:span text:style-name="T48">Package</text:span><text:span text:style-name="T20"> page of Reading App Builder.</text:span><text:bookmark-end text:name="OLE_LINK22"/><text:bookmark-end text:name="OLE_LINK23"/></text:p>
        </text:list-item>
        <text:list-item>
          <text:p text:style-name="P92" loext:marker-style-name="T20"><text:bookmark-start text:name="OLE_LINK24"/><text:bookmark-start text:name="OLE_LINK25"/><text:span text:style-name="T20">For Bundle ID, choose </text:span><text:span text:style-name="T48">Explicit </text:span><text:span text:style-name="T20">and enter your app package name from the </text:span><text:span text:style-name="T48">App</text:span><text:span text:style-name="T20"> </text:span><text:bookmark-start text:name="OLE_LINK19"/><text:bookmark-start text:name="OLE_LINK18"/><text:span text:style-name="T53"></text:span><text:span text:style-name="T57"> </text:span><text:span text:style-name="T48">Package</text:span><text:span text:style-name="T20"> page of Reading App Builder.</text:span><text:bookmark-end text:name="OLE_LINK24"/><text:bookmark-end text:name="OLE_LINK25"/><text:bookmark-end text:name="OLE_LINK19"/><text:bookmark-end text:name="OLE_LINK18"/><text:bookmark-end text:name="OLE_LINK21"/><text:bookmark-end text:name="OLE_LINK20"/></text:p>
        </text:list-item>
        <text:list-item>
          <text:p text:style-name="P92" loext:marker-style-name="T20"><text:span text:style-name="T20">Of the App Capabilities, there are only two that may need to be checked. <text:s/>Check the Push Notifications capability if the app uses Firebase Cloud Messaging or Daily Reminders. <text:s/>Check the Associated Domain capability if using Deep Linking. </text:span><text:span text:style-name="T20"/></text:p>
        </text:list-item>
        <text:list-item>
          <text:p text:style-name="P92" loext:marker-style-name="T20"><text:span text:style-name="T20">Click the </text:span><text:span text:style-name="T48">Continue</text:span><text:span text:style-name="T20"> button.</text:span></text:p>
        </text:list-item>
      </text:list>
      <text:p text:style-name="P16" loext:marker-style-name="T20"/>
      <text:p text:style-name="P93" loext:marker-style-name="T20"><text:span text:style-name="T20">To register a </text:span><text:span text:style-name="T56">device</text:span><text:span text:style-name="T20"> (i.e. a specific iPhone or iPad for testing):</text:span></text:p>
      <text:list text:style-name="WWNum17">
        <text:list-item>
          <text:p text:style-name="P94" loext:marker-style-name="T20"><text:span text:style-name="T20">Select </text:span><text:span text:style-name="T48">Devices</text:span><text:span text:style-name="T20"> on the left of the page.</text:span></text:p>
        </text:list-item>
        <text:list-item>
          <text:p text:style-name="P94" loext:marker-style-name="T20"><text:span text:style-name="T20">Click the</text:span><draw:frame draw:style-name="fr1" draw:name="Picture 30" text:anchor-type="as-char" svg:width="0.1945in" svg:height="0.2362in"><draw:image xlink:href="Pictures/100000010000001C0000002296E3C9AD.png" xlink:type="simple" xlink:show="embed" xlink:actuate="onLoad" draw:mime-type="image/png"/></draw:frame><text:span text:style-name="T20"> button to the right of the </text:span><text:span text:style-name="T48">Devices</text:span><text:span text:style-name="T20"> header.</text:span></text:p>
        </text:list-item>
        <text:list-item>
          <text:p text:style-name="P94" loext:marker-style-name="T20">In the section <text:span text:style-name="T36">Register a Device</text:span>, enter a name of the device (such as “John Smith’s iPhone”) and its UDID (unique device identifier, a sequence of 40 letters and numbers). Press <text:span text:style-name="T36">Continue</text:span>.</text:p>
        </text:list-item>
        <text:list-item>
          <text:p text:style-name="P94" loext:marker-style-name="T20"><text:span text:style-name="T20">On the next page, check that the device information is displayed correctly and click </text:span><text:span text:style-name="T48">Register</text:span><text:span text:style-name="T20"> to confirm.</text:span></text:p>
        </text:list-item>
      </text:list>
      <text:p text:style-name="P95" loext:marker-style-name="T20"><text:span text:style-name="T20">Note that you can register up to 100 devices of each type (e.g. up to 100 iPhones, 100 iPads) per year of your Apple Developer Program membership. You can remove devices that you no longer need at the beginning of the next membership year.</text:span><text:span text:style-name="T20"/></text:p>
      <text:p text:style-name="P96" loext:marker-style-name="T20"/>
      <text:p text:style-name="P93" loext:marker-style-name="T20"><text:span text:style-name="T20">To create a </text:span><text:span text:style-name="T56">provisioning profile</text:span><text:span text:style-name="T20">:</text:span></text:p>
      <text:list text:style-name="WWNum18">
        <text:list-item>
          <text:p text:style-name="P97" loext:marker-style-name="T20"><text:span text:style-name="T20">Select </text:span><text:span text:style-name="T48">Profiles</text:span><text:span text:style-name="T20"> on the left of the page.</text:span></text:p>
        </text:list-item>
        <text:list-item>
          <text:p text:style-name="P97" loext:marker-style-name="T20"><text:span text:style-name="T20">Click the</text:span><draw:frame draw:style-name="fr1" draw:name="Picture 34" text:anchor-type="as-char" svg:width="0.1945in" svg:height="0.2362in"><draw:image xlink:href="Pictures/100000010000001C0000002296E3C9AD.png" xlink:type="simple" xlink:show="embed" xlink:actuate="onLoad" draw:mime-type="image/png"/></draw:frame><text:span text:style-name="T20"> button to the right of the </text:span><text:span text:style-name="T48">Profiles</text:span><text:span text:style-name="T20"> header.</text:span></text:p>
        </text:list-item>
        <text:list-item>
          <text:p text:style-name="P97" loext:marker-style-name="T20"><text:span text:style-name="T20">On the </text:span><text:span text:style-name="T48">Register a New Provisioning Profile</text:span><text:span text:style-name="T20"> page, under </text:span><text:span text:style-name="T48">Distribution</text:span><text:span text:style-name="T20">, select </text:span><text:span text:style-name="T48">Ad Hoc</text:span><text:span text:style-name="T20"> (for testing) or </text:span><text:span text:style-name="T48">App Store</text:span><text:span text:style-name="T20"> (for submission to the App Store). Click </text:span><text:span text:style-name="T48">Continue</text:span><text:span text:style-name="T20"> to move to the next page.</text:span></text:p>
        </text:list-item>
        <text:list-item>
          <text:p text:style-name="P97" loext:marker-style-name="T20"><text:span text:style-name="T20">On the ‘Select an App ID’ page, select the App ID from the list of App IDs you have already defined. Click the </text:span><text:span text:style-name="T48">Continue</text:span><text:span text:style-name="T20"> button.</text:span></text:p>
        </text:list-item>
        <text:list-item>
          <text:p text:style-name="P97" loext:marker-style-name="T20"><text:span text:style-name="T20">On the ‘Select Certificates’ page, select the certificate (Distribution) to include in the profile. Click the </text:span><text:span text:style-name="T48">Continue</text:span><text:span text:style-name="T20"> button.</text:span></text:p>
        </text:list-item>
        <text:list-item>
          <text:p text:style-name="P97" loext:marker-style-name="T20"><text:span text:style-name="T20">If creating an AdHoc provisioning profile:<text:line-break/>On the ‘Select Devices’ page, check the device(s) that you want to be able to install and run the app. Click the </text:span><text:span text:style-name="T48">Continue</text:span><text:span text:style-name="T20"> button.</text:span></text:p>
        </text:list-item>
        <text:list-item>
          <text:p text:style-name="P97" loext:marker-style-name="T20"><text:span text:style-name="T20">On the ‘Review, Name, and Generate’ page, give the profile a name of your choice. It is helpful to include “App Store” or “AdHoc” in the name. Click the </text:span><text:span text:style-name="T48">Continue</text:span><text:span text:style-name="T20"> button.</text:span></text:p>
        </text:list-item>
        <text:list-item>
          <text:p text:style-name="P97" loext:marker-style-name="T20"><text:span text:style-name="T20">On the ‘Download and Install’ page, click </text:span><text:span text:style-name="T48">Download</text:span><text:span text:style-name="T20"> to save your new .mobileprovision file to your computer. </text:span></text:p>
        </text:list-item>
      </text:list>
      <text:p text:style-name="P95" loext:marker-style-name="T20"><text:span text:style-name="T20">This is the Provisioning Profile file that you will select in Reading App Builder.</text:span><text:span text:style-name="T20"/></text:p>
      <text:p text:style-name="P98" loext:marker-style-name="T48"><text:span text:style-name="T48">Download existing mobile provision files</text:span><text:span text:style-name="T48"/></text:p>
      <text:p text:style-name="Standard" loext:marker-style-name="T20"><text:span text:style-name="T20">If other members of your team have already created provisioning profiles, they can be downloaded from the App Developer website by selecting the profile to be downloaded and pressing the </text:span><text:span text:style-name="T48">Download</text:span><text:span text:style-name="T20"> button.</text:span></text:p>
      <text:h text:style-name="Heading_20_1" text:outline-level="1"><text:bookmark text:name="_q7i9umrolddd"/><text:bookmark text:name="_e55ehiika5jz"/><text:bookmark-start text:name="_Toc475369922"/><text:bookmark-start text:name="_Toc228354454"/><text:bookmark-start text:name="_Toc78036936"/>Building an iOS App<text:bookmark-end text:name="_Toc228354454"/><text:bookmark-end text:name="_Toc78036936"/></text:h>
      <text:p text:style-name="P99" loext:marker-style-name="T20"><text:span text:style-name="T25">The first step in building an iOS app is to create </text:span><text:span text:style-name="T20">a new app project following the instructions in the RAB </text:span><text:span text:style-name="T48">Building Apps</text:span><text:span text:style-name="T20"> document. <text:s/>Then follow the instructions below.</text:span></text:p>
      <text:h text:style-name="P29" text:outline-level="2"><text:bookmark-start text:name="_Toc78036937"/><text:bookmark-start text:name="_Toc228354455"/>Application builds available for iOS<text:bookmark-end text:name="_Toc78036937"/><text:bookmark-end text:name="_Toc228354455"/></text:h>
      <text:p text:style-name="Standard" loext:marker-style-name="T55"><text:span text:style-name="T55">For iOS distribution, three different app types are available. </text:span><text:span text:style-name="T55"/></text:p>
      <text:h text:style-name="Heading_20_3" text:outline-level="3" loext:marker-style-name="T14"><text:bookmark-start text:name="_Toc78036938"/><text:bookmark-start text:name="_Toc228354456"/><text:span text:style-name="T14">Dedicated App</text:span><text:bookmark-end text:name="_Toc78036938"/><text:bookmark-end text:name="_Toc228354456"/><text:span text:style-name="T14"/></text:h>
      <text:p text:style-name="Standard" loext:marker-style-name="T55"><text:span text:style-name="T55">This is the standard traditional app and is the default. <text:s/>The content that is defined for this project will be used to generate an iPA file that may be delivered to the App Store for publication. <text:s/>A dedicated app could be viewed as a container app that only runs one preselected asset package that is included in the app at build time.</text:span><text:span text:style-name="T55"/></text:p>
      <text:h text:style-name="Heading_20_3" text:outline-level="3" loext:marker-style-name="T14"><text:bookmark-start text:name="_Toc78036939"/><text:bookmark-start text:name="_Toc228354457"/><text:span text:style-name="T14">Container App</text:span><text:bookmark-end text:name="_Toc78036939"/><text:bookmark-end text:name="_Toc228354457"/><text:span text:style-name="T14"/></text:h>
      <text:p text:style-name="Standard" loext:marker-style-name="T55"><text:span text:style-name="T55">App Builder users have encountered issues with the Apple App Store reviewers if too many apps generated by the App Builder are published to the same account. <text:s text:c="2"/>Since the actual application differs only in the content provided, Apple rejects the app as being spam. <text:s/>To avoid these issues, a container app can be generated instead of the standard dedicated app.</text:span><text:span text:style-name="T55"/></text:p>
      <text:p text:style-name="P100" loext:marker-style-name="T55"/>
      <text:p text:style-name="Standard" loext:marker-style-name="T55"><text:span text:style-name="T55">The container app does not contain content of its own. <text:s/>It does not have book collections, audio or any of the other normal content. <text:s/>Instead, on its initial startup, it accesses a web site that is maintained by the app developer. <text:s/>The web site provides specially formatted links to multiple asset packages. <text:s/>The app user selects one of these asset packages. The container app downloads it and runs using the downloaded content. <text:s/>From this point, it resembles the dedicated app, running this set of content without further downloads being required. <text:s/></text:span><text:span text:style-name="T55"/></text:p>
      <text:p text:style-name="P100" loext:marker-style-name="T55"/>
      <text:p text:style-name="Standard" loext:marker-style-name="T55"><text:span text:style-name="T55">The user of a container app does have the option of resetting the content at any time. <text:s/>If the user elects to reset the app content, the app asset package currently in use is deleted from his device. <text:s/>The web site accessed at the initial startup is displayed, and the user can once again select the asset package to be run from the available list. <text:s/>The selected package is then downloaded and run in place of the discarded one.</text:span><text:span text:style-name="T55"/></text:p>
      <text:p text:style-name="P100" loext:marker-style-name="T55"/>
      <text:p text:style-name="Standard" loext:marker-style-name="T55"><text:span text:style-name="T55">Building a container app will generate an IPA file similar to the dedicated app with the exception that no content is included with the app beyond some configuration information and a reference to the website used by the app. <text:s/>The IPA file is submitted to the Apple App Store in the same manner as the dedicated app.</text:span><text:span text:style-name="T55"/></text:p>
      <text:p text:style-name="P100" loext:marker-style-name="T55"/>
      <text:p text:style-name="Standard" loext:marker-style-name="T55"><text:span text:style-name="T55">While most of the settings associated with the app need to be set in the asset package projects, there are a few settings that must be set at the container app level. <text:s/>The first of these are the Firebase related features. <text:s/>Firebase tracks at the app level, and the settings for the </text:span><text:span text:style-name="T58">Firebase</text:span><text:span text:style-name="T55"> tab and the </text:span><text:span text:style-name="T58">Security</text:span><text:span text:style-name="T55"> tab will apply for all app asset packages associated with this container app. <text:s/>The GoogleService-Info.plist file that is used by the iOS Firebase configuration should be associated with the Package Name for the container app set on the package tab. <text:s/>Firebase will track information associated with the container app, not with the individual asset package projects. <text:s text:c="2"/>A project field is included in events generated by asset packages and sent to Firebase and can be used to identify the events that originated with a particular package that is being distributed.</text:span></text:p>
      <text:p text:style-name="P100" loext:marker-style-name="T55"/>
      <text:p text:style-name="Standard" loext:marker-style-name="T55"><text:span text:style-name="T55">Several other features follow the settings in the asset package project definition but must be accommodated by the container app that loads them. <text:s/>If any of the asset packages that can be loaded by this container app application use </text:span><text:span text:style-name="T58">Daily Reminder</text:span><text:span text:style-name="T55"> features on the </text:span><text:span text:style-name="T58">Notifications</text:span><text:span text:style-name="T55"> tab, these options must be enabled in the container app as well as in the asset package that wants to use the feature. <text:s/>The </text:span><text:span text:style-name="T58">IPA</text:span><text:span text:style-name="T55"> tab also includes a checkbox that must be selected if any of the asset packages include audio files.</text:span></text:p>
      <text:p text:style-name="P100" loext:marker-style-name="T55"/>
      <text:p text:style-name="Standard" loext:marker-style-name="T55"><text:span text:style-name="T55">On the </text:span><text:span text:style-name="T58">Images</text:span><text:span text:style-name="T55"> tab, the </text:span><text:span text:style-name="T58">iOS Icon</text:span><text:span text:style-name="T55"> and the </text:span><text:span text:style-name="T58">iOS Splash Screen</text:span><text:span text:style-name="T55"> (optional) should be configured for the container app as these will be the images used. <text:s/>The images set in asset packages for these two items will not be used.</text:span></text:p>
      <text:h text:style-name="Heading_20_3" text:outline-level="3" loext:marker-style-name="T14"><text:bookmark-start text:name="_Toc78036940"/><text:bookmark-start text:name="_Toc228354458"/><text:span text:style-name="T14">Asset Package</text:span><text:bookmark-end text:name="_Toc78036940"/><text:bookmark-end text:name="_Toc228354458"/><text:span text:style-name="T14"/></text:h>
      <text:p text:style-name="Standard" loext:marker-style-name="T14"><text:span text:style-name="T14">Asset packages are used in conjunction with Container Apps. <text:s/>The configuration of an asset package project should be the same as it is for a dedicated app, setting the book collections, audio and feature required for that app. <text:s/>The only exceptions are those mentioned in the section above on Container Apps. <text:s text:c="2"/>However, where the build of Dedicated Apps or Container Apps results in an IPA file to submit to the Apple App Store, the build of an Asset Package project results in a zip file, saved to the IPA output folder, that is intended to be saved to a location where it can be referenced by the web site supporting the Container App. <text:s/>A user running who has downloaded the Container App from the App Store will select this package from the list presented by the Container App Web Site, at which point it will be downloaded to the device, decompressed and run as the project for the app. <text:s/>All of the book collection, audio, font, images, features and configuration information that is usually embedded within the dedicated app is saved in this zip file so that the project can be run as it would if it were configured as a dedicated app.</text:span><text:span text:style-name="T14"/></text:p>
      <text:p text:style-name="P37" loext:marker-style-name="T14"/>
      <text:p text:style-name="Standard" loext:marker-style-name="T55"><text:span text:style-name="T55">Dedicated Apps and Container Apps can only be generated on an Apple Mac device. <text:s/>Asset Packages do not require a Mac. <text:s/>Therefore, App Builder can build a project configured as an iOS Asset package on a Mac, a Linux device, or a Windows device. <text:s/>On a Mac Device, selecting </text:span><text:span text:style-name="T58">Build iOS App</text:span><text:span text:style-name="T55"> for a project configured as an Asset Package will generate the zip file in the IPA Output Folder. <text:s/>For testing purposes, so that the app developer can test the device outside of the container app, selecting </text:span><text:span text:style-name="T58">Run iOS App in Simulator</text:span><text:span text:style-name="T55"> will cause an IPA file to be generated in the Simulator Output Folder that will run using the project configuration. <text:s/>The app developer can load the IPA file on an iOS device simulator and test the project before generating the zip file and adding it to their Container App web site.</text:span></text:p>
      <text:h text:style-name="Heading_20_3" text:outline-level="3" loext:marker-style-name="T14"><text:bookmark-start text:name="_Toc78036941"/><text:bookmark-start text:name="_Toc228354459"/><text:span text:style-name="T14">Container App Website</text:span><text:bookmark-end text:name="_Toc78036941"/><text:bookmark-end text:name="_Toc228354459"/><text:span text:style-name="T14"/></text:h>
      <text:p text:style-name="Standard" loext:marker-style-name="T14"><text:span text:style-name="T14">While not generated by App Builder, a Container App project must have a web site where the asset packages are located and a web page is defined by the user to allow selection of the asset package. <text:s text:c="2"/>The Container App displays the web page referenced by the URL that is part of its configuration. <text:s/>Anything other than links that reference </text:span><text:span text:style-name="T59">asset://yourwebsite/yourassetpackage.zip</text:span><text:span text:style-name="T14"> or </text:span><text:a xlink:type="simple" xlink:href="https://[something].zip" text:style-name="Internet_20_link" text:visited-style-name="Visited_20_Internet_20_Link"><text:span text:style-name="Internet_20_link"><text:span text:style-name="T59">https://[something].zip</text:span></text:span></text:a><text:span text:style-name="T59"> </text:span><text:span text:style-name="T14"><text:s/>or </text:span><text:a xlink:type="simple" xlink:href="http://[something].zip" text:style-name="Internet_20_link" text:visited-style-name="Visited_20_Internet_20_Link"><text:span text:style-name="Internet_20_link"><text:span text:style-name="T59">http://[something].zip</text:span></text:span></text:a><text:span text:style-name="T59"> </text:span><text:span text:style-name="T14">are passed through the browser and are displayed to the user. <text:s/>When the user selects a link that starts with </text:span><text:span text:style-name="T59">asset:// </text:span><text:span text:style-name="T14">or a normal URL that ends in </text:span><text:span text:style-name="T59">.zip</text:span><text:span text:style-name="T14">, that is interpreted as the selection of an asset package. <text:s text:c="2"/>If the URL starts with </text:span><text:span text:style-name="T59">asset://</text:span><text:span text:style-name="T14">, the </text:span><text:span text:style-name="T59">asset://</text:span><text:span text:style-name="T14"> in the link is replaced with </text:span><text:span text:style-name="T59">https:// </text:span><text:span text:style-name="T14">to generate the destination URL. <text:s/>The file referenced is downloaded, unzipped, and used to initialize the Container App. <text:s/>A very simple example of a Container App Website web page would be: </text:span></text:p>
      <text:p text:style-name="P37" loext:marker-style-name="T14"/>
      <text:p text:style-name="P33" loext:marker-style-name="T14"><text:span text:style-name="T14">&lt;html&gt;</text:span><text:span text:style-name="T14"/></text:p>
      <text:p text:style-name="P33" loext:marker-style-name="T14"><text:span text:style-name="T14">&lt;head&gt;</text:span><text:span text:style-name="T14"/></text:p>
      <text:p text:style-name="P33" loext:marker-style-name="T14"><text:span text:style-name="T14">&lt;style&gt;</text:span><text:span text:style-name="T14"/></text:p>
      <text:p text:style-name="P33" loext:marker-style-name="T14"><text:span text:style-name="T14">.container {</text:span><text:span text:style-name="T14"/></text:p>
      <text:p text:style-name="P33" loext:marker-style-name="T14"><text:span text:style-name="T14"><text:s text:c="2"/>display: flex;</text:span><text:span text:style-name="T14"/></text:p>
      <text:p text:style-name="P33" loext:marker-style-name="T14"><text:span text:style-name="T14"><text:s text:c="2"/>justify-content: center;</text:span><text:span text:style-name="T14"/></text:p>
      <text:p text:style-name="P33" loext:marker-style-name="T14"><text:span text:style-name="T14"><text:s text:c="2"/>background-color: powderblue;</text:span><text:span text:style-name="T14"/></text:p>
      <text:p text:style-name="P33" loext:marker-style-name="T14"><text:span text:style-name="T14"><text:s text:c="2"/>font-size: 40px;</text:span><text:span text:style-name="T14"/></text:p>
      <text:p text:style-name="P33" loext:marker-style-name="T14"><text:span text:style-name="T14">}</text:span><text:span text:style-name="T14"/></text:p>
      <text:p text:style-name="P33" loext:marker-style-name="T14"><text:span text:style-name="T14">.center {</text:span><text:span text:style-name="T14"/></text:p>
      <text:p text:style-name="P33" loext:marker-style-name="T14"><text:span text:style-name="T14"><text:s text:c="2"/>width: 800px;</text:span><text:span text:style-name="T14"/></text:p>
      <text:p text:style-name="P33" loext:marker-style-name="T14"><text:span text:style-name="T14">}</text:span><text:span text:style-name="T14"/></text:p>
      <text:p text:style-name="P33" loext:marker-style-name="T14"><text:span text:style-name="T14">&lt;/style&gt;</text:span><text:span text:style-name="T14"/></text:p>
      <text:p text:style-name="P33" loext:marker-style-name="T14"><text:span text:style-name="T14">&lt;/head&gt;</text:span><text:span text:style-name="T14"/></text:p>
      <text:p text:style-name="P33" loext:marker-style-name="T14"><text:span text:style-name="T14">&lt;body&gt;</text:span><text:span text:style-name="T14"/></text:p>
      <text:p text:style-name="P33" loext:marker-style-name="T14"><text:span text:style-name="T14">&lt;p id="top" class="container"&gt;Container App Test&lt;/p&gt;</text:span><text:span text:style-name="T14"/></text:p>
      <text:p text:style-name="P53" loext:marker-style-name="T14"/>
      <text:p text:style-name="P33" loext:marker-style-name="T14"><text:span text:style-name="T14">&lt;div class="container"&gt;</text:span><text:span text:style-name="T14"/></text:p>
      <text:p text:style-name="P33" loext:marker-style-name="T14"><text:span text:style-name="T14">&lt;ul&gt; Select a translation</text:span><text:span text:style-name="T14"/></text:p>
      <text:p text:style-name="P33" loext:marker-style-name="T14"><text:span text:style-name="T14">&lt;li&gt;&lt;a href="asset://sab-assets-test.s3.amazonaws.com/EnglishGreek2.zip"&gt;English Greek&lt;/a&gt;&lt;/li&gt;</text:span><text:span text:style-name="T14"/></text:p>
      <text:p text:style-name="P33" loext:marker-style-name="T14"><text:span text:style-name="T14">&lt;li&gt;&lt;a href="https://Test.zip"&gt;Test&lt;/a&gt;&lt;/li&gt;</text:span><text:span text:style-name="T14"/></text:p>
      <text:p text:style-name="P33" loext:marker-style-name="T14"><text:span text:style-name="T14">&lt;/ul&gt;</text:span><text:span text:style-name="T14"/></text:p>
      <text:p text:style-name="P33" loext:marker-style-name="T14"><text:span text:style-name="T14">&lt;/div&gt;</text:span><text:span text:style-name="T14"/></text:p>
      <text:p text:style-name="P33" loext:marker-style-name="T14"><text:span text:style-name="T14">&lt;/body&gt;</text:span><text:span text:style-name="T14"/></text:p>
      <text:p text:style-name="P33" loext:marker-style-name="T14"><text:span text:style-name="T14">&lt;/html&gt;</text:span><text:span text:style-name="T14"/></text:p>
      <text:p text:style-name="P100" loext:marker-style-name="T55"/>
      <text:p text:style-name="P16" loext:marker-style-name="T20"/>
      <text:h text:style-name="P81" text:outline-level="2"><text:bookmark-start text:name="_Toc78036942"/><text:bookmark-start text:name="OLE_LINK2"/><text:bookmark-start text:name="_Toc228354460"/><text:bookmark-start text:name="_Toc193453355"/>App Type (iOS) Tab<text:bookmark-end text:name="_Toc78036942"/><text:bookmark-end text:name="_Toc228354460"/><text:bookmark-end text:name="_Toc193453355"/></text:h>
      <text:p text:style-name="P101" loext:marker-style-name="T20"/>
      <text:p text:style-name="P88" loext:marker-style-name="T20"><draw:frame draw:style-name="fr1" draw:name="Picture 3" text:anchor-type="as-char" svg:width="5.6665in" svg:height="2.5626in"><draw:image xlink:href="Pictures/10000001000004DD000002330E9B6D6A.png" xlink:type="simple" xlink:show="embed" xlink:actuate="onLoad" draw:mime-type="image/png"/><svg:desc>A screenshot of a computer

AI-generated content may be incorrect.</svg:desc></draw:frame></text:p>
      <text:p text:style-name="P101" loext:marker-style-name="T20"/>
      <text:p text:style-name="P88" loext:marker-style-name="T20"><text:span text:style-name="T20">The </text:span><text:span text:style-name="T60">App Type</text:span><text:span text:style-name="T26"> </text:span><text:span text:style-name="T20">information identifies the type of application being built, as defined in the previous section. <text:s/>Select either </text:span><text:span text:style-name="T61">Dedicated App, Container App, </text:span><text:span text:style-name="T20">or </text:span><text:span text:style-name="T61">Asset Package.</text:span></text:p>
      <text:p text:style-name="P88" loext:marker-style-name="T20"><text:span text:style-name="T20">If the </text:span><text:span text:style-name="T61">Container App</text:span><text:span text:style-name="T20"> option is selected, the </text:span><text:span text:style-name="T60">Container App URL</text:span><text:span text:style-name="T20"> needs to be entered. The URL entered here is the web page that will be displayed to the user by the container app to allow them to select the asset package to be used. <text:s/>The checkbox underneath it must be selected if any asset package used by the Container App will contain audio for books.</text:span></text:p>
      <text:p text:style-name="P88" loext:marker-style-name="T20"><text:span text:style-name="T20">If the </text:span><text:span text:style-name="T61">Asset Package</text:span><text:span text:style-name="T20"> option is selected, the </text:span><text:span text:style-name="T60">Filename</text:span><text:span text:style-name="T20"> field under the </text:span><text:span text:style-name="T61">Asset Package </text:span><text:span text:style-name="T20">option is enabled. <text:s/>This field defines the base name, without path, that will be assigned to the Asset Package zip file. <text:s/>The file will be created in the IPA Output folder when the user selects </text:span><text:span text:style-name="T61">Build iOS App</text:span><text:span text:style-name="T20"> (or on a Linux or Windows system, selects </text:span><text:span text:style-name="T61">Build iOS App Asset Package</text:span><text:span text:style-name="T20">.<text:line-break/></text:span></text:p>
      <text:p text:style-name="P16" loext:marker-style-name="T20"/>
      <text:p text:style-name="P102" loext:marker-style-name="T55"/>
      <text:h text:style-name="P29" text:outline-level="2"><text:bookmark-end text:name="OLE_LINK2"/><text:bookmark-start text:name="_Toc228354461"/>IPA Tab<text:bookmark-end text:name="_Toc228354461"/></text:h>
      <text:p text:style-name="P100" loext:marker-style-name="T55"/>
      <text:p text:style-name="P33" loext:marker-style-name="T20"><draw:frame draw:style-name="fr1" draw:name="Image2" text:anchor-type="as-char" svg:width="5.6528in" svg:height="2.7598in"><draw:image xlink:href="Pictures/10000001000004D70000025DDCF3B5BB.png" xlink:type="simple" xlink:show="embed" xlink:actuate="onLoad" draw:mime-type="image/png"/><svg:desc>A screenshot of a computer

AI-generated content may be incorrect.</svg:desc></draw:frame></text:p>
      <text:p text:style-name="P103" loext:marker-style-name="T20"><text:span text:style-name="T20">Click on the </text:span><text:span text:style-name="T48">IPA</text:span><text:span text:style-name="T20"> tab. <text:s/></text:span></text:p>
      <text:p text:style-name="P88" loext:marker-style-name="T20"><text:span text:style-name="T20">This allows you to set the name of the ipa file to be generated as well as the build and version information.</text:span><text:span text:style-name="T20"/></text:p>
      <text:p text:style-name="P88" loext:marker-style-name="T61"><text:span text:style-name="T20">The remaining fields, under the </text:span><text:span text:style-name="T60">IPA File</text:span><text:span text:style-name="T20"> and </text:span><text:span text:style-name="T60">Apple Id </text:span><text:span text:style-name="T20">headers are only enabled for a </text:span><text:span text:style-name="T61">Dedicated App </text:span><text:span text:style-name="T20">or </text:span><text:span text:style-name="T61">Container App.</text:span></text:p>
      <text:p text:style-name="P88" loext:marker-style-name="T20"><text:span text:style-name="T20">The </text:span><text:span text:style-name="T62">Filename</text:span><text:span text:style-name="T20"> field on the screen for the </text:span><text:span text:style-name="T60">IPA File</text:span><text:span text:style-name="T20"> section specifies the base name of the ipa file to be generated. <text:s/>If the checkbox at the bottom of the screen for </text:span><text:span text:style-name="T63">Append version name to ipa filename</text:span><text:span text:style-name="T20"> is checked, then the version indicated by the </text:span><text:span text:style-name="T63">Version Name</text:span><text:span text:style-name="T20"> fields is added to the base filename. <text:s/></text:span></text:p>
      <text:p text:style-name="P104" loext:marker-style-name="T20"><text:span text:style-name="T20">The </text:span><text:span text:style-name="T62">Build</text:span><text:span text:style-name="T63"> </text:span><text:span text:style-name="T20">field referenced as </text:span><text:span text:style-name="T63">Build </text:span><text:span text:style-name="T20">is also called </text:span><text:span text:style-name="T63">Bundle Version String, Bundle Version</text:span><text:span text:style-name="T20"> or </text:span><text:span text:style-name="T63">CFBundleVersion</text:span><text:span text:style-name="T20"> within Xcode and ITunes Connect. It represents the build number. The </text:span><text:span text:style-name="T63">Build</text:span><text:span text:style-name="T20"> field expects an integer value and should be incremented with each file that is submitted to the ITunes Connect for release or testing. </text:span></text:p>
      <text:p text:style-name="P104" loext:marker-style-name="T20"><text:span text:style-name="T20">The </text:span><text:span text:style-name="T62">Version Name</text:span><text:span text:style-name="T63"> </text:span><text:span text:style-name="T20">field is referenced as </text:span><text:span text:style-name="T63">Version, Bundle Short Version String, Bundle versions string, short </text:span><text:span text:style-name="T20">and </text:span><text:span text:style-name="T63">CFBundleShortVersionString </text:span><text:span text:style-name="T20">within Xcode and ITunes Connect. The field is created as a concatenation of the values of the three fields separated by a period. If the final field has a value of 0, then the version string is created from just the first two values. So for values of 1, 2 and 0, the resulting string is “1.2”. <text:s/>For values of 1, 2 and 3, the resulting version string is “1.2.3”.</text:span></text:p>
      <text:p text:style-name="P105" loext:marker-style-name="T20"><text:span text:style-name="T20">The </text:span><text:span text:style-name="T26">Apple ID</text:span><text:span text:style-name="T20"> field is the id assigned by App Store Connect to the application in the app store. <text:s/>It can be obtained from </text:span><text:span text:style-name="T26">Apple ID </text:span><text:span text:style-name="T20">filed on the App Information tab in the App Store Connect entry for the app as shown below</text:span></text:p>
      <text:p text:style-name="P105" loext:marker-style-name="T20"><draw:frame draw:style-name="fr1" draw:name="Picture 15" text:anchor-type="as-char" svg:width="5.5681in" svg:height="5.0937in"><draw:image xlink:href="Pictures/10000001000004CC000004630FC68EE0.png" xlink:type="simple" xlink:show="embed" xlink:actuate="onLoad" draw:mime-type="image/png"/><svg:desc>Graphical user interface, text, application, email

Description automatically generated</svg:desc></draw:frame></text:p>
      <text:p text:style-name="P105" loext:marker-style-name="T26"><text:span text:style-name="T20">The </text:span><text:span text:style-name="T26">Bundle ID</text:span><text:span text:style-name="T20"> section allows the user to specify a Bundle ID for the app that is different than the package name. <text:s/>By default, the </text:span><text:span text:style-name="T60">Package Name </text:span><text:span text:style-name="T20">field from the </text:span><text:span text:style-name="T60">Package</text:span><text:span text:style-name="T20"> tab is used as the Application Bundle ID that is used in creating the provisioning profiles and as the application identifier for the Apple App Store. <text:s/>If the user wants the iOS version of the app to have an identifier that is different than the package name that is used for the Android version of the app, press the </text:span><text:span text:style-name="T60">Specify a Bundle ID</text:span><text:span text:style-name="T20"> button and then enter the ID to be used in the text box labelled </text:span><text:span text:style-name="T60">Bundle ID.</text:span></text:p>
      <text:p text:style-name="P106" loext:marker-style-name="T20"/>
      <text:p text:style-name="P100" loext:marker-style-name="T55"/>
      <text:h text:style-name="P29" text:outline-level="2"><text:bookmark-start text:name="_Toc78036943"/><text:bookmark-start text:name="_Toc228354462"/>Signing (iOS) Tab<text:bookmark-end text:name="_Toc78036943"/><text:bookmark-end text:name="_Toc228354462"/></text:h>
      <text:list text:style-name="WWNum22">
        <text:list-item>
          <text:p text:style-name="P107" loext:marker-style-name="T20"><text:span text:style-name="T20">Select the </text:span><text:span text:style-name="T48">Signing (iOS)</text:span><text:span text:style-name="T20"> tab to open the iOS signing options for the app.<text:line-break/></text:span></text:p>
        </text:list-item>
      </text:list>
      <text:p text:style-name="P108" loext:marker-style-name="T20"><draw:frame draw:style-name="fr1" draw:name="Picture 28" text:anchor-type="as-char" svg:width="5.698in" svg:height="3.5409in"><draw:image xlink:href="Pictures/1000000100000228000001575B613F03.tif" xlink:type="simple" xlink:show="embed" xlink:actuate="onLoad" draw:mime-type="image/tiff"/><svg:desc>Graphical user interface, text, application, email

Description automatically generated</svg:desc></draw:frame></text:p>
      <text:list text:continue-numbering="true" text:style-name="WWNum22">
        <text:list-item>
          <text:p text:style-name="P109" loext:marker-style-name="T20"><text:span text:style-name="T20">Select the </text:span><text:span text:style-name="T48">Signing Identity</text:span><text:span text:style-name="T20"> from the drop down list of signing certificates which have been downloaded and installed to this system in the earlier steps.</text:span></text:p>
        </text:list-item>
        <text:list-item>
          <text:p text:style-name="P109" loext:marker-style-name="T20"><text:span text:style-name="T20">For the </text:span><text:span text:style-name="T48">Provisioning Profile </text:span><text:span text:style-name="T20">entry, enter or browse to the mobile provisioning file associated with the app that was downloaded in the earlier steps. <text:line-break/></text:span></text:p>
        </text:list-item>
      </text:list>
      <text:p text:style-name="Standard"/>
      <text:list text:continue-numbering="true" text:style-name="WWNum22">
        <text:list-item>
          <text:p text:style-name="P110" loext:marker-style-name="T20"><text:span text:style-name="T20">Click on the </text:span><text:span text:style-name="T48">Build iOS App </text:span><text:span text:style-name="T20">button at the top of the screen. A terminal window should open. The build script for the iOS App should run within that terminal window.</text:span></text:p>
        </text:list-item>
      </text:list>
      <text:p text:style-name="P108" loext:marker-style-name="T20"><draw:frame draw:style-name="fr1" draw:name="Picture 26" text:anchor-type="as-char" svg:width="5.678in" svg:height="3.539in"><draw:image xlink:href="Pictures/100000010000022500000156BE5E2A8F.png" xlink:type="simple" xlink:show="embed" xlink:actuate="onLoad" draw:mime-type="image/png"/><svg:desc>Graphical user interface, text, application, email

Description automatically generated</svg:desc></draw:frame></text:p>
      <text:list text:continue-numbering="true" text:style-name="WWNum22">
        <text:list-item>
          <text:p text:style-name="P109" loext:marker-style-name="T20"><text:span text:style-name="T20">Examine the terminal window once the shell script has been completed. The message “Signed release IPA built successfully” should appear in the window if the app has been built successfully. (Note that occasionally the terminal window will appear behind the Scripture App Builder and that you have to select the terminal to review the results).</text:span><text:span text:style-name="T20"/></text:p>
        </text:list-item>
        <text:list-item>
          <text:p text:style-name="P111" loext:marker-style-name="T20"><text:span text:style-name="T20">The results of the build are an IPA file and an app that can be run in the simulator.<text:line-break/>They can be found in ~/App Builder/Reading Apps/Ipa Output/ and ~/App Builder/Reading Apps/Sim Output/.</text:span><text:span text:style-name="T20"/></text:p>
        </text:list-item>
      </text:list>
      <text:p text:style-name="Standard" loext:marker-style-name="T4"><text:span text:style-name="T4"><text:tab/></text:span><draw:frame draw:style-name="fr1" draw:name="Picture 21" text:anchor-type="as-char" svg:width="5.0563in" svg:height="2.4583in"><draw:image xlink:href="Pictures/10000001000001E7000000ED4A29DE07.png" xlink:type="simple" xlink:show="embed" xlink:actuate="onLoad" draw:mime-type="image/png"/><svg:desc>Table

Description automatically generated</svg:desc></draw:frame></text:p>
      <text:h text:style-name="P112" text:outline-level="1"/>
      <text:h text:style-name="Heading_20_1" text:outline-level="1"><text:bookmark-start text:name="_Toc228354463"/>Testing an iOS App<text:bookmark-end text:name="_Toc228354463"/></text:h>
      <text:p text:style-name="No_20_Spacing">After building the iOS IPA file, you will want to install it and test it on one or more devices before you submit it for publication to the Apple App Store. This manual describes two ways of doing this:</text:p>
      <text:p text:style-name="No_20_Spacing"/>
      <text:list text:style-name="WWNum23">
        <text:list-item>
          <text:p text:style-name="P113">Use <text:span text:style-name="T36">Xcode</text:span> to install the IPA file to an iPhone or iPad that is connected to your computer.</text:p>
        </text:list-item>
      </text:list>
      <text:p text:style-name="P114" loext:marker-style-name="T64"><text:span text:style-name="T64">This method is recommended if you have your test devices with you. It does not involve uploading and downloading the IPA to and from the internet.</text:span><text:span text:style-name="T64"/></text:p>
      <text:list text:continue-numbering="true" text:style-name="WWNum23">
        <text:list-item>
          <text:p text:style-name="P115">Use <text:span text:style-name="T36">DeployGate</text:span> to upload the IPA file to the internet and share it with limited number of devices to download, install and test.</text:p>
        </text:list-item>
      </text:list>
      <text:p text:style-name="P114" loext:marker-style-name="T64"><text:span text:style-name="T64">This method is recommended if you have good internet access and/or you have a team of testers who are elsewhere.</text:span><text:span text:style-name="T64"/></text:p>
      <text:p text:style-name="P26" loext:marker-style-name="T27"/>
      <text:h text:style-name="Heading_20_1" text:outline-level="1"><text:bookmark-start text:name="_Toc508705017"/><text:bookmark-start text:name="_Toc228354464"/>Using Xcode to Test an iOS App<text:bookmark-end text:name="_Toc508705017"/><text:bookmark-end text:name="_Toc228354464"/></text:h>
      <text:p text:style-name="No_20_Spacing" loext:marker-style-name="T25"><text:span text:style-name="T25">To test your iOS IPA file using </text:span><text:span text:style-name="T65">Xcode</text:span><text:span text:style-name="T25">, do the following:</text:span></text:p>
      <text:list text:style-name="WWNum24">
        <text:list-item>
          <text:p text:style-name="P116" loext:marker-style-name="T25"><text:span text:style-name="T25">Launch </text:span><text:span text:style-name="T65">Xcode</text:span><text:span text:style-name="T25"> and select </text:span><text:bookmark-start text:name="OLE_LINK29"/><text:bookmark-start text:name="OLE_LINK28"/><text:span text:style-name="T65">Window</text:span><text:span text:style-name="T25"> </text:span><text:span text:style-name="T53"></text:span><text:span text:style-name="T25"> </text:span><text:span text:style-name="T65">Devices and Simulators</text:span><text:bookmark-end text:name="OLE_LINK29"/><text:bookmark-end text:name="OLE_LINK28"/><text:span text:style-name="T25">.</text:span></text:p>
        </text:list-item>
        <text:list-item>
          <text:p text:style-name="P116" loext:marker-style-name="T25"><text:span text:style-name="T25">Connect an iPhone or iPad to the Mac using a cable and unlock the device.</text:span><text:span text:style-name="T25"/></text:p>
        </text:list-item>
        <text:list-item>
          <text:p text:style-name="P116" loext:marker-style-name="T25"><text:span text:style-name="T25">On the Mac, iTunes may launch and show a dialog asking “Do you want to allow this computer to access information…” Click on the </text:span><text:span text:style-name="T65">Cancel</text:span><text:span text:style-name="T25"> button. </text:span></text:p>
          <text:list>
            <text:list-item>
              <text:p text:style-name="P117" loext:marker-style-name="T25"><text:span text:style-name="T25">Note: This feature can be turned off in iTunes. Select </text:span><text:span text:style-name="T65">iTunes</text:span><text:span text:style-name="T25"> </text:span><text:span text:style-name="T53"></text:span><text:span text:style-name="T25"> </text:span><text:span text:style-name="T65">Preferences…</text:span><text:span text:style-name="T25">, select the </text:span><text:span text:style-name="T65">Devices</text:span><text:span text:style-name="T25"> tab, and click on the </text:span><text:span text:style-name="T65">Prevent iPods, iPhone, and iPad from syncing automatically</text:span><text:span text:style-name="T25"> checkbox.</text:span></text:p>
            </text:list-item>
          </text:list>
        </text:list-item>
        <text:list-item>
          <text:p text:style-name="P116" loext:marker-style-name="T25"><text:span text:style-name="T25">On the device, it may prompt to </text:span><text:span text:style-name="T65">Trust This Computer</text:span><text:span text:style-name="T25">. Tap on the </text:span><text:span text:style-name="T65">Trust</text:span><text:span text:style-name="T25"> button. <text:s/>This may require to enter the Passcode to trust this computer. <text:s/>The device will show up in the </text:span><text:span text:style-name="T65">Xcode</text:span><text:span text:style-name="T25"> </text:span><text:span text:style-name="T65">Devices</text:span><text:span text:style-name="T25"> window.</text:span></text:p>
        </text:list-item>
        <text:list-item>
          <text:p text:style-name="P118" loext:marker-style-name="T25"><text:span text:style-name="T25">The first time the device is connected to the Mac, Xcode will take some time to Prepare debugger support. <text:s/>This may take some time. <text:s/>Please wait.</text:span><text:span text:style-name="T25"/></text:p>
        </text:list-item>
        <text:list-item>
          <text:p text:style-name="P118" loext:marker-style-name="T25"><text:span text:style-name="T25">In the </text:span><text:span text:style-name="T65">Xcode</text:span><text:span text:style-name="T25"> </text:span><text:span text:style-name="T65">Devices</text:span><text:span text:style-name="T25"> window, there will be a section named </text:span><text:span text:style-name="T65">INSTALLED APPS</text:span><text:span text:style-name="T25">. Click on the </text:span><text:span text:style-name="T65">+</text:span><text:span text:style-name="T25"> button. </text:span></text:p>
        </text:list-item>
        <text:list-item>
          <text:p text:style-name="P118" loext:marker-style-name="T25"><text:span text:style-name="T25">Find the IPA file to add. Click </text:span><text:span text:style-name="T65">Open</text:span><text:span text:style-name="T25"> after you have selected it.</text:span></text:p>
        </text:list-item>
        <text:list-item>
          <text:p text:style-name="P118" loext:marker-style-name="T25"><text:span text:style-name="T25">Click the </text:span><text:span text:style-name="T65">Install</text:span><text:span text:style-name="T25"> button next to the name of the app.</text:span></text:p>
        </text:list-item>
        <text:list-item>
          <text:p text:style-name="P118" loext:marker-style-name="T25"><text:span text:style-name="T25">Wait until the Mac installs the app to your device.</text:span><text:span text:style-name="T25"/></text:p>
        </text:list-item>
      </text:list>
      <text:p text:style-name="P119" loext:marker-style-name="T25"/>
      <text:p text:style-name="Standard" loext:marker-style-name="T27"><text:span text:style-name="T25">After the install is complete, you will see the app icon on your device and you can test it.</text:span><text:span text:style-name="T27"/></text:p>
      <text:h text:style-name="Heading_20_1" text:outline-level="1"><text:bookmark-start text:name="_Toc228354465"/>Using DeployGate to Test an iOS App<text:bookmark-end text:name="_Toc228354465"/><text:bookmark-end text:name="_Toc475369922"/></text:h>
      <text:p text:style-name="Standard" loext:marker-style-name="T20"><text:span text:style-name="T48">DeployGate</text:span><text:span text:style-name="T20"> enables you to test your app and share it with a limited number of users to test. You upload the IPA file for iOS apps or the APK for Android apps and then download them to your phone or tablet device. You can also invite testers to install your app and help with the testing.</text:span></text:p>
      <text:p text:style-name="P21" loext:marker-style-name="T20"><text:span text:style-name="T20">A DeployGate app is installed on the testing device. It will show all of the apps that you have uploaded to DeployGate and allows them to be installed on the device.</text:span><text:span text:style-name="T20"/></text:p>
      <text:h text:style-name="P29" text:outline-level="2"><text:bookmark text:name="_1pqgp28vmb7n"/><text:bookmark-start text:name="_Toc228354466"/><text:bookmark-start text:name="_Toc475369923"/>Creating a DeployGate Account<text:bookmark-end text:name="_Toc228354466"/><text:bookmark-end text:name="_Toc475369923"/></text:h>
      <text:p text:style-name="Standard" loext:marker-style-name="T20"><text:span text:style-name="T20">The first step is to create a DeployGate account. To do this:</text:span><text:span text:style-name="T20"/></text:p>
      <text:list text:style-name="WWNum9">
        <text:list-item>
          <text:p text:style-name="P120" loext:marker-style-name="T20"><text:span text:style-name="T20">Go to </text:span><text:a xlink:type="simple" xlink:href="https://deploygate.com/" text:style-name="ListLabel_20_402" text:visited-style-name="ListLabel_20_402"><text:span text:style-name="T54">https://deploygate.com</text:span></text:a><text:span text:style-name="T20"> </text:span></text:p>
        </text:list-item>
        <text:list-item>
          <text:p text:style-name="P121" loext:marker-style-name="T20"><text:span text:style-name="T20">Press the </text:span><text:span text:style-name="T48">Get Started</text:span><text:span text:style-name="T20"> button. </text:span></text:p>
        </text:list-item>
        <text:list-item>
          <text:p text:style-name="P121" loext:marker-style-name="T20"><text:span text:style-name="T20">Enter an email address, a user name and a password. </text:span><text:span text:style-name="T20"/></text:p>
        </text:list-item>
        <text:list-item>
          <text:p text:style-name="P121" loext:marker-style-name="T20"><text:span text:style-name="T20">Press the </text:span><text:span text:style-name="T48">Sign up for DeployGate</text:span><text:span text:style-name="T20"> button.</text:span></text:p>
        </text:list-item>
      </text:list>
      <text:p text:style-name="P122" loext:marker-style-name="T20"/>
      <text:p text:style-name="Standard" loext:marker-style-name="T20"><text:span text:style-name="T20"><text:s text:c="2"/></text:span><draw:frame draw:style-name="fr1" draw:name="image39.png" text:anchor-type="as-char" svg:width="5.8075in" svg:height="2.4291in"><draw:image xlink:href="Pictures/10000001000003630000016CDAB2D706.png" xlink:type="simple" xlink:show="embed" xlink:actuate="onLoad" draw:mime-type="image/png"/></draw:frame></text:p>
      <text:h text:style-name="P29" text:outline-level="2"><text:bookmark text:name="_es66kyf6etzn"/><text:bookmark-start text:name="_Toc228354467"/><text:bookmark-start text:name="_Toc475369924"/>Uploading your first app<text:bookmark-end text:name="_Toc228354467"/><text:bookmark-end text:name="_Toc475369924"/></text:h>
      <text:p text:style-name="P27" loext:marker-style-name="T20"><text:span text:style-name="T20">Once the sign in screen has been successfully completed, you are presented with a screen that prompts you to upload your app. <text:s/>While there are several methods described for embedding it as part of your build process, the way we have used this to date is to simply upload the IPA file that has been created by locating the ipa file in Finder and then dragging it to the bottom area of the screen where it has a green </text:span><text:span text:style-name="T48">Upload App</text:span><text:span text:style-name="T20"> area:</text:span></text:p>
      <text:p text:style-name="P3" loext:marker-style-name="T20"><draw:frame draw:style-name="fr1" draw:name="image49.png" text:anchor-type="as-char" svg:width="4.8807in" svg:height="4.4374in"><draw:image xlink:href="Pictures/10000001000001D5000001AA4146FACF.png" xlink:type="simple" xlink:show="embed" xlink:actuate="onLoad" draw:mime-type="image/png"/></draw:frame></text:p>
      <text:p text:style-name="P123" loext:marker-style-name="T20"><text:span text:style-name="T20">Dragging the file to the upload area causes a new dialog to be displayed with the name of the file and a text box where you can enter a short note that will be displayed on your profile window and also on the DeployGate app when the user is selecting the app. It is a good place to write a short note on the reason for the update so that it is easy for the testers to see that the app has been updated and to see what the primary reason they need to update is. Complete the screen and press the </text:span><text:span text:style-name="T48">Upload</text:span><text:span text:style-name="T20"> button.</text:span></text:p>
      <text:p text:style-name="P16" loext:marker-style-name="T20"/>
      <text:p text:style-name="Standard" loext:marker-style-name="T4"><draw:frame draw:style-name="fr1" draw:name="image28.png" text:anchor-type="as-char" svg:width="5.5161in" svg:height="2.8638in"><draw:image xlink:href="Pictures/10000001000002AB000001634B4F0C2B.png" xlink:type="simple" xlink:show="embed" xlink:actuate="onLoad" draw:mime-type="image/png"/></draw:frame></text:p>
      <text:p text:style-name="P73" loext:marker-style-name="T4"/>
      <text:p text:style-name="P27" loext:marker-style-name="T20"><text:span text:style-name="T20">When the upload is complete, a new dialog is displayed with a QCode bar code and the option to send an email to your device. The QCode can be read in with your iPhone or iPad which will trigger an installation of the DeployGate app using your app profile. </text:span><text:span text:style-name="T20"/></text:p>
      <text:p text:style-name="P27" loext:marker-style-name="T20"><text:span text:style-name="T20">Alternatively, you can enter an email address at this point, which you would also open on the iPhone to install the DeployGate app with the correct profile. Or you can simply go on and add users and devices later.</text:span><text:span text:style-name="T20"/></text:p>
      <text:p text:style-name="P3" loext:marker-style-name="T20"><draw:frame draw:style-name="fr1" draw:name="image38.png" text:anchor-type="as-char" svg:width="4.2965in" svg:height="2.3465in"><draw:image xlink:href="Pictures/10000001000001FD00000116E6E59501.png" xlink:type="simple" xlink:show="embed" xlink:actuate="onLoad" draw:mime-type="image/png"/></draw:frame></text:p>
      <text:p text:style-name="P123" loext:marker-style-name="T20"><text:span text:style-name="T20">After this, the screen that is displayed is what you will normally see when you login. The screen has an entry for each app that you have uploaded. It has an </text:span><text:span text:style-name="T48">Upload App</text:span><text:span text:style-name="T20"> button that can be used to upload new versions of the same app or to upload a new app.<text:line-break/></text:span></text:p>
      <text:p text:style-name="P3" loext:marker-style-name="T20"><draw:frame draw:style-name="fr1" draw:name="image48.png" text:anchor-type="as-char" svg:width="5.339in" svg:height="3.1138in"><draw:image xlink:href="Pictures/10000001000001FF0000012AB712E6CB.png" xlink:type="simple" xlink:show="embed" xlink:actuate="onLoad" draw:mime-type="image/png"/></draw:frame></text:p>
      <text:h text:style-name="P29" text:outline-level="2"><text:bookmark text:name="_707sllp4p5x6"/><text:bookmark-start text:name="_Toc228354468"/><text:bookmark-start text:name="_Toc475369925"/>Registering a Device<text:bookmark-end text:name="_Toc228354468"/><text:bookmark-end text:name="_Toc475369925"/></text:h>
      <text:p text:style-name="Standard" loext:marker-style-name="T20"><text:span text:style-name="T20">If the iOS device was not originally in the mobile provisioning profile and if the device has not been previously registered in your Apple Developer account, you need to add it to both. There is a method for manually doing this, but DeployGate provides a way of simplifying the process so that you don’t need to go and look up UDID for the device.</text:span><text:span text:style-name="T20"/></text:p>
      <text:p text:style-name="P21" loext:marker-style-name="T20"><text:span text:style-name="T20">First, try to install the app using the method described above. You will not be able to install it because the UDID is not registered for the app. However this will result in the device being registered in DeployGate which allows the following steps.</text:span><text:span text:style-name="T20"/></text:p>
      <text:p text:style-name="P21" loext:marker-style-name="T20"><text:span text:style-name="T20">After attempting to install the app, re-enter DeployGate in your browser and open the entry for your app. As you can see in the screen below, it will show that a new UDID has been registered for the device. Press the </text:span><text:span text:style-name="T48">Options</text:span><text:span text:style-name="T20"> button below and select the </text:span><text:span text:style-name="T48">Package Archive</text:span><text:span text:style-name="T20"> option. </text:span><text:span text:style-name="T49">Next click the little tag symbol inside the app box to open the UDID list.</text:span></text:p>
      <text:p text:style-name="P16" loext:marker-style-name="T20"/>
      <text:p text:style-name="P16" loext:marker-style-name="T20"/>
      <text:p text:style-name="Standard" loext:marker-style-name="T20"><draw:frame draw:style-name="fr1" draw:name="image47.png" text:anchor-type="as-char" svg:width="6.5in" svg:height="3.5417in"><draw:image xlink:href="Pictures/10000001000002700000015437DAEF84.png" xlink:type="simple" xlink:show="embed" xlink:actuate="onLoad" draw:mime-type="image/png"/></draw:frame></text:p>
      <text:p text:style-name="P124" loext:marker-style-name="T20"><text:span text:style-name="T20">The next screen shows a list of the devices that have been observed by DeployGate or that were included in the provisioning profile. Your new device entry will show up on the screen with a </text:span><text:span text:style-name="T48">Not Exist</text:span><text:span text:style-name="T20"> entry. Make sure that the entry for the new device is checked and then press the </text:span><text:span text:style-name="T48">Export Selected UDIDs</text:span><text:span text:style-name="T20"> button. This will create a file “multiple-device-upload-ios.txt” that can be used on the Apple Developer website to add these devices to the mobile provisioning file.</text:span></text:p>
      <text:p text:style-name="P16" loext:marker-style-name="T20"/>
      <text:p text:style-name="Standard" loext:marker-style-name="T20"><draw:frame draw:style-name="fr1" draw:name="image21.png" text:anchor-type="as-char" svg:width="5.9425in" svg:height="2.8571in"><draw:image xlink:href="Pictures/100000010000023B000001124673708A.png" xlink:type="simple" xlink:show="embed" xlink:actuate="onLoad" draw:mime-type="image/png"/></draw:frame></text:p>
      <text:p text:style-name="P125" loext:marker-style-name="T20"><text:span text:style-name="T20">After logging in to Apple Developer, click on </text:span><text:span text:style-name="T48">Certificates, IDs and Profiles</text:span><text:span text:style-name="T20">. Press the </text:span><text:span text:style-name="T48">All</text:span><text:span text:style-name="T20"> selection under </text:span><text:span text:style-name="T48">Devices</text:span><text:span text:style-name="T20"> as shown in the illustration below and then select </text:span><text:span text:style-name="T48">Register Multiple Devices</text:span><text:span text:style-name="T20">. Then press the </text:span><text:span text:style-name="T48">Choose File</text:span><text:span text:style-name="T20"> button.</text:span></text:p>
      <text:p text:style-name="Standard" loext:marker-style-name="T20"><draw:frame draw:style-name="fr1" draw:name="image23.png" text:anchor-type="as-char" svg:width="6.172in" svg:height="5.2126in"><draw:image xlink:href="Pictures/1000000100000251000001F5E4EAB25B.png" xlink:type="simple" xlink:show="embed" xlink:actuate="onLoad" draw:mime-type="image/png"/></draw:frame></text:p>
      <text:p text:style-name="P124" loext:marker-style-name="T20"><text:span text:style-name="T20">Find the multiple-device-upload-ios.txt file that was created by DeployGate and then press </text:span><text:span text:style-name="T48">Continue</text:span><text:span text:style-name="T20">.</text:span></text:p>
      <text:p text:style-name="Standard" loext:marker-style-name="T20"><draw:frame draw:style-name="fr1" draw:name="image17.png" text:anchor-type="as-char" svg:width="6.1098in" svg:height="5.1008in"><draw:image xlink:href="Pictures/100000010000024B000001EADDEE00E3.png" xlink:type="simple" xlink:show="embed" xlink:actuate="onLoad" draw:mime-type="image/png"/></draw:frame></text:p>
      <text:p text:style-name="P16" loext:marker-style-name="T20"/>
      <text:p text:style-name="P126" loext:marker-style-name="T20"><text:span text:style-name="T20">A review screen will be displayed which should list the name to be assigned to the device along with the UDID associated with the device. Review to ensure this is correct and press </text:span><text:span text:style-name="T48">Register</text:span><text:span text:style-name="T20">.</text:span></text:p>
      <text:p text:style-name="Standard" loext:marker-style-name="T20"><draw:frame draw:style-name="fr1" draw:name="image15.png" text:anchor-type="as-char" svg:width="6.2244in" svg:height="5.6953in"><draw:image xlink:href="Pictures/10000001000003FC000003A53BB51DFC.png" xlink:type="simple" xlink:show="embed" xlink:actuate="onLoad" draw:mime-type="image/png"/></draw:frame></text:p>
      <text:p text:style-name="P16" loext:marker-style-name="T20"/>
      <text:p text:style-name="P126" loext:marker-style-name="T20"><text:span text:style-name="T20">At this point your device has been registered to your Apple Developer account. <text:s/>You now need to add the device to the provisioning profile for your app. <text:s/>Select the provisioning profile being used to test the app. Make sure your test device is checked in the list of devices at the bottom of the screen. Press </text:span><text:span text:style-name="T48">Generate</text:span><text:span text:style-name="T20">. <text:s/></text:span></text:p>
      <text:p text:style-name="P59" loext:marker-style-name="T20"><text:span text:style-name="T48">Note:</text:span><text:span text:style-name="T20"> For the purposes of testing with DeployGate, an AdHoc type of provision profile must be created and used. If you have not selected AdHoc, the list of devices will not be available on the screen.</text:span></text:p>
      <text:p text:style-name="P3" loext:marker-style-name="T20"><draw:frame draw:style-name="fr1" draw:name="image18.png" text:anchor-type="as-char" svg:width="5.7453in" svg:height="4.9929in"><draw:image xlink:href="Pictures/1000000100000228000001DFCE146D18.png" xlink:type="simple" xlink:show="embed" xlink:actuate="onLoad" draw:mime-type="image/png"/></draw:frame></text:p>
      <text:p text:style-name="P16" loext:marker-style-name="T20"/>
      <text:p text:style-name="P124" loext:marker-style-name="T20"><text:span text:style-name="T20">The following screen will display:</text:span><text:span text:style-name="T20"/></text:p>
      <text:p text:style-name="P3" loext:marker-style-name="T20"><draw:frame draw:style-name="fr1" draw:name="image33.png" text:anchor-type="as-char" svg:width="5.7035in" svg:height="4.7965in"><draw:image xlink:href="Pictures/1000000100000224000001CEC2A72D79.png" xlink:type="simple" xlink:show="embed" xlink:actuate="onLoad" draw:mime-type="image/png"/></draw:frame></text:p>
      <text:p text:style-name="P124" loext:marker-style-name="T20"><text:span text:style-name="T20">Now you can download the new provisioning profile that has been generated.</text:span><text:span text:style-name="T20"/></text:p>
      <text:p text:style-name="P124" loext:marker-style-name="T20"><text:span text:style-name="T20">Next you need to rebuild the iOS app using the new profile and upload it to DeployGate again. This time when you attempt to install it, the </text:span><text:span text:style-name="T48">Install</text:span><text:span text:style-name="T20"> button should be enabled and will allow you to install your app.</text:span></text:p>
      <text:h text:style-name="Heading_20_1" text:outline-level="1"><text:bookmark text:name="_2tg0gs5dyul6"/><text:bookmark-start text:name="_Toc475369926"/><text:bookmark-start text:name="_Toc228354469"/>Uploading an iOS App to Apple App Store<text:bookmark-end text:name="_Toc228354469"/></text:h>
      <text:p text:style-name="Standard" loext:marker-style-name="T55"><text:span text:style-name="T25">Before attempting to upload the app, you will need to create an entry in App Store Connect (</text:span><text:a xlink:type="simple" xlink:href="https://appstoreconnect.apple.com/" text:style-name="Internet_20_link" text:visited-style-name="Visited_20_Internet_20_Link"><text:span text:style-name="Internet_20_link"><text:span text:style-name="T25">https://appstoreconnect.apple.com</text:span></text:span></text:a><text:span text:style-name="T25">). <text:s/></text:span></text:p>
      <text:p text:style-name="P119" loext:marker-style-name="T25"/>
      <text:p text:style-name="Standard" loext:marker-style-name="T25"><text:span text:style-name="T25">Select the appropriate distribution </text:span><text:span text:style-name="T66">Signing Identity</text:span><text:span text:style-name="T25"> and </text:span><text:span text:style-name="T66">App Store</text:span><text:span text:style-name="T25"> provisioning profile on the </text:span><text:span text:style-name="T66">Signing (iOS)</text:span><text:span text:style-name="T25"> tab and click Build iOS App. This will create an IPA file in the IPA Output Folder.</text:span></text:p>
      <text:p text:style-name="P119" loext:marker-style-name="T25"/>
      <text:p text:style-name="Standard" loext:marker-style-name="T25"><text:span text:style-name="T25">Launch </text:span><text:span text:style-name="T66">Transporter</text:span><text:span text:style-name="T25"> and click </text:span><text:span text:style-name="T66">Sign In</text:span><text:span text:style-name="T25"> using the Apple ID for your Apple Developer Account. Drag and drop the IPA file from the IPA Output Folder to Transporter. Once the app is added to Transporter, click on the </text:span><text:span text:style-name="T66">Deliver</text:span><text:span text:style-name="T25"> button. After it is uploaded, you can click on the </text:span><text:span text:style-name="T66">…</text:span><text:span text:style-name="T25"> button and select </text:span><text:span text:style-name="T66">View in App Store Connect</text:span><text:span text:style-name="T25">. Selecting the Activity tab will show the status of the processing of the upload.</text:span></text:p>
      <text:h text:style-name="Heading_20_1" text:outline-level="1"><text:bookmark-start text:name="_Toc31914052"/><text:bookmark-start text:name="_Toc228354470"/>Using <text:bookmark-end text:name="_Toc31914052"/>Test Flight to Test an iOS App<text:bookmark-end text:name="_Toc228354470"/></text:h>
      <text:p text:style-name="Standard" loext:marker-style-name="T25"><text:span text:style-name="T25">It will take a little bit of time (around 20 minutes) for the app to be processed in App Store Connect. You will receive an email when the app is done processing. Switching to the Test Flight tab in App Store Connect, you will see that app is Missing Compliance.</text:span><text:span text:style-name="T25"/></text:p>
      <text:p text:style-name="P3" loext:marker-style-name="T25"><draw:frame draw:style-name="fr1" draw:name="Picture 39" text:anchor-type="as-char" svg:width="4.4972in" svg:height="1.3516in"><draw:image xlink:href="Pictures/10000001000002070000009C808BEE25.png" xlink:type="simple" xlink:show="embed" xlink:actuate="onLoad" draw:mime-type="image/png"/></draw:frame></text:p>
      <text:p text:style-name="Standard" loext:marker-style-name="T25"><text:span text:style-name="T25">Click on the build number and you will be taken to a page where you can click on </text:span><text:span text:style-name="T66">Provide Export Compliance Information</text:span><text:span text:style-name="T25">. The app uses an encryption algorithm to protect the text of the app. </text:span></text:p>
      <text:p text:style-name="P119" loext:marker-style-name="T25"/>
      <text:p text:style-name="Standard" loext:marker-style-name="T25"><text:span text:style-name="T25">Click </text:span><text:span text:style-name="T66">Yes</text:span><text:span text:style-name="T25"> to the first dialog that the app uses encryption and then click </text:span><text:span text:style-name="T66">Next</text:span><text:span text:style-name="T25">.</text:span></text:p>
      <text:p text:style-name="P3" loext:marker-style-name="T25"><draw:frame draw:style-name="fr1" draw:name="Picture 45" text:anchor-type="as-char" svg:width="4.4937in" svg:height="1.3071in"><draw:image xlink:href="Pictures/1000000100000234000000A4F72C7BA1.png" xlink:type="simple" xlink:show="embed" xlink:actuate="onLoad" draw:mime-type="image/png"/></draw:frame></text:p>
      <text:p text:style-name="Standard" loext:marker-style-name="T25"><text:span text:style-name="T25">Click </text:span><text:span text:style-name="T66">Yes</text:span><text:span text:style-name="T25"> to the second dialog to indicate that the app qualifies for an exemption due to </text:span><text:span text:style-name="T66">(b) Limited to intellectual property and copyright protection</text:span><text:span text:style-name="T25"> and then click </text:span><text:span text:style-name="T66">Start Internal Testing</text:span><text:span text:style-name="T25">.</text:span></text:p>
      <text:p text:style-name="P3" loext:marker-style-name="T25"><draw:frame draw:style-name="fr1" draw:name="Picture 38" text:anchor-type="as-char" svg:width="4.5102in" svg:height="3.4972in"><draw:image xlink:href="Pictures/1000000100000228000001ACDD465328.png" xlink:type="simple" xlink:show="embed" xlink:actuate="onLoad" draw:mime-type="image/png"/></draw:frame></text:p>
      <text:p text:style-name="Standard" loext:marker-style-name="T25"><text:span text:style-name="T25">You can add App Store Connect users (normally users in your organization) to test the app. There is a link at the left for </text:span><text:span text:style-name="T66">Add External Testers</text:span><text:span text:style-name="T25">. This will require the app to go through Beta App Review.</text:span></text:p>
      <text:h text:style-name="Heading_20_1" text:outline-level="1"><text:bookmark-start text:name="_Toc74121625"/><text:bookmark-start text:name="_Toc228354471"/>Apple Privacy Policy<text:bookmark-end text:name="_Toc74121625"/><text:bookmark-end text:name="_Toc228354471"/></text:h>
      <text:p text:style-name="Standard" loext:marker-style-name="T25"><text:span text:style-name="T25">Prior to publishing your app through </text:span><text:span text:style-name="T66">App Store Connect</text:span><text:span text:style-name="T25">, you will be required to complete the privacy policy details section. <text:s/>The answers to these questions will be used to create the privacy policy section in your app store entry that describes to the user how you are using their data. <text:s/>The types of data associated with each question is documented by Apple at </text:span><text:a xlink:type="simple" xlink:href="https://developer.apple.com/app-store/app-privacy-details/" text:style-name="Internet_20_link" text:visited-style-name="Visited_20_Internet_20_Link"><text:span text:style-name="Internet_20_link"><text:span text:style-name="T25">https://developer.apple.com/app-store/app-privacy-details/</text:span></text:span></text:a><text:span text:style-name="T25">. <text:s/>The answers associated with the SAB app depend upon the use of analytics and what data is saved if you have user registration defined for your app. </text:span></text:p>
      <text:h text:style-name="P29" text:outline-level="2" loext:marker-style-name="T14"><text:bookmark-start text:name="_Toc74121626"/><text:bookmark-start text:name="_Toc228354472"/><text:span text:style-name="T14">Data Types</text:span><text:bookmark-end text:name="_Toc74121626"/><text:bookmark-end text:name="_Toc228354472"/><text:span text:style-name="T14"/></text:h>
      <text:p text:style-name="Standard" loext:marker-style-name="T25"><text:span text:style-name="T25">Under the initial </text:span><text:span text:style-name="T67">Data Collection</text:span><text:span text:style-name="T25"> screen in this section, if the app does not use analytics or user registration, you may indicate that the app does not collect any data. <text:s/>If either of these features are in use, then you should respond that we do collect data from this app. <text:s/>If you answer </text:span><text:span text:style-name="T67">Yes</text:span><text:span text:style-name="T25"> to this question, then you need to specify in the next screen the types of data collected. <text:s/>For an app that has analytics enabled, </text:span><text:span text:style-name="T67">Product Interaction</text:span><text:span text:style-name="T25"> under </text:span><text:span text:style-name="T67">Usage Data</text:span><text:span text:style-name="T25"> and </text:span><text:span text:style-name="T67">Crash Data </text:span><text:span text:style-name="T25">under </text:span><text:span text:style-name="T67">Diagnostics</text:span><text:span text:style-name="T25"> should be selected. <text:s/>If the app has User Registration enabled, then some of the fields under </text:span><text:span text:style-name="T67">Contact Info</text:span><text:span text:style-name="T25"> may need to be checked depending upon the fields you have configured for the user to enter.</text:span></text:p>
      <text:h text:style-name="P29" text:outline-level="2" loext:marker-style-name="T14"><text:bookmark-start text:name="_Toc74121627"/><text:bookmark-start text:name="_Toc228354473"/><text:span text:style-name="T14">Product Interaction</text:span><text:bookmark-end text:name="_Toc74121627"/><text:bookmark-end text:name="_Toc228354473"/><text:span text:style-name="T14"/></text:h>
      <text:p text:style-name="Standard" loext:marker-style-name="T67"><text:span text:style-name="T25">This section should only be required if analytics or user registration are enabled. <text:s/>If analytics is enabled, then the </text:span><text:span text:style-name="T67">Analytics</text:span><text:span text:style-name="T25"> entry should be checked to indicate that the data is being used to track user behavior. <text:s/>If user registration is enabled, you may also want to check the </text:span><text:span text:style-name="T67">App Functionality</text:span><text:span text:style-name="T25"> entry. On the next screen, you should check the “</text:span><text:span text:style-name="T67">No, product interaction data collected from this app is not linked to the user’s identity</text:span><text:span text:style-name="T25">” entry. On the final screen, regarding tracking, you may click the “</text:span><text:span text:style-name="T67">No, we do not product interaction data for tracking purposes”.</text:span></text:p>
      <text:p text:style-name="P26" loext:marker-style-name="T27"/>
      <text:h text:style-name="Heading_20_1" text:outline-level="1"><text:bookmark-start text:name="_Toc228354474"/><text:bookmark-start text:name="OLE_LINK1"/>Building from Terminal<text:bookmark-end text:name="_Toc228354474"/><text:bookmark-end text:name="_Toc475369926"/></text:h>
      <text:p text:style-name="P21" loext:marker-style-name="T28"><text:span text:style-name="T28">Reading App Builder has a command line interface which allows you to create a new app and build it or load an existing app and build it. <text:s/></text:span><text:span text:style-name="T28"/></text:p>
      <text:h text:style-name="P29" text:outline-level="2"><text:bookmark-start text:name="_Toc228353930"/><text:bookmark-start text:name="_Toc228354475"/><text:bookmark-start text:name="_Toc228354156"/>Installing Command Line Interface<text:bookmark-end text:name="_Toc228353930"/><text:bookmark-end text:name="_Toc228354475"/><text:bookmark-end text:name="_Toc228354156"/></text:h>
      <text:p text:style-name="Standard" loext:marker-style-name="T55"><text:span text:style-name="T20">Choose the </text:span><text:span text:style-name="T48">Tools</text:span><text:span text:style-name="T20"> </text:span><text:span text:style-name="T53"></text:span><text:span text:style-name="T20"> </text:span><text:span text:style-name="T48">Install rab command in PATH</text:span><text:span text:style-name="T20"> </text:span><text:span text:style-name="T55">menu item to enable the use of the command line interface. <text:s/>You will be prompted to enter your login password to install the command.</text:span></text:p>
      <text:h text:style-name="P29" text:outline-level="2"><text:bookmark-start text:name="_Toc228353931"/><text:bookmark-start text:name="_Toc228354476"/><text:bookmark-start text:name="_Toc228354157"/>Command Line Interface Options<text:bookmark-end text:name="_Toc228353931"/><text:bookmark-end text:name="_Toc228354476"/><text:bookmark-end text:name="_Toc228354157"/></text:h>
      <text:p text:style-name="P21" loext:marker-style-name="T28"><text:span text:style-name="T28">Run the following command to run the </text:span><text:span text:style-name="T20">Reading</text:span><text:span text:style-name="T28"> App Builder application followed by a series of options described below. <text:s/>The command is:</text:span></text:p>
      <text:p text:style-name="P21" loext:marker-style-name="T28"><text:span text:style-name="T20">r</text:span><text:span text:style-name="T28">ab</text:span></text:p>
      <text:p text:style-name="P21" loext:marker-style-name="T28"><text:span text:style-name="T28"><text:s/></text:span><text:span text:style-name="T28"/></text:p>
      <text:p text:style-name="P65" loext:marker-style-name="T28"><text:span text:style-name="T28">The available parameters are:</text:span><text:span text:style-name="T28"/></text:p>
      <text:p text:style-name="P21" loext:marker-style-name="T28"><text:span text:style-name="T28"><text:s/></text:span><text:span text:style-name="T28"/></text:p>
      <table:table table:name="Table3" table:style-name="Table3">
        <table:table-column table:style-name="Table3.A"/>
        <table:table-column table:style-name="Table3.B"/>
        <table:table-row table:style-name="Table3.1">
          <table:table-cell table:style-name="Table3.A1" office:value-type="string">
            <text:p text:style-name="P127" loext:marker-style-name="T28"><text:span text:style-name="T68">Option</text:span><text:span text:style-name="T68"/></text:p>
          </table:table-cell>
          <table:table-cell table:style-name="Table3.B1" office:value-type="string">
            <text:p text:style-name="P127" loext:marker-style-name="T28"><text:span text:style-name="T68">Description</text:span><text:span text:style-name="T68"/></text:p>
          </table:table-cell>
        </table:table-row>
        <table:table-row table:style-name="Table3.1">
          <table:table-cell table:style-name="Table3.A2" office:value-type="string">
            <text:p text:style-name="P62" loext:marker-style-name="T69"><text:span text:style-name="T70">-new</text:span><text:span text:style-name="T70"/></text:p>
          </table:table-cell>
          <table:table-cell table:style-name="Table3.B2" office:value-type="string">
            <text:p text:style-name="P62" loext:marker-style-name="T9"><text:span text:style-name="T9">Create a new app project</text:span><text:span text:style-name="T9"/></text:p>
          </table:table-cell>
        </table:table-row>
        <table:table-row table:style-name="Table3.1">
          <table:table-cell table:style-name="Table3.A2" office:value-type="string">
            <text:p text:style-name="P62" loext:marker-style-name="T69"><text:span text:style-name="T70">-load &lt;project&gt;</text:span><text:span text:style-name="T70"/></text:p>
          </table:table-cell>
          <table:table-cell table:style-name="Table3.B2" office:value-type="string">
            <text:p text:style-name="P62" loext:marker-style-name="T9"><text:span text:style-name="T9">Load an existing app project</text:span><text:span text:style-name="T9"/></text:p>
          </table:table-cell>
        </table:table-row>
        <table:table-row table:style-name="Table3.1">
          <table:table-cell table:style-name="Table3.A2" office:value-type="string">
            <text:p text:style-name="P62" loext:marker-style-name="T69"><text:span text:style-name="T70">-build</text:span><text:span text:style-name="T70"/></text:p>
          </table:table-cell>
          <table:table-cell table:style-name="Table3.B2" office:value-type="string">
            <text:p text:style-name="P62" loext:marker-style-name="T9"><text:span text:style-name="T9">Build app project (use with either -new or -load)</text:span><text:span text:style-name="T9"/></text:p>
          </table:table-cell>
        </table:table-row>
        <table:table-row table:style-name="Table3.1">
          <table:table-cell table:style-name="Table3.A2" office:value-type="string">
            <text:p text:style-name="P62" loext:marker-style-name="T69"><text:span text:style-name="T70">-no-save</text:span></text:p>
          </table:table-cell>
          <table:table-cell table:style-name="Table3.B2" office:value-type="string">
            <text:p text:style-name="P62" loext:marker-style-name="T9"><text:span text:style-name="T9">Do not save changes to app (use with -load)</text:span><text:span text:style-name="T9"/></text:p>
          </table:table-cell>
        </table:table-row>
        <table:table-row table:style-name="Table3.1">
          <table:table-cell table:style-name="Table3.A2" office:value-type="string">
            <text:p text:style-name="P62" loext:marker-style-name="T69"><text:span text:style-name="T70">-resign</text:span><text:span text:style-name="T70"/></text:p>
          </table:table-cell>
          <table:table-cell table:style-name="Table3.B2" office:value-type="string">
            <text:p text:style-name="P62" loext:marker-style-name="T9"><text:span text:style-name="T9">Resign iOS Template App (use with either -new or -load)</text:span><text:span text:style-name="T9"/></text:p>
          </table:table-cell>
        </table:table-row>
        <table:table-row table:style-name="Table3.1">
          <table:table-cell table:style-name="Table3.A2" office:value-type="string">
            <text:p text:style-name="P62" loext:marker-style-name="T69"><text:span text:style-name="T70"/></text:p>
          </table:table-cell>
          <table:table-cell table:style-name="Table3.B2" office:value-type="string">
            <text:p text:style-name="P62" loext:marker-style-name="T9"><text:span text:style-name="T9"/></text:p>
          </table:table-cell>
        </table:table-row>
        <table:table-row table:style-name="Table3.1">
          <table:table-cell table:style-name="Table3.A2" office:value-type="string">
            <text:p text:style-name="P62" loext:marker-style-name="T69"><text:span text:style-name="T70">-?</text:span><text:span text:style-name="T70"/></text:p>
          </table:table-cell>
          <table:table-cell table:style-name="Table3.B2" office:value-type="string">
            <text:p text:style-name="P62" loext:marker-style-name="T9"><text:span text:style-name="T9">Show command line help</text:span><text:span text:style-name="T9"/></text:p>
          </table:table-cell>
        </table:table-row>
        <table:table-row table:style-name="Table3.1">
          <table:table-cell table:style-name="Table3.A2" office:value-type="string">
            <text:p text:style-name="P62" loext:marker-style-name="T69"><text:span text:style-name="T70"/></text:p>
          </table:table-cell>
          <table:table-cell table:style-name="Table3.B2" office:value-type="string">
            <text:p text:style-name="P62" loext:marker-style-name="T9"><text:span text:style-name="T9"/></text:p>
          </table:table-cell>
        </table:table-row>
        <table:table-row table:style-name="Table3.1">
          <table:table-cell table:style-name="Table3.A2" office:value-type="string">
            <text:p text:style-name="P62" loext:marker-style-name="T69"><text:span text:style-name="T70">-n &lt;app-name&gt;</text:span></text:p>
          </table:table-cell>
          <table:table-cell table:style-name="Table3.B2" office:value-type="string">
            <text:p text:style-name="P62" loext:marker-style-name="T9"><text:span text:style-name="T9">Set app name.</text:span><text:span text:style-name="T9"/></text:p>
            <text:p text:style-name="P62" loext:marker-style-name="T9"><text:span text:style-name="T9">Enclose the name in "double quotes" if it contains spaces.</text:span><text:span text:style-name="T9"/></text:p>
          </table:table-cell>
        </table:table-row>
        <table:table-row table:style-name="Table3.1">
          <table:table-cell table:style-name="Table3.A2" office:value-type="string">
            <text:p text:style-name="P62" loext:marker-style-name="T69"><text:span text:style-name="T70">-p &lt;package-name&gt;</text:span></text:p>
          </table:table-cell>
          <table:table-cell table:style-name="Table3.B2" office:value-type="string">
            <text:p text:style-name="P62" loext:marker-style-name="T9"><text:span text:style-name="T9">Set package name, e.g. com.myorg.language.appname</text:span><text:span text:style-name="T9"/></text:p>
          </table:table-cell>
        </table:table-row>
        <table:table-row table:style-name="Table3.1">
          <table:table-cell table:style-name="Table3.A2" office:value-type="string">
            <text:p text:style-name="P62" loext:marker-style-name="T69"><text:span text:style-name="T70">-b &lt;filename&gt;</text:span></text:p>
          </table:table-cell>
          <table:table-cell table:style-name="Table3.B2" office:value-type="string">
            <text:p text:style-name="P62" loext:marker-style-name="T9"><text:span text:style-name="T9">Add book or bundle file. This could be a USFM file or a zipped set of USFM files. It could also be a Digital Bible Library text release bundle.</text:span><text:span text:style-name="T9"/></text:p>
          </table:table-cell>
        </table:table-row>
        <table:table-row table:style-name="Table3.1">
          <table:table-cell table:style-name="Table3.A2" office:value-type="string">
            <text:p text:style-name="P62" loext:marker-style-name="T69"><text:span text:style-name="T70">-i &lt;filename&gt;</text:span></text:p>
          </table:table-cell>
          <table:table-cell table:style-name="Table3.B2" office:value-type="string">
            <text:p text:style-name="P62" loext:marker-style-name="T9"><text:span text:style-name="T9">Include additional parameters file.</text:span><text:span text:style-name="T9"/></text:p>
            <text:p text:style-name="P62" loext:marker-style-name="T9"><text:span text:style-name="T9">Use the full path of the file and enclose it in "double quotes" if there is a space in the path.</text:span><text:span text:style-name="T9"/></text:p>
          </table:table-cell>
        </table:table-row>
        <table:table-row table:style-name="Table3.1">
          <table:table-cell table:style-name="Table3.A2" office:value-type="string">
            <text:p text:style-name="P62" loext:marker-style-name="T69"><text:span text:style-name="T70"/></text:p>
          </table:table-cell>
          <table:table-cell table:style-name="Table3.B2" office:value-type="string">
            <text:p text:style-name="P62" loext:marker-style-name="T9"><text:span text:style-name="T9"/></text:p>
          </table:table-cell>
        </table:table-row>
        <table:table-row table:style-name="Table3.1">
          <table:table-cell table:style-name="Table3.A2" office:value-type="string">
            <text:p text:style-name="P62" loext:marker-style-name="T69"><text:span text:style-name="T70">-a &lt;filename&gt;</text:span></text:p>
          </table:table-cell>
          <table:table-cell table:style-name="Table3.B2" office:value-type="string">
            <text:p text:style-name="P62" loext:marker-style-name="T9"><text:span text:style-name="T9">Set about box text, contained in text file.</text:span><text:span text:style-name="T9"/></text:p>
            <text:p text:style-name="P62" loext:marker-style-name="T9"><text:span text:style-name="T9">Use the full path of the file and enclose it in "double quotes" if there is a space in the path.</text:span><text:span text:style-name="T9"/></text:p>
          </table:table-cell>
        </table:table-row>
        <table:table-row table:style-name="Table3.1">
          <table:table-cell table:style-name="Table3.A2" office:value-type="string">
            <text:p text:style-name="P62" loext:marker-style-name="T69"><text:span text:style-name="T70">-f &lt;fontname&gt;</text:span></text:p>
          </table:table-cell>
          <table:table-cell table:style-name="Table3.B2" office:value-type="string">
            <text:p text:style-name="P62" loext:marker-style-name="T9"><text:span text:style-name="T9">Set font name or filename, e.g. "Charis SIL Compact", "c:\fonts\myfont.ttf"</text:span><text:span text:style-name="T9"/></text:p>
            <text:p text:style-name="P62" loext:marker-style-name="T9"><text:span text:style-name="T9">The font name must be one of the items in the list of fonts in the New App wizard. For other fonts, specify the full path to the font filename.</text:span><text:span text:style-name="T9"/></text:p>
          </table:table-cell>
        </table:table-row>
        <table:table-row table:style-name="Table3.1">
          <table:table-cell table:style-name="Table3.A2" office:value-type="string">
            <text:p text:style-name="P62" loext:marker-style-name="T69"><text:span text:style-name="T70">-g</text:span></text:p>
          </table:table-cell>
          <table:table-cell table:style-name="Table3.B2" office:value-type="string">
            <text:p text:style-name="P62" loext:marker-style-name="T9"><text:span text:style-name="T9">Use Grandroid</text:span><text:span text:style-name="T9"/></text:p>
          </table:table-cell>
        </table:table-row>
        <table:table-row table:style-name="Table3.1">
          <table:table-cell table:style-name="Table3.A2" office:value-type="string">
            <text:p text:style-name="P62" loext:marker-style-name="T69"><text:span text:style-name="T70">-ic &lt;filename&gt;</text:span></text:p>
          </table:table-cell>
          <table:table-cell table:style-name="Table3.B2" office:value-type="string">
            <text:p text:style-name="P62" loext:marker-style-name="T9"><text:span text:style-name="T9">Add launcher icon (one or more .png files).</text:span><text:span text:style-name="T9"/></text:p>
            <text:p text:style-name="P62" loext:marker-style-name="T9"><text:span text:style-name="T9">Use the full path of the files and enclose them in "double quotes" if there is a space in the path.</text:span><text:span text:style-name="T9"/></text:p>
          </table:table-cell>
        </table:table-row>
        <table:table-row table:style-name="Table3.1">
          <table:table-cell table:style-name="Table3.A2" office:value-type="string">
            <text:p text:style-name="P62" loext:marker-style-name="T69"><text:span text:style-name="T70">-l &lt;lang-code&gt;</text:span></text:p>
          </table:table-cell>
          <table:table-cell table:style-name="Table3.B2" office:value-type="string">
            <text:p text:style-name="P62" loext:marker-style-name="T9"><text:span text:style-name="T9">Set language for menu items and settings, e.g. en, fr, es</text:span><text:span text:style-name="T9"/></text:p>
          </table:table-cell>
        </table:table-row>
        <table:table-row table:style-name="Table3.1">
          <table:table-cell table:style-name="Table3.A2" office:value-type="string">
            <text:p text:style-name="P62" loext:marker-style-name="T69"><text:span text:style-name="T70">-ft &lt;feature=value&gt;</text:span><text:span text:style-name="T70"/></text:p>
          </table:table-cell>
          <table:table-cell table:style-name="Table3.B2" office:value-type="string">
            <text:p text:style-name="P62" loext:marker-style-name="T9"><text:span text:style-name="T9">Set a feature, e.g. book-select=grid</text:span><text:span text:style-name="T9"/></text:p>
          </table:table-cell>
        </table:table-row>
        <table:table-row table:style-name="Table3.1">
          <table:table-cell table:style-name="Table3.A2" office:value-type="string">
            <text:p text:style-name="P62" loext:marker-style-name="T69"><text:span text:style-name="T70"/></text:p>
          </table:table-cell>
          <table:table-cell table:style-name="Table3.B2" office:value-type="string">
            <text:p text:style-name="P62" loext:marker-style-name="T9"><text:span text:style-name="T9"/></text:p>
          </table:table-cell>
        </table:table-row>
        <table:table-row table:style-name="Table3.1">
          <table:table-cell table:style-name="Table3.A2" office:value-type="string">
            <text:p text:style-name="P62" loext:marker-style-name="T69"><text:span text:style-name="T70">-vc &lt;integer&gt;</text:span></text:p>
          </table:table-cell>
          <table:table-cell table:style-name="Table3.B2" office:value-type="string">
            <text:p text:style-name="P62" loext:marker-style-name="T9"><text:span text:style-name="T9">Set version code, e.g. 1, 2, 3, or +1 to increment the current version code by 1.</text:span><text:span text:style-name="T9"/></text:p>
          </table:table-cell>
        </table:table-row>
        <table:table-row table:style-name="Table3.1">
          <table:table-cell table:style-name="Table3.A2" office:value-type="string">
            <text:p text:style-name="P62" loext:marker-style-name="T69"><text:span text:style-name="T70">-vn &lt;string&gt;</text:span></text:p>
          </table:table-cell>
          <table:table-cell table:style-name="Table3.B2" office:value-type="string">
            <text:p text:style-name="P62" loext:marker-style-name="T9"><text:span text:style-name="T9">Set version name, e.g. 1.0, 2.1.4, or use +1, +0.1, +0.0.1 to increment the current value.</text:span><text:span text:style-name="T9"/></text:p>
          </table:table-cell>
        </table:table-row>
        <table:table-row table:style-name="Table3.1">
          <table:table-cell table:style-name="Table3.A2" office:value-type="string">
            <text:p text:style-name="P62" loext:marker-style-name="T69"><text:span text:style-name="T70"/></text:p>
          </table:table-cell>
          <table:table-cell table:style-name="Table3.B2" office:value-type="string">
            <text:p text:style-name="P62" loext:marker-style-name="T9"><text:span text:style-name="T9"/></text:p>
          </table:table-cell>
        </table:table-row>
        <table:table-row table:style-name="Table3.1">
          <table:table-cell table:style-name="Table3.A2" office:value-type="string">
            <text:p text:style-name="P62" loext:marker-style-name="T69"><text:span text:style-name="T70">-ks &lt;filename&gt;</text:span></text:p>
          </table:table-cell>
          <table:table-cell table:style-name="Table3.B2" office:value-type="string">
            <text:p text:style-name="P62" loext:marker-style-name="T9"><text:span text:style-name="T9">Set keystore filename.</text:span><text:span text:style-name="T9"/></text:p>
            <text:p text:style-name="P62" loext:marker-style-name="T9"><text:span text:style-name="T9">Use the full path of the file and enclose it in "double quotes" if there is a space in the path.</text:span><text:span text:style-name="T9"/></text:p>
          </table:table-cell>
        </table:table-row>
        <table:table-row table:style-name="Table3.1">
          <table:table-cell table:style-name="Table3.A2" office:value-type="string">
            <text:p text:style-name="P62" loext:marker-style-name="T69"><text:span text:style-name="T70">-ksp &lt;password&gt;</text:span></text:p>
          </table:table-cell>
          <table:table-cell table:style-name="Table3.B2" office:value-type="string">
            <text:p text:style-name="P62" loext:marker-style-name="T9"><text:span text:style-name="T9">Set keystore password</text:span><text:span text:style-name="T9"/></text:p>
          </table:table-cell>
        </table:table-row>
        <table:table-row table:style-name="Table3.1">
          <table:table-cell table:style-name="Table3.A2" office:value-type="string">
            <text:p text:style-name="P62" loext:marker-style-name="T69"><text:span text:style-name="T70">-ka &lt;alias&gt;</text:span></text:p>
          </table:table-cell>
          <table:table-cell table:style-name="Table3.B2" office:value-type="string">
            <text:p text:style-name="P62" loext:marker-style-name="T9"><text:span text:style-name="T9">Set key alias</text:span><text:span text:style-name="T9"/></text:p>
          </table:table-cell>
        </table:table-row>
        <table:table-row table:style-name="Table3.1">
          <table:table-cell table:style-name="Table3.A2" office:value-type="string">
            <text:p text:style-name="P62" loext:marker-style-name="T69"><text:span text:style-name="T70">-kap &lt;password&gt;</text:span></text:p>
          </table:table-cell>
          <table:table-cell table:style-name="Table3.B2" office:value-type="string">
            <text:p text:style-name="P62" loext:marker-style-name="T9"><text:span text:style-name="T9">Set key alias password</text:span><text:span text:style-name="T9"/></text:p>
          </table:table-cell>
        </table:table-row>
        <table:table-row table:style-name="Table3.1">
          <table:table-cell table:style-name="Table3.A2" office:value-type="string">
            <text:p text:style-name="P62" loext:marker-style-name="T69"><text:span text:style-name="T70"/></text:p>
          </table:table-cell>
          <table:table-cell table:style-name="Table3.B2" office:value-type="string">
            <text:p text:style-name="P62" loext:marker-style-name="T9"><text:span text:style-name="T9"/></text:p>
          </table:table-cell>
        </table:table-row>
        <table:table-row table:style-name="Table3.1">
          <table:table-cell table:style-name="Table3.A2" office:value-type="string">
            <text:p text:style-name="P62" loext:marker-style-name="T69"><text:span text:style-name="T70">-fp &lt;folder=path&gt;</text:span></text:p>
          </table:table-cell>
          <table:table-cell table:style-name="Table3.B2" office:value-type="string">
            <text:p text:style-name="P62" loext:marker-style-name="T9"><text:span text:style-name="T9">Set a folder path, e.g. "app.builder=/Developer/Reading App Builder".</text:span><text:span text:style-name="T9"/></text:p>
          </table:table-cell>
        </table:table-row>
        <table:table-row table:style-name="Table3.1">
          <table:table-cell table:style-name="Table3.A2" office:value-type="string">
            <text:p text:style-name="P62" loext:marker-style-name="T69"><text:span text:style-name="T70">-ta &lt;target-api&gt;</text:span></text:p>
          </table:table-cell>
          <table:table-cell table:style-name="Table3.B2" office:value-type="string">
            <text:p text:style-name="P62" loext:marker-style-name="T9"><text:span text:style-name="T9">Set Target API, e.g. 21 for Android 5.0, 22 for Android 5.1.</text:span><text:span text:style-name="T9"/></text:p>
          </table:table-cell>
        </table:table-row>
        <table:table-row table:style-name="Table3.1">
          <table:table-cell table:style-name="Table3.A2" office:value-type="string">
            <text:p text:style-name="P128" loext:marker-style-name="T69"/>
          </table:table-cell>
          <table:table-cell table:style-name="Table3.B2" office:value-type="string">
            <text:p text:style-name="P129" loext:marker-style-name="T9"/>
          </table:table-cell>
        </table:table-row>
        <table:table-row table:style-name="Table3.1">
          <table:table-cell table:style-name="Table3.A2" office:value-type="string">
            <text:p text:style-name="P62" loext:marker-style-name="T69"><text:span text:style-name="T70">-si &lt;signing identity&gt;</text:span><text:span text:style-name="T70"/></text:p>
          </table:table-cell>
          <table:table-cell table:style-name="Table3.B2" office:value-type="string">
            <text:p text:style-name="P62" loext:marker-style-name="T9"><text:span text:style-name="T9">Set Signing Identity to use for iOS Resigning</text:span><text:span text:style-name="T9"/></text:p>
          </table:table-cell>
        </table:table-row>
        <table:table-row table:style-name="Table3.1">
          <table:table-cell table:style-name="Table3.A2" office:value-type="string">
            <text:p text:style-name="P62" loext:marker-style-name="T69"><text:span text:style-name="T70">-pp &lt;provisioning profile&gt;</text:span><text:span text:style-name="T70"/></text:p>
          </table:table-cell>
          <table:table-cell table:style-name="Table3.B2" office:value-type="string">
            <text:p text:style-name="P62" loext:marker-style-name="T9"><text:span text:style-name="T9">Set full path to provisioning profile for iOS resigning</text:span><text:span text:style-name="T9"/></text:p>
          </table:table-cell>
        </table:table-row>
        <table:table-row table:style-name="Table3.1">
          <table:table-cell table:style-name="Table3.A2" office:value-type="string">
            <text:p text:style-name="P62" loext:marker-style-name="T69"><text:span text:style-name="T70">-bn &lt;integer&gt;</text:span><text:span text:style-name="T70"/></text:p>
          </table:table-cell>
          <table:table-cell table:style-name="Table3.B2" office:value-type="string">
            <text:p text:style-name="P62" loext:marker-style-name="T9"><text:span text:style-name="T9">Set build number for ipa file, e.g. 1, 2, 3, or +1 to increment by 1</text:span><text:span text:style-name="T9"/></text:p>
          </table:table-cell>
        </table:table-row>
        <table:table-row table:style-name="Table3.1">
          <table:table-cell table:style-name="Table3.A2" office:value-type="string">
            <text:p text:style-name="P62" loext:marker-style-name="T69"><text:span text:style-name="T70">-vs &lt;string&gt;</text:span><text:span text:style-name="T70"/></text:p>
          </table:table-cell>
          <table:table-cell table:style-name="Table3.B2" office:value-type="string">
            <text:p text:style-name="P62" loext:marker-style-name="T9"><text:span text:style-name="T9">Set version string for ipa file, e.g. 1.0, 2.1.4 or +1, +0.1, +0.0.1</text:span><text:span text:style-name="T9"/></text:p>
          </table:table-cell>
        </table:table-row>
      </table:table>
      <text:p text:style-name="P21" loext:marker-style-name="T4"><text:span text:style-name="T71"><text:s/></text:span><text:span text:style-name="T71"/></text:p>
      <text:p text:style-name="Standard" loext:marker-style-name="T4"><text:span text:style-name="T72">Examples:</text:span><text:span text:style-name="T72"/></text:p>
      <text:p text:style-name="P21" loext:marker-style-name="T28"><text:span text:style-name="T73">rab -load "Mali" -resign -bn "5" -vs "2.3.2" -si "iPhone Distribution: Summer Institute of Linguistics, Inc (SIL) (4YF5X97M4H) " -pp "/Users/builder/Documents/MobileProvision/AdHoc_org.wycliffe.app.mali.mobileprovision"</text:span><text:span text:style-name="T28"> </text:span></text:p>
      <text:p text:style-name="P21" loext:marker-style-name="T28"><text:span text:style-name="T28">Running the command line with no parameters will start the Reading App Builder UI from the command line.</text:span><text:span text:style-name="T28"/></text:p>
      <text:h text:style-name="P130" text:outline-level="1" loext:marker-style-name="T74"><text:bookmark-end text:name="OLE_LINK1"/><text:bookmark-start text:name="_Toc228354477"/><text:bookmark-start text:name="_Toc73705825"/><text:span text:style-name="T74">Using Firebase in an iOS App</text:span><text:bookmark-end text:name="_Toc228354477"/><text:bookmark-end text:name="_Toc73705825"/><text:span text:style-name="T74"/></text:h>
      <text:p text:style-name="Standard" loext:marker-style-name="T75"><text:span text:style-name="T76">The </text:span><text:span text:style-name="T77">Building Apps</text:span><text:span text:style-name="T76"> document contains general information </text:span><text:span text:style-name="T75">about setting up the app to support Firebase Analytics, Crashlytics, Messaging and Real Time Database. <text:s/>This section will focus on the steps required to make these features work with an iOS app.</text:span></text:p>
      <text:h text:style-name="P131" text:outline-level="2" loext:marker-style-name="T78"><text:bookmark-start text:name="_Toc73705826"/><text:bookmark-start text:name="_Toc228354478"/><text:span text:style-name="T78">Adding an iOS App</text:span><text:bookmark-end text:name="_Toc73705826"/><text:bookmark-end text:name="_Toc228354478"/><text:span text:style-name="T78"/></text:h>
      <text:p text:style-name="Standard" loext:marker-style-name="T40"><text:span text:style-name="T40">The first step is to go to your Firebase Console (</text:span><text:a xlink:type="simple" xlink:href="https://console.firebase.google.com/u/0/" text:style-name="ListLabel_20_404" text:visited-style-name="ListLabel_20_404"><text:span text:style-name="T79">https://console.firebase.google.com/u/0/</text:span></text:a><text:span text:style-name="T40">) <text:s/>and select the entry for the application you are working on. <text:s/>Press the “Add App” button, then select the iOS button.</text:span></text:p>
      <text:p text:style-name="Standard" loext:marker-style-name="T4"><draw:frame draw:style-name="fr1" draw:name="Picture 478048538" text:anchor-type="as-char" svg:width="5in" svg:height="2.5626in"><draw:image xlink:href="Pictures/100000010000044C00000233B4CBFE81.png" xlink:type="simple" xlink:show="embed" xlink:actuate="onLoad" draw:mime-type="image/png"/><svg:desc>Graphical user interface

Description automatically generated</svg:desc></draw:frame></text:p>
      <text:p text:style-name="P132" loext:marker-style-name="T75"/>
      <text:p text:style-name="P82" loext:marker-style-name="T20"><text:span text:style-name="T20">The next screen will request general information about your application. The iOS bundle ID should match the Bundle ID for the app. <text:s/>This is the SAB Package setting from the Package Tab for the App unless a separate Bundle ID is set in the IPA Tab . <text:s/>The App Nickname can be set to whatever you want this app to be referenced as within Firebase. <text:s/>The App Store ID is the same as the Apple ID field in the SAB IPA tab described in Section 9. <text:s/>Once these fields are entered press “Register App”. <text:s text:c="2"/></text:span><text:span text:style-name="T20"/></text:p>
      <text:p text:style-name="P133" loext:marker-style-name="T20"/>
      <text:p text:style-name="P82" loext:marker-style-name="T4"><draw:frame draw:style-name="fr1" draw:name="Picture 1382896794" text:anchor-type="as-char" svg:width="3.3752in" svg:height="5in"><draw:image xlink:href="Pictures/10000001000002E70000044C5299718C.png" xlink:type="simple" xlink:show="embed" xlink:actuate="onLoad" draw:mime-type="image/png"/><svg:desc>Graphical user interface, text, application

Description automatically generated</svg:desc></draw:frame></text:p>
      <text:p text:style-name="P132" loext:marker-style-name="T75"/>
      <text:p text:style-name="P82" loext:marker-style-name="T75"><text:span text:style-name="T75">The next screen allows you to download the config file for the application. <text:s/>Press “Download GoogleServiceInfo.plist” to download the Firebase configuration file to your local machine. <text:s/>It should be mentioned here that if your app has the Real Time Database option set in RAB and you have not yet configured the Real Time Database within Firebase Console, you should either do that first or download the plist file again after that configuration has been completed. Download the file to a location where you can locate it. <text:s/>Later in this section, instructions will be provided for adding this file into your RAB application. <text:s/>After downloading the file, press “Next” to continue.</text:span><text:span text:style-name="T75"/></text:p>
      <text:p text:style-name="P134" loext:marker-style-name="T75"/>
      <text:p text:style-name="P82" loext:marker-style-name="T4"><draw:frame draw:style-name="fr1" draw:name="Picture 1087146050" text:anchor-type="as-char" svg:width="4.698in" svg:height="5in"><draw:image xlink:href="Pictures/100000010000040A0000044DBA175B06.png" xlink:type="simple" xlink:show="embed" xlink:actuate="onLoad" draw:mime-type="image/png"/><svg:desc>Graphical user interface, application

Description automatically generated</svg:desc></draw:frame></text:p>
      <text:p text:style-name="P135" loext:marker-style-name="T4"/>
      <text:p text:style-name="Standard" loext:marker-style-name="T75"><text:span text:style-name="T75">The screens which follow the download step are all instructional screens providing information about programming changes that need to be made to add Firebase to an app. <text:s/>This work has already been done within RAB and can be ignored here. <text:s/></text:span><text:span text:style-name="T75"/></text:p>
      <text:p text:style-name="P132" loext:marker-style-name="T75"/>
      <text:p text:style-name="P82" loext:marker-style-name="T75"><text:span text:style-name="T75">The final screen just provides a means to return to the console. <text:s/>The addition of the iOS app to the Firebase console is complete.</text:span><text:span text:style-name="T75"/></text:p>
      <text:p text:style-name="P134" loext:marker-style-name="T75"/>
      <text:p text:style-name="P82" loext:marker-style-name="T75"><draw:frame draw:style-name="fr1" draw:name="Picture 432767027" text:anchor-type="as-char" svg:width="5in" svg:height="4.6146in"><draw:image xlink:href="Pictures/100000010000044D000003F825F5D9B9.png" xlink:type="simple" xlink:show="embed" xlink:actuate="onLoad" draw:mime-type="image/png"/><svg:desc>Graphical user interface, text, application, email

Description automatically generated</svg:desc></draw:frame></text:p>
      <text:p text:style-name="P134" loext:marker-style-name="T75"/>
      <text:p text:style-name="P136" loext:marker-style-name="T78"/>
      <text:h text:style-name="P137" text:outline-level="2" loext:marker-style-name="T78"><text:bookmark-start text:name="_Toc73705827"/><text:bookmark-start text:name="_Toc228354479"/><text:span text:style-name="T78">iOS Configuration for Firebase in SAB</text:span><text:bookmark-end text:name="_Toc73705827"/><text:bookmark-end text:name="_Toc228354479"/><text:span text:style-name="T78"/></text:h>
      <text:p text:style-name="P82" loext:marker-style-name="T43"><text:span text:style-name="T43">After the app has been added to the Firebase configuration through Firebase Console, the configuration file that was downloaded needs to be added to SAB. <text:s text:c="2"/>On the </text:span><text:span text:style-name="T80">Firebase</text:span><text:span text:style-name="T43"> tab, in the </text:span><text:span text:style-name="T80">Firebase Configuration</text:span><text:span text:style-name="T43"> section on the bottom half of the screen, press the </text:span><text:span text:style-name="T80">iOS </text:span><text:span text:style-name="T43">tab. <text:s/>Press the </text:span><text:span text:style-name="T80">Browse</text:span><text:span text:style-name="T43"> button to locate the </text:span><text:span text:style-name="T81">GoogleService-Info.plist</text:span><text:span text:style-name="T43"> file that was downloaded during the Firebase configuration process above. <text:s/>Select that file to add it to the app configuration. <text:s/>Note that if Firebase features are checked as enabled, the iOS app will not build until the plist file has been added.</text:span></text:p>
      <text:p text:style-name="P138" loext:marker-style-name="T43"/>
      <text:p text:style-name="P82" loext:marker-style-name="T78"><draw:frame draw:style-name="fr1" draw:name="Picture 32" text:anchor-type="as-char" svg:width="6.2681in" svg:height="3.2925in"><draw:image xlink:href="Pictures/1000000100000564000002D5CCF78E17.png" xlink:type="simple" xlink:show="embed" xlink:actuate="onLoad" draw:mime-type="image/png"/><svg:desc>Graphical user interface, text, application, email

Description automatically generated</svg:desc></draw:frame></text:p>
      <text:p text:style-name="P136" loext:marker-style-name="T78"><text:bookmark-start text:name="_Toc73705828"/></text:p>
      <text:h text:style-name="P137" text:outline-level="2" loext:marker-style-name="T78"><text:bookmark-start text:name="_Toc228354480"/><text:span text:style-name="T78">Security Feature Support in iOS App</text:span><text:bookmark-end text:name="_Toc228354480"/><text:bookmark-end text:name="_Toc73705828"/><text:span text:style-name="T78"/></text:h>
      <text:p text:style-name="P82" loext:marker-style-name="T75"><text:span text:style-name="T75">The iOS app supports a subset of the security features available in RAB. <text:s/>These features can be accessed through the </text:span><text:span text:style-name="T82">Security</text:span><text:span text:style-name="T75"> tab within RAB. <text:s/>iOS only supports the default </text:span><text:span text:style-name="T83">Allow anyone to use this app</text:span><text:span text:style-name="T75"> and the </text:span><text:span text:style-name="T83">Require each user to register with the details when they first use the app</text:span><text:span text:style-name="T75"> features. <text:s/>The other features are available for Android apps but are not implemented in the iOS app at this time. <text:s/>The registration configuration for this feature works identically for both Android and iOS. <text:s/>No special steps have to be taken specifically for iOS to configure this option if it is selected.</text:span></text:p>
      <text:p text:style-name="P134" loext:marker-style-name="T75"/>
      <text:p text:style-name="P82" loext:marker-style-name="T75"><draw:frame draw:style-name="fr1" draw:name="Picture 37" text:anchor-type="as-char" svg:width="6.2681in" svg:height="3.3465in"><draw:image xlink:href="Pictures/1000000100000561000002DFAF71798D.png" xlink:type="simple" xlink:show="embed" xlink:actuate="onLoad" draw:mime-type="image/png"/><svg:desc>Graphical user interface, text, application

Description automatically generated</svg:desc></draw:frame></text:p>
      <text:p text:style-name="P134" loext:marker-style-name="T75"/>
      <text:h text:style-name="P29" text:outline-level="2"><text:bookmark-start text:name="_Toc74579342"/><text:bookmark-start text:name="_Toc228354481"/>Firebase Messaging<text:bookmark-end text:name="_Toc74579342"/><text:bookmark-end text:name="_Toc228354481"/></text:h>
      <text:p text:style-name="Standard" loext:marker-style-name="T55"><text:span text:style-name="T55">If Firebase Cloud Messaging is configured to allow push notifications for the app, several changes are required for the app’s configuration information in the Apple App Store. <text:s/>The first thing that is required is that the App’s configuration must be changed in Apple Developer to include Push Notifications. <text:s/>Under </text:span><text:span text:style-name="T58">Certficates, Identifiers, and Profiles</text:span><text:span text:style-name="T55">, select the app that is being configured. <text:s text:c="2"/>Enable the Push Notifications option from the list.</text:span></text:p>
      <text:p text:style-name="Standard" loext:marker-style-name="T55"><draw:frame draw:style-name="fr1" draw:name="Picture 10" text:anchor-type="as-char" svg:width="6.2638in" svg:height="2.5382in"><draw:image xlink:href="Pictures/10000001000005620000022E479ED9DD.png" xlink:type="simple" xlink:show="embed" xlink:actuate="onLoad" draw:mime-type="image/png"/><svg:desc>Graphical user interface, text, application

Description automatically generated</svg:desc></draw:frame></text:p>
      <text:p text:style-name="Standard" loext:marker-style-name="T55"><text:span text:style-name="T55">After making these changes, the provisioning profile for the app should be updated for the new capability and the entry updated in SAB.</text:span><text:span text:style-name="T55"/></text:p>
      <text:p text:style-name="P100" loext:marker-style-name="T55"/>
      <text:p text:style-name="Standard" loext:marker-style-name="T55"><text:span text:style-name="T55">For Firebase to send notification to the app, it will need to have a key uploaded to it. <text:s/>The preferred manner is to go to the </text:span><text:span text:style-name="T58">Keys </text:span><text:span text:style-name="T55">section in Apple Developer and select to create an Apple Push Notifications service key, using the first option on the screen below. <text:s/>One key of this type is created to be used with all apps associated with this organization. <text:s/>If a key has already been created, then use that. <text:s/></text:span></text:p>
      <text:p text:style-name="Standard" loext:marker-style-name="T55"><draw:frame draw:style-name="fr1" draw:name="Picture 31" text:anchor-type="as-char" svg:width="6.2638in" svg:height="4.1354in"><draw:image xlink:href="Pictures/10000001000005600000038DB208906E.png" xlink:type="simple" xlink:show="embed" xlink:actuate="onLoad" draw:mime-type="image/png"/><svg:desc>Graphical user interface, text, application, email

Description automatically generated</svg:desc></draw:frame></text:p>
      <text:p text:style-name="Standard" loext:marker-style-name="T55"><text:span text:style-name="T55">At the time the key is created, a .p8 file is generated which can be used for all apps. <text:s/>You are allowed to make two keys through this interface, so that you can create a new key and revoke the old one, but only one is active at a time. <text:s/></text:span><text:span text:style-name="T55"/></text:p>
      <text:p text:style-name="P100" loext:marker-style-name="T55"/>
      <text:p text:style-name="Standard" loext:marker-style-name="T55"><draw:frame draw:style-name="fr1" draw:name="Picture 35" text:anchor-type="as-char" svg:width="6.2638in" svg:height="3.0402in"><draw:image xlink:href="Pictures/10000001000005610000029CCD34C93B.png" xlink:type="simple" xlink:show="embed" xlink:actuate="onLoad" draw:mime-type="image/png"/><svg:desc>Graphical user interface, text, application, email

Description automatically generated</svg:desc></draw:frame></text:p>
      <text:p text:style-name="Standard" loext:marker-style-name="T55"><text:span text:style-name="T55">Once the p8 file for this key has been downloaded, the file can be uploaded to the Firebase configuration for cloud messaging for this app.</text:span><text:span text:style-name="T55"/></text:p>
      <text:p text:style-name="Standard" loext:marker-style-name="T55"><draw:frame draw:style-name="fr1" draw:name="Picture 51" text:anchor-type="as-char" svg:width="6.2638in" svg:height="4.0335in"><draw:image xlink:href="Pictures/1000000100000561000003777016FF66.png" xlink:type="simple" xlink:show="embed" xlink:actuate="onLoad" draw:mime-type="image/png"/><svg:desc>Graphical user interface, text, application, email

Description automatically generated</svg:desc></draw:frame></text:p>
      <text:p text:style-name="P100" loext:marker-style-name="T55"/>
      <text:h text:style-name="P29" text:outline-level="2"><text:bookmark-start text:name="_Toc228354482"/>Firebase Crashlytics for iOS<text:bookmark-end text:name="_Toc228354482"/></text:h>
      <text:p text:style-name="Standard" loext:marker-style-name="T55"><text:span text:style-name="T55">If Crashlytics is configured for the app in Firebase, the dSYM file associated with the app should be uploaded to get the detailed information about any crashes. <text:s/>To upload dSYMs, you’ll need to use the </text:span><text:span text:style-name="T58">upload-symbols</text:span><text:span text:style-name="T55"> command line tool that ships with the Crashlytics SDK. <text:s/>One way to obtain the tool is to install the Crashlytics SDK and locate the tool in the “FirebaseCrashlytics” folder where you installed the SDK. <text:s/>The tool has also been uploaded to an App Builder share drive. <text:s/>The link to this file is:</text:span></text:p>
      <text:p text:style-name="Standard" loext:marker-style-name="T55"><text:a xlink:type="simple" xlink:href="https://drive.google.com/file/d/1RJIDZyQUbfhoqg9IGZg1YggNMJQQVeue/view?usp=sharing" text:style-name="Internet_20_link" text:visited-style-name="Visited_20_Internet_20_Link"><text:span text:style-name="Internet_20_link"><text:span text:style-name="T55">https://drive.google.com/file/d/1RJIDZyQUbfhoqg9IGZg1YggNMJQQVeue/view?usp=sharing</text:span></text:span></text:a><text:span text:style-name="T55"/></text:p>
      <text:p text:style-name="Standard" loext:marker-style-name="T55"><text:span text:style-name="T55">After downloading this file, cd to the download location and enter “chmod +x upload-symbols” to make the script executable. <text:s/>Otherwise a “Permission denied” may be encountered when attempting to run the script.</text:span><text:span text:style-name="T55"/></text:p>
      <text:p text:style-name="P100" loext:marker-style-name="T55"/>
      <text:p text:style-name="Standard" loext:marker-style-name="T55"><text:span text:style-name="T55">The dSYM file that is required is supplied as part of the build process if Crashlytics is configured for the application. <text:s/>The dSYM file is created in the ipa output folder with the same name as the ipa file, with a dSYM extension.</text:span><text:span text:style-name="T55"/></text:p>
      <text:p text:style-name="P100" loext:marker-style-name="T55"/>
      <text:p text:style-name="Standard" loext:marker-style-name="T55"><text:span text:style-name="T55">Upload the dSYM file using the </text:span><text:span text:style-name="T58">GoogleService-Info.plist</text:span><text:span text:style-name="T55"> file associated with this application by opening a Terminal window. <text:s/>The command line to upload the dSYM file is:</text:span></text:p>
      <text:p text:style-name="P139" loext:marker-style-name="T55"><text:span text:style-name="T55">/path/to/upload-symbols -gsp /path/to/GoogleService-Info.plist -p ios /path/to/TemplateApp.app.dSYM</text:span><text:span text:style-name="T55"/></text:p>
      <text:p text:style-name="Standard" loext:marker-style-name="T55"><text:span text:style-name="T55">For the example where all three files have been placed in the same directory and the Terminal window has cd’d to that directory, the command would be:</text:span><text:span text:style-name="T55"/></text:p>
      <text:p text:style-name="P139" loext:marker-style-name="T55"><text:span text:style-name="T55">./upload-symbols -gsp ./GoogleService-Info.plist -p ios ./TemplateApp.app.dSYM</text:span><text:span text:style-name="T55"/></text:p>
      <text:p text:style-name="P73" loext:marker-style-name="T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alibri1" svg:font-family="Calibri" style:font-family-generic="system" style:font-pitch="variable"/>
    <style:font-face style:name="Courier New" svg:font-family="'Courier New'" style:font-family-generic="swiss" style:font-pitch="variable"/>
    <style:font-face style:name="Courier New1" svg:font-family="'Courier New'"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新細明體" svg:font-family="新細明體"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fo:color="#000000" loext:opacity="100%" style:font-name="Arial" fo:font-size="11pt" fo:language="en" fo:country="US" style:letter-kerning="fals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fo:color="#000000" loext:opacity="100%" style:font-name="Arial" fo:font-size="11pt" fo:language="en" fo:country="US"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left" style:justify-single-word="false" fo:orphans="2" fo:widows="2" style:writing-mode="lr-tb"/>
      <style:text-properties style:font-name="Calibri" fo:font-family="Calibri" style:font-family-generic="swiss" style:font-pitch="variable" fo:font-size="12pt" style:font-size-asian="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class="chapter">
      <style:paragraph-properties fo:margin-top="0.1665in" fo:margin-bottom="0.0417in" style:contextual-spacing="false" fo:line-height="100%" fo:keep-with-next="always"/>
      <style:text-properties style:use-window-font-color="true" loext:opacity="0%" fo:font-size="16pt" fo:language="en" fo:country="GB" fo:font-weight="bold" style:letter-kerning="true" style:font-name-asian="Times New Roman1" style:font-family-asian="'Times New Roman'" style:font-family-generic-asian="system" style:font-pitch-asian="variable" style:font-size-asian="16pt" style:language-asian="fr" style:country-asian="FR" style:font-weight-asian="bold" style:font-size-complex="16pt" style:font-weight-complex="bold"/>
    </style:style>
    <style:style style:name="Heading_20_2" style:display-name="Heading 2" style:family="paragraph" style:parent-style-name="Standard" style:next-style-name="Standard" loext:linked-style-name="Heading_20_2_20_Char" style:default-outline-level="2" style:class="chapter">
      <style:paragraph-properties fo:margin-left="0.3937in" fo:margin-top="0.25in" fo:margin-bottom="0.0417in" style:contextual-spacing="false" fo:line-height="100%" fo:text-indent="-0.3937in" style:auto-text-indent="false" fo:keep-with-next="always">
        <style:tab-stops>
          <style:tab-stop style:position="0.3937in"/>
        </style:tab-stops>
      </style:paragraph-properties>
      <style:text-properties style:use-window-font-color="true" loext:opacity="0%" fo:font-size="14pt" fo:font-weight="bold" style:font-name-asian="Times New Roman1" style:font-family-asian="'Times New Roman'" style:font-family-generic-asian="system" style:font-pitch-asian="variable" style:font-size-asian="14pt" style:language-asian="fr" style:country-asian="FR"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chapter">
      <style:paragraph-properties fo:margin-top="0.222in" fo:margin-bottom="0.0555in" style:contextual-spacing="true" fo:keep-together="always" fo:keep-with-next="always"/>
      <style:text-properties style:use-window-font-color="true" loext:opacity="0%" fo:font-weight="bold" style:font-weight-asian="bold" style:font-size-complex="14pt"/>
    </style:style>
    <style:style style:name="Heading_20_4" style:display-name="Heading 4" style:family="paragraph" style:parent-style-name="Standard" style:next-style-name="Standard" style:default-outline-level="4" style:list-style-name="" style:class="chapter">
      <style:paragraph-properties fo:margin-top="0.1945in" fo:margin-bottom="0.0555in" style:contextual-spacing="true" fo:keep-together="always" fo:keep-with-next="always"/>
      <style:text-properties fo:color="#666666" loext:opacity="100%" style:font-size-complex="12pt"/>
    </style:style>
    <style:style style:name="Heading_20_5" style:display-name="Heading 5" style:family="paragraph" style:parent-style-name="Standard" style:next-style-name="Standard" style:default-outline-level="5" style:list-style-name="" style:class="chapter">
      <style:paragraph-properties fo:margin-top="0.1665in" fo:margin-bottom="0.0555in" style:contextual-spacing="tru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chapter">
      <style:paragraph-properties fo:margin-top="0.1665in" fo:margin-bottom="0.0555in" style:contextual-spacing="true" fo:keep-together="always" fo:keep-with-next="always"/>
      <style:text-properties fo:color="#666666" loext:opacity="100%" fo:font-style="italic" style:font-style-asian="italic"/>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1f3763" loext:opacity="100%" style:font-name="Calibri Light" fo:font-family="'Calibri Light'" style:font-family-generic="swiss" style:font-pitch="variable" fo:font-style="italic" style:font-name-asian="新細明體" style:font-family-asian="新細明體"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028in" fo:margin-bottom="0in" style:contextual-spacing="false" fo:keep-together="always" fo:keep-with-next="always"/>
      <style:text-properties fo:color="#272727" loext:opacity="100%" style:font-name="Calibri Light" fo:font-family="'Calibri Light'" style:font-family-generic="swiss" style:font-pitch="variable" fo:font-size="10.5pt" style:font-name-asian="新細明體" style:font-family-asian="新細明體" style:font-family-generic-asian="system" style:font-pitch-asian="variable" style:font-size-asian="10.5pt" style:font-name-complex="Times New Roman1" style:font-family-complex="'Times New Roman'"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028in" fo:margin-bottom="0in" style:contextual-spacing="false" fo:keep-together="always" fo:keep-with-next="always"/>
      <style:text-properties fo:color="#272727" loext:opacity="100%" style:font-name="Calibri Light" fo:font-family="'Calibri Light'" style:font-family-generic="swiss" style:font-pitch="variable" fo:font-size="10.5pt" fo:font-style="italic" style:font-name-asian="新細明體" style:font-family-asian="新細明體" style:font-family-generic-asian="system" style:font-pitch-asian="variable" style:font-size-asian="10.5pt" style:font-style-asian="italic" style:font-name-complex="Times New Roman1" style:font-family-complex="'Times New Roman'"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Title" style:family="paragraph" style:parent-style-name="Standard" style:next-style-name="Standard" style:class="chapter">
      <style:paragraph-properties fo:margin-top="0in" fo:margin-bottom="0.0417in" style:contextual-spacing="tru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in" fo:margin-bottom="0.222in" style:contextual-spacing="true" fo:keep-together="always" fo:keep-with-next="always"/>
      <style:text-properties fo:color="#666666" loext:opacity="100%" fo:font-size="15pt" style:font-size-asian="15pt" style:font-size-complex="1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1665in" fo:margin-bottom="0in" style:contextual-spacing="false" fo:line-height="108%" fo:keep-together="always" fo:text-indent="0in" style:auto-text-indent="false"/>
      <style:text-properties fo:color="#2f5496" loext:opacity="100%" style:font-name="Calibri Light" fo:font-family="'Calibri Light'" style:font-family-generic="swiss" style:font-pitch="variable" fo:language="en" fo:country="US" fo:font-weight="normal" style:letter-kerning="false" style:font-name-asian="新細明體" style:font-family-asian="新細明體" style:font-family-generic-asian="system" style:font-pitch-asian="variable" style:language-asian="en" style:country-asian="US" style:font-weight-asian="normal" style:font-name-complex="Times New Roman1" style:font-family-complex="'Times New Roman'" style:font-family-generic-complex="system" style:font-pitch-complex="variable" style:font-weight-complex="normal">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1665in" fo:margin-bottom="0.0693in" style:contextual-spacing="false">
        <style:tab-stops>
          <style:tab-stop style:position="0.3055in"/>
          <style:tab-stop style:position="6.2681in" style:type="right" style:leader-style="dotted" style:leader-text="."/>
        </style:tab-stops>
      </style:paragraph-properties>
      <style:text-properties style:font-name="Calibri" fo:font-family="Calibri" style:font-family-generic="swiss" style:font-pitch="variable" fo:font-weight="bold" style:font-weight-asian="bold" style:font-name-complex="Calibri1" style:font-family-complex="Calibri" style:font-family-generic-complex="system" style:font-pitch-complex="variable"/>
    </style:style>
    <style:style style:name="Contents_20_2" style:display-name="Contents 2" style:family="paragraph" style:parent-style-name="Standard" style:next-style-name="Standard" style:auto-update="true" style:class="index">
      <style:paragraph-properties fo:margin-left="0.1528in" fo:margin-top="0in" fo:margin-bottom="0.0693in" style:contextual-spacing="false">
        <style:tab-stops>
          <style:tab-stop style:position="0.611in"/>
          <style:tab-stop style:position="6.261in" style:type="right" style:leader-style="dotted" style:leader-text="."/>
        </style:tab-stops>
      </style:paragraph-properties>
      <style:text-properties style:font-name="Calibri" fo:font-family="Calibri" style:font-family-generic="swiss" style:font-pitch="variable" style:font-name-complex="Times New Roman1" style:font-family-complex="'Times New Roman'" style:font-family-generic-complex="system" style:font-pitch-complex="variable"/>
    </style:style>
    <style:style style:name="Contents_20_3" style:display-name="Contents 3" style:family="paragraph" style:parent-style-name="Standard" style:next-style-name="Standard" style:auto-update="true" style:class="index">
      <style:paragraph-properties fo:margin-left="0.3055in" fo:margin-top="0in" fo:margin-bottom="0.0693in" style:contextual-spacing="false"/>
    </style:style>
    <style:style style:name="List_20_Paragraph" style:display-name="List Paragraph" style:family="paragraph" style:parent-style-name="Standard">
      <style:paragraph-properties fo:margin-left="0.5in" fo:margin-top="0in" fo:margin-bottom="0in" style:contextual-spacing="true"/>
    </style:style>
    <style:style style:name="FAQ" style:family="paragraph" style:parent-style-name="Standard" style:list-style-name="WWNum10" style:list-level="3"/>
    <style:style style:name="No_20_Spacing" style:display-name="No Spacing" style:family="paragraph">
      <style:paragraph-properties fo:margin-top="0in" fo:margin-bottom="0in" style:contextual-spacing="false" fo:line-height="100%" fo:text-align="left" style:justify-single-word="false" fo:orphans="2" fo:widows="2" style:writing-mode="lr-tb"/>
      <style:text-properties style:font-name="Calibri" fo:font-family="Calibri" style:font-family-generic="swiss" style:font-pitch="variable" fo:font-size="12pt" style:font-size-asian="12pt"/>
    </style:style>
    <style:style style:name="Command_20_Line" style:display-name="Command Line" style:family="paragraph" style:parent-style-name="Standard">
      <loext:graphic-properties draw:fill="solid" draw:fill-color="#f2f2f2"/>
      <style:paragraph-properties fo:margin-left="0.4925in" fo:margin-top="0.139in" fo:margin-bottom="0in" style:contextual-spacing="false" fo:line-height="100%" fo:background-color="#f2f2f2" fo:padding="0.0835in" fo:border="0.51pt solid #ffffff" style:shadow="none"/>
      <style:text-properties fo:color="#0070c0" loext:opacity="100%" style:font-name="Courier New" fo:font-family="'Courier New'" style:font-family-generic="swiss" style:font-pitch="variable" fo:font-size="10pt" fo:language="en" fo:country="GB" fo:font-weight="bold" style:font-name-asian="Times New Roman1" style:font-family-asian="'Times New Roman'" style:font-family-generic-asian="system" style:font-pitch-asian="variable" style:font-size-asian="10pt" style:language-asian="fr" style:country-asian="FR" style:font-weight-asian="bold" style:font-name-complex="Courier New1" style:font-family-complex="'Courier New'"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line-height="100%">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fo:line-height="100%">
        <style:tab-stops>
          <style:tab-stop style:position="3.1339in" style:type="center"/>
          <style:tab-stop style:position="6.2681in" style:type="right"/>
        </style:tab-stops>
      </style:paragraph-properties>
    </style:style>
    <style:style style:name="Balloon_20_Text" style:display-name="Balloon Text" style:family="paragraph" style:parent-style-name="Standard" loext:linked-style-name="Balloon_20_Text_20_Char">
      <style:paragraph-properties fo:line-height="100%"/>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Default_20_Paragraph_20_Font" style:display-name="Default Paragraph Font" style:family="text"/>
    <style:style style:name="Heading_20_1_20_Char" style:display-name="Heading 1 Char" style:family="text" loext:linked-style-name="Heading_20_1">
      <style:text-properties style:use-window-font-color="true" loext:opacity="0%" style:font-name="Calibri" fo:font-family="Calibri" style:font-family-generic="swiss" style:font-pitch="variable" fo:font-size="16pt" fo:language="en" fo:country="GB" fo:font-weight="bold" style:letter-kerning="true" style:font-name-asian="Times New Roman1" style:font-family-asian="'Times New Roman'" style:font-family-generic-asian="system" style:font-pitch-asian="variable" style:font-size-asian="16pt" style:language-asian="fr" style:country-asian="FR" style:font-weight-asian="bold" style:font-size-complex="16pt" style:font-weight-complex="bold"/>
    </style:style>
    <style:style style:name="Heading_20_2_20_Char" style:display-name="Heading 2 Char" style:family="text" loext:linked-style-name="Heading_20_2">
      <style:text-properties style:use-window-font-color="true" loext:opacity="0%" style:font-name="Calibri" fo:font-family="Calibri" style:font-family-generic="swiss" style:font-pitch="variable" fo:font-size="14pt" fo:font-weight="bold" style:font-name-asian="Times New Roman1" style:font-family-asian="'Times New Roman'" style:font-family-generic-asian="system" style:font-pitch-asian="variable" style:font-size-asian="14pt" style:language-asian="fr" style:country-asian="FR" style:font-weight-asian="bold" style:font-size-complex="14pt" style:font-style-complex="italic"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Heading_20_7_20_Char" style:display-name="Heading 7 Char" style:family="text" style:parent-style-name="Default_20_Paragraph_20_Font" loext:linked-style-name="Heading_20_7">
      <style:text-properties fo:color="#1f3763" loext:opacity="100%" style:font-name="Calibri Light" fo:font-family="'Calibri Light'" style:font-family-generic="swiss" style:font-pitch="variable" fo:font-style="italic" style:font-name-asian="新細明體" style:font-family-asian="新細明體"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Calibri Light" fo:font-family="'Calibri Light'" style:font-family-generic="swiss" style:font-pitch="variable" fo:font-size="10.5pt" style:font-name-asian="新細明體" style:font-family-asian="新細明體" style:font-family-generic-asian="system" style:font-pitch-asian="variable" style:font-size-asian="10.5pt" style:font-name-complex="Times New Roman1" style:font-family-complex="'Times New Roman'"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Calibri Light" fo:font-family="'Calibri Light'" style:font-family-generic="swiss" style:font-pitch="variable" fo:font-size="10.5pt" fo:font-style="italic" style:font-name-asian="新細明體" style:font-family-asian="新細明體" style:font-family-generic-asian="system" style:font-pitch-asian="variable" style:font-size-asian="10.5pt" style:font-style-asian="italic" style:font-name-complex="Times New Roman1" style:font-family-complex="'Times New Roman'"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Balloon_20_Text_20_Char" style:display-name="Balloon Text Char" style:family="text" style:parent-style-name="Default_20_Paragraph_20_Font" loext:linked-style-name="Balloon_20_Tex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font-name-complex="Times New Roman1" style:font-family-complex="'Times New Roman'" style:font-family-generic-complex="system" style:font-pitch-complex="variable"/>
    </style:style>
    <style:style style:name="ListLabel_20_3" style:display-name="ListLabel 3" style:family="text">
      <style:text-properties style:text-underline-style="none" style:font-name-complex="Times New Roman1" style:font-family-complex="'Times New Roman'" style:font-family-generic-complex="system" style:font-pitch-complex="variable"/>
    </style:style>
    <style:style style:name="ListLabel_20_4" style:display-name="ListLabel 4" style:family="text">
      <style:text-properties style:text-underline-style="none" style:font-name-complex="Times New Roman1" style:font-family-complex="'Times New Roman'" style:font-family-generic-complex="system" style:font-pitch-complex="variable"/>
    </style:style>
    <style:style style:name="ListLabel_20_5" style:display-name="ListLabel 5" style:family="text">
      <style:text-properties style:text-underline-style="none" style:font-name-complex="Times New Roman1" style:font-family-complex="'Times New Roman'" style:font-family-generic-complex="system" style:font-pitch-complex="variable"/>
    </style:style>
    <style:style style:name="ListLabel_20_6" style:display-name="ListLabel 6" style:family="text">
      <style:text-properties style:text-underline-style="none" style:font-name-complex="Times New Roman1" style:font-family-complex="'Times New Roman'" style:font-family-generic-complex="system" style:font-pitch-complex="variable"/>
    </style:style>
    <style:style style:name="ListLabel_20_7" style:display-name="ListLabel 7" style:family="text">
      <style:text-properties style:text-underline-style="none" style:font-name-complex="Times New Roman1" style:font-family-complex="'Times New Roman'" style:font-family-generic-complex="system" style:font-pitch-complex="variable"/>
    </style:style>
    <style:style style:name="ListLabel_20_8" style:display-name="ListLabel 8" style:family="text">
      <style:text-properties style:text-underline-style="none" style:font-name-complex="Times New Roman1" style:font-family-complex="'Times New Roman'" style:font-family-generic-complex="system" style:font-pitch-complex="variable"/>
    </style:style>
    <style:style style:name="ListLabel_20_9" style:display-name="ListLabel 9" style:family="text">
      <style:text-properties style:text-underline-style="none" style:font-name-complex="Times New Roman1" style:font-family-complex="'Times New Roman'" style:font-family-generic-complex="system" style:font-pitch-complex="variabl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font-name-complex="Times New Roman1" style:font-family-complex="'Times New Roman'" style:font-family-generic-complex="system" style:font-pitch-complex="variable"/>
    </style:style>
    <style:style style:name="ListLabel_20_12" style:display-name="ListLabel 12" style:family="text">
      <style:text-properties style:text-underline-style="none" style:font-name-complex="Times New Roman1" style:font-family-complex="'Times New Roman'" style:font-family-generic-complex="system" style:font-pitch-complex="variable"/>
    </style:style>
    <style:style style:name="ListLabel_20_13" style:display-name="ListLabel 13" style:family="text">
      <style:text-properties style:text-underline-style="none" style:font-name-complex="Times New Roman1" style:font-family-complex="'Times New Roman'" style:font-family-generic-complex="system" style:font-pitch-complex="variable"/>
    </style:style>
    <style:style style:name="ListLabel_20_14" style:display-name="ListLabel 14" style:family="text">
      <style:text-properties style:text-underline-style="none" style:font-name-complex="Times New Roman1" style:font-family-complex="'Times New Roman'" style:font-family-generic-complex="system" style:font-pitch-complex="variable"/>
    </style:style>
    <style:style style:name="ListLabel_20_15" style:display-name="ListLabel 15" style:family="text">
      <style:text-properties style:text-underline-style="none" style:font-name-complex="Times New Roman1" style:font-family-complex="'Times New Roman'" style:font-family-generic-complex="system" style:font-pitch-complex="variable"/>
    </style:style>
    <style:style style:name="ListLabel_20_16" style:display-name="ListLabel 16" style:family="text">
      <style:text-properties style:text-underline-style="none" style:font-name-complex="Times New Roman1" style:font-family-complex="'Times New Roman'" style:font-family-generic-complex="system" style:font-pitch-complex="variable"/>
    </style:style>
    <style:style style:name="ListLabel_20_17" style:display-name="ListLabel 17" style:family="text">
      <style:text-properties style:text-underline-style="none" style:font-name-complex="Times New Roman1" style:font-family-complex="'Times New Roman'" style:font-family-generic-complex="system" style:font-pitch-complex="variable"/>
    </style:style>
    <style:style style:name="ListLabel_20_18" style:display-name="ListLabel 18" style:family="text">
      <style:text-properties style:text-underline-style="none" style:font-name-complex="Times New Roman1" style:font-family-complex="'Times New Roman'" style:font-family-generic-complex="system" style:font-pitch-complex="variabl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font-name-complex="Times New Roman1" style:font-family-complex="'Times New Roman'" style:font-family-generic-complex="system" style:font-pitch-complex="variable"/>
    </style:style>
    <style:style style:name="ListLabel_20_39" style:display-name="ListLabel 39" style:family="text">
      <style:text-properties style:text-underline-style="none" style:font-name-complex="Times New Roman1" style:font-family-complex="'Times New Roman'" style:font-family-generic-complex="system" style:font-pitch-complex="variable"/>
    </style:style>
    <style:style style:name="ListLabel_20_40" style:display-name="ListLabel 40" style:family="text">
      <style:text-properties style:text-underline-style="none" style:font-name-complex="Times New Roman1" style:font-family-complex="'Times New Roman'" style:font-family-generic-complex="system" style:font-pitch-complex="variable"/>
    </style:style>
    <style:style style:name="ListLabel_20_41" style:display-name="ListLabel 41" style:family="text">
      <style:text-properties style:text-underline-style="none" style:font-name-complex="Times New Roman1" style:font-family-complex="'Times New Roman'" style:font-family-generic-complex="system" style:font-pitch-complex="variable"/>
    </style:style>
    <style:style style:name="ListLabel_20_42" style:display-name="ListLabel 42" style:family="text">
      <style:text-properties style:text-underline-style="none" style:font-name-complex="Times New Roman1" style:font-family-complex="'Times New Roman'" style:font-family-generic-complex="system" style:font-pitch-complex="variable"/>
    </style:style>
    <style:style style:name="ListLabel_20_43" style:display-name="ListLabel 43" style:family="text">
      <style:text-properties style:text-underline-style="none" style:font-name-complex="Times New Roman1" style:font-family-complex="'Times New Roman'" style:font-family-generic-complex="system" style:font-pitch-complex="variable"/>
    </style:style>
    <style:style style:name="ListLabel_20_44" style:display-name="ListLabel 44" style:family="text">
      <style:text-properties style:text-underline-style="none" style:font-name-complex="Times New Roman1" style:font-family-complex="'Times New Roman'" style:font-family-generic-complex="system" style:font-pitch-complex="variable"/>
    </style:style>
    <style:style style:name="ListLabel_20_45" style:display-name="ListLabel 45" style:family="text">
      <style:text-properties style:text-underline-style="none" style:font-name-complex="Times New Roman1" style:font-family-complex="'Times New Roman'" style:font-family-generic-complex="system" style:font-pitch-complex="variabl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font-name-complex="Times New Roman1" style:font-family-complex="'Times New Roman'" style:font-family-generic-complex="system" style:font-pitch-complex="variable"/>
    </style:style>
    <style:style style:name="ListLabel_20_49" style:display-name="ListLabel 49" style:family="text">
      <style:text-properties style:text-underline-style="none" style:font-name-complex="Times New Roman1" style:font-family-complex="'Times New Roman'" style:font-family-generic-complex="system" style:font-pitch-complex="variable"/>
    </style:style>
    <style:style style:name="ListLabel_20_50" style:display-name="ListLabel 50" style:family="text">
      <style:text-properties style:text-underline-style="none" style:font-name-complex="Times New Roman1" style:font-family-complex="'Times New Roman'" style:font-family-generic-complex="system" style:font-pitch-complex="variable"/>
    </style:style>
    <style:style style:name="ListLabel_20_51" style:display-name="ListLabel 51" style:family="text">
      <style:text-properties style:text-underline-style="none" style:font-name-complex="Times New Roman1" style:font-family-complex="'Times New Roman'" style:font-family-generic-complex="system" style:font-pitch-complex="variable"/>
    </style:style>
    <style:style style:name="ListLabel_20_52" style:display-name="ListLabel 52" style:family="text">
      <style:text-properties style:text-underline-style="none" style:font-name-complex="Times New Roman1" style:font-family-complex="'Times New Roman'" style:font-family-generic-complex="system" style:font-pitch-complex="variable"/>
    </style:style>
    <style:style style:name="ListLabel_20_53" style:display-name="ListLabel 53" style:family="text">
      <style:text-properties style:text-underline-style="none" style:font-name-complex="Times New Roman1" style:font-family-complex="'Times New Roman'" style:font-family-generic-complex="system" style:font-pitch-complex="variable"/>
    </style:style>
    <style:style style:name="ListLabel_20_54" style:display-name="ListLabel 54" style:family="text">
      <style:text-properties style:text-underline-style="none" style:font-name-complex="Times New Roman1" style:font-family-complex="'Times New Roman'"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ListLabel_20_91" style:display-name="ListLabel 91" style:family="text"/>
    <style:style style:name="ListLabel_20_92" style:display-name="ListLabel 92" style:family="text">
      <style:text-properties style:font-name-complex="Times New Roman1" style:font-family-complex="'Times New Roman'" style:font-family-generic-complex="system" style:font-pitch-complex="variable"/>
    </style:style>
    <style:style style:name="ListLabel_20_93" style:display-name="ListLabel 93" style:family="text">
      <style:text-properties style:font-name-complex="Times New Roman1" style:font-family-complex="'Times New Roman'" style:font-family-generic-complex="system" style:font-pitch-complex="variable"/>
    </style:style>
    <style:style style:name="ListLabel_20_94" style:display-name="ListLabel 94" style:family="text">
      <style:text-properties style:font-name-complex="Times New Roman1" style:font-family-complex="'Times New Roman'" style:font-family-generic-complex="system" style:font-pitch-complex="variable"/>
    </style:style>
    <style:style style:name="ListLabel_20_95" style:display-name="ListLabel 95" style:family="text">
      <style:text-properties style:font-name-complex="Times New Roman1" style:font-family-complex="'Times New Roman'"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font-name-complex="Times New Roman1" style:font-family-complex="'Times New Roman'" style:font-family-generic-complex="system" style:font-pitch-complex="variable"/>
    </style:style>
    <style:style style:name="ListLabel_20_111" style:display-name="ListLabel 111" style:family="text">
      <style:text-properties style:text-underline-style="none" style:font-name-complex="Times New Roman1" style:font-family-complex="'Times New Roman'" style:font-family-generic-complex="system" style:font-pitch-complex="variable"/>
    </style:style>
    <style:style style:name="ListLabel_20_112" style:display-name="ListLabel 112" style:family="text">
      <style:text-properties style:text-underline-style="none" style:font-name-complex="Times New Roman1" style:font-family-complex="'Times New Roman'" style:font-family-generic-complex="system" style:font-pitch-complex="variable"/>
    </style:style>
    <style:style style:name="ListLabel_20_113" style:display-name="ListLabel 113" style:family="text">
      <style:text-properties style:text-underline-style="none" style:font-name-complex="Times New Roman1" style:font-family-complex="'Times New Roman'" style:font-family-generic-complex="system" style:font-pitch-complex="variable"/>
    </style:style>
    <style:style style:name="ListLabel_20_114" style:display-name="ListLabel 114" style:family="text">
      <style:text-properties style:text-underline-style="none" style:font-name-complex="Times New Roman1" style:font-family-complex="'Times New Roman'" style:font-family-generic-complex="system" style:font-pitch-complex="variable"/>
    </style:style>
    <style:style style:name="ListLabel_20_115" style:display-name="ListLabel 115" style:family="text">
      <style:text-properties style:text-underline-style="none" style:font-name-complex="Times New Roman1" style:font-family-complex="'Times New Roman'" style:font-family-generic-complex="system" style:font-pitch-complex="variable"/>
    </style:style>
    <style:style style:name="ListLabel_20_116" style:display-name="ListLabel 116" style:family="text">
      <style:text-properties style:text-underline-style="none" style:font-name-complex="Times New Roman1" style:font-family-complex="'Times New Roman'" style:font-family-generic-complex="system" style:font-pitch-complex="variable"/>
    </style:style>
    <style:style style:name="ListLabel_20_117" style:display-name="ListLabel 117" style:family="text">
      <style:text-properties style:text-underline-style="none" style:font-name-complex="Times New Roman1" style:font-family-complex="'Times New Roman'" style:font-family-generic-complex="system" style:font-pitch-complex="variabl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font-name-complex="Times New Roman1" style:font-family-complex="'Times New Roman'" style:font-family-generic-complex="system" style:font-pitch-complex="variable"/>
    </style:style>
    <style:style style:name="ListLabel_20_120" style:display-name="ListLabel 120" style:family="text">
      <style:text-properties style:text-underline-style="none" style:font-name-complex="Times New Roman1" style:font-family-complex="'Times New Roman'" style:font-family-generic-complex="system" style:font-pitch-complex="variable"/>
    </style:style>
    <style:style style:name="ListLabel_20_121" style:display-name="ListLabel 121" style:family="text">
      <style:text-properties style:text-underline-style="none" style:font-name-complex="Times New Roman1" style:font-family-complex="'Times New Roman'" style:font-family-generic-complex="system" style:font-pitch-complex="variable"/>
    </style:style>
    <style:style style:name="ListLabel_20_122" style:display-name="ListLabel 122" style:family="text">
      <style:text-properties style:text-underline-style="none" style:font-name-complex="Times New Roman1" style:font-family-complex="'Times New Roman'" style:font-family-generic-complex="system" style:font-pitch-complex="variable"/>
    </style:style>
    <style:style style:name="ListLabel_20_123" style:display-name="ListLabel 123" style:family="text">
      <style:text-properties style:text-underline-style="none" style:font-name-complex="Times New Roman1" style:font-family-complex="'Times New Roman'" style:font-family-generic-complex="system" style:font-pitch-complex="variable"/>
    </style:style>
    <style:style style:name="ListLabel_20_124" style:display-name="ListLabel 124" style:family="text">
      <style:text-properties style:text-underline-style="none" style:font-name-complex="Times New Roman1" style:font-family-complex="'Times New Roman'" style:font-family-generic-complex="system" style:font-pitch-complex="variable"/>
    </style:style>
    <style:style style:name="ListLabel_20_125" style:display-name="ListLabel 125" style:family="text">
      <style:text-properties style:text-underline-style="none" style:font-name-complex="Times New Roman1" style:font-family-complex="'Times New Roman'" style:font-family-generic-complex="system" style:font-pitch-complex="variable"/>
    </style:style>
    <style:style style:name="ListLabel_20_126" style:display-name="ListLabel 126" style:family="text">
      <style:text-properties style:text-underline-style="none" style:font-name-complex="Times New Roman1" style:font-family-complex="'Times New Roman'" style:font-family-generic-complex="system" style:font-pitch-complex="variabl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font-name-complex="Times New Roman1" style:font-family-complex="'Times New Roman'" style:font-family-generic-complex="system" style:font-pitch-complex="variable"/>
    </style:style>
    <style:style style:name="ListLabel_20_129" style:display-name="ListLabel 129" style:family="text">
      <style:text-properties style:text-underline-style="none" style:font-name-complex="Times New Roman1" style:font-family-complex="'Times New Roman'" style:font-family-generic-complex="system" style:font-pitch-complex="variable"/>
    </style:style>
    <style:style style:name="ListLabel_20_130" style:display-name="ListLabel 130" style:family="text">
      <style:text-properties style:text-underline-style="none" style:font-name-complex="Times New Roman1" style:font-family-complex="'Times New Roman'" style:font-family-generic-complex="system" style:font-pitch-complex="variable"/>
    </style:style>
    <style:style style:name="ListLabel_20_131" style:display-name="ListLabel 131" style:family="text">
      <style:text-properties style:text-underline-style="none" style:font-name-complex="Times New Roman1" style:font-family-complex="'Times New Roman'" style:font-family-generic-complex="system" style:font-pitch-complex="variable"/>
    </style:style>
    <style:style style:name="ListLabel_20_132" style:display-name="ListLabel 132" style:family="text">
      <style:text-properties style:text-underline-style="none" style:font-name-complex="Times New Roman1" style:font-family-complex="'Times New Roman'" style:font-family-generic-complex="system" style:font-pitch-complex="variable"/>
    </style:style>
    <style:style style:name="ListLabel_20_133" style:display-name="ListLabel 133" style:family="text">
      <style:text-properties style:text-underline-style="none" style:font-name-complex="Times New Roman1" style:font-family-complex="'Times New Roman'" style:font-family-generic-complex="system" style:font-pitch-complex="variable"/>
    </style:style>
    <style:style style:name="ListLabel_20_134" style:display-name="ListLabel 134" style:family="text">
      <style:text-properties style:text-underline-style="none" style:font-name-complex="Times New Roman1" style:font-family-complex="'Times New Roman'" style:font-family-generic-complex="system" style:font-pitch-complex="variable"/>
    </style:style>
    <style:style style:name="ListLabel_20_135" style:display-name="ListLabel 135" style:family="text">
      <style:text-properties style:text-underline-style="none" style:font-name-complex="Times New Roman1" style:font-family-complex="'Times New Roman'" style:font-family-generic-complex="system" style:font-pitch-complex="variabl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font-name-complex="Times New Roman1" style:font-family-complex="'Times New Roman'" style:font-family-generic-complex="system" style:font-pitch-complex="variable"/>
    </style:style>
    <style:style style:name="ListLabel_20_147" style:display-name="ListLabel 147" style:family="text">
      <style:text-properties style:text-underline-style="none" style:font-name-complex="Times New Roman1" style:font-family-complex="'Times New Roman'" style:font-family-generic-complex="system" style:font-pitch-complex="variable"/>
    </style:style>
    <style:style style:name="ListLabel_20_148" style:display-name="ListLabel 148" style:family="text">
      <style:text-properties style:text-underline-style="none" style:font-name-complex="Times New Roman1" style:font-family-complex="'Times New Roman'" style:font-family-generic-complex="system" style:font-pitch-complex="variable"/>
    </style:style>
    <style:style style:name="ListLabel_20_149" style:display-name="ListLabel 149" style:family="text">
      <style:text-properties style:text-underline-style="none" style:font-name-complex="Times New Roman1" style:font-family-complex="'Times New Roman'" style:font-family-generic-complex="system" style:font-pitch-complex="variable"/>
    </style:style>
    <style:style style:name="ListLabel_20_150" style:display-name="ListLabel 150" style:family="text">
      <style:text-properties style:text-underline-style="none" style:font-name-complex="Times New Roman1" style:font-family-complex="'Times New Roman'" style:font-family-generic-complex="system" style:font-pitch-complex="variable"/>
    </style:style>
    <style:style style:name="ListLabel_20_151" style:display-name="ListLabel 151" style:family="text">
      <style:text-properties style:text-underline-style="none" style:font-name-complex="Times New Roman1" style:font-family-complex="'Times New Roman'" style:font-family-generic-complex="system" style:font-pitch-complex="variable"/>
    </style:style>
    <style:style style:name="ListLabel_20_152" style:display-name="ListLabel 152" style:family="text">
      <style:text-properties style:text-underline-style="none" style:font-name-complex="Times New Roman1" style:font-family-complex="'Times New Roman'" style:font-family-generic-complex="system" style:font-pitch-complex="variable"/>
    </style:style>
    <style:style style:name="ListLabel_20_153" style:display-name="ListLabel 153" style:family="text">
      <style:text-properties style:text-underline-style="none" style:font-name-complex="Times New Roman1" style:font-family-complex="'Times New Roman'" style:font-family-generic-complex="system" style:font-pitch-complex="variabl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font-name-complex="Times New Roman1" style:font-family-complex="'Times New Roman'" style:font-family-generic-complex="system" style:font-pitch-complex="variable"/>
    </style:style>
    <style:style style:name="ListLabel_20_156" style:display-name="ListLabel 156" style:family="text">
      <style:text-properties style:text-underline-style="none" style:font-name-complex="Times New Roman1" style:font-family-complex="'Times New Roman'" style:font-family-generic-complex="system" style:font-pitch-complex="variable"/>
    </style:style>
    <style:style style:name="ListLabel_20_157" style:display-name="ListLabel 157" style:family="text">
      <style:text-properties style:text-underline-style="none" style:font-name-complex="Times New Roman1" style:font-family-complex="'Times New Roman'" style:font-family-generic-complex="system" style:font-pitch-complex="variable"/>
    </style:style>
    <style:style style:name="ListLabel_20_158" style:display-name="ListLabel 158" style:family="text">
      <style:text-properties style:text-underline-style="none" style:font-name-complex="Times New Roman1" style:font-family-complex="'Times New Roman'" style:font-family-generic-complex="system" style:font-pitch-complex="variable"/>
    </style:style>
    <style:style style:name="ListLabel_20_159" style:display-name="ListLabel 159" style:family="text">
      <style:text-properties style:text-underline-style="none" style:font-name-complex="Times New Roman1" style:font-family-complex="'Times New Roman'" style:font-family-generic-complex="system" style:font-pitch-complex="variable"/>
    </style:style>
    <style:style style:name="ListLabel_20_160" style:display-name="ListLabel 160" style:family="text">
      <style:text-properties style:text-underline-style="none" style:font-name-complex="Times New Roman1" style:font-family-complex="'Times New Roman'" style:font-family-generic-complex="system" style:font-pitch-complex="variable"/>
    </style:style>
    <style:style style:name="ListLabel_20_161" style:display-name="ListLabel 161" style:family="text">
      <style:text-properties style:text-underline-style="none" style:font-name-complex="Times New Roman1" style:font-family-complex="'Times New Roman'" style:font-family-generic-complex="system" style:font-pitch-complex="variable"/>
    </style:style>
    <style:style style:name="ListLabel_20_162" style:display-name="ListLabel 162" style:family="text">
      <style:text-properties style:text-underline-style="none" style:font-name-complex="Times New Roman1" style:font-family-complex="'Times New Roman'" style:font-family-generic-complex="system" style:font-pitch-complex="variable"/>
    </style:style>
    <style:style style:name="ListLabel_20_163" style:display-name="ListLabel 163" style:family="text">
      <style:text-properties style:font-name="Calibri" fo:font-family="Calibri" style:font-family-generic="swiss" style:font-pitch="variable" style:font-name-complex="Times New Roman1" style:font-family-complex="'Times New Roman'" style:font-family-generic-complex="system" style:font-pitch-complex="variable"/>
    </style:style>
    <style:style style:name="ListLabel_20_164" style:display-name="ListLabel 164" style:family="text">
      <style:text-properties style:font-name-complex="Times New Roman1" style:font-family-complex="'Times New Roman'" style:font-family-generic-complex="system" style:font-pitch-complex="variable"/>
    </style:style>
    <style:style style:name="ListLabel_20_165" style:display-name="ListLabel 165" style:family="text">
      <style:text-properties style:font-name-complex="Times New Roman1" style:font-family-complex="'Times New Roman'" style:font-family-generic-complex="system" style:font-pitch-complex="variable"/>
    </style:style>
    <style:style style:name="ListLabel_20_166" style:display-name="ListLabel 166" style:family="text">
      <style:text-properties style:font-name-complex="Times New Roman1" style:font-family-complex="'Times New Roman'" style:font-family-generic-complex="system" style:font-pitch-complex="variable"/>
    </style:style>
    <style:style style:name="ListLabel_20_167" style:display-name="ListLabel 167" style:family="text">
      <style:text-properties style:font-name-complex="Times New Roman1" style:font-family-complex="'Times New Roman'" style:font-family-generic-complex="system" style:font-pitch-complex="variable"/>
    </style:style>
    <style:style style:name="ListLabel_20_168" style:display-name="ListLabel 168" style:family="text">
      <style:text-properties style:font-name-complex="Times New Roman1" style:font-family-complex="'Times New Roman'" style:font-family-generic-complex="system" style:font-pitch-complex="variable"/>
    </style:style>
    <style:style style:name="ListLabel_20_169" style:display-name="ListLabel 169" style:family="text">
      <style:text-properties style:font-name-complex="Times New Roman1" style:font-family-complex="'Times New Roman'" style:font-family-generic-complex="system" style:font-pitch-complex="variable"/>
    </style:style>
    <style:style style:name="ListLabel_20_170" style:display-name="ListLabel 170" style:family="text">
      <style:text-properties style:font-name-complex="Times New Roman1" style:font-family-complex="'Times New Roman'" style:font-family-generic-complex="system" style:font-pitch-complex="variable"/>
    </style:style>
    <style:style style:name="ListLabel_20_171" style:display-name="ListLabel 171" style:family="text">
      <style:text-properties style:font-name-complex="Times New Roman1" style:font-family-complex="'Times New Roman'" style:font-family-generic-complex="system" style:font-pitch-complex="variable"/>
    </style:style>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Times New Roman1" style:font-family-complex="'Times New Roman'" style:font-family-generic-complex="system" style:font-pitch-complex="variable"/>
    </style:style>
    <style:style style:name="ListLabel_20_183" style:display-name="ListLabel 183" style:family="text">
      <style:text-properties style:font-name-complex="Times New Roman1" style:font-family-complex="'Times New Roman'" style:font-family-generic-complex="system" style:font-pitch-complex="variable"/>
    </style:style>
    <style:style style:name="ListLabel_20_184" style:display-name="ListLabel 184" style:family="text">
      <style:text-properties style:font-name-complex="Times New Roman1" style:font-family-complex="'Times New Roman'" style:font-family-generic-complex="system" style:font-pitch-complex="variable"/>
    </style:style>
    <style:style style:name="ListLabel_20_185" style:display-name="ListLabel 185" style:family="text">
      <style:text-properties style:font-name-complex="Times New Roman1" style:font-family-complex="'Times New Roman'" style:font-family-generic-complex="system" style:font-pitch-complex="variable"/>
    </style:style>
    <style:style style:name="ListLabel_20_186" style:display-name="ListLabel 186" style:family="text">
      <style:text-properties style:font-name-complex="Times New Roman1" style:font-family-complex="'Times New Roman'" style:font-family-generic-complex="system" style:font-pitch-complex="variable"/>
    </style:style>
    <style:style style:name="ListLabel_20_187" style:display-name="ListLabel 187" style:family="text">
      <style:text-properties style:font-name-complex="Times New Roman1" style:font-family-complex="'Times New Roman'" style:font-family-generic-complex="system" style:font-pitch-complex="variable"/>
    </style:style>
    <style:style style:name="ListLabel_20_188" style:display-name="ListLabel 188" style:family="text">
      <style:text-properties style:font-name-complex="Times New Roman1" style:font-family-complex="'Times New Roman'" style:font-family-generic-complex="system" style:font-pitch-complex="variable"/>
    </style:style>
    <style:style style:name="ListLabel_20_189" style:display-name="ListLabel 189" style:family="text">
      <style:text-properties style:font-name-complex="Times New Roman1" style:font-family-complex="'Times New Roman'" style:font-family-generic-complex="system" style:font-pitch-complex="variabl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font-name-complex="Times New Roman1" style:font-family-complex="'Times New Roman'" style:font-family-generic-complex="system" style:font-pitch-complex="variable"/>
    </style:style>
    <style:style style:name="ListLabel_20_193" style:display-name="ListLabel 193" style:family="text">
      <style:text-properties style:text-underline-style="none" style:font-name-complex="Times New Roman1" style:font-family-complex="'Times New Roman'" style:font-family-generic-complex="system" style:font-pitch-complex="variable"/>
    </style:style>
    <style:style style:name="ListLabel_20_194" style:display-name="ListLabel 194" style:family="text">
      <style:text-properties style:text-underline-style="none" style:font-name-complex="Times New Roman1" style:font-family-complex="'Times New Roman'" style:font-family-generic-complex="system" style:font-pitch-complex="variable"/>
    </style:style>
    <style:style style:name="ListLabel_20_195" style:display-name="ListLabel 195" style:family="text">
      <style:text-properties style:text-underline-style="none" style:font-name-complex="Times New Roman1" style:font-family-complex="'Times New Roman'" style:font-family-generic-complex="system" style:font-pitch-complex="variable"/>
    </style:style>
    <style:style style:name="ListLabel_20_196" style:display-name="ListLabel 196" style:family="text">
      <style:text-properties style:text-underline-style="none" style:font-name-complex="Times New Roman1" style:font-family-complex="'Times New Roman'" style:font-family-generic-complex="system" style:font-pitch-complex="variable"/>
    </style:style>
    <style:style style:name="ListLabel_20_197" style:display-name="ListLabel 197" style:family="text">
      <style:text-properties style:text-underline-style="none" style:font-name-complex="Times New Roman1" style:font-family-complex="'Times New Roman'" style:font-family-generic-complex="system" style:font-pitch-complex="variable"/>
    </style:style>
    <style:style style:name="ListLabel_20_198" style:display-name="ListLabel 198" style:family="text">
      <style:text-properties style:text-underline-style="none" style:font-name-complex="Times New Roman1" style:font-family-complex="'Times New Roman'" style:font-family-generic-complex="system" style:font-pitch-complex="variabl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font-name-complex="Times New Roman1" style:font-family-complex="'Times New Roman'" style:font-family-generic-complex="system" style:font-pitch-complex="variable"/>
    </style:style>
    <style:style style:name="ListLabel_20_202" style:display-name="ListLabel 202" style:family="text">
      <style:text-properties style:text-underline-style="none" style:font-name-complex="Times New Roman1" style:font-family-complex="'Times New Roman'" style:font-family-generic-complex="system" style:font-pitch-complex="variable"/>
    </style:style>
    <style:style style:name="ListLabel_20_203" style:display-name="ListLabel 203" style:family="text">
      <style:text-properties style:text-underline-style="none" style:font-name-complex="Times New Roman1" style:font-family-complex="'Times New Roman'" style:font-family-generic-complex="system" style:font-pitch-complex="variable"/>
    </style:style>
    <style:style style:name="ListLabel_20_204" style:display-name="ListLabel 204" style:family="text">
      <style:text-properties style:text-underline-style="none" style:font-name-complex="Times New Roman1" style:font-family-complex="'Times New Roman'" style:font-family-generic-complex="system" style:font-pitch-complex="variable"/>
    </style:style>
    <style:style style:name="ListLabel_20_205" style:display-name="ListLabel 205" style:family="text">
      <style:text-properties style:text-underline-style="none" style:font-name-complex="Times New Roman1" style:font-family-complex="'Times New Roman'" style:font-family-generic-complex="system" style:font-pitch-complex="variable"/>
    </style:style>
    <style:style style:name="ListLabel_20_206" style:display-name="ListLabel 206" style:family="text">
      <style:text-properties style:text-underline-style="none" style:font-name-complex="Times New Roman1" style:font-family-complex="'Times New Roman'" style:font-family-generic-complex="system" style:font-pitch-complex="variable"/>
    </style:style>
    <style:style style:name="ListLabel_20_207" style:display-name="ListLabel 207" style:family="text">
      <style:text-properties style:text-underline-style="none" style:font-name-complex="Times New Roman1" style:font-family-complex="'Times New Roman'" style:font-family-generic-complex="system" style:font-pitch-complex="variabl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font-name-complex="Times New Roman1" style:font-family-complex="'Times New Roman'" style:font-family-generic-complex="system" style:font-pitch-complex="variable"/>
    </style:style>
    <style:style style:name="ListLabel_20_211" style:display-name="ListLabel 211" style:family="text">
      <style:text-properties style:text-underline-style="none" style:font-name-complex="Times New Roman1" style:font-family-complex="'Times New Roman'" style:font-family-generic-complex="system" style:font-pitch-complex="variable"/>
    </style:style>
    <style:style style:name="ListLabel_20_212" style:display-name="ListLabel 212" style:family="text">
      <style:text-properties style:text-underline-style="none" style:font-name-complex="Times New Roman1" style:font-family-complex="'Times New Roman'" style:font-family-generic-complex="system" style:font-pitch-complex="variable"/>
    </style:style>
    <style:style style:name="ListLabel_20_213" style:display-name="ListLabel 213" style:family="text">
      <style:text-properties style:text-underline-style="none" style:font-name-complex="Times New Roman1" style:font-family-complex="'Times New Roman'" style:font-family-generic-complex="system" style:font-pitch-complex="variable"/>
    </style:style>
    <style:style style:name="ListLabel_20_214" style:display-name="ListLabel 214" style:family="text">
      <style:text-properties style:text-underline-style="none" style:font-name-complex="Times New Roman1" style:font-family-complex="'Times New Roman'" style:font-family-generic-complex="system" style:font-pitch-complex="variable"/>
    </style:style>
    <style:style style:name="ListLabel_20_215" style:display-name="ListLabel 215" style:family="text">
      <style:text-properties style:text-underline-style="none" style:font-name-complex="Times New Roman1" style:font-family-complex="'Times New Roman'" style:font-family-generic-complex="system" style:font-pitch-complex="variable"/>
    </style:style>
    <style:style style:name="ListLabel_20_216" style:display-name="ListLabel 216" style:family="text">
      <style:text-properties style:text-underline-style="none" style:font-name-complex="Times New Roman1" style:font-family-complex="'Times New Roman'" style:font-family-generic-complex="system" style:font-pitch-complex="variabl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font-name-complex="Times New Roman1" style:font-family-complex="'Times New Roman'" style:font-family-generic-complex="system" style:font-pitch-complex="variable"/>
    </style:style>
    <style:style style:name="ListLabel_20_219" style:display-name="ListLabel 219" style:family="text">
      <style:text-properties style:text-underline-style="none" style:font-name-complex="Times New Roman1" style:font-family-complex="'Times New Roman'" style:font-family-generic-complex="system" style:font-pitch-complex="variable"/>
    </style:style>
    <style:style style:name="ListLabel_20_220" style:display-name="ListLabel 220" style:family="text">
      <style:text-properties style:text-underline-style="none" style:font-name-complex="Times New Roman1" style:font-family-complex="'Times New Roman'" style:font-family-generic-complex="system" style:font-pitch-complex="variable"/>
    </style:style>
    <style:style style:name="ListLabel_20_221" style:display-name="ListLabel 221" style:family="text">
      <style:text-properties style:text-underline-style="none" style:font-name-complex="Times New Roman1" style:font-family-complex="'Times New Roman'" style:font-family-generic-complex="system" style:font-pitch-complex="variable"/>
    </style:style>
    <style:style style:name="ListLabel_20_222" style:display-name="ListLabel 222" style:family="text">
      <style:text-properties style:text-underline-style="none" style:font-name-complex="Times New Roman1" style:font-family-complex="'Times New Roman'" style:font-family-generic-complex="system" style:font-pitch-complex="variable"/>
    </style:style>
    <style:style style:name="ListLabel_20_223" style:display-name="ListLabel 223" style:family="text">
      <style:text-properties style:text-underline-style="none" style:font-name-complex="Times New Roman1" style:font-family-complex="'Times New Roman'" style:font-family-generic-complex="system" style:font-pitch-complex="variable"/>
    </style:style>
    <style:style style:name="ListLabel_20_224" style:display-name="ListLabel 224" style:family="text">
      <style:text-properties style:text-underline-style="none" style:font-name-complex="Times New Roman1" style:font-family-complex="'Times New Roman'" style:font-family-generic-complex="system" style:font-pitch-complex="variable"/>
    </style:style>
    <style:style style:name="ListLabel_20_225" style:display-name="ListLabel 225" style:family="text">
      <style:text-properties style:text-underline-style="none" style:font-name-complex="Times New Roman1" style:font-family-complex="'Times New Roman'" style:font-family-generic-complex="system" style:font-pitch-complex="variable"/>
    </style:style>
    <style:style style:name="ListLabel_20_226" style:display-name="ListLabel 226" style:family="text">
      <style:text-properties style:font-name-complex="Times New Roman1" style:font-family-complex="'Times New Roman'" style:font-family-generic-complex="system" style:font-pitch-complex="variable"/>
    </style:style>
    <style:style style:name="ListLabel_20_227" style:display-name="ListLabel 227" style:family="text">
      <style:text-properties style:font-name-complex="Times New Roman1" style:font-family-complex="'Times New Roman'" style:font-family-generic-complex="system" style:font-pitch-complex="variable"/>
    </style:style>
    <style:style style:name="ListLabel_20_228" style:display-name="ListLabel 228" style:family="text">
      <style:text-properties style:font-name-complex="Times New Roman1" style:font-family-complex="'Times New Roman'" style:font-family-generic-complex="system" style:font-pitch-complex="variable"/>
    </style:style>
    <style:style style:name="ListLabel_20_229" style:display-name="ListLabel 229" style:family="text">
      <style:text-properties style:font-name-complex="Times New Roman1" style:font-family-complex="'Times New Roman'" style:font-family-generic-complex="system" style:font-pitch-complex="variable"/>
    </style:style>
    <style:style style:name="ListLabel_20_230" style:display-name="ListLabel 230" style:family="text">
      <style:text-properties style:font-name-complex="Times New Roman1" style:font-family-complex="'Times New Roman'" style:font-family-generic-complex="system" style:font-pitch-complex="variable"/>
    </style:style>
    <style:style style:name="ListLabel_20_231" style:display-name="ListLabel 231" style:family="text">
      <style:text-properties style:font-name-complex="Times New Roman1" style:font-family-complex="'Times New Roman'" style:font-family-generic-complex="system" style:font-pitch-complex="variable"/>
    </style:style>
    <style:style style:name="ListLabel_20_232" style:display-name="ListLabel 232" style:family="text">
      <style:text-properties style:font-name-complex="Times New Roman1" style:font-family-complex="'Times New Roman'" style:font-family-generic-complex="system" style:font-pitch-complex="variable"/>
    </style:style>
    <style:style style:name="ListLabel_20_233" style:display-name="ListLabel 233" style:family="text">
      <style:text-properties style:font-name-complex="Times New Roman1" style:font-family-complex="'Times New Roman'" style:font-family-generic-complex="system" style:font-pitch-complex="variable"/>
    </style:style>
    <style:style style:name="ListLabel_20_234" style:display-name="ListLabel 234" style:family="text">
      <style:text-properties style:font-name-complex="Times New Roman1" style:font-family-complex="'Times New Roman'" style:font-family-generic-complex="system" style:font-pitch-complex="variable"/>
    </style:style>
    <style:style style:name="ListLabel_20_235" style:display-name="ListLabel 235" style:family="text"/>
    <style:style style:name="ListLabel_20_236" style:display-name="ListLabel 236" style:family="text">
      <style:text-properties style:font-name-complex="Times New Roman1" style:font-family-complex="'Times New Roman'" style:font-family-generic-complex="system" style:font-pitch-complex="variable"/>
    </style:style>
    <style:style style:name="ListLabel_20_237" style:display-name="ListLabel 237" style:family="text">
      <style:text-properties style:font-name-complex="Times New Roman1" style:font-family-complex="'Times New Roman'" style:font-family-generic-complex="system" style:font-pitch-complex="variable"/>
    </style:style>
    <style:style style:name="ListLabel_20_238" style:display-name="ListLabel 238" style:family="text">
      <style:text-properties style:font-name-complex="Times New Roman1" style:font-family-complex="'Times New Roman'" style:font-family-generic-complex="system" style:font-pitch-complex="variable"/>
    </style:style>
    <style:style style:name="ListLabel_20_239" style:display-name="ListLabel 239" style:family="text">
      <style:text-properties style:font-name-complex="Times New Roman1" style:font-family-complex="'Times New Roman'" style:font-family-generic-complex="system" style:font-pitch-complex="variable"/>
    </style:style>
    <style:style style:name="ListLabel_20_240" style:display-name="ListLabel 240" style:family="text">
      <style:text-properties style:font-name-complex="Times New Roman1" style:font-family-complex="'Times New Roman'" style:font-family-generic-complex="system" style:font-pitch-complex="variable"/>
    </style:style>
    <style:style style:name="ListLabel_20_241" style:display-name="ListLabel 241" style:family="text">
      <style:text-properties style:font-name-complex="Times New Roman1" style:font-family-complex="'Times New Roman'" style:font-family-generic-complex="system" style:font-pitch-complex="variable"/>
    </style:style>
    <style:style style:name="ListLabel_20_242" style:display-name="ListLabel 242" style:family="text">
      <style:text-properties style:font-name-complex="Times New Roman1" style:font-family-complex="'Times New Roman'" style:font-family-generic-complex="system" style:font-pitch-complex="variable"/>
    </style:style>
    <style:style style:name="ListLabel_20_243" style:display-name="ListLabel 243" style:family="text">
      <style:text-properties style:font-name-complex="Times New Roman1" style:font-family-complex="'Times New Roman'" style:font-family-generic-complex="system" style:font-pitch-complex="variable"/>
    </style:style>
    <style:style style:name="ListLabel_20_244" style:display-name="ListLabel 244" style:family="text">
      <style:text-properties style:font-name-complex="Times New Roman1" style:font-family-complex="'Times New Roman'" style:font-family-generic-complex="system" style:font-pitch-complex="variable"/>
    </style:style>
    <style:style style:name="ListLabel_20_245" style:display-name="ListLabel 245" style:family="text">
      <style:text-properties style:font-name-complex="Times New Roman1" style:font-family-complex="'Times New Roman'" style:font-family-generic-complex="system" style:font-pitch-complex="variable"/>
    </style:style>
    <style:style style:name="ListLabel_20_246" style:display-name="ListLabel 246" style:family="text">
      <style:text-properties style:font-name-complex="Times New Roman1" style:font-family-complex="'Times New Roman'" style:font-family-generic-complex="system" style:font-pitch-complex="variable"/>
    </style:style>
    <style:style style:name="ListLabel_20_247" style:display-name="ListLabel 247" style:family="text">
      <style:text-properties style:font-name-complex="Times New Roman1" style:font-family-complex="'Times New Roman'" style:font-family-generic-complex="system" style:font-pitch-complex="variable"/>
    </style:style>
    <style:style style:name="ListLabel_20_248" style:display-name="ListLabel 248" style:family="text">
      <style:text-properties style:font-name-complex="Times New Roman1" style:font-family-complex="'Times New Roman'" style:font-family-generic-complex="system" style:font-pitch-complex="variable"/>
    </style:style>
    <style:style style:name="ListLabel_20_249" style:display-name="ListLabel 249" style:family="text">
      <style:text-properties style:font-name-complex="Times New Roman1" style:font-family-complex="'Times New Roman'" style:font-family-generic-complex="system" style:font-pitch-complex="variable"/>
    </style:style>
    <style:style style:name="ListLabel_20_250" style:display-name="ListLabel 250" style:family="text">
      <style:text-properties style:font-name-complex="Times New Roman1" style:font-family-complex="'Times New Roman'" style:font-family-generic-complex="system" style:font-pitch-complex="variable"/>
    </style:style>
    <style:style style:name="ListLabel_20_251" style:display-name="ListLabel 251" style:family="text">
      <style:text-properties style:font-name-complex="Times New Roman1" style:font-family-complex="'Times New Roman'" style:font-family-generic-complex="system" style:font-pitch-complex="variable"/>
    </style:style>
    <style:style style:name="ListLabel_20_252" style:display-name="ListLabel 252" style:family="text">
      <style:text-properties style:font-name-complex="Times New Roman1" style:font-family-complex="'Times New Roman'" style:font-family-generic-complex="system" style:font-pitch-complex="variabl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font-name-complex="Times New Roman1" style:font-family-complex="'Times New Roman'" style:font-family-generic-complex="system" style:font-pitch-complex="variable"/>
    </style:style>
    <style:style style:name="ListLabel_20_272" style:display-name="ListLabel 272" style:family="text">
      <style:text-properties style:font-name-complex="Times New Roman1" style:font-family-complex="'Times New Roman'" style:font-family-generic-complex="system" style:font-pitch-complex="variable"/>
    </style:style>
    <style:style style:name="ListLabel_20_273" style:display-name="ListLabel 273" style:family="text">
      <style:text-properties style:font-name-complex="Times New Roman1" style:font-family-complex="'Times New Roman'" style:font-family-generic-complex="system" style:font-pitch-complex="variable"/>
    </style:style>
    <style:style style:name="ListLabel_20_274" style:display-name="ListLabel 274" style:family="text">
      <style:text-properties style:font-name-complex="Times New Roman1" style:font-family-complex="'Times New Roman'" style:font-family-generic-complex="system" style:font-pitch-complex="variable"/>
    </style:style>
    <style:style style:name="ListLabel_20_275" style:display-name="ListLabel 275" style:family="text">
      <style:text-properties style:font-name-complex="Times New Roman1" style:font-family-complex="'Times New Roman'" style:font-family-generic-complex="system" style:font-pitch-complex="variable"/>
    </style:style>
    <style:style style:name="ListLabel_20_276" style:display-name="ListLabel 276" style:family="text">
      <style:text-properties style:font-name-complex="Times New Roman1" style:font-family-complex="'Times New Roman'" style:font-family-generic-complex="system" style:font-pitch-complex="variable"/>
    </style:style>
    <style:style style:name="ListLabel_20_277" style:display-name="ListLabel 277" style:family="text">
      <style:text-properties style:font-name-complex="Times New Roman1" style:font-family-complex="'Times New Roman'" style:font-family-generic-complex="system" style:font-pitch-complex="variable"/>
    </style:style>
    <style:style style:name="ListLabel_20_278" style:display-name="ListLabel 278" style:family="text">
      <style:text-properties style:font-name-complex="Times New Roman1" style:font-family-complex="'Times New Roman'" style:font-family-generic-complex="system" style:font-pitch-complex="variable"/>
    </style:style>
    <style:style style:name="ListLabel_20_279" style:display-name="ListLabel 279" style:family="text">
      <style:text-properties style:font-name-complex="Times New Roman1" style:font-family-complex="'Times New Roman'" style:font-family-generic-complex="system" style:font-pitch-complex="variable"/>
    </style:style>
    <style:style style:name="ListLabel_20_280" style:display-name="ListLabel 280" style:family="text">
      <style:text-properties style:font-name-complex="Times New Roman1" style:font-family-complex="'Times New Roman'" style:font-family-generic-complex="system" style:font-pitch-complex="variable"/>
    </style:style>
    <style:style style:name="ListLabel_20_281" style:display-name="ListLabel 281" style:family="text">
      <style:text-properties style:font-name-complex="Times New Roman1" style:font-family-complex="'Times New Roman'" style:font-family-generic-complex="system" style:font-pitch-complex="variable"/>
    </style:style>
    <style:style style:name="ListLabel_20_282" style:display-name="ListLabel 282" style:family="text">
      <style:text-properties style:font-name-complex="Times New Roman1" style:font-family-complex="'Times New Roman'" style:font-family-generic-complex="system" style:font-pitch-complex="variable"/>
    </style:style>
    <style:style style:name="ListLabel_20_283" style:display-name="ListLabel 283" style:family="text">
      <style:text-properties style:font-name-complex="Times New Roman1" style:font-family-complex="'Times New Roman'" style:font-family-generic-complex="system" style:font-pitch-complex="variable"/>
    </style:style>
    <style:style style:name="ListLabel_20_284" style:display-name="ListLabel 284" style:family="text">
      <style:text-properties style:font-name-complex="Times New Roman1" style:font-family-complex="'Times New Roman'" style:font-family-generic-complex="system" style:font-pitch-complex="variable"/>
    </style:style>
    <style:style style:name="ListLabel_20_285" style:display-name="ListLabel 285" style:family="text">
      <style:text-properties style:font-name-complex="Times New Roman1" style:font-family-complex="'Times New Roman'" style:font-family-generic-complex="system" style:font-pitch-complex="variable"/>
    </style:style>
    <style:style style:name="ListLabel_20_286" style:display-name="ListLabel 286" style:family="text">
      <style:text-properties style:font-name-complex="Times New Roman1" style:font-family-complex="'Times New Roman'" style:font-family-generic-complex="system" style:font-pitch-complex="variable"/>
    </style:style>
    <style:style style:name="ListLabel_20_287" style:display-name="ListLabel 287" style:family="text">
      <style:text-properties style:font-name-complex="Times New Roman1" style:font-family-complex="'Times New Roman'" style:font-family-generic-complex="system" style:font-pitch-complex="variable"/>
    </style:style>
    <style:style style:name="ListLabel_20_288" style:display-name="ListLabel 288" style:family="text">
      <style:text-properties style:font-name-complex="Times New Roman1" style:font-family-complex="'Times New Roman'" style:font-family-generic-complex="system" style:font-pitch-complex="variable"/>
    </style:style>
    <style:style style:name="ListLabel_20_289" style:display-name="ListLabel 289" style:family="text">
      <style:text-properties style:font-name-complex="Times New Roman1" style:font-family-complex="'Times New Roman'" style:font-family-generic-complex="system" style:font-pitch-complex="variable"/>
    </style:style>
    <style:style style:name="ListLabel_20_290" style:display-name="ListLabel 290" style:family="text"/>
    <style:style style:name="ListLabel_20_291" style:display-name="ListLabel 291" style:family="text">
      <style:text-properties style:font-name-complex="Times New Roman1" style:font-family-complex="'Times New Roman'" style:font-family-generic-complex="system" style:font-pitch-complex="variable"/>
    </style:style>
    <style:style style:name="ListLabel_20_292" style:display-name="ListLabel 292" style:family="text">
      <style:text-properties style:font-name-complex="Times New Roman1" style:font-family-complex="'Times New Roman'" style:font-family-generic-complex="system" style:font-pitch-complex="variable"/>
    </style:style>
    <style:style style:name="ListLabel_20_293" style:display-name="ListLabel 293" style:family="text">
      <style:text-properties style:font-name-complex="Times New Roman1" style:font-family-complex="'Times New Roman'" style:font-family-generic-complex="system" style:font-pitch-complex="variable"/>
    </style:style>
    <style:style style:name="ListLabel_20_294" style:display-name="ListLabel 294" style:family="text">
      <style:text-properties style:font-name-complex="Times New Roman1" style:font-family-complex="'Times New Roman'" style:font-family-generic-complex="system" style:font-pitch-complex="variable"/>
    </style:style>
    <style:style style:name="ListLabel_20_295" style:display-name="ListLabel 295" style:family="text">
      <style:text-properties style:font-name-complex="Times New Roman1" style:font-family-complex="'Times New Roman'" style:font-family-generic-complex="system" style:font-pitch-complex="variable"/>
    </style:style>
    <style:style style:name="ListLabel_20_296" style:display-name="ListLabel 296" style:family="text">
      <style:text-properties style:font-name-complex="Times New Roman1" style:font-family-complex="'Times New Roman'" style:font-family-generic-complex="system" style:font-pitch-complex="variable"/>
    </style:style>
    <style:style style:name="ListLabel_20_297" style:display-name="ListLabel 297" style:family="text">
      <style:text-properties style:font-name-complex="Times New Roman1" style:font-family-complex="'Times New Roman'" style:font-family-generic-complex="system" style:font-pitch-complex="variable"/>
    </style:style>
    <style:style style:name="ListLabel_20_298" style:display-name="ListLabel 298" style:family="text">
      <style:text-properties style:font-name-complex="Times New Roman1" style:font-family-complex="'Times New Roman'" style:font-family-generic-complex="system" style:font-pitch-complex="variable"/>
    </style:style>
    <style:style style:name="ListLabel_20_299" style:display-name="ListLabel 299" style:family="text">
      <style:text-properties style:font-name-complex="Times New Roman1" style:font-family-complex="'Times New Roman'" style:font-family-generic-complex="system" style:font-pitch-complex="variable"/>
    </style:style>
    <style:style style:name="ListLabel_20_300" style:display-name="ListLabel 300" style:family="text">
      <style:text-properties style:font-name-complex="Times New Roman1" style:font-family-complex="'Times New Roman'" style:font-family-generic-complex="system" style:font-pitch-complex="variable"/>
    </style:style>
    <style:style style:name="ListLabel_20_301" style:display-name="ListLabel 301" style:family="text">
      <style:text-properties style:font-name-complex="Times New Roman1" style:font-family-complex="'Times New Roman'" style:font-family-generic-complex="system" style:font-pitch-complex="variable"/>
    </style:style>
    <style:style style:name="ListLabel_20_302" style:display-name="ListLabel 302" style:family="text">
      <style:text-properties style:font-name-complex="Times New Roman1" style:font-family-complex="'Times New Roman'" style:font-family-generic-complex="system" style:font-pitch-complex="variable"/>
    </style:style>
    <style:style style:name="ListLabel_20_303" style:display-name="ListLabel 303" style:family="text">
      <style:text-properties style:font-name-complex="Times New Roman1" style:font-family-complex="'Times New Roman'" style:font-family-generic-complex="system" style:font-pitch-complex="variable"/>
    </style:style>
    <style:style style:name="ListLabel_20_304" style:display-name="ListLabel 304" style:family="text">
      <style:text-properties style:font-name-complex="Times New Roman1" style:font-family-complex="'Times New Roman'" style:font-family-generic-complex="system" style:font-pitch-complex="variable"/>
    </style:style>
    <style:style style:name="ListLabel_20_305" style:display-name="ListLabel 305" style:family="text">
      <style:text-properties style:font-name-complex="Times New Roman1" style:font-family-complex="'Times New Roman'" style:font-family-generic-complex="system" style:font-pitch-complex="variable"/>
    </style:style>
    <style:style style:name="ListLabel_20_306" style:display-name="ListLabel 306" style:family="text">
      <style:text-properties style:font-name-complex="Times New Roman1" style:font-family-complex="'Times New Roman'" style:font-family-generic-complex="system" style:font-pitch-complex="variable"/>
    </style:style>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text-properties style:font-name-complex="Courier New1" style:font-family-complex="'Courier New'" style:font-family-generic-complex="system" style:font-pitch-complex="variable"/>
    </style:style>
    <style:style style:name="ListLabel_20_318" style:display-name="ListLabel 318" style:family="text"/>
    <style:style style:name="ListLabel_20_319" style:display-name="ListLabel 319" style:family="text"/>
    <style:style style:name="ListLabel_20_320" style:display-name="ListLabel 320" style:family="text">
      <style:text-properties style:font-name-complex="Courier New1" style:font-family-complex="'Courier New'" style:font-family-generic-complex="system" style:font-pitch-complex="variable"/>
    </style:style>
    <style:style style:name="ListLabel_20_321" style:display-name="ListLabel 321" style:family="text"/>
    <style:style style:name="ListLabel_20_322" style:display-name="ListLabel 322" style:family="text"/>
    <style:style style:name="ListLabel_20_323" style:display-name="ListLabel 323" style:family="text">
      <style:text-properties style:font-name-complex="Courier New1" style:font-family-complex="'Courier New'" style:font-family-generic-complex="system" style:font-pitch-complex="variable"/>
    </style:style>
    <style:style style:name="ListLabel_20_324" style:display-name="ListLabel 324" style:family="text"/>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style style:name="ListLabel_20_335" style:display-name="ListLabel 335" style:family="text"/>
    <style:style style:name="ListLabel_20_336" style:display-name="ListLabel 336" style:family="text">
      <style:text-properties style:font-name-complex="Courier New1" style:font-family-complex="'Courier New'" style:font-family-generic-complex="system" style:font-pitch-complex="variable"/>
    </style:style>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text-properties style:font-name-complex="Courier New1" style:font-family-complex="'Courier New'" style:font-family-generic-complex="system" style:font-pitch-complex="variable"/>
    </style:style>
    <style:style style:name="ListLabel_20_341" style:display-name="ListLabel 341" style:family="text"/>
    <style:style style:name="ListLabel_20_342" style:display-name="ListLabel 342" style:family="text"/>
    <style:style style:name="ListLabel_20_343" style:display-name="ListLabel 343" style:family="text">
      <style:text-properties style:font-name-complex="Times New Roman1" style:font-family-complex="'Times New Roman'" style:font-family-generic-complex="system" style:font-pitch-complex="variable"/>
    </style:style>
    <style:style style:name="ListLabel_20_344" style:display-name="ListLabel 344" style:family="text">
      <style:text-properties style:font-name-complex="Times New Roman1" style:font-family-complex="'Times New Roman'" style:font-family-generic-complex="system" style:font-pitch-complex="variable"/>
    </style:style>
    <style:style style:name="ListLabel_20_345" style:display-name="ListLabel 345" style:family="text">
      <style:text-properties style:font-name-complex="Times New Roman1" style:font-family-complex="'Times New Roman'" style:font-family-generic-complex="system" style:font-pitch-complex="variable"/>
    </style:style>
    <style:style style:name="ListLabel_20_346" style:display-name="ListLabel 346" style:family="text">
      <style:text-properties style:font-name-complex="Times New Roman1" style:font-family-complex="'Times New Roman'" style:font-family-generic-complex="system" style:font-pitch-complex="variable"/>
    </style:style>
    <style:style style:name="ListLabel_20_347" style:display-name="ListLabel 347" style:family="text">
      <style:text-properties style:font-name-complex="Times New Roman1" style:font-family-complex="'Times New Roman'" style:font-family-generic-complex="system" style:font-pitch-complex="variable"/>
    </style:style>
    <style:style style:name="ListLabel_20_348" style:display-name="ListLabel 348" style:family="text">
      <style:text-properties style:font-name-complex="Times New Roman1" style:font-family-complex="'Times New Roman'" style:font-family-generic-complex="system" style:font-pitch-complex="variable"/>
    </style:style>
    <style:style style:name="ListLabel_20_349" style:display-name="ListLabel 349" style:family="text">
      <style:text-properties style:font-name-complex="Times New Roman1" style:font-family-complex="'Times New Roman'" style:font-family-generic-complex="system" style:font-pitch-complex="variable"/>
    </style:style>
    <style:style style:name="ListLabel_20_350" style:display-name="ListLabel 350" style:family="text">
      <style:text-properties style:font-name-complex="Times New Roman1" style:font-family-complex="'Times New Roman'" style:font-family-generic-complex="system" style:font-pitch-complex="variable"/>
    </style:style>
    <style:style style:name="ListLabel_20_351" style:display-name="ListLabel 351" style:family="text">
      <style:text-properties style:font-name-complex="Times New Roman1" style:font-family-complex="'Times New Roman'" style:font-family-generic-complex="system" style:font-pitch-complex="variable"/>
    </style:style>
    <style:style style:name="ListLabel_20_352" style:display-name="ListLabel 352" style:family="text"/>
    <style:style style:name="ListLabel_20_353" style:display-name="ListLabel 353" style:family="text">
      <style:text-properties style:font-name-complex="Courier New1" style:font-family-complex="'Courier New'" style:font-family-generic-complex="system" style:font-pitch-complex="variable"/>
    </style:style>
    <style:style style:name="ListLabel_20_354" style:display-name="ListLabel 354" style:family="text"/>
    <style:style style:name="ListLabel_20_355" style:display-name="ListLabel 355" style:family="text"/>
    <style:style style:name="ListLabel_20_356" style:display-name="ListLabel 356" style:family="text">
      <style:text-properties style:font-name-complex="Courier New1" style:font-family-complex="'Courier New'" style:font-family-generic-complex="system" style:font-pitch-complex="variable"/>
    </style:style>
    <style:style style:name="ListLabel_20_357" style:display-name="ListLabel 357" style:family="text"/>
    <style:style style:name="ListLabel_20_358" style:display-name="ListLabel 358" style:family="text"/>
    <style:style style:name="ListLabel_20_359" style:display-name="ListLabel 359" style:family="text">
      <style:text-properties style:font-name-complex="Courier New1" style:font-family-complex="'Courier New'" style:font-family-generic-complex="system" style:font-pitch-complex="variable"/>
    </style:style>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text-properties style:font-name-complex="Courier New1" style:font-family-complex="'Courier New'" style:font-family-generic-complex="system" style:font-pitch-complex="variable"/>
    </style:style>
    <style:style style:name="ListLabel_20_372" style:display-name="ListLabel 372" style:family="text"/>
    <style:style style:name="ListLabel_20_373" style:display-name="ListLabel 373" style:family="text"/>
    <style:style style:name="ListLabel_20_374" style:display-name="ListLabel 374" style:family="text">
      <style:text-properties style:font-name-complex="Courier New1" style:font-family-complex="'Courier New'" style:font-family-generic-complex="system" style:font-pitch-complex="variable"/>
    </style:style>
    <style:style style:name="ListLabel_20_375" style:display-name="ListLabel 375" style:family="text"/>
    <style:style style:name="ListLabel_20_376" style:display-name="ListLabel 376" style:family="text"/>
    <style:style style:name="ListLabel_20_377" style:display-name="ListLabel 377" style:family="text">
      <style:text-properties style:font-name-complex="Courier New1" style:font-family-complex="'Courier New'" style:font-family-generic-complex="system" style:font-pitch-complex="variable"/>
    </style:style>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text-properties style:font-name="Calibri" fo:font-family="Calibri" style:font-family-generic="swiss" style:font-pitch="variable"/>
    </style:style>
    <style:style style:name="ListLabel_20_398" style:display-name="ListLabel 398" style:family="text">
      <style:text-properties style:font-name-complex="Calibri1" style:font-family-complex="Calibri" style:font-family-generic-complex="system" style:font-pitch-complex="variable" style:font-size-complex="12pt"/>
    </style:style>
    <style:style style:name="ListLabel_20_399" style:display-name="ListLabel 399" style:family="text"/>
    <style:style style:name="ListLabel_20_400" style:display-name="ListLabel 400" style:family="text">
      <style:text-properties fo:color="#1155cc" loext:opacity="100%" style:text-underline-style="solid" style:text-underline-width="auto" style:text-underline-color="font-color" style:font-name-complex="Calibri1" style:font-family-complex="Calibri" style:font-family-generic-complex="system" style:font-pitch-complex="variable" style:font-size-complex="12pt"/>
    </style:style>
    <style:style style:name="ListLabel_20_401" style:display-name="ListLabel 401" style:family="text">
      <style:text-properties fo:language="en" fo:country="GB" fo:font-style="italic" style:font-style-asian="italic" style:font-style-complex="italic"/>
    </style:style>
    <style:style style:name="ListLabel_20_402" style:display-name="ListLabel 402" style:family="text">
      <style:text-properties fo:color="#1155cc" loext:opacity="100%" style:text-underline-style="solid" style:text-underline-width="auto" style:text-underline-color="font-color" style:font-name-complex="Calibri1" style:font-family-complex="Calibri" style:font-family-generic-complex="system" style:font-pitch-complex="variable" style:font-size-complex="12pt"/>
    </style:style>
    <style:style style:name="ListLabel_20_403" style:display-name="ListLabel 403" style:family="text">
      <style:text-properties fo:language="en" fo:country="GB" style:language-asian="fr" style:country-asian="FR"/>
    </style:style>
    <style:style style:name="ListLabel_20_404" style:display-name="ListLabel 404" style:family="text">
      <style:text-properties fo:color="#0563c1" loext:opacity="100%" style:text-underline-style="solid" style:text-underline-width="auto" style:text-underline-color="font-color" style:font-name-complex="Calibri1" style:font-family-complex="Calibri" style:font-family-generic-complex="system" style:font-pitch-complex="variable">
        <loext:char-complex-color loext:theme-type="hyperlink" loext:color-type="theme"/>
      </style:text-properties>
    </style:style>
    <style:style style:name="ListLabel_20_405" style:display-name="ListLabel 405" style:family="text">
      <style:text-properties style:language-asian="fr" style:country-asian="F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text:style-name="ListLabel_20_163" loext:num-list-format="%1%." style:num-suffix="." style:num-format="1">
        <style:list-level-properties text:list-level-position-and-space-mode="label-alignment">
          <style:list-level-label-alignment text:label-followed-by="listtab" text:list-tab-stop-position="0.25in" fo:text-indent="-0.25in" fo:margin-left="0.25in"/>
        </style:list-level-properties>
      </text:outline-level-style>
      <text:outline-level-style text:level="2" text:style-name="ListLabel_20_164"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outline-level-style>
      <text:outline-level-style text:level="3" text:style-name="ListLabel_20_165"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outline-level-style>
      <text:outline-level-style text:level="4" text:style-name="ListLabel_20_166"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outline-level-style>
      <text:outline-level-style text:level="5" text:style-name="ListLabel_20_167"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outline-level-style>
      <text:outline-level-style text:level="6" text:style-name="ListLabel_20_168"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outline-level-style>
      <text:outline-level-style text:level="7" text:style-name="ListLabel_20_169"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outline-level-style>
      <text:outline-level-style text:level="8" text:style-name="ListLabel_20_170"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outline-level-style>
      <text:outline-level-style text:level="9" text:style-name="ListLabel_20_171"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text:list-tab-stop-position="1.75in" fo:text-indent="-0.45in" fo:margin-left="1.45in"/>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text:list-tab-stop-position="2.5in" fo:text-indent="-0.65in" fo:margin-left="2.15in"/>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text:list-tab-stop-position="3.25in" fo:text-indent="-0.85in" fo:margin-left="2.85in"/>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0" loext:num-list-format="%3%."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33" loext:num-list-format="%6%."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36" loext:num-list-format="%9%."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38" loext:num-list-format="%1%.%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39" loext:num-list-format="%1%.%2%.%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ListLabel_20_40" loext:num-list-format="%1%.%2%.%3%.%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47" loext:num-list-format="" style:num-suffix="" text:bullet-char="">
        <style:list-level-properties text:list-level-position-and-space-mode="label-alignment">
          <style:list-level-label-alignment text:label-followed-by="listtab" text:list-tab-stop-position="0.8in" fo:text-indent="-0.3in" fo:margin-left="0.8in"/>
        </style:list-level-properties>
        <style:text-properties fo:font-family="Symbol" style:font-charset="x-symbol"/>
      </text:list-level-style-bullet>
      <text:list-level-style-number text:level="3" text:style-name="ListLabel_20_48" loext:num-list-format="%1%.%2%.%3%."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text:style-name="ListLabel_20_49" loext:num-list-format="%1%.%2%.%3%.%4%." style:num-suffix="." style:num-format="1" text:display-levels="4">
        <style:list-level-properties text:list-level-position-and-space-mode="label-alignment">
          <style:list-level-label-alignment text:label-followed-by="listtab" text:list-tab-stop-position="1.75in" fo:text-indent="-0.45in" fo:margin-left="1.45in"/>
        </style:list-level-properties>
      </text:list-level-style-number>
      <text:list-level-style-number text:level="5" text:style-name="ListLabel_20_50" loext:num-list-format="%1%.%2%.%3%.%4%.%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text:style-name="ListLabel_20_51" loext:num-list-format="%1%.%2%.%3%.%4%.%5%.%6%." style:num-suffix="." style:num-format="1" text:display-levels="6">
        <style:list-level-properties text:list-level-position-and-space-mode="label-alignment">
          <style:list-level-label-alignment text:label-followed-by="listtab" text:list-tab-stop-position="2.5in" fo:text-indent="-0.65in" fo:margin-left="2.15in"/>
        </style:list-level-properties>
      </text:list-level-style-number>
      <text:list-level-style-number text:level="7" text:style-name="ListLabel_20_52" loext:num-list-format="%1%.%2%.%3%.%4%.%5%.%6%.%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text:style-name="ListLabel_20_53" loext:num-list-format="%1%.%2%.%3%.%4%.%5%.%6%.%7%.%8%." style:num-suffix="." style:num-format="1" text:display-levels="8">
        <style:list-level-properties text:list-level-position-and-space-mode="label-alignment">
          <style:list-level-label-alignment text:label-followed-by="listtab" text:list-tab-stop-position="3.25in" fo:text-indent="-0.85in" fo:margin-left="2.85in"/>
        </style:list-level-properties>
      </text:list-level-style-number>
      <text:list-level-style-number text:level="9" text:style-name="ListLabel_20_54" loext:num-list-format="%1%.%2%.%3%.%4%.%5%.%6%.%7%.%8%.%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57" loext:num-list-format="%3%."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0" loext:num-list-format="%6%."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75in" fo:margin-left="0.5in"/>
        </style:list-level-properties>
      </text:list-level-style-number>
      <text:list-level-style-number text:level="3" text:style-name="ListLabel_20_66" loext:num-list-format="%3%." style:num-suffix="." style:num-format="i">
        <style:list-level-properties text:list-level-position-and-space-mode="label-alignment">
          <style:list-level-label-alignment text:label-followed-by="listtab" fo:text-indent="1.25in" fo:margin-left="1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1.75in" fo:margin-left="1.5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2.25in" fo:margin-left="2in"/>
        </style:list-level-properties>
      </text:list-level-style-number>
      <text:list-level-style-number text:level="6" text:style-name="ListLabel_20_69" loext:num-list-format="%6%." style:num-suffix="." style:num-format="i">
        <style:list-level-properties text:list-level-position-and-space-mode="label-alignment">
          <style:list-level-label-alignment text:label-followed-by="listtab" fo:text-indent="2.75in" fo:margin-left="2.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3.25in" fo:margin-left="3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3.75in" fo:margin-left="3.5in"/>
        </style:list-level-properties>
      </text:list-level-style-number>
      <text:list-level-style-number text:level="9" text:style-name="ListLabel_20_72" loext:num-list-format="%9%." style:num-suffix="." style:num-format="i">
        <style:list-level-properties text:list-level-position-and-space-mode="label-alignment">
          <style:list-level-label-alignment text:label-followed-by="listtab" fo:text-indent="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75in" fo:margin-left="0.5in"/>
        </style:list-level-properties>
      </text:list-level-style-number>
      <text:list-level-style-number text:level="3" text:style-name="ListLabel_20_75" loext:num-list-format="%3%." style:num-suffix="." style:num-format="i">
        <style:list-level-properties text:list-level-position-and-space-mode="label-alignment">
          <style:list-level-label-alignment text:label-followed-by="listtab" fo:text-indent="1.25in" fo:margin-left="1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1.75in" fo:margin-left="1.5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2.25in" fo:margin-left="2in"/>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2.75in" fo:margin-left="2.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3.25in" fo:margin-left="3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3.75in" fo:margin-left="3.5in"/>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2" loext:num-list-format="%1%.%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text:style-name="ListLabel_20_93" loext:num-list-format="%1%.%2%.%3%."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text:style-name="ListLabel_20_94" loext:num-list-format="%1%.%2%.%3%.%4%." style:num-suffix="." style:num-format="1" text:display-levels="4">
        <style:list-level-properties text:list-level-position-and-space-mode="label-alignment">
          <style:list-level-label-alignment text:label-followed-by="listtab" text:list-tab-stop-position="1.75in" fo:text-indent="-0.45in" fo:margin-left="1.45in"/>
        </style:list-level-properties>
      </text:list-level-style-number>
      <text:list-level-style-number text:level="5" text:style-name="ListLabel_20_95" loext:num-list-format="%1%.%2%.%3%.%4%.%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text:style-name="ListLabel_20_96" loext:num-list-format="%1%.%2%.%3%.%4%.%5%.%6%." style:num-suffix="." style:num-format="1" text:display-levels="6">
        <style:list-level-properties text:list-level-position-and-space-mode="label-alignment">
          <style:list-level-label-alignment text:label-followed-by="listtab" text:list-tab-stop-position="2.5in" fo:text-indent="-0.65in" fo:margin-left="2.15in"/>
        </style:list-level-properties>
      </text:list-level-style-number>
      <text:list-level-style-number text:level="7" text:style-name="ListLabel_20_97" loext:num-list-format="%1%.%2%.%3%.%4%.%5%.%6%.%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text:style-name="ListLabel_20_98" loext:num-list-format="%1%.%2%.%3%.%4%.%5%.%6%.%7%.%8%." style:num-suffix="." style:num-format="1" text:display-levels="8">
        <style:list-level-properties text:list-level-position-and-space-mode="label-alignment">
          <style:list-level-label-alignment text:label-followed-by="listtab" text:list-tab-stop-position="3.25in" fo:text-indent="-0.85in" fo:margin-left="2.85in"/>
        </style:list-level-properties>
      </text:list-level-style-number>
      <text:list-level-style-number text:level="9" text:style-name="ListLabel_20_99" loext:num-list-format="%1%.%2%.%3%.%4%.%5%.%6%.%7%.%8%.%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1" loext:num-list-format="%1%.%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text:style-name="ListLabel_20_102" loext:num-list-format="%1%.%2%.%3%."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text:style-name="ListLabel_20_103" loext:num-list-format="%1%.%2%.%3%.%4%." style:num-suffix="." style:num-format="1" text:display-levels="4">
        <style:list-level-properties text:list-level-position-and-space-mode="label-alignment">
          <style:list-level-label-alignment text:label-followed-by="listtab" text:list-tab-stop-position="1.75in" fo:text-indent="-0.45in" fo:margin-left="1.45in"/>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text:list-tab-stop-position="2.5in" fo:text-indent="-0.65in" fo:margin-left="2.15in"/>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text:list-tab-stop-position="3.25in" fo:text-indent="-0.85in" fo:margin-left="2.85in"/>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0" loext:num-list-format="%1%.%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text:style-name="ListLabel_20_111" loext:num-list-format="%1%.%2%.%3%."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text:style-name="ListLabel_20_112" loext:num-list-format="%1%.%2%.%3%.%4%." style:num-suffix="." style:num-format="1" text:display-levels="4">
        <style:list-level-properties text:list-level-position-and-space-mode="label-alignment">
          <style:list-level-label-alignment text:label-followed-by="listtab" text:list-tab-stop-position="1.75in" fo:text-indent="-0.45in" fo:margin-left="1.45in"/>
        </style:list-level-properties>
      </text:list-level-style-number>
      <text:list-level-style-number text:level="5" text:style-name="ListLabel_20_113" loext:num-list-format="%1%.%2%.%3%.%4%.%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text:style-name="ListLabel_20_114" loext:num-list-format="%1%.%2%.%3%.%4%.%5%.%6%." style:num-suffix="." style:num-format="1" text:display-levels="6">
        <style:list-level-properties text:list-level-position-and-space-mode="label-alignment">
          <style:list-level-label-alignment text:label-followed-by="listtab" text:list-tab-stop-position="2.5in" fo:text-indent="-0.65in" fo:margin-left="2.15in"/>
        </style:list-level-properties>
      </text:list-level-style-number>
      <text:list-level-style-number text:level="7" text:style-name="ListLabel_20_115" loext:num-list-format="%1%.%2%.%3%.%4%.%5%.%6%.%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text:style-name="ListLabel_20_116" loext:num-list-format="%1%.%2%.%3%.%4%.%5%.%6%.%7%.%8%." style:num-suffix="." style:num-format="1" text:display-levels="8">
        <style:list-level-properties text:list-level-position-and-space-mode="label-alignment">
          <style:list-level-label-alignment text:label-followed-by="listtab" text:list-tab-stop-position="3.25in" fo:text-indent="-0.85in" fo:margin-left="2.85in"/>
        </style:list-level-properties>
      </text:list-level-style-number>
      <text:list-level-style-number text:level="9" text:style-name="ListLabel_20_117" loext:num-list-format="%1%.%2%.%3%.%4%.%5%.%6%.%7%.%8%.%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9" loext:num-list-format="%1%.%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text:style-name="ListLabel_20_120" loext:num-list-format="%1%.%2%.%3%."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text:style-name="ListLabel_20_121" loext:num-list-format="%1%.%2%.%3%.%4%." style:num-suffix="." style:num-format="1" text:display-levels="4">
        <style:list-level-properties text:list-level-position-and-space-mode="label-alignment">
          <style:list-level-label-alignment text:label-followed-by="listtab" text:list-tab-stop-position="1.75in" fo:text-indent="-0.45in" fo:margin-left="1.45in"/>
        </style:list-level-properties>
      </text:list-level-style-number>
      <text:list-level-style-number text:level="5" text:style-name="ListLabel_20_122" loext:num-list-format="%1%.%2%.%3%.%4%.%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text:style-name="ListLabel_20_123" loext:num-list-format="%1%.%2%.%3%.%4%.%5%.%6%." style:num-suffix="." style:num-format="1" text:display-levels="6">
        <style:list-level-properties text:list-level-position-and-space-mode="label-alignment">
          <style:list-level-label-alignment text:label-followed-by="listtab" text:list-tab-stop-position="2.5in" fo:text-indent="-0.65in" fo:margin-left="2.15in"/>
        </style:list-level-properties>
      </text:list-level-style-number>
      <text:list-level-style-number text:level="7" text:style-name="ListLabel_20_124" loext:num-list-format="%1%.%2%.%3%.%4%.%5%.%6%.%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text:style-name="ListLabel_20_125" loext:num-list-format="%1%.%2%.%3%.%4%.%5%.%6%.%7%.%8%." style:num-suffix="." style:num-format="1" text:display-levels="8">
        <style:list-level-properties text:list-level-position-and-space-mode="label-alignment">
          <style:list-level-label-alignment text:label-followed-by="listtab" text:list-tab-stop-position="3.25in" fo:text-indent="-0.85in" fo:margin-left="2.85in"/>
        </style:list-level-properties>
      </text:list-level-style-number>
      <text:list-level-style-number text:level="9" text:style-name="ListLabel_20_126" loext:num-list-format="%1%.%2%.%3%.%4%.%5%.%6%.%7%.%8%.%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28" loext:num-list-format="%1%.%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text:style-name="ListLabel_20_129" loext:num-list-format="%1%.%2%.%3%."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text:style-name="ListLabel_20_130" loext:num-list-format="%1%.%2%.%3%.%4%." style:num-suffix="." style:num-format="1" text:display-levels="4">
        <style:list-level-properties text:list-level-position-and-space-mode="label-alignment">
          <style:list-level-label-alignment text:label-followed-by="listtab" text:list-tab-stop-position="1.75in" fo:text-indent="-0.45in" fo:margin-left="1.45in"/>
        </style:list-level-properties>
      </text:list-level-style-number>
      <text:list-level-style-number text:level="5" text:style-name="ListLabel_20_131" loext:num-list-format="%1%.%2%.%3%.%4%.%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text:style-name="ListLabel_20_132" loext:num-list-format="%1%.%2%.%3%.%4%.%5%.%6%." style:num-suffix="." style:num-format="1" text:display-levels="6">
        <style:list-level-properties text:list-level-position-and-space-mode="label-alignment">
          <style:list-level-label-alignment text:label-followed-by="listtab" text:list-tab-stop-position="2.5in" fo:text-indent="-0.65in" fo:margin-left="2.15in"/>
        </style:list-level-properties>
      </text:list-level-style-number>
      <text:list-level-style-number text:level="7" text:style-name="ListLabel_20_133" loext:num-list-format="%1%.%2%.%3%.%4%.%5%.%6%.%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text:style-name="ListLabel_20_134" loext:num-list-format="%1%.%2%.%3%.%4%.%5%.%6%.%7%.%8%." style:num-suffix="." style:num-format="1" text:display-levels="8">
        <style:list-level-properties text:list-level-position-and-space-mode="label-alignment">
          <style:list-level-label-alignment text:label-followed-by="listtab" text:list-tab-stop-position="3.25in" fo:text-indent="-0.85in" fo:margin-left="2.85in"/>
        </style:list-level-properties>
      </text:list-level-style-number>
      <text:list-level-style-number text:level="9" text:style-name="ListLabel_20_135" loext:num-list-format="%1%.%2%.%3%.%4%.%5%.%6%.%7%.%8%.%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75in" fo:margin-left="0.5in"/>
        </style:list-level-properties>
      </text:list-level-style-number>
      <text:list-level-style-number text:level="3" text:style-name="ListLabel_20_138" loext:num-list-format="%3%." style:num-suffix="." style:num-format="i">
        <style:list-level-properties text:list-level-position-and-space-mode="label-alignment">
          <style:list-level-label-alignment text:label-followed-by="listtab" fo:text-indent="1.25in" fo:margin-left="1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1.75in" fo:margin-left="1.5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2.25in" fo:margin-left="2in"/>
        </style:list-level-properties>
      </text:list-level-style-number>
      <text:list-level-style-number text:level="6" text:style-name="ListLabel_20_141" loext:num-list-format="%6%." style:num-suffix="." style:num-format="i">
        <style:list-level-properties text:list-level-position-and-space-mode="label-alignment">
          <style:list-level-label-alignment text:label-followed-by="listtab" fo:text-indent="2.75in" fo:margin-left="2.5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3.25in" fo:margin-left="3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3.75in" fo:margin-left="3.5in"/>
        </style:list-level-properties>
      </text:list-level-style-number>
      <text:list-level-style-number text:level="9" text:style-name="ListLabel_20_144" loext:num-list-format="%9%." style:num-suffix="." style:num-format="i">
        <style:list-level-properties text:list-level-position-and-space-mode="label-alignment">
          <style:list-level-label-alignment text:label-followed-by="listtab" fo:text-indent="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46" loext:num-list-format="%1%.%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text:style-name="ListLabel_20_147" loext:num-list-format="%1%.%2%.%3%."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text:style-name="ListLabel_20_148" loext:num-list-format="%1%.%2%.%3%.%4%." style:num-suffix="." style:num-format="1" text:display-levels="4">
        <style:list-level-properties text:list-level-position-and-space-mode="label-alignment">
          <style:list-level-label-alignment text:label-followed-by="listtab" text:list-tab-stop-position="1.75in" fo:text-indent="-0.45in" fo:margin-left="1.45in"/>
        </style:list-level-properties>
      </text:list-level-style-number>
      <text:list-level-style-number text:level="5" text:style-name="ListLabel_20_149" loext:num-list-format="%1%.%2%.%3%.%4%.%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text:style-name="ListLabel_20_150" loext:num-list-format="%1%.%2%.%3%.%4%.%5%.%6%." style:num-suffix="." style:num-format="1" text:display-levels="6">
        <style:list-level-properties text:list-level-position-and-space-mode="label-alignment">
          <style:list-level-label-alignment text:label-followed-by="listtab" text:list-tab-stop-position="2.5in" fo:text-indent="-0.65in" fo:margin-left="2.15in"/>
        </style:list-level-properties>
      </text:list-level-style-number>
      <text:list-level-style-number text:level="7" text:style-name="ListLabel_20_151" loext:num-list-format="%1%.%2%.%3%.%4%.%5%.%6%.%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text:style-name="ListLabel_20_152" loext:num-list-format="%1%.%2%.%3%.%4%.%5%.%6%.%7%.%8%." style:num-suffix="." style:num-format="1" text:display-levels="8">
        <style:list-level-properties text:list-level-position-and-space-mode="label-alignment">
          <style:list-level-label-alignment text:label-followed-by="listtab" text:list-tab-stop-position="3.25in" fo:text-indent="-0.85in" fo:margin-left="2.85in"/>
        </style:list-level-properties>
      </text:list-level-style-number>
      <text:list-level-style-number text:level="9" text:style-name="ListLabel_20_153" loext:num-list-format="%1%.%2%.%3%.%4%.%5%.%6%.%7%.%8%.%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55" loext:num-list-format="%1%.%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text:style-name="ListLabel_20_156" loext:num-list-format="%1%.%2%.%3%."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text:style-name="ListLabel_20_157" loext:num-list-format="%1%.%2%.%3%.%4%." style:num-suffix="." style:num-format="1" text:display-levels="4">
        <style:list-level-properties text:list-level-position-and-space-mode="label-alignment">
          <style:list-level-label-alignment text:label-followed-by="listtab" text:list-tab-stop-position="1.75in" fo:text-indent="-0.45in" fo:margin-left="1.45in"/>
        </style:list-level-properties>
      </text:list-level-style-number>
      <text:list-level-style-number text:level="5" text:style-name="ListLabel_20_158" loext:num-list-format="%1%.%2%.%3%.%4%.%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text:style-name="ListLabel_20_159" loext:num-list-format="%1%.%2%.%3%.%4%.%5%.%6%." style:num-suffix="." style:num-format="1" text:display-levels="6">
        <style:list-level-properties text:list-level-position-and-space-mode="label-alignment">
          <style:list-level-label-alignment text:label-followed-by="listtab" text:list-tab-stop-position="2.5in" fo:text-indent="-0.65in" fo:margin-left="2.15in"/>
        </style:list-level-properties>
      </text:list-level-style-number>
      <text:list-level-style-number text:level="7" text:style-name="ListLabel_20_160" loext:num-list-format="%1%.%2%.%3%.%4%.%5%.%6%.%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text:style-name="ListLabel_20_161" loext:num-list-format="%1%.%2%.%3%.%4%.%5%.%6%.%7%.%8%." style:num-suffix="." style:num-format="1" text:display-levels="8">
        <style:list-level-properties text:list-level-position-and-space-mode="label-alignment">
          <style:list-level-label-alignment text:label-followed-by="listtab" text:list-tab-stop-position="3.25in" fo:text-indent="-0.85in" fo:margin-left="2.85in"/>
        </style:list-level-properties>
      </text:list-level-style-number>
      <text:list-level-style-number text:level="9" text:style-name="ListLabel_20_162" loext:num-list-format="%1%.%2%.%3%.%4%.%5%.%6%.%7%.%8%.%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73" loext:num-list-format="%1%.%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74" loext:num-list-format="%1%.%2%.%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75"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76"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77"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78"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79"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80"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82" loext:num-list-format="%1%.%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text:style-name="ListLabel_20_183" loext:num-list-format="%1%.%2%.%3%."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text:style-name="ListLabel_20_184" loext:num-list-format="%1%.%2%.%3%.%4%." style:num-suffix="." style:num-format="1" text:display-levels="4">
        <style:list-level-properties text:list-level-position-and-space-mode="label-alignment">
          <style:list-level-label-alignment text:label-followed-by="listtab" text:list-tab-stop-position="1.75in" fo:text-indent="-0.45in" fo:margin-left="1.45in"/>
        </style:list-level-properties>
      </text:list-level-style-number>
      <text:list-level-style-number text:level="5" text:style-name="ListLabel_20_185" loext:num-list-format="%1%.%2%.%3%.%4%.%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text:style-name="ListLabel_20_186" loext:num-list-format="%1%.%2%.%3%.%4%.%5%.%6%." style:num-suffix="." style:num-format="1" text:display-levels="6">
        <style:list-level-properties text:list-level-position-and-space-mode="label-alignment">
          <style:list-level-label-alignment text:label-followed-by="listtab" text:list-tab-stop-position="2.5in" fo:text-indent="-0.65in" fo:margin-left="2.15in"/>
        </style:list-level-properties>
      </text:list-level-style-number>
      <text:list-level-style-number text:level="7" text:style-name="ListLabel_20_187" loext:num-list-format="%1%.%2%.%3%.%4%.%5%.%6%.%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text:style-name="ListLabel_20_188" loext:num-list-format="%1%.%2%.%3%.%4%.%5%.%6%.%7%.%8%." style:num-suffix="." style:num-format="1" text:display-levels="8">
        <style:list-level-properties text:list-level-position-and-space-mode="label-alignment">
          <style:list-level-label-alignment text:label-followed-by="listtab" text:list-tab-stop-position="3.25in" fo:text-indent="-0.85in" fo:margin-left="2.85in"/>
        </style:list-level-properties>
      </text:list-level-style-number>
      <text:list-level-style-number text:level="9" text:style-name="ListLabel_20_189" loext:num-list-format="%1%.%2%.%3%.%4%.%5%.%6%.%7%.%8%.%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91" loext:num-list-format="" style:num-suffix="" text:bullet-char="">
        <style:list-level-properties text:list-level-position-and-space-mode="label-alignment">
          <style:list-level-label-alignment text:label-followed-by="listtab" text:list-tab-stop-position="0.8in" fo:text-indent="-0.3in" fo:margin-left="0.8in"/>
        </style:list-level-properties>
        <style:text-properties fo:font-family="Symbol" style:font-charset="x-symbol"/>
      </text:list-level-style-bullet>
      <text:list-level-style-number text:level="3" text:style-name="ListLabel_20_192" loext:num-list-format="%1%.%2%.%3%."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text:style-name="ListLabel_20_193" loext:num-list-format="%1%.%2%.%3%.%4%." style:num-suffix="." style:num-format="1" text:display-levels="4">
        <style:list-level-properties text:list-level-position-and-space-mode="label-alignment">
          <style:list-level-label-alignment text:label-followed-by="listtab" text:list-tab-stop-position="1.75in" fo:text-indent="-0.45in" fo:margin-left="1.45in"/>
        </style:list-level-properties>
      </text:list-level-style-number>
      <text:list-level-style-number text:level="5" text:style-name="ListLabel_20_194" loext:num-list-format="%1%.%2%.%3%.%4%.%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text:style-name="ListLabel_20_195" loext:num-list-format="%1%.%2%.%3%.%4%.%5%.%6%." style:num-suffix="." style:num-format="1" text:display-levels="6">
        <style:list-level-properties text:list-level-position-and-space-mode="label-alignment">
          <style:list-level-label-alignment text:label-followed-by="listtab" text:list-tab-stop-position="2.5in" fo:text-indent="-0.65in" fo:margin-left="2.15in"/>
        </style:list-level-properties>
      </text:list-level-style-number>
      <text:list-level-style-number text:level="7" text:style-name="ListLabel_20_196" loext:num-list-format="%1%.%2%.%3%.%4%.%5%.%6%.%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text:style-name="ListLabel_20_197" loext:num-list-format="%1%.%2%.%3%.%4%.%5%.%6%.%7%.%8%." style:num-suffix="." style:num-format="1" text:display-levels="8">
        <style:list-level-properties text:list-level-position-and-space-mode="label-alignment">
          <style:list-level-label-alignment text:label-followed-by="listtab" text:list-tab-stop-position="3.25in" fo:text-indent="-0.85in" fo:margin-left="2.85in"/>
        </style:list-level-properties>
      </text:list-level-style-number>
      <text:list-level-style-number text:level="9" text:style-name="ListLabel_20_198" loext:num-list-format="%1%.%2%.%3%.%4%.%5%.%6%.%7%.%8%.%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00" loext:num-list-format="" style:num-suffix="" text:bullet-char="">
        <style:list-level-properties text:list-level-position-and-space-mode="label-alignment">
          <style:list-level-label-alignment text:label-followed-by="listtab" text:list-tab-stop-position="0.8in" fo:text-indent="-0.3in" fo:margin-left="0.8in"/>
        </style:list-level-properties>
        <style:text-properties fo:font-family="Symbol" style:font-charset="x-symbol"/>
      </text:list-level-style-bullet>
      <text:list-level-style-number text:level="3" text:style-name="ListLabel_20_201" loext:num-list-format="%1%.%2%.%3%."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text:style-name="ListLabel_20_202" loext:num-list-format="%1%.%2%.%3%.%4%." style:num-suffix="." style:num-format="1" text:display-levels="4">
        <style:list-level-properties text:list-level-position-and-space-mode="label-alignment">
          <style:list-level-label-alignment text:label-followed-by="listtab" text:list-tab-stop-position="1.75in" fo:text-indent="-0.45in" fo:margin-left="1.45in"/>
        </style:list-level-properties>
      </text:list-level-style-number>
      <text:list-level-style-number text:level="5" text:style-name="ListLabel_20_203" loext:num-list-format="%1%.%2%.%3%.%4%.%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text:style-name="ListLabel_20_204" loext:num-list-format="%1%.%2%.%3%.%4%.%5%.%6%." style:num-suffix="." style:num-format="1" text:display-levels="6">
        <style:list-level-properties text:list-level-position-and-space-mode="label-alignment">
          <style:list-level-label-alignment text:label-followed-by="listtab" text:list-tab-stop-position="2.5in" fo:text-indent="-0.65in" fo:margin-left="2.15in"/>
        </style:list-level-properties>
      </text:list-level-style-number>
      <text:list-level-style-number text:level="7" text:style-name="ListLabel_20_205" loext:num-list-format="%1%.%2%.%3%.%4%.%5%.%6%.%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text:style-name="ListLabel_20_206" loext:num-list-format="%1%.%2%.%3%.%4%.%5%.%6%.%7%.%8%." style:num-suffix="." style:num-format="1" text:display-levels="8">
        <style:list-level-properties text:list-level-position-and-space-mode="label-alignment">
          <style:list-level-label-alignment text:label-followed-by="listtab" text:list-tab-stop-position="3.25in" fo:text-indent="-0.85in" fo:margin-left="2.85in"/>
        </style:list-level-properties>
      </text:list-level-style-number>
      <text:list-level-style-number text:level="9" text:style-name="ListLabel_20_207" loext:num-list-format="%1%.%2%.%3%.%4%.%5%.%6%.%7%.%8%.%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09" loext:num-list-format="" style:num-suffix="" text:bullet-char="">
        <style:list-level-properties text:list-level-position-and-space-mode="label-alignment">
          <style:list-level-label-alignment text:label-followed-by="listtab" text:list-tab-stop-position="0.8in" fo:text-indent="-0.3in" fo:margin-left="0.8in"/>
        </style:list-level-properties>
        <style:text-properties fo:font-family="Symbol" style:font-charset="x-symbol"/>
      </text:list-level-style-bullet>
      <text:list-level-style-number text:level="3" text:style-name="ListLabel_20_210" loext:num-list-format="%1%.%2%.%3%."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text:style-name="ListLabel_20_211" loext:num-list-format="%1%.%2%.%3%.%4%." style:num-suffix="." style:num-format="1" text:display-levels="4">
        <style:list-level-properties text:list-level-position-and-space-mode="label-alignment">
          <style:list-level-label-alignment text:label-followed-by="listtab" text:list-tab-stop-position="1.75in" fo:text-indent="-0.45in" fo:margin-left="1.45in"/>
        </style:list-level-properties>
      </text:list-level-style-number>
      <text:list-level-style-number text:level="5" text:style-name="ListLabel_20_212" loext:num-list-format="%1%.%2%.%3%.%4%.%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text:style-name="ListLabel_20_213" loext:num-list-format="%1%.%2%.%3%.%4%.%5%.%6%." style:num-suffix="." style:num-format="1" text:display-levels="6">
        <style:list-level-properties text:list-level-position-and-space-mode="label-alignment">
          <style:list-level-label-alignment text:label-followed-by="listtab" text:list-tab-stop-position="2.5in" fo:text-indent="-0.65in" fo:margin-left="2.15in"/>
        </style:list-level-properties>
      </text:list-level-style-number>
      <text:list-level-style-number text:level="7" text:style-name="ListLabel_20_214" loext:num-list-format="%1%.%2%.%3%.%4%.%5%.%6%.%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text:style-name="ListLabel_20_215" loext:num-list-format="%1%.%2%.%3%.%4%.%5%.%6%.%7%.%8%." style:num-suffix="." style:num-format="1" text:display-levels="8">
        <style:list-level-properties text:list-level-position-and-space-mode="label-alignment">
          <style:list-level-label-alignment text:label-followed-by="listtab" text:list-tab-stop-position="3.25in" fo:text-indent="-0.85in" fo:margin-left="2.85in"/>
        </style:list-level-properties>
      </text:list-level-style-number>
      <text:list-level-style-number text:level="9" text:style-name="ListLabel_20_216" loext:num-list-format="%1%.%2%.%3%.%4%.%5%.%6%.%7%.%8%.%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18" loext:num-list-format="%1%.%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text:style-name="ListLabel_20_219" loext:num-list-format="%1%.%2%.%3%."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text:style-name="ListLabel_20_220" loext:num-list-format="%1%.%2%.%3%.%4%." style:num-suffix="." style:num-format="1" text:display-levels="4">
        <style:list-level-properties text:list-level-position-and-space-mode="label-alignment">
          <style:list-level-label-alignment text:label-followed-by="listtab" text:list-tab-stop-position="1.75in" fo:text-indent="-0.45in" fo:margin-left="1.45in"/>
        </style:list-level-properties>
      </text:list-level-style-number>
      <text:list-level-style-number text:level="5" text:style-name="ListLabel_20_221" loext:num-list-format="%1%.%2%.%3%.%4%.%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text:style-name="ListLabel_20_222" loext:num-list-format="%1%.%2%.%3%.%4%.%5%.%6%." style:num-suffix="." style:num-format="1" text:display-levels="6">
        <style:list-level-properties text:list-level-position-and-space-mode="label-alignment">
          <style:list-level-label-alignment text:label-followed-by="listtab" text:list-tab-stop-position="2.5in" fo:text-indent="-0.65in" fo:margin-left="2.15in"/>
        </style:list-level-properties>
      </text:list-level-style-number>
      <text:list-level-style-number text:level="7" text:style-name="ListLabel_20_223" loext:num-list-format="%1%.%2%.%3%.%4%.%5%.%6%.%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text:style-name="ListLabel_20_224" loext:num-list-format="%1%.%2%.%3%.%4%.%5%.%6%.%7%.%8%." style:num-suffix="." style:num-format="1" text:display-levels="8">
        <style:list-level-properties text:list-level-position-and-space-mode="label-alignment">
          <style:list-level-label-alignment text:label-followed-by="listtab" text:list-tab-stop-position="3.25in" fo:text-indent="-0.85in" fo:margin-left="2.85in"/>
        </style:list-level-properties>
      </text:list-level-style-number>
      <text:list-level-style-number text:level="9" text:style-name="ListLabel_20_225" loext:num-list-format="%1%.%2%.%3%.%4%.%5%.%6%.%7%.%8%.%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0.7417in" fo:text-indent="-0.25in" fo:margin-left="0.7417in"/>
        </style:list-level-properties>
        <style:text-properties fo:font-family="Symbol" style:font-charset="x-symbol"/>
      </text:list-level-style-bullet>
      <text:list-level-style-number text:level="2" text:style-name="ListLabel_20_236" loext:num-list-format="%2%." style:num-suffix="." style:num-format="a" style:num-letter-sync="true">
        <style:list-level-properties text:list-level-position-and-space-mode="label-alignment">
          <style:list-level-label-alignment text:label-followed-by="listtab" text:list-tab-stop-position="1.2417in" fo:text-indent="-0.25in" fo:margin-left="1.2417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text:list-tab-stop-position="1.7417in" fo:text-indent="-0.1252in" fo:margin-left="1.7417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text:list-tab-stop-position="2.2417in" fo:text-indent="-0.25in" fo:margin-left="2.2417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text:list-tab-stop-position="2.7417in" fo:text-indent="-0.25in" fo:margin-left="2.7417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text:list-tab-stop-position="3.2417in" fo:text-indent="-0.1252in" fo:margin-left="3.2417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text:list-tab-stop-position="3.7417in" fo:text-indent="-0.25in" fo:margin-left="3.7417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text:list-tab-stop-position="4.2417in" fo:text-indent="-0.25in" fo:margin-left="4.2417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text:list-tab-stop-position="4.7417in"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75in" fo:margin-left="0.5in"/>
        </style:list-level-properties>
      </text:list-level-style-number>
      <text:list-level-style-number text:level="3" text:style-name="ListLabel_20_255" loext:num-list-format="%3%." style:num-suffix="." style:num-format="i">
        <style:list-level-properties text:list-level-position-and-space-mode="label-alignment">
          <style:list-level-label-alignment text:label-followed-by="listtab" fo:text-indent="1.25in" fo:margin-left="1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1.75in" fo:margin-left="1.5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2.25in" fo:margin-left="2in"/>
        </style:list-level-properties>
      </text:list-level-style-number>
      <text:list-level-style-number text:level="6" text:style-name="ListLabel_20_258" loext:num-list-format="%6%." style:num-suffix="." style:num-format="i">
        <style:list-level-properties text:list-level-position-and-space-mode="label-alignment">
          <style:list-level-label-alignment text:label-followed-by="listtab" fo:text-indent="2.75in" fo:margin-left="2.5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3.25in" fo:margin-left="3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3.75in" fo:margin-left="3.5in"/>
        </style:list-level-properties>
      </text:list-level-style-number>
      <text:list-level-style-number text:level="9" text:style-name="ListLabel_20_261" loext:num-list-format="%9%." style:num-suffix="." style:num-format="i">
        <style:list-level-properties text:list-level-position-and-space-mode="label-alignment">
          <style:list-level-label-alignment text:label-followed-by="listtab" fo:text-indent="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75in" fo:margin-left="0.5in"/>
        </style:list-level-properties>
      </text:list-level-style-number>
      <text:list-level-style-number text:level="3" text:style-name="ListLabel_20_264" loext:num-list-format="%3%." style:num-suffix="." style:num-format="i">
        <style:list-level-properties text:list-level-position-and-space-mode="label-alignment">
          <style:list-level-label-alignment text:label-followed-by="listtab" fo:text-indent="1.25in" fo:margin-left="1in"/>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1.75in" fo:margin-left="1.5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2.25in" fo:margin-left="2in"/>
        </style:list-level-properties>
      </text:list-level-style-number>
      <text:list-level-style-number text:level="6" text:style-name="ListLabel_20_267" loext:num-list-format="%6%." style:num-suffix="." style:num-format="i">
        <style:list-level-properties text:list-level-position-and-space-mode="label-alignment">
          <style:list-level-label-alignment text:label-followed-by="listtab" fo:text-indent="2.75in" fo:margin-left="2.5in"/>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3.25in" fo:margin-left="3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3.75in" fo:margin-left="3.5in"/>
        </style:list-level-properties>
      </text:list-level-style-number>
      <text:list-level-style-number text:level="9" text:style-name="ListLabel_20_270" loext:num-list-format="%9%." style:num-suffix="." style:num-format="i">
        <style:list-level-properties text:list-level-position-and-space-mode="label-alignment">
          <style:list-level-label-alignment text:label-followed-by="listtab" fo:text-indent="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prefix="("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9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3" text:style-name="ListLabel_20_29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317"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320"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323"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75in" fo:margin-left="0.5in"/>
        </style:list-level-properties>
      </text:list-level-style-number>
      <text:list-level-style-number text:level="3" text:style-name="ListLabel_20_327" loext:num-list-format="%3%." style:num-suffix="." style:num-format="i">
        <style:list-level-properties text:list-level-position-and-space-mode="label-alignment">
          <style:list-level-label-alignment text:label-followed-by="listtab" fo:text-indent="1.25in" fo:margin-left="1in"/>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1.75in" fo:margin-left="1.5in"/>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2.25in" fo:margin-left="2in"/>
        </style:list-level-properties>
      </text:list-level-style-number>
      <text:list-level-style-number text:level="6" text:style-name="ListLabel_20_330" loext:num-list-format="%6%." style:num-suffix="." style:num-format="i">
        <style:list-level-properties text:list-level-position-and-space-mode="label-alignment">
          <style:list-level-label-alignment text:label-followed-by="listtab" fo:text-indent="2.75in" fo:margin-left="2.5in"/>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3.25in" fo:margin-left="3in"/>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3.75in" fo:margin-left="3.5in"/>
        </style:list-level-properties>
      </text:list-level-style-number>
      <text:list-level-style-number text:level="9" text:style-name="ListLabel_20_333" loext:num-list-format="%9%." style:num-suffix="." style:num-format="i">
        <style:list-level-properties text:list-level-position-and-space-mode="label-alignment">
          <style:list-level-label-alignment text:label-followed-by="listtab" fo:text-indent="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charset="x-symbol"/>
      </text:list-level-style-bullet>
      <text:list-level-style-bullet text:level="3" text:style-name="ListLabel_20_336"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style-name="Regular" style:font-pitch="fixed"/>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charset="x-symbol"/>
      </text:list-level-style-bullet>
      <text:list-level-style-bullet text:level="7" text:style-name="ListLabel_20_340"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style-name="Regular" style:font-pitch="fixed"/>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45"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48"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5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353" loext:num-list-format="o"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3" text:style-name="ListLabel_20_354"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5" text:style-name="ListLabel_20_356" loext:num-list-format="o"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25in" fo:margin-left="2.25in"/>
        </style:list-level-properties>
        <style:text-properties fo:font-family="Wingdings" style:font-charset="x-symbol"/>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25in" fo:margin-left="2.75in"/>
        </style:list-level-properties>
        <style:text-properties fo:font-family="Symbol" style:font-charset="x-symbol"/>
      </text:list-level-style-bullet>
      <text:list-level-style-bullet text:level="8" text:style-name="ListLabel_20_359" loext:num-list-format="o"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25in" fo:margin-left="3.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6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6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6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6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6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fo:text-indent="-0.25in" fo:margin-left="0.9917in"/>
        </style:list-level-properties>
        <style:text-properties fo:font-family="Symbol" style:font-charset="x-symbol"/>
      </text:list-level-style-bullet>
      <text:list-level-style-bullet text:level="2" text:style-name="ListLabel_20_371" loext:num-list-format="o" style:num-suffix="o" text:bullet-char="o">
        <style:list-level-properties text:list-level-position-and-space-mode="label-alignment">
          <style:list-level-label-alignment text:label-followed-by="listtab" fo:text-indent="-0.25in" fo:margin-left="1.4917in"/>
        </style:list-level-properties>
        <style:text-properties fo:font-family="'Courier New'" style:font-style-name="Regular" style:font-pitch="fixed"/>
      </text:list-level-style-bullet>
      <text:list-level-style-bullet text:level="3" text:style-name="ListLabel_20_372" loext:num-list-format="" style:num-suffix="" text:bullet-char="">
        <style:list-level-properties text:list-level-position-and-space-mode="label-alignment">
          <style:list-level-label-alignment text:label-followed-by="listtab" fo:text-indent="-0.25in" fo:margin-left="1.9917in"/>
        </style:list-level-properties>
        <style:text-properties fo:font-family="Wingdings" style:font-charset="x-symbol"/>
      </text:list-level-style-bullet>
      <text:list-level-style-bullet text:level="4" text:style-name="ListLabel_20_373" loext:num-list-format="" style:num-suffix="" text:bullet-char="">
        <style:list-level-properties text:list-level-position-and-space-mode="label-alignment">
          <style:list-level-label-alignment text:label-followed-by="listtab" fo:text-indent="-0.25in" fo:margin-left="2.4917in"/>
        </style:list-level-properties>
        <style:text-properties fo:font-family="Symbol" style:font-charset="x-symbol"/>
      </text:list-level-style-bullet>
      <text:list-level-style-bullet text:level="5" text:style-name="ListLabel_20_374" loext:num-list-format="o" style:num-suffix="o" text:bullet-char="o">
        <style:list-level-properties text:list-level-position-and-space-mode="label-alignment">
          <style:list-level-label-alignment text:label-followed-by="listtab" fo:text-indent="-0.25in" fo:margin-left="2.9917in"/>
        </style:list-level-properties>
        <style:text-properties fo:font-family="'Courier New'" style:font-style-name="Regular" style:font-pitch="fixed"/>
      </text:list-level-style-bullet>
      <text:list-level-style-bullet text:level="6" text:style-name="ListLabel_20_375" loext:num-list-format="" style:num-suffix="" text:bullet-char="">
        <style:list-level-properties text:list-level-position-and-space-mode="label-alignment">
          <style:list-level-label-alignment text:label-followed-by="listtab" fo:text-indent="-0.25in" fo:margin-left="3.4917in"/>
        </style:list-level-properties>
        <style:text-properties fo:font-family="Wingdings" style:font-charset="x-symbol"/>
      </text:list-level-style-bullet>
      <text:list-level-style-bullet text:level="7" text:style-name="ListLabel_20_376" loext:num-list-format="" style:num-suffix="" text:bullet-char="">
        <style:list-level-properties text:list-level-position-and-space-mode="label-alignment">
          <style:list-level-label-alignment text:label-followed-by="listtab" fo:text-indent="-0.25in" fo:margin-left="3.9917in"/>
        </style:list-level-properties>
        <style:text-properties fo:font-family="Symbol" style:font-charset="x-symbol"/>
      </text:list-level-style-bullet>
      <text:list-level-style-bullet text:level="8" text:style-name="ListLabel_20_377" loext:num-list-format="o" style:num-suffix="o" text:bullet-char="o">
        <style:list-level-properties text:list-level-position-and-space-mode="label-alignment">
          <style:list-level-label-alignment text:label-followed-by="listtab" fo:text-indent="-0.25in" fo:margin-left="4.4917in"/>
        </style:list-level-properties>
        <style:text-properties fo:font-family="'Courier New'" style:font-style-name="Regular" style:font-pitch="fixed"/>
      </text:list-level-style-bullet>
      <text:list-level-style-bullet text:level="9" text:style-name="ListLabel_20_378" loext:num-list-format="" style:num-suffix="" text:bullet-char="">
        <style:list-level-properties text:list-level-position-and-space-mode="label-alignment">
          <style:list-level-label-alignment text:label-followed-by="listtab" fo:text-indent="-0.25in" fo:margin-left="4.9917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8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8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8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8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8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9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9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9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9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text-properties style:font-name="Calibri"/>
    </style:style>
    <style:style style:name="MT1" style:family="text">
      <style:text-properties style:font-name="Calibri"/>
    </style:style>
    <style:style style:name="MT2" style:family="text">
      <style:text-properties style:font-name="Calibri" style:font-name-complex="Calibri1" style:font-size-complex="12pt"/>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46"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text:span text:style-name="MT2"><text:page-number text:select-page="current">12</text:page-number></text:span></text:p>
        <text:p text:style-name="MP2" loext:marker-style-name="MT1"/>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Reading App Builder: Installing and Building Apps on a Mac</dc:title>
    <meta:initial-creator>David Moore</meta:initial-creator>
    <dc:creator>David Moore</dc:creator>
    <meta:editing-cycles>31</meta:editing-cycles>
    <meta:print-date>2022-01-25T20:27:00</meta:print-date>
    <meta:creation-date>2021-06-09T13:04:00</meta:creation-date>
    <dc:date>2026-04-29T18:05:00</dc:date>
    <meta:editing-duration>PT1H16M</meta:editing-duration>
    <meta:generator>LibreOffice/26.2.3.2$Linux_X86_64 LibreOffice_project/620$Build-2</meta:generator>
    <meta:document-statistic meta:table-count="3" meta:image-count="47" meta:object-count="0" meta:page-count="12" meta:paragraph-count="535" meta:word-count="8783" meta:character-count="51052" meta:non-whitespace-character-count="42676"/>
    <meta:user-defined meta:name="AppVersion">16.0000</meta:user-defined>
    <meta:template xlink:type="simple" xlink:actuate="onRequest" xlink:title="Normal.dotm" xlink:href=""/>
  </office:meta>
</office:document-meta>
</file>