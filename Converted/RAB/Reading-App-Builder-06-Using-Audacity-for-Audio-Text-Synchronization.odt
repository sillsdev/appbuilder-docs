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183ED2BD124.png" manifest:media-type="image/png"/>
  <manifest:file-entry manifest:full-path="Pictures/100000000000012B00000098363E8AB6.png" manifest:media-type="image/png"/>
  <manifest:file-entry manifest:full-path="Pictures/10000000000000F30000003A39EABE3E.png" manifest:media-type="image/png"/>
  <manifest:file-entry manifest:full-path="Pictures/10000000000001F300000183FB6552FC.png" manifest:media-type="image/png"/>
  <manifest:file-entry manifest:full-path="Pictures/10000000000000600000006CCBDB454E.png" manifest:media-type="image/png"/>
  <manifest:file-entry manifest:full-path="Pictures/10000000000000FD000000645817885E.jpg" manifest:media-type="image/jpeg"/>
  <manifest:file-entry manifest:full-path="Pictures/10000000000001F30000018324F8F924.png" manifest:media-type="image/png"/>
  <manifest:file-entry manifest:full-path="Pictures/100000010000076700000269044D798A.png" manifest:media-type="image/png"/>
  <manifest:file-entry manifest:full-path="Pictures/100000000000024800000170BF1C90AB.png" manifest:media-type="image/png"/>
  <manifest:file-entry manifest:full-path="Pictures/100000000000017700000107BC7F8427.png" manifest:media-type="image/png"/>
  <manifest:file-entry manifest:full-path="Pictures/100000000000037F0000020C83F39A5C.png" manifest:media-type="image/png"/>
  <manifest:file-entry manifest:full-path="Pictures/100000000000037F0000020C3B6D2B42.png" manifest:media-type="image/png"/>
  <manifest:file-entry manifest:full-path="Pictures/10000000000001F3000001833CE2F20D.png" manifest:media-type="image/png"/>
  <manifest:file-entry manifest:full-path="Pictures/100000000000037F000001ECF16FF5AB.png" manifest:media-type="image/png"/>
  <manifest:file-entry manifest:full-path="Pictures/100000000000037F0000020C8A93A2CF.png" manifest:media-type="image/png"/>
  <manifest:file-entry manifest:full-path="Pictures/100000000000037F0000020C59FE4565.png" manifest:media-type="image/png"/>
  <manifest:file-entry manifest:full-path="Pictures/10000000000002CB0000014C31CAE285.png" manifest:media-type="image/png"/>
  <manifest:file-entry manifest:full-path="Pictures/10000000000001F300000183684571A6.png" manifest:media-type="image/png"/>
  <manifest:file-entry manifest:full-path="Pictures/10000000000001F300000183854602AE.png" manifest:media-type="image/png"/>
  <manifest:file-entry manifest:full-path="Pictures/100000000000024800000170E39B73FE.png" manifest:media-type="image/png"/>
  <manifest:file-entry manifest:full-path="Pictures/10000000000001F30000018351ED4511.png" manifest:media-type="image/png"/>
  <manifest:file-entry manifest:full-path="Pictures/1000000000000248000001706D265004.png" manifest:media-type="image/png"/>
  <manifest:file-entry manifest:full-path="Pictures/10000000000001F300000183465E43E3.png" manifest:media-type="image/png"/>
  <manifest:file-entry manifest:full-path="Pictures/100000000000017E000001079146D5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ika Compact" svg:font-family="'Andika Compact'" style:font-family-generic="roman" style:font-pitch="variable"/>
    <style:font-face style:name="Andika Compact1" svg:font-family="'Andika Compact'"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8083in" fo:margin-left="0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5.3924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 style:family="table">
      <style:table-properties style:width="5.1188in" fo:margin-left="0in" fo:margin-top="0in" fo:margin-bottom="0in" table:align="left" style:writing-mode="page"/>
    </style:style>
    <style:style style:name="Table2.A" style:family="table-column">
      <style:table-column-properties style:column-width="0.416in"/>
    </style:style>
    <style:style style:name="Table2.B" style:family="table-column">
      <style:table-column-properties style:column-width="4.7028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 style:family="table">
      <style:table-properties style:width="5.5069in" fo:margin-left="0.5007in" fo:margin-top="0in" fo:margin-bottom="0in" table:align="left" style:writing-mode="page"/>
    </style:style>
    <style:style style:name="Table3.A" style:family="table-column">
      <style:table-column-properties style:column-width="3.25in"/>
    </style:style>
    <style:style style:name="Table3.B" style:family="table-column">
      <style:table-column-properties style:column-width="1.125in"/>
    </style:style>
    <style:style style:name="Table3.C" style:family="table-column">
      <style:table-column-properties style:column-width="1.1319in"/>
    </style:style>
    <style:style style:name="Table3.1" style:family="table-row">
      <style:table-row-properties fo:keep-together="always"/>
    </style:style>
    <style:style style:name="Table3.A1" style:family="table-cell">
      <style:table-cell-properties fo:background-color="#f8f8f8" fo:padding-left="0.075in" fo:padding-right="0.075in" fo:padding-top="0.0396in" fo:padding-bottom="0.0396in" fo:border="0.5pt solid #000000">
        <style:background-image/>
      </style:table-cell-properties>
    </style:style>
    <style:style style:name="Table3.A2" style:family="table-cell">
      <style:table-cell-properties style:vertical-align="middle" fo:background-color="#f8f8f8" fo:padding-left="0.075in" fo:padding-right="0.075in" fo:padding-top="0.0396in" fo:padding-bottom="0.0396in" fo:border="0.5pt solid #000000">
        <style:background-image/>
      </style:table-cell-properties>
    </style:style>
    <style:style style:name="Table2" style:family="table">
      <style:table-properties style:width="5.1188in" fo:margin-left="0in" fo:margin-top="0in" fo:margin-bottom="0in" table:align="left" style:writing-mode="page"/>
    </style:style>
    <style:style style:name="Table2.A" style:family="table-column">
      <style:table-column-properties style:column-width="0.416in"/>
    </style:style>
    <style:style style:name="Table2.B" style:family="table-column">
      <style:table-column-properties style:column-width="4.7028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 style:family="table">
      <style:table-properties style:width="5.8083in" fo:margin-left="0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5.3924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paragraph-properties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10" style:family="paragraph" style:parent-style-name="Standard">
      <style:text-properties fo:language="en" fo:country="US"/>
    </style:style>
    <style:style style:name="P11" style:family="paragraph" style:parent-style-name="Standard">
      <style:paragraph-properties fo:break-before="page"/>
      <style:text-properties fo:language="en" fo:country="US"/>
    </style:style>
    <style:style style:name="P12" style:family="paragraph" style:parent-style-name="Heading_20_1" style:list-style-name="WWNum13"/>
    <style:style style:name="P13" style:family="paragraph" style:parent-style-name="Standard" style:list-style-name="WWNum23">
      <style:paragraph-properties fo:margin-left="0.4957in" fo:margin-top="0.0835in" fo:margin-bottom="0in" style:contextual-spacing="false" fo:text-indent="-0.248in" style:auto-text-indent="false"/>
    </style:style>
    <style:style style:name="P14" style:family="paragraph" style:parent-style-name="Standard">
      <style:paragraph-properties fo:margin-top="0.0835in" fo:margin-bottom="0in" style:contextual-spacing="false"/>
      <style:text-properties fo:language="en" fo:country="GB"/>
    </style:style>
    <style:style style:name="P15" style:family="paragraph" style:parent-style-name="Standard">
      <style:paragraph-properties fo:margin-top="0.1665in" fo:margin-bottom="0in" style:contextual-spacing="false"/>
      <style:text-properties fo:language="en" fo:country="GB"/>
    </style:style>
    <style:style style:name="P16" style:family="paragraph" style:parent-style-name="Standard">
      <loext:graphic-properties draw:fill="solid" draw:fill-color="#f2f2f2"/>
      <style:paragraph-properties fo:margin-left="0.2957in" fo:background-color="#f2f2f2" fo:padding="0.0835in" fo:border="0.51pt solid #ffffff" style:shadow="none"/>
    </style:style>
    <style:style style:name="P17" style:family="paragraph" style:parent-style-name="Standard">
      <style:paragraph-properties fo:margin-top="0.0835in" fo:margin-bottom="0.0835in" style:contextual-spacing="false"/>
      <style:text-properties fo:language="en" fo:country="GB"/>
    </style:style>
    <style:style style:name="P18" style:family="paragraph" style:parent-style-name="Standard">
      <style:paragraph-properties fo:margin-top="0.0835in" fo:margin-bottom="0.0835in" style:contextual-spacing="false"/>
    </style:style>
    <style:style style:name="P19" style:family="paragraph" style:parent-style-name="Standard" style:list-style-name="WWNum26">
      <style:paragraph-properties fo:margin-left="0.4957in" fo:margin-top="0.0835in" fo:margin-bottom="0in" style:contextual-spacing="false" fo:text-indent="-0.248in" style:auto-text-indent="false"/>
    </style:style>
    <style:style style:name="P20" style:family="paragraph" style:parent-style-name="Standard" style:list-style-name="WWNum26">
      <style:paragraph-properties fo:margin-left="0.4957in" fo:margin-top="0.0417in" fo:margin-bottom="0in" style:contextual-spacing="false" fo:text-indent="-0.248in" style:auto-text-indent="false"/>
    </style:style>
    <style:style style:name="P21" style:family="paragraph" style:parent-style-name="Standard">
      <style:paragraph-properties fo:margin-top="0.1665in" fo:margin-bottom="0in" style:contextual-spacing="false"/>
    </style:style>
    <style:style style:name="P22" style:family="paragraph" style:parent-style-name="Standard">
      <style:paragraph-properties fo:margin-top="0.1665in" fo:margin-bottom="0.0835in" style:contextual-spacing="false"/>
    </style:style>
    <style:style style:name="P23" style:family="paragraph" style:parent-style-name="Standard">
      <style:paragraph-properties fo:margin-top="0.0835in" fo:margin-bottom="0.0835in" style:contextual-spacing="false" fo:keep-with-next="always"/>
    </style:style>
    <style:style style:name="P24" style:family="paragraph" style:parent-style-name="Standard">
      <style:paragraph-properties fo:margin-top="0.1665in" fo:margin-bottom="0in" style:contextual-spacing="false" fo:text-align="center" style:justify-single-word="false"/>
    </style:style>
    <style:style style:name="P25" style:family="paragraph">
      <loext:graphic-properties draw:fill="solid" draw:fill-color="#f8f8f8"/>
    </style:style>
    <style:style style:name="P26" style:family="paragraph" style:parent-style-name="Standard">
      <style:paragraph-properties fo:margin-top="0.0835in" fo:margin-bottom="0in" style:contextual-spacing="false"/>
    </style:style>
    <style:style style:name="P27" style:family="paragraph" style:parent-style-name="Standard">
      <style:paragraph-properties fo:margin-top="0.0835in" fo:margin-bottom="0in" style:contextual-spacing="false" fo:text-align="center" style:justify-single-word="false"/>
    </style:style>
    <style:style style:name="P28" style:family="paragraph" style:parent-style-name="Standard">
      <style:paragraph-properties fo:margin-left="0.25in"/>
    </style:style>
    <style:style style:name="P29" style:family="paragraph" style:parent-style-name="Frame_20_contents">
      <style:paragraph-properties>
        <style:tab-stops>
          <style:tab-stop style:position="1.25in"/>
          <style:tab-stop style:position="2.5in"/>
        </style:tab-stops>
      </style:paragraph-properties>
    </style:style>
    <style:style style:name="P30" style:family="paragraph" style:parent-style-name="Heading_20_2" style:list-style-name="WWNum13"/>
    <style:style style:name="P31" style:family="paragraph" style:parent-style-name="Standard" style:list-style-name="WWNum15">
      <style:paragraph-properties fo:margin-left="0.4957in" fo:margin-top="0.0835in" fo:margin-bottom="0in" style:contextual-spacing="false" fo:text-indent="-0.248in" style:auto-text-indent="false"/>
    </style:style>
    <style:style style:name="P32" style:family="paragraph" style:parent-style-name="Standard">
      <style:paragraph-properties fo:keep-with-next="always"/>
    </style:style>
    <style:style style:name="P33" style:family="paragraph" style:parent-style-name="Standard">
      <style:paragraph-properties fo:keep-with-next="always"/>
      <style:text-properties fo:language="en" fo:country="US"/>
    </style:style>
    <style:style style:name="P34" style:family="paragraph" style:parent-style-name="Base_20_Style">
      <style:text-properties style:font-name="Times New Roman" style:font-name-complex="Times New Roman1"/>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margin-top="0.0835in" fo:margin-bottom="0in" style:contextual-spacing="false" fo:text-align="center" style:justify-single-word="false"/>
      <style:text-properties fo:language="en" fo:country="GB"/>
    </style:style>
    <style:style style:name="P37" style:family="paragraph" style:parent-style-name="Heading_20_1" style:list-style-name="WWNum13">
      <style:paragraph-properties fo:keep-together="always"/>
    </style:style>
    <style:style style:name="P38" style:family="paragraph" style:parent-style-name="Standard">
      <style:paragraph-properties fo:keep-together="always" fo:keep-with-next="always"/>
      <style:text-properties fo:language="en" fo:country="GB"/>
    </style:style>
    <style:style style:name="P39" style:family="paragraph" style:parent-style-name="Standard" style:list-style-name="WWNum5">
      <style:paragraph-properties fo:keep-together="always" fo:keep-with-next="always"/>
    </style:style>
    <style:style style:name="P40" style:family="paragraph" style:parent-style-name="Standard">
      <style:paragraph-properties fo:margin-left="0.25in"/>
      <style:text-properties fo:language="en" fo:country="GB"/>
    </style:style>
    <style:style style:name="P41" style:family="paragraph" style:parent-style-name="Standard" style:list-style-name="WWNum5"/>
    <style:style style:name="P42" style:family="paragraph" style:parent-style-name="Standard" style:list-style-name="WWNum5">
      <style:paragraph-properties fo:margin-left="0.248in" fo:text-indent="-0.248in" style:auto-text-indent="false" fo:keep-with-next="always"/>
    </style:style>
    <style:style style:name="P43" style:family="paragraph" style:parent-style-name="Standard">
      <style:paragraph-properties fo:margin-left="0.5in" fo:keep-with-next="always"/>
    </style:style>
    <style:style style:name="P44" style:family="paragraph" style:parent-style-name="Standard" style:list-style-name="WWNum5">
      <style:paragraph-properties fo:keep-with-next="always"/>
    </style:style>
    <style:style style:name="P45" style:family="paragraph" style:parent-style-name="Standard">
      <style:paragraph-properties fo:margin-left="0.25in" fo:text-indent="0.2417in" style:auto-text-indent="false" fo:keep-with-next="always"/>
    </style:style>
    <style:style style:name="P46" style:family="paragraph" style:parent-style-name="Standard">
      <style:paragraph-properties fo:margin-left="0.4917in" fo:keep-with-next="always"/>
      <style:text-properties fo:language="en" fo:country="GB"/>
    </style:style>
    <style:style style:name="P47" style:family="paragraph" style:parent-style-name="Standard">
      <style:paragraph-properties fo:margin-left="0.4917in" fo:keep-with-next="always"/>
    </style:style>
    <style:style style:name="P48" style:family="paragraph" style:parent-style-name="Standard">
      <style:text-properties fo:language="en" fo:country="GB" fo:font-style="italic" style:font-style-asian="italic"/>
    </style:style>
    <style:style style:name="P49" style:family="paragraph" style:parent-style-name="Standard">
      <style:paragraph-properties fo:margin-left="0.4917in"/>
    </style:style>
    <style:style style:name="P50" style:family="paragraph" style:parent-style-name="Standard">
      <style:paragraph-properties fo:margin-left="0.4917in"/>
      <style:text-properties fo:font-size="8pt" fo:language="en" fo:country="GB" fo:font-style="italic" style:font-size-asian="8pt" style:font-style-asian="italic"/>
    </style:style>
    <style:style style:name="P51" style:family="paragraph" style:parent-style-name="Standard">
      <style:paragraph-properties fo:margin-left="0.4917in"/>
      <style:text-properties fo:language="en" fo:country="GB" fo:font-style="italic" style:font-style-asian="italic"/>
    </style:style>
    <style:style style:name="P52" style:family="paragraph" style:parent-style-name="Standard">
      <style:paragraph-properties fo:keep-with-next="always"/>
      <style:text-properties fo:language="en" fo:country="GB" fo:font-style="italic" fo:font-weight="bold" style:font-style-asian="italic" style:font-weight-asian="bold"/>
    </style:style>
    <style:style style:name="P53" style:family="paragraph" style:parent-style-name="Standard">
      <style:paragraph-properties fo:text-align="center" style:justify-single-word="false" fo:keep-with-next="always"/>
    </style:style>
    <style:style style:name="P54" style:family="paragraph" style:parent-style-name="Standard">
      <style:paragraph-properties fo:margin-left="0.4925in" fo:margin-top="0.0835in" fo:margin-bottom="0in" style:contextual-spacing="false" fo:text-align="center" style:justify-single-word="false"/>
    </style:style>
    <style:style style:name="P55" style:family="paragraph" style:parent-style-name="Standard">
      <style:paragraph-properties fo:margin-left="0.4917in"/>
      <style:text-properties fo:language="en" fo:country="GB"/>
    </style:style>
    <style:style style:name="P56" style:family="paragraph" style:parent-style-name="Standard">
      <style:paragraph-properties fo:margin-left="0.4898in"/>
    </style:style>
    <style:style style:name="P57" style:family="paragraph" style:parent-style-name="Standard">
      <style:paragraph-properties fo:margin-left="0.4898in"/>
      <style:text-properties fo:font-size="10pt" fo:language="en" fo:country="GB" style:font-size-asian="10pt"/>
    </style:style>
    <style:style style:name="P58" style:family="paragraph" style:parent-style-name="Standard">
      <style:paragraph-properties fo:margin-left="0.4898in"/>
      <style:text-properties fo:language="en" fo:country="GB"/>
    </style:style>
    <style:style style:name="P59" style:family="paragraph" style:parent-style-name="Standard" style:list-style-name="WWNum5">
      <style:paragraph-properties fo:margin-top="0.0835in" fo:margin-bottom="0in" style:contextual-spacing="false"/>
    </style:style>
    <style:style style:name="P60" style:family="paragraph" style:parent-style-name="Heading_20_1" style:list-style-name="WWNum13">
      <style:paragraph-properties fo:margin-left="0.248in" fo:text-indent="-0.248in" style:auto-text-indent="false" fo:break-before="page"/>
    </style:style>
    <style:style style:name="P61" style:family="paragraph" style:parent-style-name="Standard" style:list-style-name="WWNum21">
      <style:paragraph-properties fo:margin-left="0.4957in" fo:margin-top="0.0835in" fo:margin-bottom="0in" style:contextual-spacing="false" fo:text-indent="-0.248in" style:auto-text-indent="false"/>
    </style:style>
    <style:style style:name="P62" style:family="paragraph" style:parent-style-name="Standard">
      <style:paragraph-properties fo:margin-left="0.9835in" fo:margin-top="0.0835in" fo:margin-bottom="0in" style:contextual-spacing="false"/>
    </style:style>
    <style:style style:name="P63" style:family="paragraph" style:parent-style-name="Standard" style:list-style-name="WWNum22">
      <style:paragraph-properties fo:margin-left="0.4957in" fo:margin-top="0.0835in" fo:margin-bottom="0in" style:contextual-spacing="false" fo:text-indent="-0.248in" style:auto-text-indent="false"/>
    </style:style>
    <style:style style:name="P64" style:family="paragraph" style:parent-style-name="Standard" style:list-style-name="WWNum22">
      <style:paragraph-properties fo:margin-left="0.4957in" fo:text-indent="-0.248in" style:auto-text-indent="false"/>
    </style:style>
    <style:style style:name="P65" style:family="paragraph" style:parent-style-name="Heading_20_1" style:list-style-name="WWNum13">
      <style:paragraph-properties fo:break-before="page"/>
    </style:style>
    <style:style style:name="P66" style:family="paragraph" style:parent-style-name="Standard" style:list-style-name="WWNum19"/>
    <style:style style:name="P67" style:family="paragraph" style:parent-style-name="Standard">
      <style:paragraph-properties fo:margin-left="0.25in" fo:text-align="right" style:justify-single-word="false"/>
    </style:style>
    <style:style style:name="P68" style:family="paragraph" style:parent-style-name="Standard">
      <style:paragraph-properties fo:margin-left="0.25in" fo:text-align="center" style:justify-single-word="false"/>
      <style:text-properties fo:language="en" fo:country="GB"/>
    </style:style>
    <style:style style:name="P69" style:family="paragraph" style:parent-style-name="Standard" style:list-style-name="WWNum19">
      <style:paragraph-properties fo:keep-with-next="always"/>
    </style:style>
    <style:style style:name="P70" style:family="paragraph" style:parent-style-name="Standard">
      <style:paragraph-properties fo:margin-left="0.25in" fo:keep-with-next="always"/>
      <style:text-properties fo:language="en" fo:country="GB"/>
    </style:style>
    <style:style style:name="P71" style:family="paragraph" style:parent-style-name="Standard">
      <style:paragraph-properties fo:margin-left="0.25in" fo:text-align="center" style:justify-single-word="false"/>
    </style:style>
    <style:style style:name="P72" style:family="paragraph" style:parent-style-name="Standard">
      <style:paragraph-properties fo:margin-left="0.5in"/>
      <style:text-properties fo:language="en" fo:country="GB"/>
    </style:style>
    <style:style style:name="P73" style:family="paragraph" style:parent-style-name="Standard">
      <style:paragraph-properties fo:keep-together="always" fo:keep-with-next="always"/>
    </style:style>
    <style:style style:name="P74" style:family="paragraph" style:parent-style-name="Standard" style:list-style-name="WWNum16"/>
    <style:style style:name="P75" style:family="paragraph" style:parent-style-name="Standard">
      <style:paragraph-properties fo:text-align="right" style:justify-single-word="false"/>
    </style:style>
    <style:style style:name="P76" style:family="paragraph" style:parent-style-name="Standard">
      <style:text-properties fo:language="en" fo:country="GB" fo:font-weight="bold" style:font-weight-asian="bold"/>
    </style:style>
    <style:style style:name="P77" style:family="paragraph" style:parent-style-name="Standard">
      <style:paragraph-properties fo:keep-with-next="always"/>
      <style:text-properties fo:language="en" fo:country="GB" fo:font-weight="bold" style:font-weight-asian="bold"/>
    </style:style>
    <style:style style:name="P78" style:family="paragraph" style:parent-style-name="Standard" style:list-style-name="WWNum7">
      <style:paragraph-properties fo:margin-left="0.4957in" fo:margin-top="0.0417in" fo:margin-bottom="0in" style:contextual-spacing="false" fo:text-indent="-0.248in" style:auto-text-indent="false"/>
    </style:style>
    <style:style style:name="P79" style:family="paragraph" style:parent-style-name="Standard" style:list-style-name="WWNum11">
      <style:paragraph-properties fo:margin-top="0.0835in" fo:margin-bottom="0in" style:contextual-spacing="false" fo:keep-with-next="always"/>
    </style:style>
    <style:style style:name="P80" style:family="paragraph" style:parent-style-name="Standard">
      <style:paragraph-properties fo:margin-left="0.25in" fo:margin-top="0.0835in" fo:margin-bottom="0in" style:contextual-spacing="false" fo:keep-with-next="always"/>
      <style:text-properties fo:language="en" fo:country="GB" style:font-size-complex="11pt"/>
    </style:style>
    <style:style style:name="P81" style:family="paragraph" style:parent-style-name="Standard">
      <style:paragraph-properties fo:margin-left="0.25in" fo:margin-top="0.0835in" fo:margin-bottom="0in" style:contextual-spacing="false" fo:keep-with-next="always"/>
    </style:style>
    <style:style style:name="P82" style:family="paragraph" style:parent-style-name="Standard">
      <style:paragraph-properties fo:margin-top="0.0835in" fo:margin-bottom="0in" style:contextual-spacing="false" fo:text-align="center" style:justify-single-word="false" fo:keep-with-next="always"/>
    </style:style>
    <style:style style:name="P83" style:family="paragraph" style:parent-style-name="Standard">
      <style:paragraph-properties fo:margin-top="0.0835in" fo:margin-bottom="0in" style:contextual-spacing="false" fo:text-align="center" style:justify-single-word="false"/>
      <style:text-properties fo:language="en" fo:country="GB" style:font-size-complex="11pt"/>
    </style:style>
    <style:style style:name="P84" style:family="paragraph" style:parent-style-name="Standard" style:list-style-name="WWNum11">
      <style:paragraph-properties fo:margin-left="0.248in" fo:margin-top="0.0835in" fo:margin-bottom="0in" style:contextual-spacing="false" fo:text-indent="-0.248in" style:auto-text-indent="false"/>
    </style:style>
    <style:style style:name="P85" style:family="paragraph" style:parent-style-name="Standard">
      <style:paragraph-properties fo:margin-left="0.248in" fo:margin-top="0.0835in" fo:margin-bottom="0in" style:contextual-spacing="false"/>
      <style:text-properties fo:language="en" fo:country="GB" style:font-size-complex="11pt"/>
    </style:style>
    <style:style style:name="P86" style:family="paragraph" style:parent-style-name="Standard">
      <style:paragraph-properties fo:margin-left="0.25in" fo:margin-top="0.0835in" fo:margin-bottom="0in" style:contextual-spacing="false" fo:text-align="center" style:justify-single-word="false"/>
    </style:style>
    <style:style style:name="P87" style:family="paragraph" style:parent-style-name="Standard">
      <style:paragraph-properties fo:margin-left="0.25in" fo:margin-top="0.0835in" fo:margin-bottom="0in" style:contextual-spacing="false"/>
      <style:text-properties fo:language="en" fo:country="GB" style:font-size-complex="11pt"/>
    </style:style>
    <style:style style:name="P88" style:family="paragraph" style:parent-style-name="Standard">
      <style:paragraph-properties fo:margin-left="0.248in" fo:margin-top="0.0835in" fo:margin-bottom="0in" style:contextual-spacing="false" fo:keep-with-next="always"/>
    </style:style>
    <style:style style:name="P89" style:family="paragraph" style:parent-style-name="Standard">
      <style:paragraph-properties fo:margin-top="0.0835in" fo:margin-bottom="0in" style:contextual-spacing="false" fo:text-indent="0.248in" style:auto-text-indent="false"/>
    </style:style>
    <style:style style:name="P90" style:family="paragraph" style:parent-style-name="Standard" style:list-style-name="WWNum11">
      <style:paragraph-properties fo:margin-top="0.0835in" fo:margin-bottom="0in" style:contextual-spacing="false"/>
    </style:style>
    <style:style style:name="P91" style:family="paragraph" style:parent-style-name="Standard">
      <style:paragraph-properties fo:margin-top="0.0835in" fo:margin-bottom="0in" style:contextual-spacing="false" fo:text-indent="0.25in" style:auto-text-indent="false"/>
    </style:style>
    <style:style style:name="P92" style:family="paragraph" style:parent-style-name="Standard" style:list-style-name="WWNum11">
      <style:paragraph-properties fo:margin-left="0.248in" fo:margin-top="0.1665in" fo:margin-bottom="0in" style:contextual-spacing="false" fo:text-indent="-0.248in" style:auto-text-indent="false"/>
    </style:style>
    <style:style style:name="P93" style:family="paragraph" style:parent-style-name="Standard">
      <style:paragraph-properties fo:text-align="center" style:justify-single-word="false"/>
      <style:text-properties fo:language="en" fo:country="GB" fo:font-weight="bold" style:font-weight-asian="bold" style:font-size-complex="11pt" style:font-weight-complex="bold"/>
    </style:style>
    <style:style style:name="P94" style:family="paragraph" style:parent-style-name="Standard">
      <style:paragraph-properties fo:margin-top="0.0835in" fo:margin-bottom="0in" style:contextual-spacing="false" fo:text-indent="0.248in" style:auto-text-indent="false" fo:keep-with-next="always"/>
    </style:style>
    <style:style style:name="P95" style:family="paragraph" style:parent-style-name="Standard">
      <style:paragraph-properties fo:margin-top="0.0835in" fo:margin-bottom="0in" style:contextual-spacing="false"/>
      <style:text-properties fo:language="en" fo:country="GB" style:font-size-complex="11pt"/>
    </style:style>
    <style:style style:name="P96" style:family="paragraph" style:parent-style-name="Standard">
      <style:paragraph-properties fo:margin-top="0.0835in" fo:margin-bottom="0in" style:contextual-spacing="false" fo:text-align="center" style:justify-single-word="false"/>
      <style:text-properties fo:language="en" fo:country="GB" fo:font-weight="bold" style:font-weight-asian="bold" style:font-size-complex="11pt" style:font-weight-complex="bold"/>
    </style:style>
    <style:style style:name="P97" style:family="paragraph" style:parent-style-name="Standard">
      <style:paragraph-properties fo:margin-left="0.25in" fo:margin-top="0.0835in" fo:margin-bottom="0in" style:contextual-spacing="false"/>
    </style:style>
    <style:style style:name="P98"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language="en" fo:country="GB" fo:font-weight="bold" style:font-size-asian="32pt" style:font-weight-asian="bold" style:font-size-complex="32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US" fo:font-weight="bold" style:font-size-asian="16pt" style:font-weight-asian="bold" style:font-size-complex="16pt"/>
    </style:style>
    <style:style style:name="T8" style:family="text">
      <style:text-properties fo:font-size="20pt" fo:language="en" fo:country="US" fo:font-weight="bold" style:font-size-asian="20pt" style:font-weight-asian="bold" style:font-size-complex="16pt"/>
    </style:style>
    <style:style style:name="T9" style:family="text">
      <style:text-properties fo:font-size="11pt" fo:language="en" fo:country="GB" fo:font-weight="normal" style:font-size-asian="11pt" style:language-asian="en" style:country-asian="GB" style:font-weight-asian="normal" style:font-name-complex="Arial1" style:font-size-complex="11pt"/>
    </style:style>
    <style:style style:name="T10" style:family="text">
      <style:text-properties text:display="true"/>
    </style:style>
    <style:style style:name="T11" style:family="text">
      <style:text-properties fo:font-size="11pt" fo:language="en" fo:country="GB" fo:font-style="normal" style:font-size-asian="11pt" style:language-asian="en" style:country-asian="GB" style:font-style-asian="normal" style:font-name-complex="Arial1" style:font-size-complex="11pt"/>
    </style:style>
    <style:style style:name="T12" style:family="text">
      <style:text-properties fo:language="en" fo:country="US"/>
    </style:style>
    <style:style style:name="T13" style:family="text">
      <style:text-properties fo:language="en" fo:country="GB" fo:font-weight="bold" style:font-weight-asian="bold" style:font-weight-complex="bold"/>
    </style:style>
    <style:style style:name="T14" style:family="text">
      <style:text-properties fo:language="en" fo:country="GB" fo:font-style="italic" style:font-style-asian="italic" style:font-style-complex="italic"/>
    </style:style>
    <style:style style:name="T15" style:family="text">
      <style:text-properties fo:font-size="14pt" fo:language="en" fo:country="GB" fo:font-weight="bold" style:font-size-asian="14pt" style:font-weight-asian="bold" style:font-size-complex="14pt" style:font-weight-complex="bold"/>
    </style:style>
    <style:style style:name="T16" style:family="text">
      <style:text-properties fo:language="en" fo:country="GB" fo:font-weight="bold" style:font-weight-asian="bold"/>
    </style:style>
    <style:style style:name="T17" style:family="text">
      <style:text-properties fo:font-family="'Courier New'" style:font-family-generic="swiss" style:font-pitch="variable" fo:language="en" fo:country="GB" style:font-name-complex="Courier New"/>
    </style:style>
    <style:style style:name="T18" style:family="text">
      <style:text-properties fo:language="en" fo:country="US" fo:font-style="italic" style:font-style-asian="italic"/>
    </style:style>
    <style:style style:name="T19" style:family="text">
      <style:text-properties fo:language="en" fo:country="US" fo:font-weight="bold" style:font-weight-asian="bold"/>
    </style:style>
    <style:style style:name="T20" style:family="text">
      <style:text-properties fo:font-weight="bold" style:font-weight-asian="bold"/>
    </style:style>
    <style:style style:name="T21"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2" style:family="text">
      <style:text-properties style:font-name="Times New Roman" fo:font-size="11pt" style:font-size-asian="11pt" style:font-name-complex="Times New Roman1"/>
    </style:style>
    <style:style style:name="T23" style:family="text">
      <style:text-properties style:font-name="Times New Roman" fo:font-size="11pt" fo:font-weight="bold" style:font-size-asian="11pt" style:font-weight-asian="bold" style:font-name-complex="Times New Roman1"/>
    </style:style>
    <style:style style:name="T24" style:family="text">
      <style:text-properties style:font-name="Times New Roman" style:font-name-complex="Times New Roman1"/>
    </style:style>
    <style:style style:name="T25" style:family="text">
      <style:text-properties fo:language="en" fo:country="GB" style:language-asian="en" style:country-asian="GB"/>
    </style:style>
    <style:style style:name="T26" style:family="text">
      <style:text-properties fo:language="en" fo:country="GB" fo:font-style="italic" fo:font-weight="bold" style:font-style-asian="italic" style:font-weight-asian="bold"/>
    </style:style>
    <style:style style:name="T27" style:family="text">
      <style:text-properties fo:font-size="8pt" fo:language="en" fo:country="GB" fo:font-style="italic" style:font-size-asian="8pt" style:font-style-asian="italic"/>
    </style:style>
    <style:style style:name="T28" style:family="text">
      <style:text-properties fo:font-size="10pt" fo:language="en" fo:country="GB" style:font-size-asian="10pt"/>
    </style:style>
    <style:style style:name="T29" style:family="text">
      <style:text-properties fo:language="en" fo:country="GB" style:font-weight-complex="bold"/>
    </style:style>
    <style:style style:name="T30" style:family="text">
      <style:text-properties fo:language="en" fo:country="GB" style:text-underline-style="solid" style:text-underline-width="auto" style:text-underline-color="font-color"/>
    </style:style>
    <style:style style:name="T31" style:family="text">
      <style:text-properties fo:language="en" fo:country="GB" style:font-size-complex="11pt"/>
    </style:style>
    <style:style style:name="T32" style:family="text">
      <style:text-properties fo:language="en" fo:country="GB" fo:font-weight="bold" style:font-weight-asian="bold" style:font-size-complex="11pt" style:font-weight-complex="bold"/>
    </style:style>
    <style:style style:name="T33" style:family="text">
      <style:text-properties fo:language="en" fo:country="GB" style:font-size-complex="11pt" style:font-weight-complex="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8f8f8" style:background-transparency="0%" draw:fill="solid" draw:fill-color="#f8f8f8" draw:opacity="100%" fo:padding-left="0.1in" fo:padding-right="0.1in" fo:padding-top="0.05in" fo:padding-bottom="0.05in" fo:border="0.06pt solid #000000" style:shadow="#808080 0.0244in 0.0244in" draw:shadow-opacity="100%"/>
    </style:style>
    <style:style style:name="fr2"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2f2f2" style:background-transparency="0%" draw:fill="solid" draw:fill-color="#f2f2f2" draw:opacity="100%" fo:padding-left="0.1in" fo:padding-right="0.1in" fo:padding-top="0.05in" fo:padding-bottom="0.05in" fo:border="0.06pt solid #000000"/>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in" svg:stroke-color="#000000" draw:stroke-linejoin="miter" svg:stroke-linecap="butt" draw:fill="solid" draw:fill-color="#f8f8f8" draw:textarea-vertical-align="top" draw:auto-grow-height="false" fo:min-height="3.4in" fo:min-width="4.4252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text:anchor-type="as-char" draw:z-index="0" draw:style-name="gr1" draw:text-style-name="P3" svg:width="5.3803in" svg:height="1.7504in"><draw:image xlink:href="Pictures/100000010000076700000269044D798A.png" xlink:type="simple" xlink:show="embed" xlink:actuate="onLoad" draw:mime-type="image/png"><text:p/></draw:image></draw:frame></text:p>
      <text:p text:style-name="P1" loext:marker-style-name="T1"/>
      <text:p text:style-name="P1" loext:marker-style-name="T1"/>
      <text:p text:style-name="P1" loext:marker-style-name="T1"/>
      <text:p text:style-name="P2" loext:marker-style-name="T2"><text:span text:style-name="T2">Using Audacity for <text:line-break/>Audio-Text Synchronization</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3"><draw:frame text:anchor-type="as-char" draw:z-index="1" draw:name="Picture 28" draw:style-name="gr1" draw:text-style-name="P3" svg:width="0.6858in" svg:height="0.7594in"><draw:image xlink:href="Pictures/10000000000000600000006CCBDB454E.png" xlink:type="simple" xlink:show="embed" xlink:actuate="onLoad" draw:mime-type="image/png"><text:p/></draw:image></draw:frame></text:p>
      <text:p text:style-name="P4" loext:marker-style-name="T3"/>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Reading App Builder: Using Audacity for </text:span><text:span text:style-name="T5"/></text:p>
      <text:p text:style-name="P2" loext:marker-style-name="T5"><text:span text:style-name="T5">Audio-Text Synchronization</text:span><text:span text:style-name="T5"/></text:p>
      <text:p text:style-name="P7" loext:marker-style-name="T4"/>
      <text:p text:style-name="P2" loext:marker-style-name="T4"><text:span text:style-name="T4">© 2017, SIL International</text:span><text:span text:style-name="T4"/></text:p>
      <text:p text:style-name="P7" loext:marker-style-name="T4"/>
      <text:p text:style-name="P2" loext:marker-style-name="T6"><text:span text:style-name="T6">Last updated: 5 December 2017</text:span><text:span text:style-name="T6"/></text:p>
      <text:p text:style-name="P7" loext:marker-style-name="T4"/>
      <text:p text:style-name="P7" loext:marker-style-name="T4"/>
      <text:p text:style-name="P7" loext:marker-style-name="T4"><text:bookmark text:name="_GoBack"/></text:p>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 loext:marker-style-name="T4"><text:a xlink:type="simple" xlink:href="http://software.sil.org/readingappbuilder/resources/" text:style-name="Internet_20_link" text:visited-style-name="Visited_20_Internet_20_Link"><text:span text:style-name="Internet_20_link"><text:span text:style-name="T4">http://software.sil.org/readingappbuilder/resources/</text:span></text:span></text:a><text:span text:style-name="T4"> <text:s text:c="2"/></text:span></text:p>
      <text:p text:style-name="P7" loext:marker-style-name="T4"/>
      <text:p text:style-name="P2" loext:marker-style-name="T4"><text:span text:style-name="T4">and on the Help menu of Reading App Builder.</text:span><text:span text:style-name="T4"/></text:p>
      <text:p text:style-name="P6" loext:marker-style-name="T4"/>
      <text:p text:style-name="P8" loext:marker-style-name="T7"><text:span text:style-name="T8">Contents</text:span><text:span text:style-name="T7"/></text:p>
      <text:p text:style-name="P9"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500235124"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9"><text:a xlink:type="simple" xlink:href="#_Toc500235125" text:style-name="Index_20_Link" text:visited-style-name="Index_20_Link"><text:span text:style-name="T4">2.</text:span><text:span text:style-name="T9"><text:tab/></text:span><text:span text:style-name="T4">Getting Started</text:span><text:span text:style-name="T10"><text:tab/>7</text:span></text:a></text:p>
          <text:p text:style-name="Contents_20_2" loext:marker-style-name="T11"><text:a xlink:type="simple" xlink:href="#_Toc500235126" text:style-name="Index_20_Link" text:visited-style-name="Index_20_Link">2.1.<text:span text:style-name="T11"><text:tab/></text:span>Phrase Lists<text:span text:style-name="T10"><text:tab/>7</text:span></text:a></text:p>
          <text:p text:style-name="Contents_20_2" loext:marker-style-name="T11"><text:a xlink:type="simple" xlink:href="#_Toc500235127" text:style-name="Index_20_Link" text:visited-style-name="Index_20_Link">2.2.<text:span text:style-name="T11"><text:tab/></text:span>Installing Audacity<text:span text:style-name="T10"><text:tab/>9</text:span></text:a></text:p>
          <text:p text:style-name="Contents_20_1" loext:marker-style-name="T9"><text:a xlink:type="simple" xlink:href="#_Toc500235128" text:style-name="Index_20_Link" text:visited-style-name="Index_20_Link"><text:span text:style-name="T4">3.</text:span><text:span text:style-name="T9"><text:tab/></text:span><text:span text:style-name="T4">Producing Timing Files</text:span><text:span text:style-name="T10"><text:tab/>9</text:span></text:a></text:p>
          <text:p text:style-name="Contents_20_1" loext:marker-style-name="T9"><text:a xlink:type="simple" xlink:href="#_Toc500235129" text:style-name="Index_20_Link" text:visited-style-name="Index_20_Link"><text:span text:style-name="T4">4.</text:span><text:span text:style-name="T9"><text:tab/></text:span><text:span text:style-name="T4">Timing Labels Assistant</text:span><text:span text:style-name="T10"><text:tab/>14</text:span></text:a></text:p>
          <text:p text:style-name="Contents_20_1" loext:marker-style-name="T9"><text:a xlink:type="simple" xlink:href="#_Toc500235130" text:style-name="Index_20_Link" text:visited-style-name="Index_20_Link"><text:span text:style-name="T4">5.</text:span><text:span text:style-name="T9"><text:tab/></text:span><text:span text:style-name="T4">Usability Tips</text:span><text:span text:style-name="T10"><text:tab/>15</text:span></text:a></text:p>
          <text:p text:style-name="Contents_20_2" loext:marker-style-name="T11"><text:a xlink:type="simple" xlink:href="#_Toc500235131" text:style-name="Index_20_Link" text:visited-style-name="Index_20_Link"><text:span text:style-name="T4">5.1.</text:span><text:span text:style-name="T11"><text:tab/></text:span><text:span text:style-name="T4">Tip #1: Change the keyboard binding for the spacebar</text:span><text:span text:style-name="T10"><text:tab/>15</text:span></text:a></text:p>
          <text:p text:style-name="Contents_20_2" loext:marker-style-name="T11"><text:a xlink:type="simple" xlink:href="#_Toc500235132" text:style-name="Index_20_Link" text:visited-style-name="Index_20_Link"><text:span text:style-name="T4">5.2.</text:span><text:span text:style-name="T11"><text:tab/></text:span><text:span text:style-name="T4">Tip #2: Change the keyboard binding for adding a label</text:span><text:span text:style-name="T10"><text:tab/>16</text:span></text:a></text:p>
          <text:p text:style-name="Contents_20_1" loext:marker-style-name="T9"><text:a xlink:type="simple" xlink:href="#_Toc500235133" text:style-name="Index_20_Link" text:visited-style-name="Index_20_Link"><text:span text:style-name="T4">6.</text:span><text:span text:style-name="T9"><text:tab/></text:span><text:span text:style-name="T4">FAQ</text:span><text:span text:style-name="T10"><text:tab/>19</text:span></text:a></text:p>
          <text:p text:style-name="Contents_20_2" loext:marker-style-name="T11"><text:a xlink:type="simple" xlink:href="#_Toc500235134" text:style-name="Index_20_Link" text:visited-style-name="Index_20_Link"><text:span text:style-name="T4">6.1.</text:span><text:span text:style-name="T11"><text:tab/></text:span><text:span text:style-name="T4">How can I change the punctuation characters which are recognised as ‘end of phrase’ marks?</text:span><text:span text:style-name="T10"><text:tab/>19</text:span></text:a></text:p>
          <text:p text:style-name="Contents_20_2" loext:marker-style-name="T11"><text:a xlink:type="simple" xlink:href="#_Toc500235135" text:style-name="Index_20_Link" text:visited-style-name="Index_20_Link"><text:span text:style-name="T4">6.2.</text:span><text:span text:style-name="T11"><text:tab/></text:span><text:span text:style-name="T4">How can I get it to highlight section headings?</text:span><text:span text:style-name="T10"><text:tab/>19</text:span></text:a></text:p>
          <text:p text:style-name="Contents_20_2" loext:marker-style-name="T11"><text:a xlink:type="simple" xlink:href="#_Toc500235136" text:style-name="Index_20_Link" text:visited-style-name="Index_20_Link"><text:span text:style-name="T4">6.3.</text:span><text:span text:style-name="T11"><text:tab/></text:span><text:span text:style-name="T4">There are parts of the audio where I don’t want any text highlighted. How can I turn off the highlighting for a few moments?</text:span><text:span text:style-name="T10"><text:tab/>20</text:span></text:a></text:p>
          <text:p text:style-name="Contents_20_2" loext:marker-style-name="T11"><text:a xlink:type="simple" xlink:href="#_Toc500235137" text:style-name="Index_20_Link" text:visited-style-name="Index_20_Link"><text:span text:style-name="T4">6.4.</text:span><text:span text:style-name="T11"><text:tab/></text:span><text:span text:style-name="T4">I’d like to give someone else the task of creating timing files. Is there any way of them testing these without needing to know how to build the app?</text:span><text:span text:style-name="T10"><text:tab/>20</text:span></text:a></text:p>
          <text:p text:style-name="Contents_20_1" loext:marker-style-name="T9"><text:a xlink:type="simple" xlink:href="#_Toc500235138" text:style-name="Index_20_Link" text:visited-style-name="Index_20_Link"><text:span text:style-name="T4">7.</text:span><text:span text:style-name="T9"><text:tab/></text:span><text:span text:style-name="T4">Appendix – How to Install Audacity</text:span><text:span text:style-name="T10"><text:tab/>22</text:span></text:a></text:p>
        </text:index-body>
      </text:table-of-content>
      <text:p text:style-name="P10" loext:marker-style-name="T12"/>
      <text:p text:style-name="P11" loext:marker-style-name="T12"/>
      <text:list xml:id="list3036312241" text:style-name="WWNum13">
        <text:list-item>
          <text:h text:style-name="P12" text:outline-level="1" loext:marker-style-name="T4"><text:bookmark-start text:name="_Toc500235124"/><text:span text:style-name="T4">Introduction</text:span><text:bookmark-end text:name="_Toc500235124"/><text:span text:style-name="T4"/></text:h>
        </text:list-item>
      </text:list>
      <text:p text:style-name="P6" loext:marker-style-name="T4"/>
      <text:p text:style-name="Standard" loext:marker-style-name="T4"><text:span text:style-name="T4">To add audio-text synchronization to apps built with Reading App Builder, you need to create a </text:span><text:span text:style-name="T13">timing file</text:span><text:span text:style-name="T4"> to go alongside each audio MP3 file. The timing files provide the information the app needs to highlight phrases in the text as the audio is playing. </text:span></text:p>
      <text:p text:style-name="P6" loext:marker-style-name="T4"/>
      <text:p text:style-name="Standard" loext:marker-style-name="T4"><text:span text:style-name="T4">You can choose between two different methods to create the timing files:</text:span><text:span text:style-name="T4"/></text:p>
      <text:list text:style-name="WWNum23">
        <text:list-item>
          <text:p text:style-name="P13" loext:marker-style-name="T4"><text:span text:style-name="T13">Audacity</text:span><text:span text:style-name="T4">: listen to an audio file in the Audacity audio editor and lay down a labels track, placing a label at the start of each phrase.</text:span></text:p>
        </text:list-item>
        <text:list-item>
          <text:p text:style-name="P13" loext:marker-style-name="T4"><text:span text:style-name="T13">aeneas</text:span><text:span text:style-name="T4">: an automated method of synchronizing text and audio.</text:span></text:p>
        </text:list-item>
      </text:list>
      <text:p text:style-name="P14" loext:marker-style-name="T4"/>
      <text:p text:style-name="Standard" loext:marker-style-name="T4"><text:span text:style-name="T4">This document takes you through the first of these methods: using Audacity to create the timing files. Instructions on the other method can be found in the user manual </text:span><text:span text:style-name="T14">Using aeneas for Audio-Text Synchronization</text:span><text:span text:style-name="T4">.</text:span></text:p>
      <text:p text:style-name="P15" loext:marker-style-name="T4"/>
      <text:p text:style-name="P16" loext:marker-style-name="T4"><text:span text:style-name="T13">PLEASE NOTE</text:span><text:span text:style-name="T4">: <text:line-break/>Many users of Reading App Builder are finding that aeneas is providing very accurate synchronization results, so we do recommend you try it out.</text:span></text:p>
      <text:p text:style-name="P17" loext:marker-style-name="T4"/>
      <text:p text:style-name="P17" loext:marker-style-name="T4"/>
      <text:p text:style-name="P18" loext:marker-style-name="T15"><text:span text:style-name="T15">One timing file for each audio file</text:span><text:span text:style-name="T15"/></text:p>
      <text:p text:style-name="Standard" loext:marker-style-name="T12"><text:span text:style-name="T12">To synchronize audio and text in your app, you will need:</text:span><text:span text:style-name="T12"/></text:p>
      <text:list text:style-name="WWNum26">
        <text:list-item>
          <text:p text:style-name="P19" loext:marker-style-name="T12"><text:span text:style-name="T12">one MP3 audio file and one timing file per chapter, or</text:span><text:span text:style-name="T12"/></text:p>
        </text:list-item>
        <text:list-item>
          <text:p text:style-name="P20" loext:marker-style-name="T12"><text:span text:style-name="T12">one MP3 audio file and one timing file per picture story book.</text:span><text:span text:style-name="T12"/></text:p>
        </text:list-item>
      </text:list>
      <text:p text:style-name="P21" loext:marker-style-name="T12"><text:span text:style-name="T12">For example, if you have a book ‘History of Mali’ with 20 chapters, you will need 20 audio files and 20 timing files. If you have a picture story book with 8 pages, you need a single audio file which covers all 8 pages together with a single timing file.</text:span><text:span text:style-name="T12"/></text:p>
      <text:p text:style-name="P22" loext:marker-style-name="T15"><text:span text:style-name="T4">Example: if you have an audio file for ‘History of Mali’ chapter 1, History_Mali_01.mp3, you need to create a corresponding timing file, e.g. History_Mali_01.txt.</text:span><text:span text:style-name="T15"/></text:p>
      <text:p text:style-name="P21" loext:marker-style-name="T12"><text:span text:style-name="T12">Note: If you have several audio files per chapter or several chapters in one audio file, you will need to concatenate or split your files to create files of one chapter each before creating the timing files. This could be done in Audacity.</text:span><text:span text:style-name="T12"/></text:p>
      <text:p text:style-name="P15" loext:marker-style-name="T4"/>
      <text:p text:style-name="P23" loext:marker-style-name="T15"><text:span text:style-name="T15">Timing files</text:span><text:span text:style-name="T15"/></text:p>
      <text:p text:style-name="P21" loext:marker-style-name="T4"><text:span text:style-name="T16">A timing file for a single chapter</text:span><text:span text:style-name="T4"> will look like this, with a line for the timing of each phrase to be highlighted:</text:span></text:p>
      <text:p text:style-name="P24" loext:marker-style-name="T4"><draw:custom-shape text:anchor-type="as-char" draw:z-index="2" draw:style-name="gr2" draw:text-style-name="P25" svg:width="4.6252in" svg:height="3.5004in"><text:p text:style-name="Frame_20_contents" loext:marker-style-name="T17"><text:span text:style-name="T17">8.252945<text:tab/><text:tab/>8.252945<text:tab/><text:tab/>a</text:span><text:span text:style-name="T17"/></text:p><text:p text:style-name="Frame_20_contents" loext:marker-style-name="T17"><text:span text:style-name="T17">16.401422<text:tab/><text:tab/>16.401422<text:tab/><text:tab/>b</text:span><text:span text:style-name="T17"/></text:p><text:p text:style-name="Frame_20_contents" loext:marker-style-name="T17"><text:span text:style-name="T17">27.235258<text:tab/><text:tab/>27.235258<text:tab/><text:tab/>c</text:span><text:span text:style-name="T17"/></text:p><text:p text:style-name="Frame_20_contents" loext:marker-style-name="T17"><text:span text:style-name="T17">33.809408<text:tab/><text:tab/>33.809408<text:tab/><text:tab/>d</text:span><text:span text:style-name="T17"/></text:p><text:p text:style-name="Frame_20_contents" loext:marker-style-name="T17"><text:span text:style-name="T17">66.545898<text:tab/><text:tab/>66.545898<text:tab/><text:tab/>e</text:span><text:span text:style-name="T17"/></text:p><text:p text:style-name="Frame_20_contents" loext:marker-style-name="T17"><text:span text:style-name="T17">74.952265<text:tab/><text:tab/>74.952265<text:tab/><text:tab/>f</text:span><text:span text:style-name="T17"/></text:p><text:p text:style-name="Frame_20_contents" loext:marker-style-name="T17"><text:span text:style-name="T17">96.749997<text:tab/><text:tab/>96.749997<text:tab/><text:tab/>g</text:span><text:span text:style-name="T17"/></text:p><text:p text:style-name="Frame_20_contents" loext:marker-style-name="T17"><text:span text:style-name="T17">111.571459<text:tab/>111.571459<text:tab/>h</text:span><text:span text:style-name="T17"/></text:p><text:p text:style-name="Frame_20_contents" loext:marker-style-name="T17"><text:span text:style-name="T17">127.398309<text:tab/>127.398309<text:tab/>i</text:span><text:span text:style-name="T17"/></text:p><text:p text:style-name="Frame_20_contents" loext:marker-style-name="T17"><text:span text:style-name="T17">130.636807<text:tab/>130.636807<text:tab/>j</text:span><text:span text:style-name="T17"/></text:p><text:p text:style-name="Frame_20_contents" loext:marker-style-name="T17"><text:span text:style-name="T17">149.545453<text:tab/>149.545453<text:tab/>k</text:span><text:span text:style-name="T17"/></text:p><text:p text:style-name="Frame_20_contents" loext:marker-style-name="T17"><text:span text:style-name="T17">157.938255<text:tab/>157.938255<text:tab/>l</text:span><text:span text:style-name="T17"/></text:p><text:p text:style-name="Frame_20_contents" loext:marker-style-name="T17"><text:span text:style-name="T17">172.479752<text:tab/>172.479752<text:tab/>m</text:span><text:span text:style-name="T17"/></text:p><text:p text:style-name="Frame_20_contents" loext:marker-style-name="T17"><text:span text:style-name="T17">190.809003<text:tab/>190.809003<text:tab/>n</text:span><text:span text:style-name="T17"/></text:p><text:p text:style-name="Frame_20_contents" loext:marker-style-name="T17"><text:span text:style-name="T17">206.453448<text:tab/>206.453448<text:tab/>o</text:span><text:span text:style-name="T17"/></text:p><text:p text:style-name="Frame_20_contents" loext:marker-style-name="T17"><text:span text:style-name="T17">217.292729<text:tab/>217.292729<text:tab/>p</text:span><text:span text:style-name="T17"/></text:p><text:p text:style-name="Frame_20_contents" loext:marker-style-name="T17"><text:span text:style-name="T17">229.985550<text:tab/>229.985550<text:tab/>q</text:span></text:p><draw:enhanced-geometry svg:viewBox="0 0 21600 21600" draw:type="mso-spt202" draw:enhanced-path="M 0 0 L 21600 0 21600 21600 0 21600 0 0 Z N"/></draw:custom-shape></text:p>
      <text:p text:style-name="P15" loext:marker-style-name="T4"/>
      <text:p text:style-name="P21" loext:marker-style-name="T4"><text:span text:style-name="T4">The first and second columns indicate the time in seconds. The third column contains the phrase label (a-z). </text:span><text:span text:style-name="T4"/></text:p>
      <text:p text:style-name="P21" loext:marker-style-name="T4"><text:span text:style-name="T4">For a longer chapter, you will soon run out of letters of the alphabet. When you get to “z”, the next label you need to use is “aa”, then “ab”, “ac”, “ad”, etc. When you get to “az”, the next label you need to use is “ba”, then “bb”, “bc”, “bd”, etc. In other words, this follows a similar naming convention to the column names in a spreadsheet.</text:span><text:span text:style-name="T4"/></text:p>
      <text:p text:style-name="P26" loext:marker-style-name="T4"><text:span text:style-name="T4">Phrases can be between punctuation marks, e.g. up to the next “.” or “,”. You can define the set of punctuation characters that mark the end of a phrase. Individual poetic lines can also be highlighted one by one, for example in a psalm or a song.</text:span><text:span text:style-name="T4"/></text:p>
      <text:p text:style-name="P14" loext:marker-style-name="T4"/>
      <text:p text:style-name="P26" loext:marker-style-name="T4"><text:span text:style-name="T16">A timing file for a picture story book</text:span><text:span text:style-name="T4"> will look like this, with the number representing the page of the book and the letter representing the phrase within that page:</text:span></text:p>
      <text:p text:style-name="P27" loext:marker-style-name="T4"><draw:frame draw:style-name="fr1" draw:name="Frame2" text:anchor-type="as-char" svg:width="4.6252in" svg:height="2.5937in"><draw:text-box><text:p text:style-name="Frame_20_contents" loext:marker-style-name="T17"><text:span text:style-name="T17">0.000<text:tab/>2.920<text:tab/>1a</text:span><text:span text:style-name="T17"/></text:p><text:p text:style-name="Frame_20_contents" loext:marker-style-name="T17"><text:span text:style-name="T17">2.920<text:tab/>5.840<text:tab/>1b</text:span><text:span text:style-name="T17"/></text:p><text:p text:style-name="Frame_20_contents" loext:marker-style-name="T17"><text:span text:style-name="T17">5.840<text:tab/>10.080<text:tab/>1c</text:span><text:span text:style-name="T17"/></text:p><text:p text:style-name="Frame_20_contents" loext:marker-style-name="T17"><text:span text:style-name="T17">10.080<text:tab/>13.560<text:tab/>2a</text:span><text:span text:style-name="T17"/></text:p><text:p text:style-name="Frame_20_contents" loext:marker-style-name="T17"><text:span text:style-name="T17">13.560<text:tab/>15.260<text:tab/>2b</text:span><text:span text:style-name="T17"/></text:p><text:p text:style-name="Frame_20_contents" loext:marker-style-name="T17"><text:span text:style-name="T17">15.260<text:tab/>17.240<text:tab/>2c</text:span><text:span text:style-name="T17"/></text:p><text:p text:style-name="Frame_20_contents" loext:marker-style-name="T17"><text:span text:style-name="T17">17.240<text:tab/>19.020<text:tab/>2d</text:span><text:span text:style-name="T17"/></text:p><text:p text:style-name="Frame_20_contents" loext:marker-style-name="T17"><text:span text:style-name="T17">19.020<text:tab/>21.540<text:tab/>2e</text:span><text:span text:style-name="T17"/></text:p><text:p text:style-name="Frame_20_contents" loext:marker-style-name="T17"><text:span text:style-name="T17">21.540<text:tab/>24.560<text:tab/>2f</text:span><text:span text:style-name="T17"/></text:p><text:p text:style-name="Frame_20_contents" loext:marker-style-name="T17"><text:span text:style-name="T17">24.560<text:tab/>27.660<text:tab/>3a</text:span><text:span text:style-name="T17"/></text:p><text:p text:style-name="Frame_20_contents" loext:marker-style-name="T17"><text:span text:style-name="T17">27.660<text:tab/>30.060<text:tab/>3b</text:span><text:span text:style-name="T17"/></text:p><text:p text:style-name="Frame_20_contents" loext:marker-style-name="T17"><text:span text:style-name="T17">30.060<text:tab/>32.620<text:tab/>3c</text:span><text:span text:style-name="T17"/></text:p><text:p text:style-name="Frame_20_contents" loext:marker-style-name="T17"><text:span text:style-name="T17">32.620<text:tab/>36.140<text:tab/>3d</text:span></text:p></draw:text-box></draw:frame></text:p>
      <text:p text:style-name="P6" loext:marker-style-name="T4"/>
      <text:p text:style-name="P6" loext:marker-style-name="T4"/>
      <text:p text:style-name="Standard" loext:marker-style-name="T4"><text:span text:style-name="T16">Word level highlighting</text:span><text:span text:style-name="T4">: </text:span></text:p>
      <text:p text:style-name="Standard" loext:marker-style-name="T4"><text:span text:style-name="T4">If you want to split a phrase after one or more words, you can use word-level highlighting for that phrase. For this, the labels in the timing files should contain an underscore and then the index of the word, e.g.</text:span><text:span text:style-name="T4"/></text:p>
      <text:p text:style-name="P6" loext:marker-style-name="T4"/>
      <text:p text:style-name="P28" loext:marker-style-name="T4"><text:span text:style-name="T16">a_4</text:span><text:span text:style-name="T4"> <text:tab/>starts at the 4th word of the first phrase (a)<text:line-break/></text:span><text:span text:style-name="T16">b_5</text:span><text:span text:style-name="T4"> <text:tab/>starts at the 5th word of the second phrase (b)<text:line-break/></text:span><text:span text:style-name="T16">b_9</text:span><text:span text:style-name="T4"><text:tab/>starts at the 9th word of the second phrase (b)</text:span></text:p>
      <text:p text:style-name="P6" loext:marker-style-name="T4"/>
      <text:p text:style-name="P26" loext:marker-style-name="T4"><text:span text:style-name="T4">A timing file with word-level phrase breaks might look like the following example:</text:span><text:span text:style-name="T4"/></text:p>
      <text:p text:style-name="P6" loext:marker-style-name="T4"/>
      <text:p text:style-name="P2" loext:marker-style-name="T4"><draw:frame draw:style-name="fr1" draw:name="Frame3" text:anchor-type="as-char" svg:width="4.6252in" svg:height="3.7535in"><draw:text-box><text:p text:style-name="P29" loext:marker-style-name="T17"><text:span text:style-name="T17">3.188682<text:tab/>3.188682<text:tab/>a</text:span><text:span text:style-name="T17"/></text:p><text:p text:style-name="P29" loext:marker-style-name="T17"><text:span text:style-name="T17">7.415084<text:tab/>7.415084<text:tab/>a_4</text:span><text:span text:style-name="T17"/></text:p><text:p text:style-name="P29" loext:marker-style-name="T17"><text:span text:style-name="T17">12.934091<text:tab/>12.934091<text:tab/>a_11</text:span><text:span text:style-name="T17"/></text:p><text:p text:style-name="P29" loext:marker-style-name="T17"><text:span text:style-name="T17">16.746603<text:tab/>16.746603<text:tab/>b</text:span><text:span text:style-name="T17"/></text:p><text:p text:style-name="P29" loext:marker-style-name="T17"><text:span text:style-name="T17">17.356305<text:tab/>17.356305<text:tab/>b_5</text:span><text:span text:style-name="T17"/></text:p><text:p text:style-name="P29" loext:marker-style-name="T17"><text:span text:style-name="T17">18.853311<text:tab/>18.853311<text:tab/>b_9</text:span><text:span text:style-name="T17"/></text:p><text:p text:style-name="P29" loext:marker-style-name="T17"><text:span text:style-name="T17">19.829615<text:tab/>19.829615<text:tab/>c</text:span><text:span text:style-name="T17"/></text:p><text:p text:style-name="P29" loext:marker-style-name="T17"><text:span text:style-name="T17">20.905796<text:tab/>20.905796<text:tab/>d</text:span><text:span text:style-name="T17"/></text:p><text:p text:style-name="P29" loext:marker-style-name="T17"><text:span text:style-name="T17">21.884018<text:tab/>21.884018<text:tab/>e</text:span><text:span text:style-name="T17"/></text:p><text:p text:style-name="P29" loext:marker-style-name="T17"><text:span text:style-name="T17">22.858863<text:tab/>22.858863<text:tab/>f</text:span><text:span text:style-name="T17"/></text:p><text:p text:style-name="P29" loext:marker-style-name="T17"><text:span text:style-name="T17">25.613723<text:tab/>25.613723<text:tab/>g</text:span><text:span text:style-name="T17"/></text:p><text:p text:style-name="P29" loext:marker-style-name="T17"><text:span text:style-name="T17">27.108508<text:tab/>27.108508<text:tab/>h</text:span><text:span text:style-name="T17"/></text:p><text:p text:style-name="P29" loext:marker-style-name="T17"><text:span text:style-name="T17">28.839213<text:tab/>28.839213<text:tab/>i_6</text:span><text:span text:style-name="T17"/></text:p><text:p text:style-name="P29" loext:marker-style-name="T17"><text:span text:style-name="T17">29.158316<text:tab/>29.158316<text:tab/>i_10</text:span><text:span text:style-name="T17"/></text:p><text:p text:style-name="P29" loext:marker-style-name="T17"><text:span text:style-name="T17">30.192832<text:tab/>30.192832<text:tab/>j</text:span><text:span text:style-name="T17"/></text:p><text:p text:style-name="P29" loext:marker-style-name="T17"><text:span text:style-name="T17">31.388587<text:tab/>31.388587<text:tab/>k</text:span><text:span text:style-name="T17"/></text:p><text:p text:style-name="P29" loext:marker-style-name="T17"><text:span text:style-name="T17">32.683989<text:tab/>32.683989<text:tab/>l</text:span><text:span text:style-name="T17"/></text:p><text:p text:style-name="P29" loext:marker-style-name="T17"><text:span text:style-name="T17">36.440027<text:tab/>36.440027<text:tab/>m</text:span><text:span text:style-name="T17"/></text:p><text:p text:style-name="P29" loext:marker-style-name="T17"><text:span text:style-name="T17">38.297624<text:tab/>38.297624<text:tab/>n</text:span></text:p></draw:text-box></draw:frame></text:p>
      <text:p text:style-name="P6" loext:marker-style-name="T4"/>
      <text:p text:style-name="P6" loext:marker-style-name="T4"/>
      <text:p text:style-name="P6" loext:marker-style-name="T4"/>
      <text:list xml:id="list131447846246998" text:continue-list="list3036312241" text:style-name="WWNum13">
        <text:list-item>
          <text:h text:style-name="P12" text:outline-level="1" loext:marker-style-name="T4"><text:bookmark-start text:name="_Toc500235125"/><text:span text:style-name="T4">Getting Started</text:span><text:bookmark-end text:name="_Toc500235125"/><text:span text:style-name="T4"/></text:h>
          <text:list>
            <text:list-item>
              <text:h text:style-name="P30" text:outline-level="2"><text:bookmark-start text:name="_Toc500235126"/><text:span text:style-name="T12">Phrase Lists</text:span><text:bookmark-end text:name="_Toc500235126"/></text:h>
            </text:list-item>
          </text:list>
        </text:list-item>
      </text:list>
      <text:p text:style-name="Standard" loext:marker-style-name="T12"><text:span text:style-name="T12">To help you identify when to mark a timing break, we recommend you create </text:span><text:span text:style-name="T18">Phrase Lists</text:span><text:span text:style-name="T12">. These will arrange the phrases line by line for you.</text:span></text:p>
      <text:p text:style-name="P10" loext:marker-style-name="T12"/>
      <text:p text:style-name="Standard" loext:marker-style-name="T12"><text:span text:style-name="T12">To create phrase lists for each of the chapters in your app:</text:span><text:span text:style-name="T12"/></text:p>
      <text:list text:style-name="WWNum15">
        <text:list-item>
          <text:p text:style-name="P31" loext:marker-style-name="T12"><text:span text:style-name="T12">Launch </text:span><text:span text:style-name="T19">Reading App Builder</text:span><text:span text:style-name="T12">.</text:span></text:p>
        </text:list-item>
        <text:list-item>
          <text:p text:style-name="P31" loext:marker-style-name="T12"><text:span text:style-name="T12">Navigate to the </text:span><text:span text:style-name="T19">Book Collection</text:span><text:span text:style-name="T12"> page for your app.</text:span></text:p>
        </text:list-item>
        <text:list-item>
          <text:p text:style-name="P31" loext:marker-style-name="T12"><text:span text:style-name="T12">Go to the </text:span><text:span text:style-name="T19">Audio Synchronization</text:span><text:span text:style-name="T12"> tab.</text:span></text:p>
        </text:list-item>
        <text:list-item>
          <text:p text:style-name="P31" loext:marker-style-name="T12"><text:span text:style-name="T12">Click on </text:span><text:span text:style-name="T19">Create Phrase Lists</text:span><text:span text:style-name="T12"> and follow the instructions in the wizard.</text:span></text:p>
        </text:list-item>
      </text:list>
      <text:p text:style-name="P10" loext:marker-style-name="T12"/>
      <text:p text:style-name="Standard" loext:marker-style-name="T12"><text:span text:style-name="T12"><text:line-break/>A set of Word documents (.docx), comma-separated files (.csv) or tab-separated files will be created, one for each chapter.</text:span><text:span text:style-name="T12"/></text:p>
      <text:p text:style-name="P10" loext:marker-style-name="T12"/>
      <text:p text:style-name="Standard" loext:marker-style-name="T12"><text:span text:style-name="T12"><text:line-break/>A phrase list document for a </text:span><text:span text:style-name="T19">single chapter</text:span><text:span text:style-name="T12"> looks like the following:</text:span></text:p>
      <text:p text:style-name="P10" loext:marker-style-name="T12"/>
      <text:p text:style-name="Standard" loext:marker-style-name="T12"><draw:frame draw:style-name="fr2" draw:name="Frame4" text:anchor-type="as-char" svg:width="5.9807in" svg:height="5.0366in"><draw:text-box><text:p text:style-name="Base_20_Style"><text:span text:style-name="T20">Chicken and Millipede 1</text:span></text:p><text:p text:style-name="Base_20_Style"/><table:table table:name="Table1" table:style-name="Table1"><table:table-column table:style-name="Table1.A"/><table:table-column table:style-name="Table1.B"/><table:table-row table:style-name="Table1.1"><table:table-cell table:style-name="Table1.A1" office:value-type="string"><text:p text:style-name="Base_20_Style">a</text:p></table:table-cell><table:table-cell table:style-name="Table1.A1" office:value-type="string"><text:p text:style-name="Base_20_Style">Chicken and Millipede were friends.</text:p></table:table-cell></table:table-row><table:table-row table:style-name="Table1.1"><table:table-cell table:style-name="Table1.A1" office:value-type="string"><text:p text:style-name="Base_20_Style">b</text:p></table:table-cell><table:table-cell table:style-name="Table1.A1" office:value-type="string"><text:p text:style-name="Base_20_Style">But they were always competing with each other.</text:p></table:table-cell></table:table-row><table:table-row table:style-name="Table1.1"><table:table-cell table:style-name="Table1.A1" office:value-type="string"><text:p text:style-name="Base_20_Style">c</text:p></table:table-cell><table:table-cell table:style-name="Table1.A1" office:value-type="string"><text:p text:style-name="Base_20_Style">One day they decided to play football to see who the best player was.</text:p></table:table-cell></table:table-row><table:table-row table:style-name="Table1.1"><table:table-cell table:style-name="Table1.A1" office:value-type="string"><text:p text:style-name="Base_20_Style">d</text:p></table:table-cell><table:table-cell table:style-name="Table1.A1" office:value-type="string"><text:p text:style-name="Base_20_Style">They went to the football field and started their game.</text:p></table:table-cell></table:table-row><table:table-row table:style-name="Table1.1"><table:table-cell table:style-name="Table1.A1" office:value-type="string"><text:p text:style-name="Base_20_Style">e</text:p></table:table-cell><table:table-cell table:style-name="Table1.A1" office:value-type="string"><text:p text:style-name="Base_20_Style">Chicken was fast,</text:p></table:table-cell></table:table-row><table:table-row table:style-name="Table1.1"><table:table-cell table:style-name="Table1.A1" office:value-type="string"><text:p text:style-name="Base_20_Style">f</text:p></table:table-cell><table:table-cell table:style-name="Table1.A1" office:value-type="string"><text:p text:style-name="Base_20_Style">but Millipede was faster.</text:p></table:table-cell></table:table-row><table:table-row table:style-name="Table1.1"><table:table-cell table:style-name="Table1.A1" office:value-type="string"><text:p text:style-name="Base_20_Style">g</text:p></table:table-cell><table:table-cell table:style-name="Table1.A1" office:value-type="string"><text:p text:style-name="Base_20_Style">Chicken kicked far,</text:p></table:table-cell></table:table-row><table:table-row table:style-name="Table1.1"><table:table-cell table:style-name="Table1.A1" office:value-type="string"><text:p text:style-name="Base_20_Style">h</text:p></table:table-cell><table:table-cell table:style-name="Table1.A1" office:value-type="string"><text:p text:style-name="Base_20_Style">but Millipede kicked further.</text:p></table:table-cell></table:table-row><table:table-row table:style-name="Table1.1"><table:table-cell table:style-name="Table1.A1" office:value-type="string"><text:p text:style-name="Base_20_Style">i</text:p></table:table-cell><table:table-cell table:style-name="Table1.A1" office:value-type="string"><text:p text:style-name="Base_20_Style">Chicken started to feel grumpy.</text:p></table:table-cell></table:table-row><table:table-row table:style-name="Table1.1"><table:table-cell table:style-name="Table1.A1" office:value-type="string"><text:p text:style-name="Base_20_Style">j</text:p></table:table-cell><table:table-cell table:style-name="Table1.A1" office:value-type="string"><text:p text:style-name="Base_20_Style">They decided to play a penalty shoot-out.</text:p></table:table-cell></table:table-row><table:table-row table:style-name="Table1.1"><table:table-cell table:style-name="Table1.A1" office:value-type="string"><text:p text:style-name="Base_20_Style">k</text:p></table:table-cell><table:table-cell table:style-name="Table1.A1" office:value-type="string"><text:p text:style-name="Base_20_Style">First Millipede was goal keeper.</text:p></table:table-cell></table:table-row><table:table-row table:style-name="Table1.1"><table:table-cell table:style-name="Table1.A1" office:value-type="string"><text:p text:style-name="Base_20_Style">l</text:p></table:table-cell><table:table-cell table:style-name="Table1.A1" office:value-type="string"><text:p text:style-name="Base_20_Style">Chicken scored only one goal.</text:p></table:table-cell></table:table-row></table:table><text:p text:style-name="Frame_20_contents"/><text:p text:style-name="Frame_20_contents"/></draw:text-box></draw:frame></text:p>
      <text:p text:style-name="P10" loext:marker-style-name="T12"/>
      <text:p text:style-name="Standard" loext:marker-style-name="T4"><text:span text:style-name="T4">Each row in the phrase list document represents a separate timing phrase which will need to be marked.</text:span><text:span text:style-name="T4"/></text:p>
      <text:p text:style-name="P6" loext:marker-style-name="T4"/>
      <text:p text:style-name="Standard" loext:marker-style-name="T4"><text:span text:style-name="T4">You can define which characters are recognised as phrase ending characters in the </text:span><text:span text:style-name="T16">Features</text:span><text:span text:style-name="T4"> </text:span><text:span text:style-name="T21"></text:span><text:span text:style-name="T4"> </text:span><text:span text:style-name="T16">Audio</text:span><text:span text:style-name="T4"> page of Reading App Builder. By default, it is: a full stop/period (.), a question mark (?), an exclamation mark (!), a colon (:) and a comma (,).</text:span></text:p>
      <text:p text:style-name="P10" loext:marker-style-name="T12"/>
      <text:p text:style-name="P10" loext:marker-style-name="T12"/>
      <text:p text:style-name="P32" loext:marker-style-name="T12"><text:span text:style-name="T12">A phrase list document for a </text:span><text:span text:style-name="T19">picture story book</text:span><text:span text:style-name="T12"> looks like the following:</text:span></text:p>
      <text:p text:style-name="P33" loext:marker-style-name="T12"/>
      <text:p text:style-name="P2"><draw:frame draw:style-name="fr2" draw:name="Frame5" text:anchor-type="as-char" svg:width="5.2909in" svg:height="5.4429in"><draw:text-box><text:p text:style-name="Base_20_Style" loext:marker-style-name="T22"><text:span text:style-name="T23">Chicken and Millipede</text:span><text:span text:style-name="T23"/></text:p><text:p text:style-name="P34" loext:marker-style-name="T24"/><table:table table:name="Table2" table:style-name="Table2"><table:table-column table:style-name="Table2.A"/><table:table-column table:style-name="Table2.B"/><table:table-row table:style-name="Table2.1"><table:table-cell table:style-name="Table2.A1" office:value-type="string"><text:p text:style-name="Base_20_Style" loext:marker-style-name="T24"><text:span text:style-name="T24">1</text:span><text:span text:style-name="T24"/></text:p></table:table-cell><table:table-cell table:style-name="Table2.A1" office:value-type="string"><text:p text:style-name="Base_20_Style" loext:marker-style-name="T24"><text:span text:style-name="T24">Chicken and Millipede were friends.</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But they were always competing with each other.</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One day they decided to play football to see who the best player was.</text:span><text:span text:style-name="T24"/></text:p></table:table-cell></table:table-row><table:table-row table:style-name="Table2.1"><table:table-cell table:style-name="Table2.A1" office:value-type="string"><text:p text:style-name="Base_20_Style" loext:marker-style-name="T24"><text:span text:style-name="T24">2</text:span><text:span text:style-name="T24"/></text:p></table:table-cell><table:table-cell table:style-name="Table2.A1" office:value-type="string"><text:p text:style-name="Base_20_Style" loext:marker-style-name="T24"><text:span text:style-name="T24">They went to the football field and started their game.</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Chicken was fast,</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but Millipede was faster.</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Chicken kicked far,</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but Millipede kicked further.</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Chicken started to feel grumpy.</text:span><text:span text:style-name="T24"/></text:p></table:table-cell></table:table-row><table:table-row table:style-name="Table2.1"><table:table-cell table:style-name="Table2.A1" office:value-type="string"><text:p text:style-name="Base_20_Style" loext:marker-style-name="T24"><text:span text:style-name="T24">3</text:span><text:span text:style-name="T24"/></text:p></table:table-cell><table:table-cell table:style-name="Table2.A1" office:value-type="string"><text:p text:style-name="Base_20_Style" loext:marker-style-name="T24"><text:span text:style-name="T24">They decided to play a penalty shoot-out.</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First Millipede was goal keeper.</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Chicken scored only one goal.</text:span><text:span text:style-name="T24"/></text:p></table:table-cell></table:table-row><table:table-row table:style-name="Table2.1"><table:table-cell table:style-name="Table2.A1" office:value-type="string"><text:p text:style-name="P34" loext:marker-style-name="T24"/></table:table-cell><table:table-cell table:style-name="Table2.A1" office:value-type="string"><text:p text:style-name="Base_20_Style" loext:marker-style-name="T24"><text:span text:style-name="T24">Then it was the chicken’s turn to defend the goal.</text:span><text:span text:style-name="T24"/></text:p></table:table-cell></table:table-row></table:table><text:p text:style-name="Frame_20_contents"/><text:p text:style-name="Frame_20_contents"/></draw:text-box></draw:frame></text:p>
      <text:p text:style-name="P6" loext:marker-style-name="T4"/>
      <text:p text:style-name="P6" loext:marker-style-name="T4"/>
      <text:p text:style-name="P6" loext:marker-style-name="T4"/>
      <text:list text:continue-list="list131447846246998" text:style-name="WWNum13">
        <text:list-item>
          <text:list>
            <text:list-item>
              <text:h text:style-name="P30" text:outline-level="2"><text:bookmark-start text:name="_Toc500235127"/><text:span text:style-name="T12">Installing</text:span> Audacity<text:bookmark-end text:name="_Toc500235127"/></text:h>
            </text:list-item>
          </text:list>
        </text:list-item>
      </text:list>
      <text:p text:style-name="P32" loext:marker-style-name="T4"><text:span text:style-name="T4">Install the </text:span><text:span text:style-name="T16">Audacity</text:span><text:span text:style-name="T4"> sound-editing program if you do not already have it. Please see </text:span><text:span text:style-name="T16">Appendix: How to install Audacity</text:span><text:span text:style-name="T4">.</text:span></text:p>
      <text:p text:style-name="P35" loext:marker-style-name="T4"/>
      <text:p text:style-name="P27"><draw:frame text:anchor-type="as-char" draw:z-index="3" draw:style-name="gr1" draw:text-style-name="P3" svg:width="1.898in" svg:height="0.7413in"><draw:image xlink:href="Pictures/10000000000000FD000000645817885E.jpg" xlink:type="simple" xlink:show="embed" xlink:actuate="onLoad" draw:mime-type="image/jpeg"><text:p/></draw:image></draw:frame></text:p>
      <text:p text:style-name="P36" loext:marker-style-name="T4"/>
      <text:list xml:id="list131449434870786" text:continue-numbering="true" text:style-name="WWNum13">
        <text:list-item>
          <text:h text:style-name="P37" text:outline-level="1" loext:marker-style-name="T4"><text:bookmark-start text:name="_Toc500235128"/><text:span text:style-name="T4">Producing Timing Files</text:span><text:bookmark-end text:name="_Toc500235128"/><text:span text:style-name="T4"/></text:h>
        </text:list-item>
      </text:list>
      <text:p text:style-name="P38" loext:marker-style-name="T4"/>
      <text:list text:style-name="WWNum5">
        <text:list-item>
          <text:p text:style-name="P39" loext:marker-style-name="T4"><text:span text:style-name="T4">Launch Audacity.</text:span><text:span text:style-name="T4"/></text:p>
        </text:list-item>
      </text:list>
      <text:p text:style-name="P38" loext:marker-style-name="T4"/>
      <text:list text:continue-numbering="true" text:style-name="WWNum5">
        <text:list-item>
          <text:p text:style-name="P39" loext:marker-style-name="T4"><text:span text:style-name="T4">Open the MP3 file using </text:span><text:span text:style-name="T16">File</text:span><text:span text:style-name="T4"> </text:span><text:span text:style-name="T21"></text:span><text:span text:style-name="T4"> </text:span><text:span text:style-name="T16">Open</text:span><text:span text:style-name="T4"> on the main menu.</text:span></text:p>
        </text:list-item>
      </text:list>
      <text:p text:style-name="P40" loext:marker-style-name="T4"/>
      <text:list text:continue-numbering="true" text:style-name="WWNum5">
        <text:list-item>
          <text:p text:style-name="P41" loext:marker-style-name="T4"><text:span text:style-name="T4">If the file is stereo with two tracks, it can be helpful to reduce it to mono for this process so it doesn’t take up so much room on your screen. Do this with </text:span><text:span text:style-name="T16">Tracks </text:span><text:span text:style-name="T21"></text:span><text:span text:style-name="T16"> Stereo Track to Mono</text:span><text:span text:style-name="T4">.</text:span></text:p>
        </text:list-item>
      </text:list>
      <text:p text:style-name="P40" loext:marker-style-name="T4"/>
      <text:list text:continue-numbering="true" text:style-name="WWNum5">
        <text:list-item>
          <text:p text:style-name="P41" loext:marker-style-name="T4"><text:span text:style-name="T4">Zoom in a couple of times so it is easier to see the gaps between the audio waveforms.</text:span><text:span text:style-name="T4"/></text:p>
        </text:list-item>
      </text:list>
      <text:p text:style-name="P6" loext:marker-style-name="T4"/>
      <text:p text:style-name="P2" loext:marker-style-name="T4"><draw:frame text:anchor-type="as-char" draw:z-index="4" draw:style-name="gr1" draw:text-style-name="P3" svg:width="5.9815in" svg:height="3.287in"><draw:image xlink:href="Pictures/100000000000037F000001ECF16FF5AB.png" xlink:type="simple" xlink:show="embed" xlink:actuate="onLoad" draw:mime-type="image/png"><text:p/></draw:image></draw:frame><text:span text:style-name="T25"><text:line-break/></text:span></text:p>
      <text:p text:style-name="P6" loext:marker-style-name="T4"/>
      <text:list text:continue-numbering="true" text:style-name="WWNum5">
        <text:list-item>
          <text:p text:style-name="P42" loext:marker-style-name="T4"><text:span text:style-name="T4">Have the Scripture text or Phrase List open to the chapter you will be listening to. </text:span><text:span text:style-name="T4"/></text:p>
        </text:list-item>
      </text:list>
      <text:p text:style-name="P35" loext:marker-style-name="T4"/>
      <text:p text:style-name="P43" loext:marker-style-name="T3"><text:span text:style-name="T3">You could display the text in a different window (i.e. have Audacity take up the left part of the screen and the Scripture text on the right, or have the screens arranged at the top and bottom of the screen), but this can be awkward since you will need to scroll the text from time to time and then click in the Audacity window to give it focus again. While you are doing this you might lose your place and miss a phrase break. What can work better is if you have a printed text in front of you or if the text is already on a smartphone or tablet. Then you can concentrate more fully on the text and avoid the complication of switching between windows.</text:span><text:span text:style-name="T3"/></text:p>
      <text:p text:style-name="P6" loext:marker-style-name="T4"/>
      <text:p text:style-name="P6" loext:marker-style-name="T4"/>
      <text:list text:continue-numbering="true" text:style-name="WWNum5">
        <text:list-item>
          <text:p text:style-name="P41" loext:marker-style-name="T4"><text:span text:style-name="T4">Move the cursor to just before the beginning of the first phrase (i.e. after any titles or chapter headings). </text:span><text:span text:style-name="T4"/></text:p>
        </text:list-item>
      </text:list>
      <text:p text:style-name="P6" loext:marker-style-name="T4"/>
      <text:list text:continue-numbering="true" text:style-name="WWNum5">
        <text:list-item>
          <text:p text:style-name="P44" loext:marker-style-name="T4"><text:span text:style-name="T4">Place the first label marker using </text:span><text:span text:style-name="T16">CTRL-B</text:span><text:span text:style-name="T4">. A label track will be created.</text:span></text:p>
        </text:list-item>
      </text:list>
      <text:p text:style-name="P35" loext:marker-style-name="T4"/>
      <text:p text:style-name="P45" loext:marker-style-name="T3"><text:span text:style-name="T3">If you are using a Mac, the shortcut to use is </text:span><text:span text:style-name="T26">Command B</text:span><text:span text:style-name="T3">.</text:span></text:p>
      <text:p text:style-name="P35" loext:marker-style-name="T4"/>
      <text:p text:style-name="P2" loext:marker-style-name="T4"><draw:frame text:anchor-type="as-char" draw:z-index="5" draw:style-name="gr1" draw:text-style-name="P3" svg:width="5.9815in" svg:height="3.5004in"><draw:image xlink:href="Pictures/100000000000037F0000020C8A93A2CF.png" xlink:type="simple" xlink:show="embed" xlink:actuate="onLoad" draw:mime-type="image/png"><text:p/></draw:image></draw:frame></text:p>
      <text:p text:style-name="P6" loext:marker-style-name="T4"/>
      <text:p text:style-name="P6" loext:marker-style-name="T4"/>
      <text:list text:continue-numbering="true" text:style-name="WWNum5">
        <text:list-item>
          <text:p text:style-name="P44" loext:marker-style-name="T4"><text:span text:style-name="T4">Type the first label, such as “a”. This indicates that “phrase ‘a’ starts here”. (Look at the phrase list document to tell you which label to use. In the case of a picture story book, the first label will be “1” rather than “a”.)</text:span><text:span text:style-name="T4"/></text:p>
        </text:list-item>
      </text:list>
      <text:p text:style-name="P46" loext:marker-style-name="T4"/>
      <text:p text:style-name="P47" loext:marker-style-name="T3"><text:span text:style-name="T3">The cursor should already be in the label, so you just need to press the “a” key after pressing CTRL+B above.</text:span><text:span text:style-name="T3"/></text:p>
      <text:p text:style-name="P48" loext:marker-style-name="T3"/>
      <text:p text:style-name="P6" loext:marker-style-name="T4"/>
      <text:list text:continue-numbering="true" text:style-name="WWNum5">
        <text:list-item>
          <text:p text:style-name="P41" loext:marker-style-name="T4"><text:span text:style-name="T4">Press ‘Play’ to start listening to the audio. As you listen, place a label at each timing break using </text:span><text:span text:style-name="T16">CTRL-M</text:span><text:span text:style-name="T4">.</text:span></text:p>
        </text:list-item>
      </text:list>
      <text:p text:style-name="P6" loext:marker-style-name="T4"/>
      <text:p text:style-name="P49" loext:marker-style-name="T3"><text:span text:style-name="T3">You don't really need to look at Audacity for this. Just follow the text closely and keep pressing CTRL-M at the phrase breaks.</text:span><text:span text:style-name="T3"/></text:p>
      <text:p text:style-name="P50" loext:marker-style-name="T27"/>
      <text:p text:style-name="P47" loext:marker-style-name="T3"><text:span text:style-name="T3">If you are using a Mac, the shortcut to use is </text:span><text:span text:style-name="T26">Command </text:span><text:span text:style-name="T3">. – that is Command and period (.) together.</text:span></text:p>
      <text:p text:style-name="P51" loext:marker-style-name="T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 loext:marker-style-name="T26"/>
          </table:table-cell>
          <table:table-cell table:style-name="Table3.A1" office:value-type="string">
            <text:p text:style-name="P53" loext:marker-style-name="T16"><text:span text:style-name="T16">Windows</text:span><text:span text:style-name="T16"/></text:p>
          </table:table-cell>
          <table:table-cell table:style-name="Table3.A1" office:value-type="string">
            <text:p text:style-name="P53" loext:marker-style-name="T16"><text:span text:style-name="T16">Mac</text:span><text:span text:style-name="T16"/></text:p>
          </table:table-cell>
        </table:table-row>
        <table:table-row table:style-name="Table3.1">
          <table:table-cell table:style-name="Table3.A2" office:value-type="string">
            <text:p text:style-name="P32" loext:marker-style-name="T4"><text:span text:style-name="T4">Add Label At Selection</text:span><text:span text:style-name="T4"/></text:p>
            <text:p text:style-name="P32" loext:marker-style-name="T3"><text:span text:style-name="T3"><text:s text:c="2"/>(at cursor position when paused)</text:span><text:span text:style-name="T3"/></text:p>
          </table:table-cell>
          <table:table-cell table:style-name="Table3.A2" office:value-type="string">
            <text:p text:style-name="P53" loext:marker-style-name="T4"><text:span text:style-name="T4">CTRL-B</text:span><text:span text:style-name="T4"/></text:p>
          </table:table-cell>
          <table:table-cell table:style-name="Table3.A2" office:value-type="string">
            <text:p text:style-name="P53" loext:marker-style-name="T4"><text:span text:style-name="T4">Command B</text:span><text:span text:style-name="T4"/></text:p>
          </table:table-cell>
        </table:table-row>
        <table:table-row table:style-name="Table3.1">
          <table:table-cell table:style-name="Table3.A2" office:value-type="string">
            <text:p text:style-name="P32" loext:marker-style-name="T4"><text:span text:style-name="T4">Add Label At Playback Position</text:span><text:span text:style-name="T4"/></text:p>
            <text:p text:style-name="P32" loext:marker-style-name="T3"><text:span text:style-name="T3"><text:s text:c="2"/>(at current position when playing audio)</text:span><text:span text:style-name="T3"/></text:p>
          </table:table-cell>
          <table:table-cell table:style-name="Table3.A2" office:value-type="string">
            <text:p text:style-name="P53" loext:marker-style-name="T3"><text:span text:style-name="T4">CTRL-M</text:span><text:span text:style-name="T3"/></text:p>
          </table:table-cell>
          <table:table-cell table:style-name="Table3.A2" office:value-type="string">
            <text:p text:style-name="P53" loext:marker-style-name="T4"><text:span text:style-name="T4">Command .</text:span><text:span text:style-name="T4"/></text:p>
          </table:table-cell>
        </table:table-row>
      </table:table>
      <text:p text:style-name="P54" loext:marker-style-name="T3"><text:span text:style-name="T3">Default key mappings for adding labels</text:span><text:span text:style-name="T3"/></text:p>
      <text:p text:style-name="P51" loext:marker-style-name="T3"/>
      <text:p text:style-name="P49" loext:marker-style-name="T3"><text:span text:style-name="T26">Usability Tip:</text:span><text:span text:style-name="T3"> Instead of pressing two keys together (CTRL-M) to add a label, it is easier if you reassign the key binding to be a single key, such as F1. See Section 4: Usability Tips for more details on how to do this.</text:span></text:p>
      <text:p text:style-name="P55" loext:marker-style-name="T4"/>
      <text:p text:style-name="P55" loext:marker-style-name="T4"/>
      <text:list text:continue-numbering="true" text:style-name="WWNum5">
        <text:list-item>
          <text:p text:style-name="P41" loext:marker-style-name="T4"><text:span text:style-name="T4">When you get to the start of a new phrase, type the label while the audio is still playing. </text:span><text:span text:style-name="T4"/></text:p>
        </text:list-item>
      </text:list>
      <text:p text:style-name="P6" loext:marker-style-name="T4"/>
      <text:p text:style-name="P49" loext:marker-style-name="T3"><text:span text:style-name="T3">If you are quick, you’ll find there is no need to stop the audio for this. The cursor is in the new label already so all you have to do is type the letters or numbers. If you miss typing a label, you can always come back to it at the end.</text:span><text:span text:style-name="T3"/></text:p>
      <text:p text:style-name="P6" loext:marker-style-name="T4"/>
      <text:p text:style-name="P2" loext:marker-style-name="T4"><draw:frame text:anchor-type="as-char" draw:z-index="6" draw:style-name="gr1" draw:text-style-name="P3" svg:width="5.9815in" svg:height="3.5004in"><draw:image xlink:href="Pictures/100000000000037F0000020C59FE4565.png" xlink:type="simple" xlink:show="embed" xlink:actuate="onLoad" draw:mime-type="image/png"><text:p/></draw:image></draw:frame></text:p>
      <text:p text:style-name="P6" loext:marker-style-name="T4"/>
      <text:p text:style-name="P56" loext:marker-style-name="T4"><text:span text:style-name="T4">If you lose your way, stop playback, move back a few seconds and press play again. </text:span><text:span text:style-name="T4"/></text:p>
      <text:p text:style-name="P57" loext:marker-style-name="T28"/>
      <text:p text:style-name="P56" loext:marker-style-name="T4"><text:span text:style-name="T4">To delete a label you have placed by accident, press the </text:span><text:span text:style-name="T16">DELETE</text:span><text:span text:style-name="T4"> key when the label is selected.</text:span></text:p>
      <text:p text:style-name="P58" loext:marker-style-name="T4"/>
      <text:p text:style-name="P58" loext:marker-style-name="T4"/>
      <text:list text:continue-numbering="true" text:style-name="WWNum5">
        <text:list-item>
          <text:p text:style-name="P42" loext:marker-style-name="T4"><text:span text:style-name="T4">When you have finished placing labels for the whole chapter or picture story book, go back to each label : </text:span><text:span text:style-name="T4"/></text:p>
          <text:list>
            <text:list-item>
              <text:p text:style-name="P59" loext:marker-style-name="T4"><text:span text:style-name="T4">Move it slightly if you missed the middle of the blank section between phrases. Do this by dragging the circle in the middle of the marker.</text:span><text:span text:style-name="T4"/></text:p>
            </text:list-item>
            <text:list-item>
              <text:p text:style-name="P59" loext:marker-style-name="T4"><text:span text:style-name="T4">Type timing labels into the small white boxes in the label track if you didn’t do this earlier.<text:line-break/></text:span><text:span text:style-name="T4"/></text:p>
            </text:list-item>
          </text:list>
        </text:list-item>
      </text:list>
      <text:p text:style-name="P27" loext:marker-style-name="T4"><draw:frame text:anchor-type="as-char" draw:z-index="7" draw:style-name="gr1" draw:text-style-name="P3" svg:width="5.9815in" svg:height="3.5004in"><draw:image xlink:href="Pictures/100000000000037F0000020C3B6D2B42.png" xlink:type="simple" xlink:show="embed" xlink:actuate="onLoad" draw:mime-type="image/png"><text:p/></draw:image></draw:frame></text:p>
      <text:p text:style-name="P14" loext:marker-style-name="T4"/>
      <text:p text:style-name="P49" loext:marker-style-name="T3"><text:span text:style-name="T3">Another way of adding labels is via </text:span><text:span text:style-name="T26">Tracks </text:span><text:span text:style-name="T21"></text:span><text:span text:style-name="T26"> Edit Labels...</text:span><text:span text:style-name="T4"> </text:span><text:span text:style-name="T3">This is an easier way to add timing labels quickly. You can also delete unwanted labels here.<text:line-break/>   </text:span></text:p>
      <text:p text:style-name="P2" loext:marker-style-name="T3"><draw:frame text:anchor-type="as-char" draw:z-index="8" draw:style-name="gr1" draw:text-style-name="P3" svg:width="5.9913in" svg:height="2.778in"><draw:image xlink:href="Pictures/10000000000002CB0000014C31CAE285.png" xlink:type="simple" xlink:show="embed" xlink:actuate="onLoad" draw:mime-type="image/png"><text:p/></draw:image></draw:frame></text:p>
      <text:p text:style-name="P4" loext:marker-style-name="T3"/>
      <text:p text:style-name="P49" loext:marker-style-name="T4"><text:span text:style-name="T4">During this process you will be able to see if you have missed out a phrase somewhere or if you have added an unwanted marker that needs to be deleted.</text:span><text:span text:style-name="T4"/></text:p>
      <text:p text:style-name="P55" loext:marker-style-name="T4"/>
      <text:p text:style-name="P51" loext:marker-style-name="T3"/>
      <text:list text:continue-numbering="true" text:style-name="WWNum5">
        <text:list-item>
          <text:p text:style-name="P41" loext:marker-style-name="T4"><text:span text:style-name="T4">Export the label track to a text file using </text:span><text:span text:style-name="T16">File </text:span><text:span text:style-name="T21"></text:span><text:span text:style-name="T16"> Export Labels...</text:span><text:span text:style-name="T4">   Choose a name such as My-Book-01.txt (for chapter 1), My-Book-02.txt (for chapter 2), etc.</text:span></text:p>
        </text:list-item>
      </text:list>
      <text:p text:style-name="P6" loext:marker-style-name="T4"/>
      <text:list text:continue-numbering="true" text:style-name="WWNum5">
        <text:list-item>
          <text:p text:style-name="P44" loext:marker-style-name="T4"><text:span text:style-name="T4">Open the timing file in a text editor such as Notepad. You should see something like this:</text:span><text:span text:style-name="T4"/></text:p>
        </text:list-item>
      </text:list>
      <text:p text:style-name="P35" loext:marker-style-name="T4"/>
      <text:p text:style-name="P2" loext:marker-style-name="T4"><draw:frame draw:style-name="fr1" draw:name="Frame6" text:anchor-type="as-char" svg:width="4.6252in" svg:height="2.9898in"><draw:text-box><text:p text:style-name="P29" loext:marker-style-name="T17"><text:span text:style-name="T17">3.188682<text:tab/>3.188682<text:tab/>1</text:span><text:span text:style-name="T17"/></text:p><text:p text:style-name="P29" loext:marker-style-name="T17"><text:span text:style-name="T17">7.415084<text:tab/>7.415084<text:tab/></text:span><text:span text:style-name="T17"/></text:p><text:p text:style-name="P29" loext:marker-style-name="T17"><text:span text:style-name="T17">12.934091<text:tab/>12.934091<text:tab/></text:span><text:span text:style-name="T17"/></text:p><text:p text:style-name="P29" loext:marker-style-name="T17"><text:span text:style-name="T17">16.746603<text:tab/>16.746603<text:tab/>2</text:span><text:span text:style-name="T17"/></text:p><text:p text:style-name="P29" loext:marker-style-name="T17"><text:span text:style-name="T17">19.829615<text:tab/>19.829615<text:tab/></text:span><text:span text:style-name="T17"/></text:p><text:p text:style-name="P29" loext:marker-style-name="T17"><text:span text:style-name="T17">20.905796<text:tab/>20.905796<text:tab/></text:span><text:span text:style-name="T17"/></text:p><text:p text:style-name="P29" loext:marker-style-name="T17"><text:span text:style-name="T17">21.884018<text:tab/>21.884018<text:tab/>3</text:span><text:span text:style-name="T17"/></text:p><text:p text:style-name="P29" loext:marker-style-name="T17"><text:span text:style-name="T17">22.858863<text:tab/>22.858863<text:tab/></text:span><text:span text:style-name="T17"/></text:p><text:p text:style-name="P29" loext:marker-style-name="T17"><text:span text:style-name="T17">25.613723<text:tab/>25.613723<text:tab/>4</text:span><text:span text:style-name="T17"/></text:p><text:p text:style-name="P29" loext:marker-style-name="T17"><text:span text:style-name="T17">27.108508<text:tab/>27.108508<text:tab/></text:span><text:span text:style-name="T17"/></text:p><text:p text:style-name="P29" loext:marker-style-name="T17"><text:span text:style-name="T17">30.192832<text:tab/>30.192832<text:tab/></text:span><text:span text:style-name="T17"/></text:p><text:p text:style-name="P29" loext:marker-style-name="T17"><text:span text:style-name="T17">31.388587<text:tab/>31.388587<text:tab/></text:span><text:span text:style-name="T17"/></text:p><text:p text:style-name="P29" loext:marker-style-name="T17"><text:span text:style-name="T17">32.683989<text:tab/>32.683989<text:tab/>5</text:span><text:span text:style-name="T17"/></text:p><text:p text:style-name="P29" loext:marker-style-name="T17"><text:span text:style-name="T17">36.440027<text:tab/>36.440027<text:tab/></text:span><text:span text:style-name="T17"/></text:p><text:p text:style-name="P29" loext:marker-style-name="T17"><text:span text:style-name="T17">38.297624<text:tab/>38.297624<text:tab/></text:span></text:p></draw:text-box></draw:frame></text:p>
      <text:p text:style-name="P6" loext:marker-style-name="T4"/>
      <text:p text:style-name="P6" loext:marker-style-name="T4"/>
      <text:p text:style-name="P6" loext:marker-style-name="T4"/>
      <text:list text:continue-numbering="true" text:style-name="WWNum5">
        <text:list-item>
          <text:p text:style-name="P44" loext:marker-style-name="T4"><text:span text:style-name="T4">The three columns are </text:span><text:span text:style-name="T3">From</text:span><text:span text:style-name="T4">, </text:span><text:span text:style-name="T3">To</text:span><text:span text:style-name="T4"> and </text:span><text:span text:style-name="T3">Label</text:span><text:span text:style-name="T4">. Make sure all the timing labels are present. If you have missed out a label somewhere, fix it in the text file or within Audacity and export again.</text:span></text:p>
        </text:list-item>
      </text:list>
      <text:p text:style-name="P6" loext:marker-style-name="T4"/>
      <text:p text:style-name="P6" loext:marker-style-name="T4"/>
      <text:p text:style-name="P6" loext:marker-style-name="T4"/>
      <text:p text:style-name="Standard" loext:marker-style-name="T4"><text:span text:style-name="T4">The timing file is now ready to be used in an app.</text:span><text:span text:style-name="T4"/></text:p>
      <text:p text:style-name="P6" loext:marker-style-name="T4"/>
      <text:p text:style-name="P6" loext:marker-style-name="T4"/>
      <text:list xml:id="list131449689118122" text:continue-list="list131449434870786" text:style-name="WWNum13">
        <text:list-item>
          <text:h text:style-name="P60" text:outline-level="1" loext:marker-style-name="T4"><text:bookmark-start text:name="_Toc500235129"/><text:span text:style-name="T4">Timing Labels Assistant</text:span><text:bookmark-end text:name="_Toc500235129"/><text:span text:style-name="T4"/></text:h>
        </text:list-item>
      </text:list>
      <text:p text:style-name="P6" loext:marker-style-name="T4"/>
      <text:p text:style-name="Standard" loext:marker-style-name="T4"><text:span text:style-name="T4">If you are using Audacity in Windows, there is a helpful utility program that will make marking labels significantly easier. It is called </text:span><text:span text:style-name="T13">Timing Labels Assistant (TLA)</text:span><text:span text:style-name="T4">.</text:span></text:p>
      <text:p text:style-name="P26" loext:marker-style-name="T4"><text:span text:style-name="T4">TLA is built with </text:span><text:a xlink:type="simple" xlink:href="http://www.autohotkey.com/" text:style-name="Internet_20_link" text:visited-style-name="Visited_20_Internet_20_Link"><text:span text:style-name="Internet_20_link"><text:span text:style-name="T4">AutoHotKey</text:span></text:span></text:a><text:span text:style-name="T4"> to simulate keystrokes in Windows. It allows you to specify a phrases file and will insert the label name (a, b, etc.) for you automatically when you press the key to add the next label.</text:span></text:p>
      <text:p text:style-name="P6" loext:marker-style-name="T4"/>
      <text:p text:style-name="Standard" loext:marker-style-name="T4"><text:span text:style-name="T4">You can find it here: </text:span><text:a xlink:type="simple" xlink:href="https://github.com/indiamcq/timing-labels-assistant" text:style-name="Internet_20_link" text:visited-style-name="Visited_20_Internet_20_Link"><text:span text:style-name="Internet_20_link">https://github.com/indiamcq/timing-labels-assistant</text:span></text:a> </text:p>
      <text:p text:style-name="P6" loext:marker-style-name="T4"/>
      <text:p text:style-name="Standard" loext:marker-style-name="T4"><text:span text:style-name="T4">Download the zip file, </text:span><text:span text:style-name="T13">Timing-Labels-Assistant_v1.2.29.zip</text:span><text:span text:style-name="T4"> (or a later version), and unzip it to a writable folder on your computer (i.e. not in Program Files). The main TLA executable is called </text:span><text:span text:style-name="T13">Timing-Labels-Assistant.exe</text:span><text:span text:style-name="T4">.</text:span></text:p>
      <text:p text:style-name="P6" loext:marker-style-name="T4"/>
      <text:p text:style-name="Standard" loext:marker-style-name="T4"><text:span text:style-name="T4">To use TLA:</text:span><text:span text:style-name="T4"/></text:p>
      <text:list text:style-name="WWNum21">
        <text:list-item>
          <text:p text:style-name="P61" loext:marker-style-name="T4"><text:span text:style-name="T4">Run the </text:span><text:span text:style-name="T13">Create Phrase Lists </text:span><text:span text:style-name="T4">wizard within Reading App Builder to create a set of tab-delimited .phrases files for the book chapters you want to synchronize. That’s the 3rd option in the choice of file types.</text:span></text:p>
        </text:list-item>
        <text:list-item>
          <text:p text:style-name="P61" loext:marker-style-name="T4"><text:span text:style-name="T4">Open </text:span><text:span text:style-name="T13">Audacity</text:span><text:span text:style-name="T4"> with the audio file to be synchronised and zoom into the waveform 2-3 times.</text:span></text:p>
        </text:list-item>
        <text:list-item>
          <text:p text:style-name="P61" loext:marker-style-name="T4"><text:span text:style-name="T4">Launch </text:span><text:span text:style-name="T13">Timing-Labels-Assistant.exe</text:span><text:span text:style-name="T4">.</text:span></text:p>
        </text:list-item>
        <text:list-item>
          <text:p text:style-name="P61" loext:marker-style-name="T4"><text:span text:style-name="T4">Choose the .phrases file corresponding to the audio file you have open in Audacity. It will be opened for you in Notepad.</text:span><text:span text:style-name="T4"/></text:p>
        </text:list-item>
        <text:list-item>
          <text:p text:style-name="P61" loext:marker-style-name="T4"><text:span text:style-name="T4">Arrange Notepad to the side of your Audacity window so you can see both.</text:span><text:span text:style-name="T4"/></text:p>
        </text:list-item>
        <text:list-item>
          <text:p text:style-name="P61" loext:marker-style-name="T4"><text:span text:style-name="T4">Start playing the audio.</text:span><text:span text:style-name="T4"/></text:p>
        </text:list-item>
        <text:list-item>
          <text:p text:style-name="P61" loext:marker-style-name="T4"><text:span text:style-name="T4">Press the </text:span><text:span text:style-name="T13">TAB</text:span><text:span text:style-name="T4"> key or the </text:span><text:span text:style-name="T13">+</text:span><text:span text:style-name="T4"> key on the numeric keyboard to place a marker. (This much easier than pressing CTRL+M). The markers will appear in the order they are in the .phrases file.</text:span></text:p>
        </text:list-item>
      </text:list>
      <text:p text:style-name="P62" loext:marker-style-name="T4"><text:span text:style-name="T4">If markers do not appear when you press TAB or +, check that CTRL+M is still associated with the command </text:span><text:span text:style-name="T16">Add Label at Playback Position</text:span><text:span text:style-name="T29">. See section 5.2 for more details.</text:span></text:p>
      <text:list text:continue-numbering="true" text:style-name="WWNum21">
        <text:list-item>
          <text:p text:style-name="P61" loext:marker-style-name="T4"><text:span text:style-name="T4">You will hear a beep when the list of markers comes to an end.</text:span><text:span text:style-name="T4"/></text:p>
        </text:list-item>
      </text:list>
      <text:p text:style-name="P6" loext:marker-style-name="T4"/>
      <text:p text:style-name="P6" loext:marker-style-name="T4"/>
      <text:p text:style-name="Standard" loext:marker-style-name="T4"><text:span text:style-name="T4">To restart from a given label:</text:span><text:span text:style-name="T4"/></text:p>
      <text:list text:style-name="WWNum22">
        <text:list-item>
          <text:p text:style-name="P63" loext:marker-style-name="T4"><text:span text:style-name="T4">Click on the icon in the taskbar and select </text:span><text:span text:style-name="T13">Restart timing at label…</text:span><text:span text:style-name="T4">.</text:span></text:p>
        </text:list-item>
        <text:list-item>
          <text:p text:style-name="P64" loext:marker-style-name="T4"><text:span text:style-name="T4">Enter the label you want to start from, e.g. b.</text:span><text:span text:style-name="T4"/></text:p>
        </text:list-item>
        <text:list-item>
          <text:p text:style-name="P64" loext:marker-style-name="T4"><text:span text:style-name="T4">Press </text:span><text:span text:style-name="T13">OK</text:span><text:span text:style-name="T4"> and continue from step 6 above.</text:span></text:p>
        </text:list-item>
      </text:list>
      <text:p text:style-name="P6" loext:marker-style-name="T4"/>
      <text:p text:style-name="Standard" loext:marker-style-name="T4"><text:span text:style-name="T4">To exit:</text:span><text:span text:style-name="T4"/></text:p>
      <text:list text:continue-numbering="true" text:style-name="WWNum22">
        <text:list-item>
          <text:p text:style-name="P63" loext:marker-style-name="T4"><text:span text:style-name="T4">Click on the icon in the taskbar and select </text:span><text:span text:style-name="T13">Exit</text:span><text:span text:style-name="T4">.</text:span></text:p>
        </text:list-item>
      </text:list>
      <text:list xml:id="list131447705816819" text:continue-list="list131449689118122" text:style-name="WWNum13">
        <text:list-item>
          <text:h text:style-name="P65" text:outline-level="1" loext:marker-style-name="T4"><text:bookmark-start text:name="_Toc500235130"/><text:span text:style-name="T4">Usability Tips</text:span><text:bookmark-end text:name="_Toc500235130"/><text:span text:style-name="T4"/></text:h>
          <text:list>
            <text:list-item>
              <text:h text:style-name="P30" text:outline-level="2" loext:marker-style-name="T4"><text:bookmark-start text:name="_Toc500235131"/><text:span text:style-name="T4">Tip #1: Change the keyboard binding for the spacebar</text:span><text:bookmark-end text:name="_Toc500235131"/><text:span text:style-name="T4"/></text:h>
            </text:list-item>
          </text:list>
        </text:list-item>
      </text:list>
      <text:p text:style-name="P6" loext:marker-style-name="T4"/>
      <text:p text:style-name="Standard" loext:marker-style-name="T4"><text:span text:style-name="T4">By default, the spacebar is assigned to Play/Stop. This is good, but the problem is that if you stop somewhere and then start again, the playback goes back to the original start position rather than playing from where you stopped. </text:span><text:span text:style-name="T4"/></text:p>
      <text:p text:style-name="P6" loext:marker-style-name="T4"/>
      <text:p text:style-name="Standard" loext:marker-style-name="T4"><text:span text:style-name="T4">To modify this:</text:span><text:span text:style-name="T4"/></text:p>
      <text:p text:style-name="P6" loext:marker-style-name="T4"/>
      <text:list text:style-name="WWNum19">
        <text:list-item>
          <text:p text:style-name="P66" loext:marker-style-name="T4"><text:span text:style-name="T4">Go to </text:span><text:span text:style-name="T16">Edit</text:span><text:span text:style-name="T4"> </text:span><text:span text:style-name="T21"></text:span><text:span text:style-name="T4"> </text:span><text:span text:style-name="T16">Preferences</text:span><text:span text:style-name="T4"> </text:span><text:span text:style-name="T21"></text:span><text:span text:style-name="T4"> </text:span><text:span text:style-name="T16">Keyboard</text:span><text:span text:style-name="T4">.<text:line-break/></text:span></text:p>
        </text:list-item>
        <text:list-item>
          <text:p text:style-name="P66" loext:marker-style-name="T4"><text:span text:style-name="T4">Select the line </text:span><text:span text:style-name="T16">Play/Stop and Set Cursor</text:span><text:span text:style-name="T4">. To find this quickly, type ‘play/stop’ into the Search field at the top.</text:span></text:p>
        </text:list-item>
      </text:list>
      <text:p text:style-name="P6" loext:marker-style-name="T4"/>
      <text:p text:style-name="P49" loext:marker-style-name="T4"><text:span text:style-name="T4">You are looking for the line that ends with ‘…and Set Cursor’ rather than simply ‘Play/Stop’. </text:span><text:span text:style-name="T4"/></text:p>
      <text:p text:style-name="P40" loext:marker-style-name="T4"/>
      <text:p text:style-name="P67" loext:marker-style-name="T4"><draw:frame text:anchor-type="as-char" draw:z-index="9" draw:style-name="gr1" draw:text-style-name="P3" svg:width="5.4724in" svg:height="3.4449in"><draw:image xlink:href="Pictures/1000000000000248000001706D265004.png" xlink:type="simple" xlink:show="embed" xlink:actuate="onLoad" draw:mime-type="image/png"><text:p/></draw:image></draw:frame></text:p>
      <text:p text:style-name="P40" loext:marker-style-name="T4"/>
      <text:list text:continue-numbering="true" text:style-name="WWNum19">
        <text:list-item>
          <text:p text:style-name="P66" loext:marker-style-name="T4"><text:span text:style-name="T4">Change the key binding for this line to Space (rather than Shift+A).</text:span><text:span text:style-name="T4"/></text:p>
        </text:list-item>
      </text:list>
      <text:p text:style-name="P40" loext:marker-style-name="T4"/>
      <text:list text:continue-numbering="true" text:style-name="WWNum19">
        <text:list-item>
          <text:p text:style-name="P66" loext:marker-style-name="T4"><text:span text:style-name="T4">Press </text:span><text:span text:style-name="T16">Set</text:span><text:span text:style-name="T4">.</text:span></text:p>
        </text:list-item>
      </text:list>
      <text:p text:style-name="P6" loext:marker-style-name="T4"/>
      <text:p text:style-name="P68" loext:marker-style-name="T4"/>
      <text:p text:style-name="P7" loext:marker-style-name="T4"/>
      <text:p text:style-name="P7" loext:marker-style-name="T4"/>
      <text:list text:continue-numbering="true" text:style-name="WWNum19">
        <text:list-item>
          <text:p text:style-name="P69" loext:marker-style-name="T4"><text:span text:style-name="T4">You will be asked if you want to make the change. Click </text:span><text:span text:style-name="T16">OK</text:span><text:span text:style-name="T4"> to do this.</text:span></text:p>
        </text:list-item>
      </text:list>
      <text:p text:style-name="P70" loext:marker-style-name="T4"/>
      <text:p text:style-name="P71" loext:marker-style-name="T4"><draw:frame text:anchor-type="as-char" draw:z-index="10" draw:style-name="gr1" draw:text-style-name="P3" svg:width="3.9815in" svg:height="2.7413in"><draw:image xlink:href="Pictures/100000000000017E000001079146D5DD.png" xlink:type="simple" xlink:show="embed" xlink:actuate="onLoad" draw:mime-type="image/png"><text:p/></draw:image></draw:frame></text:p>
      <text:p text:style-name="P40" loext:marker-style-name="T4"/>
      <text:p text:style-name="P40" loext:marker-style-name="T4"/>
      <text:list text:continue-numbering="true" text:style-name="WWNum19">
        <text:list-item>
          <text:p text:style-name="P66" loext:marker-style-name="T4"><text:span text:style-name="T4">Click </text:span><text:span text:style-name="T16">OK</text:span><text:span text:style-name="T4"> to save the changes to the Preferences.</text:span></text:p>
        </text:list-item>
      </text:list>
      <text:p text:style-name="P72" loext:marker-style-name="T4"/>
      <text:p text:style-name="P40" loext:marker-style-name="T4"/>
      <text:list xml:id="list131449559131223" text:continue-list="list131447705816819" text:style-name="WWNum13">
        <text:list-item>
          <text:list>
            <text:list-item>
              <text:h text:style-name="P30" text:outline-level="2" loext:marker-style-name="T4"><text:bookmark-start text:name="_Toc500235132"/><text:span text:style-name="T4">Tip #2: Change the keyboard binding for adding a label</text:span><text:bookmark-end text:name="_Toc500235132"/><text:span text:style-name="T4"/></text:h>
            </text:list-item>
          </text:list>
        </text:list-item>
      </text:list>
      <text:p text:style-name="P6" loext:marker-style-name="T4"/>
      <text:p text:style-name="Standard" loext:marker-style-name="T4"><text:span text:style-name="T4">Instead of pressing two keys together (</text:span><text:span text:style-name="T16">CTRL-M</text:span><text:span text:style-name="T4">) to add a label, it is easier if you reassign the key binding to be a single key, such as </text:span><text:span text:style-name="T16">F1</text:span><text:span text:style-name="T4">. Then you have one hand free to type the labels.</text:span></text:p>
      <text:p text:style-name="P6" loext:marker-style-name="T4"/>
      <text:p text:style-name="Standard" loext:marker-style-name="T4"><text:span text:style-name="T30">NOTE</text:span><text:span text:style-name="T4">: This tip is only useful if you are </text:span><text:span text:style-name="T30">not</text:span><text:span text:style-name="T4"> using </text:span><text:span text:style-name="T14">Timing Labels Assistant (TLA)</text:span><text:span text:style-name="T4">. If you are using TLA, you need to keep CTRL-M as the key combination to add a label.</text:span></text:p>
      <text:p text:style-name="P6" loext:marker-style-name="T4"/>
      <text:p text:style-name="P73" loext:marker-style-name="T4"><text:span text:style-name="T4">To change the keyboard binding for adding a label:</text:span><text:span text:style-name="T4"/></text:p>
      <text:p text:style-name="P6" loext:marker-style-name="T4"/>
      <text:list text:style-name="WWNum16">
        <text:list-item>
          <text:p text:style-name="P74" loext:marker-style-name="T16"><text:span text:style-name="T4">Go to </text:span><text:span text:style-name="T16">Edit</text:span><text:span text:style-name="T4"> </text:span><text:span text:style-name="T21"></text:span><text:span text:style-name="T4"> </text:span><text:span text:style-name="T16">Preferences</text:span><text:span text:style-name="T4"> </text:span><text:span text:style-name="T21"></text:span><text:span text:style-name="T4"> </text:span><text:span text:style-name="T16">Keyboard</text:span><text:span text:style-name="T4">.<text:line-break/></text:span></text:p>
        </text:list-item>
        <text:list-item>
          <text:p text:style-name="P74" loext:marker-style-name="T4"><text:span text:style-name="T4">Select the line </text:span><text:span text:style-name="T16">Add Label at Playback Position</text:span><text:span text:style-name="T4">. To find this quickly, type ‘add label’ into the Search field at the top.</text:span></text:p>
        </text:list-item>
      </text:list>
      <text:p text:style-name="P40" loext:marker-style-name="T4"/>
      <text:p text:style-name="P75" loext:marker-style-name="T4"><draw:frame text:anchor-type="as-char" draw:z-index="11" draw:style-name="gr1" draw:text-style-name="P3" svg:width="5.4815in" svg:height="3.4449in"><draw:image xlink:href="Pictures/100000000000024800000170BF1C90AB.png" xlink:type="simple" xlink:show="embed" xlink:actuate="onLoad" draw:mime-type="image/png"><text:p/></draw:image></draw:frame></text:p>
      <text:p text:style-name="P6" loext:marker-style-name="T4"/>
      <text:list text:continue-numbering="true" text:style-name="WWNum16">
        <text:list-item>
          <text:p text:style-name="P74" loext:marker-style-name="T4"><text:span text:style-name="T4">Type the key you want to use instead of </text:span><text:span text:style-name="T16">CTRL-M</text:span><text:span text:style-name="T4">, such as </text:span><text:span text:style-name="T16">F1</text:span><text:span text:style-name="T4">.</text:span></text:p>
        </text:list-item>
      </text:list>
      <text:p text:style-name="P40" loext:marker-style-name="T4"/>
      <text:list text:continue-numbering="true" text:style-name="WWNum16">
        <text:list-item>
          <text:p text:style-name="P74" loext:marker-style-name="T4"><text:span text:style-name="T4">Press </text:span><text:span text:style-name="T16">Set</text:span><text:span text:style-name="T4">.</text:span></text:p>
        </text:list-item>
      </text:list>
      <text:p text:style-name="P6" loext:marker-style-name="T4"/>
      <text:p text:style-name="P75" loext:marker-style-name="T4"><draw:frame text:anchor-type="as-char" draw:z-index="12" draw:style-name="gr1" draw:text-style-name="P3" svg:width="5.4724in" svg:height="3.4358in"><draw:image xlink:href="Pictures/100000000000024800000170E39B73FE.png" xlink:type="simple" xlink:show="embed" xlink:actuate="onLoad" draw:mime-type="image/png"><text:p/></draw:image></draw:frame></text:p>
      <text:p text:style-name="P7" loext:marker-style-name="T4"/>
      <text:p text:style-name="P7" loext:marker-style-name="T4"/>
      <text:list text:continue-numbering="true" text:style-name="WWNum16">
        <text:list-item>
          <text:p text:style-name="P74" loext:marker-style-name="T4"><text:span text:style-name="T4">If the keyboard shortcut you have chosen is already in use for another function, you will be asked if you want to make the change. Click </text:span><text:span text:style-name="T16">OK</text:span><text:span text:style-name="T4"> to do this.</text:span></text:p>
        </text:list-item>
      </text:list>
      <text:p text:style-name="P40" loext:marker-style-name="T4"/>
      <text:p text:style-name="P71" loext:marker-style-name="T4"><draw:frame text:anchor-type="as-char" draw:z-index="13" draw:style-name="gr1" draw:text-style-name="P3" svg:width="3.9079in" svg:height="2.7413in"><draw:image xlink:href="Pictures/100000000000017700000107BC7F8427.png" xlink:type="simple" xlink:show="embed" xlink:actuate="onLoad" draw:mime-type="image/png"><text:p/></draw:image></draw:frame></text:p>
      <text:p text:style-name="P40" loext:marker-style-name="T4"/>
      <text:p text:style-name="P40" loext:marker-style-name="T4"/>
      <text:list text:continue-numbering="true" text:style-name="WWNum16">
        <text:list-item>
          <text:p text:style-name="P74" loext:marker-style-name="T4"><text:span text:style-name="T4">Click </text:span><text:span text:style-name="T16">OK</text:span><text:span text:style-name="T4"> to save the changes to the Preferences.</text:span></text:p>
        </text:list-item>
      </text:list>
      <text:p text:style-name="P6" loext:marker-style-name="T4"/>
      <text:p text:style-name="P6" loext:marker-style-name="T4"/>
      <text:list text:continue-list="list131449559131223" text:style-name="WWNum13">
        <text:list-item>
          <text:h text:style-name="P65" text:outline-level="1" loext:marker-style-name="T4"><text:bookmark-start text:name="_Toc500235133"/><text:span text:style-name="T4">FAQ</text:span><text:bookmark-end text:name="_Toc500235133"/><text:span text:style-name="T4"/></text:h>
          <text:list>
            <text:list-item>
              <text:h text:style-name="P30" text:outline-level="2" loext:marker-style-name="T4"><text:bookmark-start text:name="_Toc500235134"/><text:span text:style-name="T4">How can I change the punctuation characters which are recognised as ‘end of phrase’ marks?</text:span><text:bookmark-end text:name="_Toc500235134"/><text:span text:style-name="T4"/></text:h>
            </text:list-item>
          </text:list>
        </text:list-item>
      </text:list>
      <text:p text:style-name="P76" loext:marker-style-name="T16"/>
      <text:p text:style-name="Standard" loext:marker-style-name="T4"><text:span text:style-name="T4">You can define which characters are recognised as phrase ending characters in the </text:span><text:span text:style-name="T16">Features</text:span><text:span text:style-name="T4"> </text:span><text:span text:style-name="T21"></text:span><text:span text:style-name="T4"> </text:span><text:span text:style-name="T16">Audio</text:span><text:span text:style-name="T4"> page of Reading App Builder. </text:span></text:p>
      <text:p text:style-name="P76" loext:marker-style-name="T16"/>
      <text:p text:style-name="Standard" loext:marker-style-name="T4"><text:span text:style-name="T4">You can add Unicode characters here using the format \uABCD where ABCD is the hexadecimal Unicode code point, e.g. \u061F for an Arabic question mark, \u1362 for an Ethiopic full stop.</text:span><text:span text:style-name="T4"/></text:p>
      <text:p text:style-name="P76" loext:marker-style-name="T16"/>
      <text:list text:continue-numbering="true" text:style-name="WWNum13">
        <text:list-item>
          <text:list>
            <text:list-item>
              <text:h text:style-name="P30" text:outline-level="2" loext:marker-style-name="T4"><text:bookmark-start text:name="_Toc500235135"/><text:span text:style-name="T4">How can I get it to highlight section headings?</text:span><text:bookmark-end text:name="_Toc500235135"/><text:span text:style-name="T4"> </text:span><text:span text:style-name="T4"/></text:h>
            </text:list-item>
          </text:list>
        </text:list-item>
      </text:list>
      <text:p text:style-name="P77" loext:marker-style-name="T16"/>
      <text:p text:style-name="P32" loext:marker-style-name="T4"><text:span text:style-name="T4">In some audio files, the section headings are read out by the narrator as well as the main text. To include them in the highlighting, use labels ‘s1’, ‘s2’, ‘s3’, etc., where ‘s1’ is the first section heading, ‘s2’ is the second section heading and so on. </text:span><text:span text:style-name="T4"/></text:p>
      <text:p text:style-name="P35" loext:marker-style-name="T4"/>
      <text:p text:style-name="Standard" loext:marker-style-name="T4"><text:span text:style-name="T4">Note that the ‘s’ is lower-case and there is no space between the ‘s’ and the number.</text:span><text:span text:style-name="T4"/></text:p>
      <text:p text:style-name="P6" loext:marker-style-name="T4"/>
      <text:p text:style-name="Standard" loext:marker-style-name="T4"><text:span text:style-name="T4">Use this same method for other types of headings, e.g. use ‘d’ as the prefix for \d headings, ‘sp’ as the prefix for \sp headings, ‘is’ for \is, etc.</text:span><text:span text:style-name="T4"/></text:p>
      <text:p text:style-name="P6" loext:marker-style-name="T4"/>
      <text:p text:style-name="Standard" loext:marker-style-name="T4"><text:span text:style-name="T4">For </text:span><text:span text:style-name="T16">section headings in picture story books</text:span><text:span text:style-name="T4">, add the page number before the label, e.g. 1s1, 1s2, 1s3 for section headings on the first page; 2s1, 2s2, etc. for section headings on the second page.</text:span></text:p>
      <text:p text:style-name="P6" loext:marker-style-name="T4"/>
      <text:list xml:id="list131449643554226" text:continue-numbering="true" text:style-name="WWNum13">
        <text:list-item>
          <text:list>
            <text:list-item>
              <text:h text:style-name="P30" text:outline-level="2" loext:marker-style-name="T4"><text:bookmark-start text:name="_Toc500235136"/><text:span text:style-name="T4">There are parts of the audio where I don’t want any text highlighted. How can I turn off the highlighting for a few moments?</text:span><text:bookmark-end text:name="_Toc500235136"/><text:span text:style-name="T4"/></text:h>
            </text:list-item>
          </text:list>
        </text:list-item>
      </text:list>
      <text:p text:style-name="P77" loext:marker-style-name="T16"/>
      <text:p text:style-name="P32" loext:marker-style-name="T4"><text:span text:style-name="T4">You might want to turn off text highlighting during musical interludes or sound effects. To do this, you need to give the labels a range, rather than being at a single point.</text:span><text:span text:style-name="T4"/></text:p>
      <text:p text:style-name="P35" loext:marker-style-name="T4"/>
      <text:p text:style-name="P32" loext:marker-style-name="T4"><text:span text:style-name="T4">Here is an example:</text:span><text:span text:style-name="T4"/></text:p>
      <text:p text:style-name="P35" loext:marker-style-name="T4"/>
      <text:p text:style-name="Standard" loext:marker-style-name="T4"><draw:frame text:anchor-type="as-char" draw:z-index="14" draw:style-name="gr1" draw:text-style-name="P3" svg:width="5.9815in" svg:height="3.5004in"><draw:image xlink:href="Pictures/100000000000037F0000020C83F39A5C.png" xlink:type="simple" xlink:show="embed" xlink:actuate="onLoad" draw:mime-type="image/png"><text:p/></draw:image></draw:frame></text:p>
      <text:p text:style-name="P6" loext:marker-style-name="T4"/>
      <text:p text:style-name="Standard" loext:marker-style-name="T4"><text:span text:style-name="T4">In the above timing file:</text:span><text:span text:style-name="T4"/></text:p>
      <text:list text:style-name="WWNum7">
        <text:list-item>
          <text:p text:style-name="P78" loext:marker-style-name="T4"><text:span text:style-name="T4">Phrase “b” highlighting will start at the “b” label and end at the beginning of the “c” label (as normal).</text:span><text:span text:style-name="T4"/></text:p>
        </text:list-item>
        <text:list-item>
          <text:p text:style-name="P78" loext:marker-style-name="T4"><text:span text:style-name="T4">Phrase “c” highlighting will start at the initial point of the “c” label range and continue until the end of the “c” label range.</text:span><text:span text:style-name="T4"/></text:p>
        </text:list-item>
        <text:list-item>
          <text:p text:style-name="P78" loext:marker-style-name="T4"><text:span text:style-name="T4">Nothing will be highlighted between the end of the “c” label range and the “d” label.</text:span><text:span text:style-name="T4"/></text:p>
        </text:list-item>
        <text:list-item>
          <text:p text:style-name="P78" loext:marker-style-name="T4"><text:span text:style-name="T4">Phrase “d” highlighting will start at the “d” label.</text:span><text:span text:style-name="T4"/></text:p>
        </text:list-item>
      </text:list>
      <text:p text:style-name="P6" loext:marker-style-name="T4"/>
      <text:p text:style-name="Standard" loext:marker-style-name="T4"><text:span text:style-name="T4">To create a label range, drag the &lt; or &gt; part of the label marker.</text:span><text:span text:style-name="T4"/></text:p>
      <text:p text:style-name="P6" loext:marker-style-name="T4"/>
      <text:p text:style-name="P6" loext:marker-style-name="T4"/>
      <text:list text:continue-list="list131449643554226" text:style-name="WWNum13">
        <text:list-item>
          <text:list>
            <text:list-item>
              <text:h text:style-name="P30" text:outline-level="2" loext:marker-style-name="T4"><text:bookmark-start text:name="_Toc500235137"/><text:span text:style-name="T4">I’d like to give someone else the task of creating timing files. Is there any way of them testing these without needing to know how to build the app?</text:span><text:bookmark-end text:name="_Toc500235137"/><text:span text:style-name="T4"> </text:span><text:span text:style-name="T4"/></text:h>
            </text:list-item>
          </text:list>
        </text:list-item>
      </text:list>
      <text:p text:style-name="P35" loext:marker-style-name="T4"/>
      <text:p text:style-name="P32" loext:marker-style-name="T4"><text:span text:style-name="T4">Yes, if you have chosen Audio Distribution by external folder or download, the MP3 files will be in a folder on the SD card. The app will look for a corresponding timing file in this folder if it doesn’t already have a timing file packaged inside the APK.</text:span><text:span text:style-name="T4"/></text:p>
      <text:p text:style-name="P6" loext:marker-style-name="T4"/>
      <text:p text:style-name="Standard" loext:marker-style-name="T4"><text:span text:style-name="T4">The timing filename in this case should be same as the mp3 file, but with the </text:span><text:span text:style-name="T16">.txt</text:span><text:span text:style-name="T4"> extension rather than </text:span><text:span text:style-name="T16">.mp3</text:span><text:span text:style-name="T4">.</text:span></text:p>
      <text:p text:style-name="P6" loext:marker-style-name="T4"/>
      <text:p text:style-name="Standard" loext:marker-style-name="T4"><text:span text:style-name="T4">So, for example, if you have a file such as </text:span><text:span text:style-name="T16">My-Book-01.mp3</text:span><text:span text:style-name="T4"> in the folder, you can put the file </text:span><text:span text:style-name="T16">My-Book-01.txt</text:span><text:span text:style-name="T4"> in the same place and the app should recognise it. </text:span></text:p>
      <text:p text:style-name="P6" loext:marker-style-name="T4"/>
      <text:p text:style-name="Standard" loext:marker-style-name="T4"><text:span text:style-name="T4">Using this method, others can work on providing timing files for the app and test them, without needing to rebuild the app. Once the timing files are working, you can rebuild the app and package them inside the apk. They are very small so should not increase the size of the apk significantly.</text:span><text:span text:style-name="T4"/></text:p>
      <text:p text:style-name="P6" loext:marker-style-name="T4"/>
      <text:p text:style-name="P6" loext:marker-style-name="T4"/>
      <text:p text:style-name="P6" loext:marker-style-name="T4"/>
      <text:list text:continue-numbering="true" text:style-name="WWNum13">
        <text:list-item>
          <text:h text:style-name="P65" text:outline-level="1" loext:marker-style-name="T4"><text:bookmark-start text:name="_Toc500235138"/><text:span text:style-name="T4">Appendix – How to Install Audacity</text:span><text:bookmark-end text:name="_Toc500235138"/><text:span text:style-name="T4"/></text:h>
        </text:list-item>
      </text:list>
      <text:p text:style-name="P6" loext:marker-style-name="T4"/>
      <text:list text:style-name="WWNum11">
        <text:list-item>
          <text:p text:style-name="P79" loext:marker-style-name="T31"><text:span text:style-name="T31">Download the latest Audacity installation program from the Audacity website: <text:line-break/><text:line-break/><text:tab/><text:tab/></text:span><text:a xlink:type="simple" xlink:href="http://www.audacityteam.org" text:style-name="Internet_20_link" text:visited-style-name="Visited_20_Internet_20_Link"><text:span text:style-name="Internet_20_link"><text:span text:style-name="T32">http://www.audacityteam.org</text:span></text:span></text:a></text:p>
        </text:list-item>
      </text:list>
      <text:p text:style-name="P80" loext:marker-style-name="T31"/>
      <text:p text:style-name="P81" loext:marker-style-name="T31"><text:span text:style-name="T31">For version 2.1, the filename is </text:span><text:span text:style-name="T32">audacity-win-2.2.0.exe</text:span><text:span text:style-name="T33">. It is 19 MB in size.</text:span></text:p>
      <text:p text:style-name="P82" loext:marker-style-name="T32"><draw:frame text:anchor-type="as-char" draw:z-index="15" draw:style-name="gr1" draw:text-style-name="P3" svg:width="2.5469in" svg:height="0.6024in"><draw:image xlink:href="Pictures/10000000000000F30000003A39EABE3E.png" xlink:type="simple" xlink:show="embed" xlink:actuate="onLoad" draw:mime-type="image/png"><text:p/></draw:image></draw:frame></text:p>
      <text:p text:style-name="P81" loext:marker-style-name="T33"><text:span text:style-name="T33"><text:line-break/>It might be that a newer version than 2.2.0 is available. If so, download this newer version instead.</text:span><text:span text:style-name="T33"/></text:p>
      <text:p text:style-name="P83" loext:marker-style-name="T31"/>
      <text:list text:continue-numbering="true" text:style-name="WWNum11">
        <text:list-item>
          <text:p text:style-name="P84" loext:marker-style-name="T31"><text:span text:style-name="T31">Double-click </text:span><text:span text:style-name="T32">audacity-win-2.2.0.exe </text:span><text:span text:style-name="T31">to start the installation.</text:span></text:p>
        </text:list-item>
      </text:list>
      <text:p text:style-name="P85" loext:marker-style-name="T31"/>
      <text:list text:continue-numbering="true" text:style-name="WWNum11">
        <text:list-item>
          <text:p text:style-name="P79" loext:marker-style-name="T31"><text:span text:style-name="T31">Select English as the language to use :<text:line-break/></text:span><text:span text:style-name="T31"/></text:p>
        </text:list-item>
      </text:list>
      <text:p text:style-name="P86" loext:marker-style-name="T31"><draw:frame text:anchor-type="as-char" draw:z-index="16" draw:name="Picture 1" draw:style-name="gr1" draw:text-style-name="P3" svg:width="3.1114in" svg:height="1.5835in"><draw:image xlink:href="Pictures/100000000000012B00000098363E8AB6.png" xlink:type="simple" xlink:show="embed" xlink:actuate="onLoad" draw:mime-type="image/png"><text:p/></draw:image></draw:frame></text:p>
      <text:p text:style-name="P87" loext:marker-style-name="T31"/>
      <text:p text:style-name="P88" loext:marker-style-name="T31"><text:span text:style-name="T31">The Setup Wizard opens:</text:span><text:span text:style-name="T31"/></text:p>
      <text:p text:style-name="P27" loext:marker-style-name="T32"><draw:frame text:anchor-type="as-char" draw:z-index="17" draw:style-name="gr1" draw:text-style-name="P3" svg:width="5.1949in" svg:height="4.028in"><draw:image xlink:href="Pictures/10000000000001F300000183854602AE.png" xlink:type="simple" xlink:show="embed" xlink:actuate="onLoad" draw:mime-type="image/png"><text:p/></draw:image></draw:frame><text:span text:style-name="T25"><text:line-break/></text:span></text:p>
      <text:list text:continue-numbering="true" text:style-name="WWNum11">
        <text:list-item>
          <text:p text:style-name="P84" loext:marker-style-name="T31"><text:span text:style-name="T31">Click </text:span><text:span text:style-name="T32">Next</text:span><text:span text:style-name="T31"> to continue.</text:span></text:p>
        </text:list-item>
      </text:list>
      <text:p text:style-name="P89" loext:marker-style-name="T31"><text:span text:style-name="T31">A page of licence information will appear:</text:span><text:span text:style-name="T31"/></text:p>
      <text:p text:style-name="P27" loext:marker-style-name="T32"><draw:frame text:anchor-type="as-char" draw:z-index="18" draw:style-name="gr1" draw:text-style-name="P3" svg:width="5.1949in" svg:height="4.028in"><draw:image xlink:href="Pictures/10000000000001F300000183684571A6.png" xlink:type="simple" xlink:show="embed" xlink:actuate="onLoad" draw:mime-type="image/png"><text:p/></draw:image></draw:frame><text:span text:style-name="T25"><text:line-break/></text:span></text:p>
      <text:list text:continue-numbering="true" text:style-name="WWNum11">
        <text:list-item>
          <text:p text:style-name="P90" loext:marker-style-name="T31"><text:span text:style-name="T31">Click </text:span><text:span text:style-name="T32">Next</text:span><text:span text:style-name="T31"> to continue.</text:span></text:p>
        </text:list-item>
      </text:list>
      <text:p text:style-name="P91" loext:marker-style-name="T31"><text:span text:style-name="T31">You will see the page </text:span><text:span text:style-name="T32">Select Destination Location</text:span><text:span text:style-name="T31">:</text:span></text:p>
      <text:p text:style-name="P27" loext:marker-style-name="T32"><draw:frame text:anchor-type="as-char" draw:z-index="19" draw:style-name="gr1" draw:text-style-name="P3" svg:width="5.1949in" svg:height="4.028in"><draw:image xlink:href="Pictures/10000000000001F300000183465E43E3.png" xlink:type="simple" xlink:show="embed" xlink:actuate="onLoad" draw:mime-type="image/png"><text:p/></draw:image></draw:frame><text:span text:style-name="T25"><text:line-break/></text:span></text:p>
      <text:list text:continue-numbering="true" text:style-name="WWNum11">
        <text:list-item>
          <text:p text:style-name="P90" loext:marker-style-name="T31"><text:span text:style-name="T31">The suggested location in which to install</text:span><text:alphabetical-index-mark text:string-value=" " text:key1="install"/><text:span text:style-name="T31"> Audacity is normally fine, so click </text:span><text:span text:style-name="T32">Next</text:span><text:span text:style-name="T31">.</text:span></text:p>
        </text:list-item>
      </text:list>
      <text:p text:style-name="P91" loext:marker-style-name="T31"><text:span text:style-name="T31">You’ll see the </text:span><text:span text:style-name="T32">Select Additional Tasks</text:span><text:span text:style-name="T31"> page:<text:line-break/></text:span></text:p>
      <text:p text:style-name="P2" loext:marker-style-name="T31"><draw:frame text:anchor-type="as-char" draw:z-index="20" draw:style-name="gr1" draw:text-style-name="P3" svg:width="5.1949in" svg:height="4.028in"><draw:image xlink:href="Pictures/10000000000001F3000001833CE2F20D.png" xlink:type="simple" xlink:show="embed" xlink:actuate="onLoad" draw:mime-type="image/png"><text:p/></draw:image></draw:frame><text:span text:style-name="T25"><text:line-break/></text:span></text:p>
      <text:list text:continue-numbering="true" text:style-name="WWNum11">
        <text:list-item>
          <text:p text:style-name="P92" loext:marker-style-name="T31"><text:span text:style-name="T31">Click </text:span><text:span text:style-name="T32">Next</text:span><text:span text:style-name="T31"> to continue.</text:span></text:p>
        </text:list-item>
      </text:list>
      <text:p text:style-name="P91" loext:marker-style-name="T31"><text:span text:style-name="T31">You’ll then see the </text:span><text:span text:style-name="T32">Ready to Install</text:span><text:span text:style-name="T31"> page:<text:line-break/></text:span></text:p>
      <text:p text:style-name="P2" loext:marker-style-name="T25"><draw:frame text:anchor-type="as-char" draw:z-index="21" draw:style-name="gr1" draw:text-style-name="P3" svg:width="5.1949in" svg:height="4.028in"><draw:image xlink:href="Pictures/10000000000001F300000183FB6552FC.png" xlink:type="simple" xlink:show="embed" xlink:actuate="onLoad" draw:mime-type="image/png"><text:p/></draw:image></draw:frame></text:p>
      <text:p text:style-name="P93" loext:marker-style-name="T32"/>
      <text:list text:continue-numbering="true" text:style-name="WWNum11">
        <text:list-item>
          <text:p text:style-name="P90" loext:marker-style-name="T31"><text:span text:style-name="T31">Click </text:span><text:span text:style-name="T32">Install</text:span><text:span text:style-name="T31"> to begin the installation.<text:line-break/></text:span></text:p>
        </text:list-item>
      </text:list>
      <text:p text:style-name="P27" loext:marker-style-name="T31"><draw:frame text:anchor-type="as-char" draw:z-index="22" draw:style-name="gr1" draw:text-style-name="P3" svg:width="5.1949in" svg:height="4.028in"><draw:image xlink:href="Pictures/10000000000001F30000018324F8F924.png" xlink:type="simple" xlink:show="embed" xlink:actuate="onLoad" draw:mime-type="image/png"><text:p/></draw:image></draw:frame></text:p>
      <text:p text:style-name="P94" loext:marker-style-name="T31"><text:span text:style-name="T31">When the installation is complete, you will see a page of information:<text:line-break/></text:span><text:span text:style-name="T31"/></text:p>
      <text:p text:style-name="P27" loext:marker-style-name="T25"><draw:frame text:anchor-type="as-char" draw:z-index="23" draw:style-name="gr1" draw:text-style-name="P3" svg:width="5.1949in" svg:height="4.028in"><draw:image xlink:href="Pictures/10000000000001F30000018351ED4511.png" xlink:type="simple" xlink:show="embed" xlink:actuate="onLoad" draw:mime-type="image/png"><text:p/></draw:image></draw:frame></text:p>
      <text:p text:style-name="P83" loext:marker-style-name="T31"/>
      <text:list text:continue-numbering="true" text:style-name="WWNum11">
        <text:list-item>
          <text:p text:style-name="P90" loext:marker-style-name="T31"><text:span text:style-name="T31">Click </text:span><text:span text:style-name="T32">Next</text:span><text:span text:style-name="T31"> to continue.</text:span></text:p>
        </text:list-item>
      </text:list>
      <text:p text:style-name="P95" loext:marker-style-name="T31"/>
      <text:p text:style-name="P88" loext:marker-style-name="T31"><text:span text:style-name="T31">You will then see the final page of the Setup Wizard:<text:line-break/></text:span><text:span text:style-name="T31"/></text:p>
      <text:p text:style-name="P27" loext:marker-style-name="T32"><draw:frame text:anchor-type="as-char" draw:z-index="24" draw:style-name="gr1" draw:text-style-name="P3" svg:width="5.1949in" svg:height="4.028in"><draw:image xlink:href="Pictures/10000000000001F300000183ED2BD124.png" xlink:type="simple" xlink:show="embed" xlink:actuate="onLoad" draw:mime-type="image/png"><text:p/></draw:image></draw:frame></text:p>
      <text:p text:style-name="P96" loext:marker-style-name="T32"/>
      <text:p text:style-name="P96" loext:marker-style-name="T32"/>
      <text:list text:continue-numbering="true" text:style-name="WWNum11">
        <text:list-item>
          <text:p text:style-name="P90" loext:marker-style-name="T31"><text:span text:style-name="T31">Click </text:span><text:span text:style-name="T32">Finish</text:span><text:span text:style-name="T31"> to close the Setup Wizard and launch Audacity.</text:span></text:p>
        </text:list-item>
      </text:list>
      <text:p text:style-name="P95" loext:marker-style-name="T31"/>
      <text:p text:style-name="P97" loext:marker-style-name="T31"><text:span text:style-name="T31">Audacity is now ready to use.</text:span><text:span text:style-name="T31"/></text:p>
      <text:p text:style-name="P6"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ika Compact" svg:font-family="'Andika Compact'" style:font-family-generic="roman" style:font-pitch="variable"/>
    <style:font-face style:name="Andika Compact1" svg:font-family="'Andika Compact'"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13" style:class="chapter">
      <style:paragraph-properties fo:margin-top="0.1665in" fo:margin-bottom="0.0417in" style:contextual-spacing="false" fo:keep-with-next="always"/>
      <style:text-properties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WWNum13" style:list-level="2" style:class="chapter">
      <style:paragraph-properties fo:margin-top="0.1665in" fo:margin-bottom="0.0417in" style:contextual-spacing="false" fo:keep-with-next="always"/>
      <style:text-properties fo:font-size="13pt" fo:font-style="italic" fo:font-weight="bold" style:font-size-asian="13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5984in" fo:margin-top="0.1665in" fo:margin-bottom="0in" style:contextual-spacing="false" fo:text-indent="-0.4335in" style:auto-text-indent="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style0" style:family="paragraph">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ab-stops>
          <style:tab-stop style:position="0.4925in"/>
        </style:tab-stops>
      </style:paragraph-properties>
      <style:text-properties style:font-name="Charis SIL" fo:font-family="'Charis SIL'" style:font-family-generic="roman" style:font-pitch="variable" fo:font-size="12pt" style:font-size-asian="12pt" style:language-asian="zh" style:country-asian="CN" style:font-name-complex="Charis SIL1" style:font-family-complex="'Charis SI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AQ" style:family="paragraph" style:parent-style-name="Standard" style:list-style-name="WWNum13" style:list-level="3"/>
    <style:style style:name="Base_20_Style" style:display-name="Base Style" style:family="paragraph">
      <style:paragraph-properties fo:margin-top="0in" fo:margin-bottom="0.111in" style:contextual-spacing="false" fo:line-height="108%" fo:text-align="left" style:justify-single-word="false" fo:orphans="0" fo:widows="0" fo:hyphenation-ladder-count="no-limit" fo:hyphenation-keep="auto" loext:hyphenation-keep-type="column" loext:hyphenation-keep-line="false" style:writing-mode="lr-tb">
        <style:tab-stops>
          <style:tab-stop style:position="0.4925in"/>
        </style:tab-stops>
      </style:paragraph-properties>
      <style:text-properties style:font-name="Andika Compact" fo:font-family="'Andika Compact'" style:font-family-generic="roman" style:font-pitch="variable" style:font-name-asian="Andika Compact1" style:font-family-asian="'Andika Compact'" style:font-family-generic-asian="system" style:font-pitch-asian="variable" style:language-asian="zh" style:country-asian="CN" style:font-name-complex="Andika Compact1" style:font-family-complex="'Andika Compact'"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name-complex="Times New Roman1" style:font-family-complex="'Times New Roman'"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Unresolved_20_Mention" style:display-name="Unresolved Mention" style:family="tex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fo:font-weight="normal" style:font-weight-asian="normal"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language="en" fo:country="GB"/>
    </style:style>
    <style:style style:name="ListLabel_20_236" style:display-name="ListLabel 236" style:family="text"/>
    <style:style style:name="ListLabel_20_237" style:display-name="ListLabel 237" style:family="text">
      <style:text-properties fo:language="en" fo:country="GB" fo:font-weight="bold" style:font-weight-asian="bold" style:font-size-complex="11pt" style:font-weight-complex="bol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0083in" fo:text-indent="-0.1252in" fo:margin-left="1.00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5083in" fo:text-indent="-0.1252in" fo:margin-left="2.50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0083in" fo:text-indent="-0.1252in" fo:margin-left="4.00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453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528in" fo:margin-left="0in" fo:margin-right="0in" fo:margin-top="0.413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8" text:anchor-type="paragraph" svg:y="0.0008in" draw:z-index="32"><draw:text-box fo:min-height="0in" fo:min-width="0.0161in"><text:p text:style-name="MP1" loext:marker-style-name="Page Number"><text:span text:style-name="Page_20_Number"><text:page-number text:select-page="current">8</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ing App Builder - Using Audacity for Audio-Text Synchronization</dc:title>
    <meta:initial-creator>Richard Margetts</meta:initial-creator>
    <dc:creator>Richard Margetts</dc:creator>
    <meta:editing-cycles>124</meta:editing-cycles>
    <meta:print-date>2017-12-05T11:03:00</meta:print-date>
    <meta:creation-date>2015-05-15T16:26:00</meta:creation-date>
    <dc:date>2017-12-05T11:03:00</dc:date>
    <meta:editing-duration>PT6H36M</meta:editing-duration>
    <meta:generator>LibreOffice/26.2.3.2$Linux_X86_64 LibreOffice_project/620$Build-2</meta:generator>
    <meta:document-statistic meta:table-count="3" meta:image-count="0" meta:object-count="0" meta:page-count="8" meta:paragraph-count="328" meta:word-count="3561" meta:character-count="19593" meta:non-whitespace-character-count="16325"/>
    <meta:user-defined meta:name="AppVersion">16.0000</meta:user-defined>
    <meta:template xlink:type="simple" xlink:actuate="onRequest" xlink:title="Normal.dotm" xlink:href=""/>
  </office:meta>
</office:document-meta>
</file>