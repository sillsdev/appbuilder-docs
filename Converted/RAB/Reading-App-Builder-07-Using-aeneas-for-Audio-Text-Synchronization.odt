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80000030AB9D92968.png" manifest:media-type="image/png"/>
  <manifest:file-entry manifest:full-path="Pictures/10000000000003C80000030ABDA134CF.png" manifest:media-type="image/png"/>
  <manifest:file-entry manifest:full-path="Pictures/10000000000002930000014EBAE60B85.png" manifest:media-type="image/png"/>
  <manifest:file-entry manifest:full-path="Pictures/1000000000000246000001DC0E031CCF.png" manifest:media-type="image/png"/>
  <manifest:file-entry manifest:full-path="Pictures/10000000000003C80000030A6434B54B.png" manifest:media-type="image/png"/>
  <manifest:file-entry manifest:full-path="Pictures/1000000000000246000001DC71ABC918.png" manifest:media-type="image/png"/>
  <manifest:file-entry manifest:full-path="Pictures/10000001000002B70000008BD57A2983.png" manifest:media-type="image/png"/>
  <manifest:file-entry manifest:full-path="Pictures/10000001000002EC000000855EAA607A.png" manifest:media-type="image/png"/>
  <manifest:file-entry manifest:full-path="Pictures/100000010000042C000004B0826D13D2.png" manifest:media-type="image/png"/>
  <manifest:file-entry manifest:full-path="Pictures/100000010000076700000269044D798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4.9965in" fo:margin-top="0in" fo:margin-bottom="0in" table:align="center" style:writing-mode="lr-tb"/>
    </style:style>
    <style:style style:name="Table1.A" style:family="table-column">
      <style:table-column-properties style:column-width="1.0826in"/>
    </style:style>
    <style:style style:name="Table1.B" style:family="table-column">
      <style:table-column-properties style:column-width="3.9139in"/>
    </style:style>
    <style:style style:name="Table1.1" style:family="table-row">
      <style:table-row-properties fo:keep-together="auto"/>
    </style:style>
    <style:style style:name="Table1.A1" style:family="table-cell">
      <style:table-cell-properties style:vertical-align="middle" fo:background-color="#dbe5f1" fo:padding-left="0.075in" fo:padding-right="0.075in" fo:padding-top="0.0396in" fo:padding-bottom="0.0396in" fo:border="0.5pt solid #000000" style:writing-mode="lr-tb">
        <style:background-image/>
      </style:table-cell-properties>
    </style:style>
    <style:style style:name="Table1.A2" style:family="table-cell">
      <style:table-cell-properties style:vertical-align="middle" fo:padding-left="0.075in" fo:padding-right="0.075in" fo:padding-top="0.0396in" fo:padding-bottom="0.0396in" fo:border="0.5pt solid #000000" style:writing-mode="lr-tb"/>
    </style:style>
    <style:style style:name="Table1.B2" style:family="table-cell">
      <style:table-cell-properties style:vertical-align="middle" fo:padding-left="0.075in" fo:padding-right="0.075in" fo:padding-top="0.0396in" fo:padding-bottom="0.0396in" fo:border="0.5pt solid #000000" style:writing-mode="lr-tb"/>
    </style:style>
    <style:style style:name="Table1.A3" style:family="table-cell">
      <style:table-cell-properties style:vertical-align="middle" fo:padding-left="0.075in" fo:padding-right="0.075in" fo:padding-top="0.0396in" fo:padding-bottom="0.0396in" fo:border="0.5pt solid #000000" style:writing-mode="lr-tb"/>
    </style:style>
    <style:style style:name="Table1.B3" style:family="table-cell">
      <style:table-cell-properties style:vertical-align="middle" fo:padding-left="0.075in" fo:padding-right="0.075in" fo:padding-top="0.0396in" fo:padding-bottom="0.0396in" fo:border="0.5pt solid #000000" style:writing-mode="lr-tb"/>
    </style:style>
    <style:style style:name="Table1.A4" style:family="table-cell">
      <style:table-cell-properties style:vertical-align="middle" fo:padding-left="0.075in" fo:padding-right="0.075in" fo:padding-top="0.0396in" fo:padding-bottom="0.0396in" fo:border="0.5pt solid #000000" style:writing-mode="lr-tb"/>
    </style:style>
    <style:style style:name="Table1.B4" style:family="table-cell">
      <style:table-cell-properties style:vertical-align="middle" fo:padding-left="0.075in" fo:padding-right="0.075in" fo:padding-top="0.0396in" fo:padding-bottom="0.0396in" fo:border="0.5pt solid #000000" style:writing-mode="lr-tb"/>
    </style:style>
    <style:style style:name="Table1.A5" style:family="table-cell">
      <style:table-cell-properties style:vertical-align="middle" fo:padding-left="0.075in" fo:padding-right="0.075in" fo:padding-top="0.0396in" fo:padding-bottom="0.0396in" fo:border="0.5pt solid #000000" style:writing-mode="lr-tb"/>
    </style:style>
    <style:style style:name="Table1.B5" style:family="table-cell">
      <style:table-cell-properties style:vertical-align="middle" fo:padding-left="0.075in" fo:padding-right="0.075in" fo:padding-top="0.0396in" fo:padding-bottom="0.0396in" fo:border="0.5pt solid #000000" style:writing-mode="lr-tb"/>
    </style:style>
    <style:style style:name="Table1.A6" style:family="table-cell">
      <style:table-cell-properties style:vertical-align="middle" fo:padding-left="0.075in" fo:padding-right="0.075in" fo:padding-top="0.0396in" fo:padding-bottom="0.0396in" fo:border="0.5pt solid #000000" style:writing-mode="lr-tb"/>
    </style:style>
    <style:style style:name="Table1.B6" style:family="table-cell">
      <style:table-cell-properties style:vertical-align="middle" fo:padding-left="0.075in" fo:padding-right="0.075in" fo:padding-top="0.0396in" fo:padding-bottom="0.0396in" fo:border="0.5pt solid #000000" style:writing-mode="lr-tb"/>
    </style:style>
    <style:style style:name="Table1.A7" style:family="table-cell">
      <style:table-cell-properties style:vertical-align="middle" fo:padding-left="0.075in" fo:padding-right="0.075in" fo:padding-top="0.0396in" fo:padding-bottom="0.0396in" fo:border="0.5pt solid #000000" style:writing-mode="lr-tb"/>
    </style:style>
    <style:style style:name="Table1.B7" style:family="table-cell">
      <style:table-cell-properties style:vertical-align="middle" fo:padding-left="0.075in" fo:padding-right="0.075in" fo:padding-top="0.0396in" fo:padding-bottom="0.0396in" fo:border="0.5pt solid #000000" style:writing-mode="lr-tb"/>
    </style:style>
    <style:style style:name="Table1.A8" style:family="table-cell">
      <style:table-cell-properties style:vertical-align="middle" fo:padding-left="0.075in" fo:padding-right="0.075in" fo:padding-top="0.0396in" fo:padding-bottom="0.0396in" fo:border="0.5pt solid #000000" style:writing-mode="lr-tb"/>
    </style:style>
    <style:style style:name="Table1.B8" style:family="table-cell">
      <style:table-cell-properties style:vertical-align="middle" fo:padding-left="0.075in" fo:padding-right="0.075in" fo:padding-top="0.0396in" fo:padding-bottom="0.0396in" fo:border="0.5pt solid #000000" style:writing-mode="lr-tb"/>
    </style:style>
    <style:style style:name="Table1.A9" style:family="table-cell">
      <style:table-cell-properties style:vertical-align="middle" fo:padding-left="0.075in" fo:padding-right="0.075in" fo:padding-top="0.0396in" fo:padding-bottom="0.0396in" fo:border="0.5pt solid #000000" style:writing-mode="lr-tb"/>
    </style:style>
    <style:style style:name="Table1.B9" style:family="table-cell">
      <style:table-cell-properties style:vertical-align="middle" fo:padding-left="0.075in" fo:padding-right="0.075in" fo:padding-top="0.0396in" fo:padding-bottom="0.0396in" fo:border="0.5pt solid #000000" style:writing-mode="lr-tb"/>
    </style:style>
    <style:style style:name="Table1.A10" style:family="table-cell">
      <style:table-cell-properties style:vertical-align="middle" fo:padding-left="0.075in" fo:padding-right="0.075in" fo:padding-top="0.0396in" fo:padding-bottom="0.0396in" fo:border="0.5pt solid #000000" style:writing-mode="lr-tb"/>
    </style:style>
    <style:style style:name="Table1.B10" style:family="table-cell">
      <style:table-cell-properties style:vertical-align="middle" fo:padding-left="0.075in" fo:padding-right="0.075in" fo:padding-top="0.0396in" fo:padding-bottom="0.0396in" fo:border="0.5pt solid #000000" style:writing-mode="lr-tb"/>
    </style:style>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GB" fo:font-style="italic" style:font-style-asian="italic"/>
    </style:style>
    <style:style style:name="P4" style:family="paragraph" style:parent-style-name="Standard">
      <style:text-properties style:font-name="Calibri1" fo:language="en" fo:country="GB"/>
    </style:style>
    <style:style style:name="P5" style:family="paragraph" style:parent-style-name="Standard">
      <style:paragraph-properties fo:margin-top="0in" fo:margin-bottom="0in" style:contextual-spacing="false" fo:break-before="page"/>
      <style:text-properties fo:language="en" fo:country="GB"/>
    </style:style>
    <style:style style:name="P6" style:family="paragraph" style:parent-style-name="Standard">
      <style:text-properties fo:language="en" fo:country="GB"/>
    </style:style>
    <style:style style:name="P7" style:family="paragraph" style:parent-style-name="Standard">
      <style:paragraph-properties fo:text-align="center" style:justify-single-word="false"/>
      <style:text-properties fo:language="en" fo:country="GB"/>
    </style:style>
    <style:style style:name="P8" style:family="paragraph" style:parent-style-name="Standard">
      <style:paragraph-properties fo:margin-top="0in" fo:margin-bottom="0in" style:contextual-spacing="false" fo:text-align="center" style:justify-single-word="false" fo:break-before="page"/>
    </style:style>
    <style:style style:name="P9" style:family="paragraph" style:parent-style-name="Standard">
      <style:paragraph-properties fo:text-align="center" style:justify-single-word="false"/>
      <style:text-properties style:font-name="Calibri1" fo:font-size="16pt" fo:language="en" fo:country="GB" fo:font-weight="bold" style:font-size-asian="16pt" style:font-weight-asian="bold" style:font-size-complex="16pt"/>
    </style:style>
    <style:style style:name="P10" style:family="paragraph" style:parent-style-name="Standard">
      <style:text-properties style:font-name="Calibri1" fo:font-size="16pt" fo:language="en" fo:country="GB" fo:font-weight="bold" style:font-size-asian="16pt" style:font-weight-asian="bold" style:font-size-complex="16pt"/>
    </style:style>
    <style:style style:name="P11" style:family="paragraph" style:parent-style-name="Standard">
      <style:paragraph-properties fo:margin-top="0.0835in" fo:margin-bottom="0in" style:contextual-spacing="false"/>
    </style:style>
    <style:style style:name="P12" style:family="paragraph" style:parent-style-name="Standard">
      <style:paragraph-properties fo:margin-top="0.1665in" fo:margin-bottom="0in" style:contextual-spacing="false"/>
    </style:style>
    <style:style style:name="P13" style:family="paragraph" style:parent-style-name="Heading_20_1">
      <style:paragraph-properties fo:text-indent="-0.248in" style:auto-text-indent="false" fo:break-before="page"/>
    </style:style>
    <style:style style:name="P14" style:family="paragraph" style:parent-style-name="Standard">
      <style:paragraph-properties fo:margin-left="0.4917in" fo:margin-right="0.3736in"/>
    </style:style>
    <style:style style:name="P15" style:family="paragraph" style:parent-style-name="Footnote">
      <style:paragraph-properties fo:margin-top="0.0835in" fo:margin-bottom="0in" style:contextual-spacing="false"/>
    </style:style>
    <style:style style:name="P16" style:family="paragraph">
      <loext:graphic-properties draw:fill="none"/>
      <style:paragraph-properties fo:text-align="center"/>
    </style:style>
    <style:style style:name="P17" style:family="paragraph">
      <loext:graphic-properties draw:fill="solid" draw:fill-color="#ffffff"/>
      <style:paragraph-properties fo:text-align="left"/>
      <style:text-properties fo:font-size="18pt"/>
    </style:style>
    <style:style style:name="P18" style:family="paragraph" style:parent-style-name="Standard">
      <style:paragraph-properties fo:margin-top="0.0835in" fo:margin-bottom="0in" style:contextual-spacing="false"/>
      <style:text-properties style:font-name="Calibri1" fo:language="en" fo:country="GB"/>
    </style:style>
    <style:style style:name="P19" style:family="paragraph" style:parent-style-name="List_20_Paragraph" style:list-style-name="WWNum11">
      <style:paragraph-properties fo:margin-top="0.0835in" fo:margin-bottom="0in" style:contextual-spacing="true"/>
    </style:style>
    <style:style style:name="P20" style:family="paragraph" style:parent-style-name="Heading_20_2">
      <style:paragraph-properties fo:margin-left="0.0984in" fo:text-indent="-0.3484in" style:auto-text-indent="false">
        <style:tab-stops>
          <style:tab-stop style:position="0.1972in"/>
        </style:tab-stops>
      </style:paragraph-properties>
    </style:style>
    <style:style style:name="P21" style:family="paragraph" style:parent-style-name="Standard">
      <style:paragraph-properties fo:text-indent="0.4917in" style:auto-text-indent="false"/>
    </style:style>
    <style:style style:name="P22" style:family="paragraph" style:parent-style-name="Standard">
      <style:paragraph-properties fo:margin-top="0.0835in" fo:margin-bottom="0.25in" style:contextual-spacing="false"/>
    </style:style>
    <style:style style:name="P23" style:family="paragraph" style:parent-style-name="List_20_Paragraph" style:list-style-name="WWNum20">
      <style:paragraph-properties fo:keep-with-next="always"/>
    </style:style>
    <style:style style:name="P24" style:family="paragraph" style:parent-style-name="List_20_Paragraph">
      <style:paragraph-properties fo:margin-left="0.248in" fo:margin-top="0.0835in" fo:margin-bottom="0in" style:contextual-spacing="false" fo:keep-with-next="always"/>
    </style:style>
    <style:style style:name="P25" style:family="paragraph" style:parent-style-name="List_20_Paragraph">
      <style:paragraph-properties fo:margin-left="0.25in" fo:keep-with-next="always"/>
      <style:text-properties style:font-name="Calibri1" fo:language="en" fo:country="GB"/>
    </style:style>
    <style:style style:name="P26" style:family="paragraph" style:parent-style-name="List_20_Paragraph">
      <style:text-properties style:font-name="Calibri1" fo:language="en" fo:country="GB"/>
    </style:style>
    <style:style style:name="P27" style:family="paragraph" style:parent-style-name="List_20_Paragraph" style:list-style-name="WWNum20">
      <style:paragraph-properties fo:margin-left="0.248in" fo:text-indent="-0.248in" style:auto-text-indent="false"/>
    </style:style>
    <style:style style:name="P28" style:family="paragraph" style:parent-style-name="List_20_Paragraph" style:list-style-name="WWNum20"/>
    <style:style style:name="P29" style:family="paragraph" style:parent-style-name="Standard">
      <style:paragraph-properties fo:margin-left="0.25in"/>
    </style:style>
    <style:style style:name="P30" style:family="paragraph" style:parent-style-name="Standard">
      <style:paragraph-properties fo:margin-left="0.25in"/>
      <style:text-properties fo:language="en" fo:country="GB"/>
    </style:style>
    <style:style style:name="P31" style:family="paragraph" style:parent-style-name="Standard">
      <style:paragraph-properties fo:margin-left="0.25in" fo:text-align="center" style:justify-single-word="false"/>
    </style:style>
    <style:style style:name="P32" style:family="paragraph" style:parent-style-name="Standard">
      <loext:graphic-properties draw:fill="solid" draw:fill-color="#f2f2f2"/>
      <style:paragraph-properties fo:background-color="#f2f2f2" fo:padding="0.0835in" fo:border="0.51pt solid #ffffff" style:shadow="none"/>
    </style:style>
    <style:style style:name="P33" style:family="paragraph" style:parent-style-name="Heading_20_1">
      <style:paragraph-properties fo:keep-together="always"/>
    </style:style>
    <style:style style:name="P34" style:family="paragraph" style:parent-style-name="Standard">
      <style:paragraph-properties fo:keep-with-next="always"/>
      <style:text-properties fo:language="en" fo:country="GB"/>
    </style:style>
    <style:style style:name="P35" style:family="paragraph" style:parent-style-name="Standard">
      <style:paragraph-properties fo:keep-with-next="always"/>
    </style:style>
    <style:style style:name="P36" style:family="paragraph" style:parent-style-name="List_20_Paragraph" style:list-style-name="WWNum12">
      <style:paragraph-properties fo:margin-left="0.4957in" fo:margin-top="0in" fo:margin-bottom="0in" style:contextual-spacing="false" fo:text-indent="-0.248in" style:auto-text-indent="false"/>
    </style:style>
    <style:style style:name="P37" style:family="paragraph" style:parent-style-name="List_20_Paragraph" style:list-style-name="WWNum12">
      <style:paragraph-properties fo:margin-left="0.4957in" fo:margin-top="0.0835in" fo:margin-bottom="0in" style:contextual-spacing="false" fo:text-indent="-0.248in" style:auto-text-indent="false"/>
    </style:style>
    <style:style style:name="P38" style:family="paragraph" style:parent-style-name="Standard">
      <style:paragraph-properties fo:margin-top="0.25in" fo:margin-bottom="0in" style:contextual-spacing="false"/>
    </style:style>
    <style:style style:name="P39" style:family="paragraph" style:parent-style-name="Standard">
      <style:paragraph-properties fo:margin-top="0.1665in" fo:margin-bottom="0in" style:contextual-spacing="false"/>
      <style:text-properties fo:language="en" fo:country="GB"/>
    </style:style>
    <style:style style:name="P40" style:family="paragraph" style:parent-style-name="Standard">
      <style:paragraph-properties fo:margin-top="0.1665in" fo:margin-bottom="0in" style:contextual-spacing="false" fo:keep-with-next="always"/>
    </style:style>
    <style:style style:name="P41" style:family="paragraph" style:parent-style-name="Standard">
      <style:paragraph-properties fo:margin-top="0.0835in" fo:margin-bottom="0in" style:contextual-spacing="false" fo:keep-with-next="always"/>
    </style:style>
    <style:style style:name="P42" style:family="paragraph" style:parent-style-name="List_20_Paragraph">
      <style:paragraph-properties fo:margin-top="0.0835in" fo:margin-bottom="0in" style:contextual-spacing="false"/>
      <style:text-properties fo:language="en" fo:country="GB"/>
    </style:style>
    <style:style style:name="P43" style:family="paragraph" style:parent-style-name="List_20_Paragraph" style:list-style-name="WWNum23">
      <style:paragraph-properties fo:margin-left="0.248in" fo:margin-top="0.25in" fo:margin-bottom="0in" style:contextual-spacing="true" fo:text-indent="-0.248in" style:auto-text-indent="false"/>
    </style:style>
    <style:style style:name="P44" style:family="paragraph" style:parent-style-name="Standard">
      <style:paragraph-properties fo:margin-top="0.1665in" fo:margin-bottom="0in" style:contextual-spacing="false" fo:text-indent="0.25in" style:auto-text-indent="false"/>
    </style:style>
    <style:style style:name="P45" style:family="paragraph" style:parent-style-name="Standard">
      <style:paragraph-properties fo:margin-top="0.1665in" fo:margin-bottom="0in" style:contextual-spacing="false" fo:text-align="center" style:justify-single-word="false"/>
    </style:style>
    <style:style style:name="P46" style:family="paragraph" style:parent-style-name="List_20_Paragraph" style:list-style-name="WWNum23">
      <style:paragraph-properties fo:margin-top="0.1665in" fo:margin-bottom="0in" style:contextual-spacing="true"/>
    </style:style>
    <style:style style:name="P47" style:family="paragraph" style:parent-style-name="List_20_Paragraph">
      <style:paragraph-properties fo:margin-left="0.25in" fo:margin-top="0.1665in" fo:margin-bottom="0in" style:contextual-spacing="true"/>
      <style:text-properties fo:language="en" fo:country="GB"/>
    </style:style>
    <style:style style:name="P48" style:family="paragraph" style:parent-style-name="List_20_Paragraph">
      <style:text-properties fo:language="en" fo:country="GB"/>
    </style:style>
    <style:style style:name="P49" style:family="paragraph" style:parent-style-name="List_20_Paragraph">
      <style:paragraph-properties fo:margin-left="0.25in" fo:margin-top="0.1665in" fo:margin-bottom="0in" style:contextual-spacing="true"/>
    </style:style>
    <style:style style:name="P50" style:family="paragraph" style:parent-style-name="List_20_Paragraph">
      <style:paragraph-properties fo:margin-left="0.25in" fo:text-align="justify" style:justify-single-word="false" loext:word-spacing-minimum="75%" loext:word-spacing-maximum="133%"/>
    </style:style>
    <style:style style:name="P51" style:family="paragraph">
      <loext:graphic-properties draw:fill="none"/>
      <style:paragraph-properties fo:text-align="left"/>
      <style:text-properties fo:font-size="18pt"/>
    </style:style>
    <style:style style:name="P52" style:family="paragraph" style:parent-style-name="Standard">
      <style:paragraph-properties fo:margin-top="0.0835in" fo:margin-bottom="0in" style:contextual-spacing="false" fo:keep-with-next="always"/>
      <style:text-properties fo:language="en" fo:country="GB"/>
    </style:style>
    <style:style style:name="P53" style:family="paragraph" style:parent-style-name="Standard">
      <style:paragraph-properties fo:margin-top="0in" fo:margin-bottom="0in" style:contextual-spacing="false" fo:text-align="center" style:justify-single-word="false" fo:orphans="2" fo:widows="2" fo:keep-with-next="always"/>
      <style:text-properties style:letter-kerning="false" style:font-name-asian="Times New Roman1" style:font-name-complex="Times New Roman1" style:language-complex="ar" style:country-complex="SA"/>
    </style:style>
    <style:style style:name="P54" style:family="paragraph" style:parent-style-name="Standard">
      <style:paragraph-properties fo:margin-top="0in" fo:margin-bottom="0in" style:contextual-spacing="false" fo:text-align="left" style:justify-single-word="false" fo:orphans="2" fo:widows="2" fo:keep-with-next="always"/>
      <style:text-properties style:letter-kerning="false" style:font-name-asian="Times New Roman1" style:font-name-complex="Times New Roman1" style:language-complex="ar" style:country-complex="SA"/>
    </style:style>
    <style:style style:name="P55" style:family="paragraph" style:parent-style-name="Standard">
      <style:paragraph-properties fo:margin-top="0in" fo:margin-bottom="0in" style:contextual-spacing="false" fo:text-align="center" style:justify-single-word="false" fo:orphans="2" fo:widows="2"/>
      <style:text-properties style:letter-kerning="false" style:font-name-asian="Times New Roman1" style:font-name-complex="Times New Roman1" style:language-complex="ar" style:country-complex="SA"/>
    </style:style>
    <style:style style:name="P56" style:family="paragraph" style:parent-style-name="Standard">
      <style:paragraph-properties fo:margin-top="0in" fo:margin-bottom="0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57" style:family="paragraph" style:parent-style-name="List_20_Paragraph" style:list-style-name="WWNum32">
      <style:paragraph-properties fo:margin-top="0.1665in" fo:margin-bottom="0in" style:contextual-spacing="true"/>
    </style:style>
    <style:style style:name="P58" style:family="paragraph" style:parent-style-name="List_20_Paragraph" style:list-style-name="WWNum32">
      <style:paragraph-properties fo:margin-top="0.0835in" fo:margin-bottom="0in" style:contextual-spacing="false"/>
    </style:style>
    <style:style style:name="P59" style:family="paragraph" style:parent-style-name="List_20_Paragraph" style:list-style-name="WWNum13">
      <style:paragraph-properties fo:margin-top="0.1665in" fo:margin-bottom="0in" style:contextual-spacing="true"/>
    </style:style>
    <style:style style:name="P60" style:family="paragraph" style:parent-style-name="List_20_Paragraph" style:list-style-name="WWNum13">
      <style:paragraph-properties fo:margin-left="0.4957in" fo:margin-top="0.0835in" fo:margin-bottom="0in" style:contextual-spacing="false" fo:text-indent="-0.248in" style:auto-text-indent="false"/>
    </style:style>
    <style:style style:name="P61" style:family="paragraph" style:parent-style-name="Standard">
      <style:paragraph-properties fo:margin-top="0.0835in" fo:margin-bottom="0in" style:contextual-spacing="false"/>
      <style:text-properties fo:language="en" fo:country="GB"/>
    </style:style>
    <style:style style:name="P62"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6pt" fo:language="en" fo:country="GB" fo:font-weight="bold" style:font-size-asian="36pt" style:font-weight-asian="bold" style:font-size-complex="20pt"/>
    </style:style>
    <style:style style:name="T3" style:family="text">
      <style:text-properties fo:language="en" fo:country="GB" fo:font-style="italic" style:font-style-asian="italic"/>
    </style:style>
    <style:style style:name="T4" style:family="text">
      <style:text-properties style:font-name="Calibri1" fo:language="en" fo:country="GB"/>
    </style:style>
    <style:style style:name="T5" style:family="text">
      <style:text-properties fo:language="en" fo:country="GB"/>
    </style:style>
    <style:style style:name="T6" style:family="text">
      <style:text-properties fo:font-size="16pt" fo:language="en" fo:country="GB" style:font-size-asian="16pt"/>
    </style:style>
    <style:style style:name="T7" style:family="text">
      <style:text-properties fo:font-size="11pt" fo:language="en" fo:country="GB" fo:font-style="italic" style:font-size-asian="11pt" style:font-style-asian="italic"/>
    </style:style>
    <style:style style:name="T8" style:family="text">
      <style:text-properties style:font-name="Calibri1" fo:font-size="16pt" fo:language="en" fo:country="GB" fo:font-weight="bold" style:font-size-asian="16pt" style:font-weight-asian="bold" style:font-size-complex="16pt"/>
    </style:style>
    <style:style style:name="T9" style:family="text">
      <style:text-properties style:font-name="Calibri" fo:font-size="11pt" fo:language="en" fo:country="GB" fo:font-weight="normal" style:letter-kerning="true" style:font-family-asian="'ＭＳ 明朝'" style:font-family-generic-asian="system" style:font-pitch-asian="variable" style:font-size-asian="11pt" style:language-asian="en" style:country-asian="GB" style:font-weight-asian="normal" style:font-name-complex="Arial1" style:font-size-complex="11pt"/>
    </style:style>
    <style:style style:name="T10" style:family="text">
      <style:text-properties style:font-name="Calibri1" fo:font-size="11pt" fo:language="en" fo:country="GB" fo:font-weight="normal" style:letter-kerning="true" style:font-family-asian="'ＭＳ 明朝'" style:font-family-generic-asian="system" style:font-pitch-asian="variable" style:font-size-asian="11pt" style:language-asian="en" style:country-asian="GB" style:font-weight-asian="normal" style:font-name-complex="Arial1" style:font-size-complex="11pt"/>
    </style:style>
    <style:style style:name="T11" style:family="text">
      <style:text-properties text:display="true"/>
    </style:style>
    <style:style style:name="T12" style:family="text">
      <style:text-properties style:font-name="Calibri" fo:font-size="11pt" fo:language="en" fo:country="GB" fo:font-style="normal" style:letter-kerning="true" style:font-family-asian="'ＭＳ 明朝'" style:font-family-generic-asian="system" style:font-pitch-asian="variable" style:font-size-asian="11pt" style:language-asian="en" style:country-asian="GB" style:font-style-asian="normal" style:font-name-complex="Arial1" style:font-size-complex="11pt"/>
    </style:style>
    <style:style style:name="T13" style:family="text">
      <style:text-properties style:font-name="Calibri1" fo:font-size="11pt" fo:language="en" fo:country="GB" fo:font-style="normal" style:letter-kerning="true" style:font-family-asian="'ＭＳ 明朝'" style:font-family-generic-asian="system" style:font-pitch-asian="variable" style:font-size-asian="11pt" style:language-asian="en" style:country-asian="GB" style:font-style-asian="normal" style:font-name-complex="Arial1" style:font-size-complex="11pt"/>
    </style:style>
    <style:style style:name="T14" style:family="text">
      <style:text-properties style:font-name="Calibri1" fo:language="en" fo:country="GB" fo:font-weight="bold" style:font-weight-asian="bold"/>
    </style:style>
    <style:style style:name="T15" style:family="text">
      <style:text-properties style:font-name="Calibri1" fo:language="en" fo:country="GB" fo:font-weight="bold" style:font-weight-asian="bold" style:font-weight-complex="bold"/>
    </style:style>
    <style:style style:name="T16" style:family="text">
      <style:text-properties style:font-name="Calibri1" fo:font-size="11pt" fo:language="en" fo:country="GB" style:font-size-asian="11pt"/>
    </style:style>
    <style:style style:name="T17" style:family="text">
      <style:text-properties fo:font-size="11pt" fo:language="en" fo:country="GB" style:font-size-asian="11pt"/>
    </style:style>
    <style:style style:name="T18" style:family="text">
      <style:text-properties fo:font-family="'Arial Unicode MS'" style:font-family-generic="swiss" style:font-pitch="variable" fo:font-size="11pt" fo:language="en" fo:country="GB" style:font-family-asian="'Arial Unicode MS'" style:font-family-generic-asian="system" style:font-pitch-asian="variable" style:font-size-asian="11pt" style:font-family-complex="'Arial Unicode MS'" style:font-family-generic-complex="system" style:font-pitch-complex="variable" style:font-size-complex="11pt" style:language-complex="hi" style:country-complex="IN"/>
    </style:style>
    <style:style style:name="T19" style:family="text">
      <style:text-properties fo:font-family="'Arial Unicode MS'" style:font-family-generic="swiss" style:font-pitch="variable" fo:font-size="11pt" fo:language="en" fo:country="GB" style:font-family-asian="'Arial Unicode MS'" style:font-family-generic-asian="system" style:font-pitch-asian="variable" style:font-size-asian="11pt" style:font-family-complex="'Arial Unicode MS'" style:font-family-generic-complex="system" style:font-pitch-complex="variable" style:font-size-complex="11pt" style:language-complex="hi" style:country-complex="IN" style:script-type="complex"/>
    </style:style>
    <style:style style:name="T20" style:family="text">
      <style:text-properties fo:font-family="'Arial Unicode MS'" style:font-family-generic="swiss" style:font-pitch="variable" fo:font-size="11pt" style:font-family-asian="'Arial Unicode MS'" style:font-family-generic-asian="system" style:font-pitch-asian="variable" style:font-size-asian="11pt" style:font-family-complex="'Arial Unicode MS'" style:font-family-generic-complex="system" style:font-pitch-complex="variable" style:font-size-complex="11pt" style:language-complex="hi" style:country-complex="IN" style:script-type="asian"/>
    </style:style>
    <style:style style:name="T21" style:family="text">
      <style:text-properties fo:font-family="'Arial Unicode MS'" style:font-family-generic="swiss" style:font-pitch="variable" fo:font-size="11pt" style:font-family-asian="'Arial Unicode MS'" style:font-family-generic-asian="system" style:font-pitch-asian="variable" style:font-size-asian="11pt" style:font-family-complex="'Arial Unicode MS'" style:font-family-generic-complex="system" style:font-pitch-complex="variable" style:font-size-complex="11pt" style:language-complex="hi" style:country-complex="IN" style:script-type="complex"/>
    </style:style>
    <style:style style:name="T22" style:family="text">
      <style:text-properties style:font-name="Calibri1" fo:language="en" fo:country="GB" style:font-family-complex="Tahoma" style:font-family-generic-complex="system" style:font-pitch-complex="variable"/>
    </style:style>
    <style:style style:name="T23" style:family="text">
      <style:text-properties style:font-name="Calibri1" fo:language="en" fo:country="GB" fo:font-weight="bold" style:font-weight-asian="bold" style:font-family-complex="Tahoma" style:font-family-generic-complex="system" style:font-pitch-complex="variable"/>
    </style:style>
    <style:style style:name="T24" style:family="text">
      <style:text-properties fo:language="en" fo:country="GB" style:text-underline-style="solid" style:text-underline-width="auto" style:text-underline-color="font-color" fo:font-weight="bold" style:font-weight-asian="bold" style:font-weight-complex="bold"/>
    </style:style>
    <style:style style:name="T25" style:family="text">
      <style:text-properties fo:language="en" fo:country="GB" fo:font-weight="bold" style:font-weight-asian="bold"/>
    </style:style>
    <style:style style:name="T26" style:family="text">
      <style:text-properties fo:language="en" fo:country="GB" fo:font-weight="bold" style:font-weight-asian="bold" style:font-weight-complex="bold"/>
    </style:style>
    <style:style style:name="T27" style:family="text">
      <style:text-properties fo:font-family="Wingdings" style:font-family-generic="swiss" style:font-pitch="variable" style:font-charset="x-symbol" fo:language="en" fo:country="GB" style:font-family-asian="Wingdings" style:font-family-generic-asian="system" style:font-pitch-asian="variable" style:font-family-complex="Wingdings" style:font-family-generic-complex="system" style:font-pitch-complex="variable"/>
    </style:style>
    <style:style style:name="T28" style:family="text">
      <style:text-properties fo:language="en" fo:country="GB"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4.5902in, 0in, 3.7673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5.7783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1681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6.6217in, 0in, 0in)" draw:image-opacity="100%" style:mirror="none"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in" svg:stroke-color="#3a5f8b" svg:stroke-linecap="butt" draw:fill="solid" draw:fill-color="#ffffff" draw:textarea-vertical-align="top" draw:auto-grow-height="false" fo:min-height="0.3028in" fo:min-width="0in" fo:padding-top="0.0492in" fo:padding-bottom="0.0492in" fo:padding-left="0.0984in" fo:padding-right="0.0984in" fo:wrap-option="wrap" loext:decorative="false" fo:margin-left="0.1453in" fo:margin-right="0.1453in" fo:margin-top="0in" fo:margin-bottom="0.0311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3" style:family="graphic">
      <style:graphic-properties draw:stroke="solid" svg:stroke-width="0.028in" svg:stroke-color="#3a5f8b" svg:stroke-linecap="butt" draw:fill="solid" draw:fill-color="#ffffff" draw:textarea-vertical-align="top" draw:auto-grow-height="false" fo:min-height="0.3028in" fo:min-width="0in" fo:padding-top="0.0492in" fo:padding-bottom="0.0492in" fo:padding-left="0.0984in" fo:padding-right="0.0984in" fo:wrap-option="wrap" loext:decorative="false" fo:margin-left="0.0209in" fo:margin-right="0.0417in" fo:margin-top="0in" fo:margin-bottom="0.052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accent1" loext:color-type="theme"/>
        <loext:fill-complex-color loext:theme-type="light1" loext:color-type="theme"/>
      </style:graphic-properties>
    </style:style>
    <style:style style:name="gr4" style:family="graphic">
      <style:graphic-properties draw:stroke="solid" svg:stroke-width="0.028in" svg:stroke-color="#3a5f8b" svg:stroke-linecap="butt" draw:fill="solid" draw:fill-color="#ffffff" draw:textarea-vertical-align="top" draw:auto-grow-height="false" fo:min-height="0.3028in" fo:min-width="0in" fo:padding-top="0.0492in" fo:padding-bottom="0.0492in" fo:padding-left="0.0984in" fo:padding-right="0.0984in" fo:wrap-option="wrap" loext:decorative="false" fo:margin-left="0.0209in" fo:margin-right="0.0417in" fo:margin-top="0in" fo:margin-bottom="0.05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5" style:family="graphic">
      <style:graphic-properties draw:stroke="solid" svg:stroke-width="0.028in" svg:stroke-color="#3a5f8b" svg:stroke-linecap="butt" draw:fill="solid" draw:fill-color="#ffffff" draw:textarea-vertical-align="top" draw:auto-grow-height="false" fo:min-height="0.6417in" fo:min-width="0in" fo:padding-top="0.0492in" fo:padding-bottom="0.0492in" fo:padding-left="0.0984in" fo:padding-right="0.0984in" fo:wrap-option="wrap" loext:decorative="false" fo:margin-left="0in" fo:margin-right="0.0134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6" style:family="graphic">
      <style:graphic-properties draw:stroke="solid" svg:stroke-width="0.0102in" svg:stroke-color="#000000" draw:stroke-linejoin="miter" draw:fill="solid" draw:fill-color="#ffffff" draw:textarea-vertical-align="top" draw:auto-grow-height="false" fo:min-height="0.0362in" fo:min-width="1.7575in" fo:padding-top="0.0492in" fo:padding-bottom="0.0492in" fo:padding-left="0.0984in" fo:padding-right="0.0984in" fo:wrap-option="wrap" loext:decorative="false" fo:margin-left="0.2165in" fo:margin-right="0.1819in" fo:margin-top="0in" fo:margin-bottom="0.01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102in" svg:stroke-color="#000000" draw:stroke-linejoin="miter" draw:fill="solid" draw:fill-color="#ffffff" draw:textarea-vertical-align="top" draw:auto-grow-height="false" fo:min-height="0.0362in" fo:min-width="1.7244in" fo:padding-top="0.0492in" fo:padding-bottom="0.0492in" fo:padding-left="0.0984in" fo:padding-right="0.0984in" fo:wrap-option="wrap" loext:decorative="false" fo:margin-left="0.2008in" fo:margin-right="0.1984in" fo:margin-top="0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solid" svg:stroke-width="0.0102in" svg:stroke-color="#ffffff" draw:stroke-linejoin="miter" draw:fill="solid" draw:fill-color="#ffffff" draw:textarea-vertical-align="top" draw:auto-grow-height="true" fo:min-height="0in" fo:min-width="0in" fo:padding-top="0.05in" fo:padding-bottom="0.05in" fo:padding-left="0.1in" fo:padding-right="0.1in" fo:wrap-option="wrap" loext:decorative="false" fo:margin-left="0in" fo:margin-right="0.0228in" fo:margin-top="0in" fo:margin-bottom="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width-rel="paragraph" loext:rel-height-rel="paragraph">
        <loext:stroke-complex-color loext:theme-type="light1" loext:color-type="theme"/>
      </style:graphic-properties>
    </style:style>
    <style:style style:name="gr9" style:family="graphic" style:parent-style-name="Frame">
      <style:graphic-properties draw:stroke="solid" svg:stroke-width="0.0102in" svg:stroke-color="#ffffff"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0228in" fo:margin-top="0in" fo:margin-bottom="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width-rel="paragraph" loext:rel-height-rel="paragraph">
        <loext:stroke-complex-color loext:theme-type="light1" loext:color-type="theme"/>
      </style:graphic-properties>
    </style:style>
    <style:style style:name="gr10" style:family="graphic">
      <style:graphic-properties draw:stroke="solid" svg:stroke-width="0.0102in" svg:stroke-color="#000000" draw:stroke-linejoin="miter" draw:fill="solid" draw:fill-color="#ffffff" draw:textarea-vertical-align="top" draw:auto-grow-height="false" fo:min-height="0.0362in" fo:min-width="0.7957in" fo:padding-top="0.0492in" fo:padding-bottom="0.0492in" fo:padding-left="0.0984in" fo:padding-right="0.0984in" fo:wrap-option="wrap" loext:decorative="false" fo:margin-left="0.2571in" fo:margin-right="0.2661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solid" svg:stroke-width="0.0102in" svg:stroke-color="#ffffff"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0311in" fo:margin-top="0in" fo:margin-bottom="0.0201in" style:run-through="foreground" style:wrap="run-through" style:number-wrapped-paragraphs="no-limit" style:vertical-pos="from-top" style:vertical-rel="paragraph" style:horizontal-pos="left" style:horizontal-rel="page-content" draw:wrap-influence-on-position="once-concurrent" loext:allow-overlap="true" style:flow-with-text="false" loext:rel-height-rel="paragraph">
        <loext:stroke-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draw:style-name="fr1" draw:name="Picture 13" text:anchor-type="as-char" svg:width="5.3839in" svg:height="1.752in" draw:z-index="35"><draw:image xlink:href="Pictures/100000010000076700000269044D798A.png" xlink:type="simple" xlink:show="embed" xlink:actuate="onLoad" draw:mime-type="image/png"/><svg:desc>RAB-logo</svg:desc></draw:frame></text:p>
      <text:p text:style-name="P1" loext:marker-style-name="T1"/>
      <text:p text:style-name="P1" loext:marker-style-name="T1"/>
      <text:p text:style-name="P1" loext:marker-style-name="T1"/>
      <text:p text:style-name="P2" loext:marker-style-name="T2"><text:s/><text:span text:style-name="T2">Using aeneas for <text:line-break/>Audio-Text Synchronization</text:span><text:span text:style-name="T2"/></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2" loext:marker-style-name="T3"><draw:frame draw:style-name="fr1" draw:name="Image 2" text:anchor-type="as-char" svg:width="0.6772in" svg:height="0.7598in" draw:z-index="39"><draw:image xlink:href="Pictures/100000010000042C000004B0826D13D2.png" xlink:type="simple" xlink:show="embed" xlink:actuate="onLoad" draw:mime-type="image/png"/></draw:frame></text:p>
      <text:p text:style-name="P3" loext:marker-style-name="T3"/>
      <text:p text:style-name="P3" loext:marker-style-name="T3"/>
      <text:p text:style-name="P4" loext:marker-style-name="T4"/>
      <text:p text:style-name="P5"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7" loext:marker-style-name="T5"/>
      <text:p text:style-name="P2" loext:marker-style-name="T6"><text:span text:style-name="T6">Reading App Builder: Using aeneas for </text:span><text:span text:style-name="T6"/></text:p>
      <text:p text:style-name="P2" loext:marker-style-name="T6"><text:span text:style-name="T6">Audio-Text Synchronization</text:span><text:span text:style-name="T6"/></text:p>
      <text:p text:style-name="P7" loext:marker-style-name="T5"/>
      <text:p text:style-name="P2" loext:marker-style-name="T5"><text:span text:style-name="T5">© 2023, SIL International</text:span><text:span text:style-name="T5"/></text:p>
      <text:p text:style-name="P7" loext:marker-style-name="T5"/>
      <text:p text:style-name="P2" loext:marker-style-name="T7"><text:span text:style-name="T7">Last updated: 19 June 2023</text:span><text:span text:style-name="T7"/></text:p>
      <text:p text:style-name="P7" loext:marker-style-name="T5"/>
      <text:p text:style-name="P7" loext:marker-style-name="T5"/>
      <text:p text:style-name="P7" loext:marker-style-name="T5"/>
      <text:p text:style-name="P7" loext:marker-style-name="T5"/>
      <text:p text:style-name="P7" loext:marker-style-name="T5"/>
      <text:p text:style-name="P2">You are free to print this manual for personal use and for training workshops.</text:p>
      <text:p text:style-name="P2"/>
      <text:p text:style-name="P2">The latest version is available at</text:p>
      <text:p text:style-name="P2" loext:marker-style-name="T5"><text:a xlink:type="simple" xlink:href="http://software.sil.org/readingappbuilder/resources/" text:style-name="Internet_20_link" text:visited-style-name="Visited_20_Internet_20_Link"><text:span text:style-name="Internet_20_link"><text:span text:style-name="T5">http://software.sil.org/readingappbuilder/resources/</text:span></text:span></text:a><text:span text:style-name="T5"> <text:s/></text:span></text:p>
      <text:p text:style-name="P7" loext:marker-style-name="T5"/>
      <text:p text:style-name="P2" loext:marker-style-name="T5"><text:span text:style-name="T5">and on the Help menu of Reading App Builder.</text:span><text:span text:style-name="T5"/></text:p>
      <text:p text:style-name="P6" loext:marker-style-name="T5"/>
      <text:p text:style-name="P6" loext:marker-style-name="T5"/>
      <text:p text:style-name="P8" loext:marker-style-name="T8"><text:span text:style-name="T8">Contents</text:span><text:span text:style-name="T8"/></text:p>
      <text:p text:style-name="P9" loext:marker-style-name="T8"/>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9"><text:a xlink:type="simple" xlink:href="#_Toc138058875" text:style-name="Index_20_Link" text:visited-style-name="Index_20_Link"><text:span text:style-name="T5">1.</text:span><text:span text:style-name="T10"><text:tab/></text:span>Introduction<text:span text:style-name="T11"><text:tab/>5</text:span></text:a></text:p>
          <text:p text:style-name="Contents_20_2" loext:marker-style-name="T12"><text:a xlink:type="simple" xlink:href="#_Toc138058876" text:style-name="Index_20_Link" text:visited-style-name="Index_20_Link">1.1.<text:span text:style-name="T13"><text:tab/></text:span>What is aeneas?<text:span text:style-name="T11"><text:tab/>5</text:span></text:a></text:p>
          <text:p text:style-name="Contents_20_2" loext:marker-style-name="T12"><text:a xlink:type="simple" xlink:href="#_Toc138058877" text:style-name="Index_20_Link" text:visited-style-name="Index_20_Link">1.2.<text:span text:style-name="T13"><text:tab/></text:span>Will it work with our language?<text:span text:style-name="T11"><text:tab/>6</text:span></text:a></text:p>
          <text:p text:style-name="Contents_20_2" loext:marker-style-name="T12"><text:a xlink:type="simple" xlink:href="#_Toc138058878" text:style-name="Index_20_Link" text:visited-style-name="Index_20_Link">1.3.<text:span text:style-name="T13"><text:tab/></text:span>How long does it take?<text:span text:style-name="T11"><text:tab/>6</text:span></text:a></text:p>
          <text:p text:style-name="Contents_20_2" loext:marker-style-name="T12"><text:a xlink:type="simple" xlink:href="#_Toc138058879" text:style-name="Index_20_Link" text:visited-style-name="Index_20_Link">1.4.<text:span text:style-name="T13"><text:tab/></text:span>How do we run aeneas?<text:span text:style-name="T11"><text:tab/>6</text:span></text:a></text:p>
          <text:p text:style-name="Contents_20_1" loext:marker-style-name="T9"><text:a xlink:type="simple" xlink:href="#_Toc138058880" text:style-name="Index_20_Link" text:visited-style-name="Index_20_Link"><text:span text:style-name="T5">2.</text:span><text:span text:style-name="T10"><text:tab/></text:span>Windows<text:span text:style-name="T5"> Installation</text:span><text:span text:style-name="T11"><text:tab/>6</text:span></text:a></text:p>
          <text:p text:style-name="Contents_20_1" loext:marker-style-name="T9"><text:a xlink:type="simple" xlink:href="#_Toc138058881" text:style-name="Index_20_Link" text:visited-style-name="Index_20_Link"><text:span text:style-name="T5">3.</text:span><text:span text:style-name="T10"><text:tab/></text:span>Linux<text:span text:style-name="T5"> Installation</text:span><text:span text:style-name="T11"><text:tab/>9</text:span></text:a></text:p>
          <text:p text:style-name="Contents_20_1" loext:marker-style-name="T9"><text:a xlink:type="simple" xlink:href="#_Toc138058882" text:style-name="Index_20_Link" text:visited-style-name="Index_20_Link"><text:span text:style-name="T5">4.</text:span><text:span text:style-name="T10"><text:tab/></text:span><text:span text:style-name="T5">Using aeneas within Reading App Builder</text:span><text:span text:style-name="T11"><text:tab/>9</text:span></text:a></text:p>
          <text:p text:style-name="Contents_20_2" loext:marker-style-name="T12"><text:a xlink:type="simple" xlink:href="#_Toc138058883" text:style-name="Index_20_Link" text:visited-style-name="Index_20_Link">4.1.<text:span text:style-name="T13"><text:tab/></text:span>Running the Audio Synchronization wizard<text:span text:style-name="T11"><text:tab/>9</text:span></text:a></text:p>
          <text:p text:style-name="Contents_20_2" loext:marker-style-name="T12"><text:a xlink:type="simple" xlink:href="#_Toc138058884" text:style-name="Index_20_Link" text:visited-style-name="Index_20_Link">4.2.<text:span text:style-name="T13"><text:tab/></text:span>Troubleshooting<text:span text:style-name="T11"><text:tab/>9</text:span></text:a></text:p>
          <text:p text:style-name="Contents_20_2" loext:marker-style-name="T12"><text:a xlink:type="simple" xlink:href="#_Toc138058885" text:style-name="Index_20_Link" text:visited-style-name="Index_20_Link">4.3.<text:span text:style-name="T13"><text:tab/></text:span>Viewing and testing the timing files created by aeneas<text:span text:style-name="T11"><text:tab/>10</text:span></text:a></text:p>
          <text:p text:style-name="Contents_20_1" loext:marker-style-name="T9"><text:a xlink:type="simple" xlink:href="#_Toc138058886" text:style-name="Index_20_Link" text:visited-style-name="Index_20_Link">5.<text:span text:style-name="T10"><text:tab/></text:span>Fine Tune Timings<text:span text:style-name="T11"><text:tab/>11</text:span></text:a></text:p>
          <text:p text:style-name="Contents_20_2" loext:marker-style-name="T12"><text:a xlink:type="simple" xlink:href="#_Toc138058887" text:style-name="Index_20_Link" text:visited-style-name="Index_20_Link">5.1.<text:span text:style-name="T13"><text:tab/></text:span>Fine tune timing files using the Fine Tune Timings viewer<text:span text:style-name="T11"><text:tab/>11</text:span></text:a></text:p>
          <text:p text:style-name="Contents_20_2" loext:marker-style-name="T12"><text:a xlink:type="simple" xlink:href="#_Toc138058888" text:style-name="Index_20_Link" text:visited-style-name="Index_20_Link">5.2.<text:span text:style-name="T13"><text:tab/></text:span>Changing audio speed when doing fine tuning<text:span text:style-name="T11"><text:tab/>13</text:span></text:a></text:p>
          <text:p text:style-name="Contents_20_2" loext:marker-style-name="T12"><text:a xlink:type="simple" xlink:href="#_Toc138058889" text:style-name="Index_20_Link" text:visited-style-name="Index_20_Link">5.3.<text:span text:style-name="T13"><text:tab/></text:span>Keyboard shortcuts when doing fine tuning<text:span text:style-name="T11"><text:tab/>13</text:span></text:a></text:p>
          <text:p text:style-name="Contents_20_2" loext:marker-style-name="T12"><text:a xlink:type="simple" xlink:href="#_Toc138058890" text:style-name="Index_20_Link" text:visited-style-name="Index_20_Link">5.4.<text:span text:style-name="T13"><text:tab/></text:span>Sending Fine Tuning files to others<text:span text:style-name="T11"><text:tab/>14</text:span></text:a></text:p>
          <text:p text:style-name="Contents_20_2" loext:marker-style-name="T12"><text:a xlink:type="simple" xlink:href="#_Toc138058891" text:style-name="Index_20_Link" text:visited-style-name="Index_20_Link">5.5.<text:span text:style-name="T13"><text:tab/></text:span>Fine tune timing files using Audacity<text:span text:style-name="T11"><text:tab/>14</text:span></text:a></text:p>
          <text:p text:style-name="Contents_20_1" loext:marker-style-name="T9"><text:a xlink:type="simple" xlink:href="#_Toc138058892" text:style-name="Index_20_Link" text:visited-style-name="Index_20_Link"><text:span text:style-name="T5">6.</text:span><text:span text:style-name="T10"><text:tab/></text:span><text:span text:style-name="T5">Adding voices to eSpeak</text:span><text:span text:style-name="T11"><text:tab/>15</text:span></text:a></text:p>
        </text:index-body>
      </text:table-of-content>
      <text:p text:style-name="P4" loext:marker-style-name="T4"/>
      <text:p text:style-name="P10" loext:marker-style-name="T8"/>
      <text:p text:style-name="P10" loext:marker-style-name="T8"/>
      <text:p text:style-name="P10" loext:marker-style-name="T8"/>
      <text:p text:style-name="P10" loext:marker-style-name="T8"/>
      <text:p text:style-name="P10" loext:marker-style-name="T8"/>
      <text:p text:style-name="P10" loext:marker-style-name="T8"/>
      <text:p text:style-name="P10" loext:marker-style-name="T8"/>
      <text:p text:style-name="P10" loext:marker-style-name="T8"/>
      <text:p text:style-name="P8" loext:marker-style-name="T4"><text:span text:style-name="T8">Acknowledgements</text:span><text:span text:style-name="T8"/></text:p>
      <text:p text:style-name="P4" loext:marker-style-name="T4"/>
      <text:p text:style-name="P4" loext:marker-style-name="T4"/>
      <text:p text:style-name="P4" loext:marker-style-name="T4"/>
      <text:p text:style-name="P4" loext:marker-style-name="T4"/>
      <text:p text:style-name="Standard" loext:marker-style-name="T4"><text:span text:style-name="T4">Thank you very much to Alberto Pettarin, Italy, for all his work developing </text:span><text:span text:style-name="T14">aeneas</text:span><text:span text:style-name="T4"> and for making it freely available for use in synchronising text and audio around the world.</text:span></text:p>
      <text:p text:style-name="P11" loext:marker-style-name="T4"><text:span text:style-name="T4">Website: </text:span><text:a xlink:type="simple" xlink:href="https://github.com/readbeyond/aeneas/#aeneas" text:style-name="Internet_20_link" text:visited-style-name="Visited_20_Internet_20_Link"><text:span text:style-name="Internet_20_link"><text:span text:style-name="T4">https://github.com/readbeyond/aeneas/#aeneas</text:span></text:span></text:a><text:span text:style-name="T4"> </text:span></text:p>
      <text:p text:style-name="P4" loext:marker-style-name="T4"/>
      <text:p text:style-name="Standard" loext:marker-style-name="T4"><text:span text:style-name="T4">These instructions were written using aeneas 1.7.2, released 09 mars 2017.</text:span><text:span text:style-name="T4"/></text:p>
      <text:p text:style-name="P4" loext:marker-style-name="T4"/>
      <text:p text:style-name="P4" loext:marker-style-name="T4"/>
      <text:p text:style-name="P12" loext:marker-style-name="T4"><text:span text:style-name="T4">Thank you to Firat Özdemir for inventing the </text:span><text:span text:style-name="T15">Fine Tuning</text:span><text:span text:style-name="T4"> feature, a modified version of which is built into Reading App Builder. </text:span></text:p>
      <text:p text:style-name="P11" loext:marker-style-name="T4"><text:span text:style-name="T4">Website: </text:span><text:a xlink:type="simple" xlink:href="https://github.com/ozdefir/finetuneas" text:style-name="Internet_20_link" text:visited-style-name="Visited_20_Internet_20_Link"><text:span text:style-name="Internet_20_link"><text:span text:style-name="T4">https://github.com/ozdefir/finetuneas</text:span></text:span></text:a><text:span text:style-name="T4"> </text:span></text:p>
      <text:p text:style-name="P4" loext:marker-style-name="T4"/>
      <text:p text:style-name="P4" loext:marker-style-name="T4"/>
      <text:p text:style-name="P12" loext:marker-style-name="T4"><text:span text:style-name="T4">Thank you to Daniel Bair for his work on the Windows installer for </text:span><text:span text:style-name="T14">aeneas</text:span><text:span text:style-name="T4">.</text:span></text:p>
      <text:p text:style-name="P11" loext:marker-style-name="T4"><text:span text:style-name="T4">Website: </text:span><text:a xlink:type="simple" xlink:href="https://github.com/sillsdev/aeneas-installer" text:style-name="Internet_20_link" text:visited-style-name="Visited_20_Internet_20_Link"><text:span text:style-name="Internet_20_link"><text:span text:style-name="T4">https://github.com/sillsdev/aeneas-installer</text:span></text:span></text:a><text:span text:style-name="T4"> <text:s/></text:span></text:p>
      <text:p text:style-name="P4" loext:marker-style-name="T4"/>
      <text:h text:style-name="P13" text:outline-level="1" loext:marker-style-name="T5"><text:bookmark-start text:name="_Toc138058875"/>Introduction<text:bookmark-end text:name="_Toc138058875"/><text:span text:style-name="T5"/></text:h>
      <text:h text:style-name="Heading_20_2" text:outline-level="2"><text:bookmark-start text:name="_Toc138058876"/>What is aeneas?<text:bookmark-end text:name="_Toc138058876"/></text:h>
      <text:p text:style-name="Standard" loext:marker-style-name="T4"><text:span text:style-name="T14">aeneas</text:span><text:span text:style-name="T4"> is a tool designed to “automagically synchronize audio and text”.</text:span><text:span text:style-name="T4"><text:note text:id="ftn1" text:note-class="footnote"><text:note-citation>1</text:note-citation><text:note-body><text:p text:style-name="Footnote"><text:s/>https://github.com/readbeyond/aeneas/#aeneas</text:p></text:note-body></text:note></text:span><text:span text:style-name="T4"> It takes an audio file and a list of phrases as inputs. Its output is a synchronization timing file, i.e. the same kind of labels file you would create manually in Audacity.</text:span></text:p>
      <text:p text:style-name="P4" loext:marker-style-name="T4"/>
      <text:p text:style-name="Standard" loext:marker-style-name="T4"><text:span text:style-name="T4">The way </text:span><text:span text:style-name="T14">aeneas</text:span><text:span text:style-name="T4"> works is to synthesize each phrase using a text-to-speech engine, and then compare the synthesized audio files against the input audio file to find the phrase breaks. To do this, a lot of clever mathematical computation goes on behind the scenes:</text:span></text:p>
      <text:p text:style-name="P4" loext:marker-style-name="T4"/>
      <text:p text:style-name="P14" loext:marker-style-name="T16"><text:span text:style-name="T17">Using the Sakoe-Chiba Band Dynamic Time Warping (DTW) algorithm to align the Mel-frequency cepstral coefficients (MFCCs) representation of the given (real) audio wave and the audio wave obtained by synthesizing the text fragments with a TTS engine, eventually mapping the computed alignment back onto the (real) time domain.</text:span><text:span text:style-name="T17"><text:note text:id="ftn2" text:note-class="footnote"><text:note-citation>2</text:note-citation><text:note-body><text:p text:style-name="P15"><text:s/>https://github.com/readbeyond/aeneas/#one-sentence-explanation-pro-edition</text:p></text:note-body></text:note></text:span></text:p>
      <text:p text:style-name="P4" loext:marker-style-name="T4"/>
      <text:p text:style-name="P4" loext:marker-style-name="T4"/>
      <text:p text:style-name="Standard" loext:marker-style-name="T4"><text:span text:style-name="T4">Or to illustrate it more simply, the synthesized phrases…</text:span><text:span text:style-name="T4"/></text:p>
      <text:p text:style-name="P4" loext:marker-style-name="T4"><draw:frame draw:style-name="fr2" draw:name="Picture 4" text:anchor-type="char" svg:x="2.4209in" svg:y="0.2016in" svg:width="0.9272in" svg:height="1.0626in" draw:z-index="0"><draw:image xlink:href="Pictures/10000001000002EC000000855EAA607A.png" xlink:type="simple" xlink:show="embed" xlink:actuate="onLoad" draw:mime-type="image/png"/><svg:desc>C:\Users\Richard\AppData\Local\Microsoft\Windows\INetCache\Content.Word\org2.png</svg:desc></draw:frame><draw:frame text:anchor-type="char" draw:z-index="14" draw:name="Shape1" draw:style-name="gr1" draw:text-style-name="P16" svg:width="2.0205in" svg:height="1.063in" svg:x="0.202in" svg:y="0.2035in"><draw:image xlink:href="Pictures/10000001000002EC000000855EAA607A.png" xlink:type="simple" xlink:show="embed" xlink:actuate="onLoad" draw:mime-type="image/png"><text:p/></draw:image></draw:frame></text:p>
      <text:p text:style-name="P4" loext:marker-style-name="T4"><draw:custom-shape text:anchor-type="char" draw:z-index="3" draw:name="Down Arrow 6" draw:style-name="gr2" draw:text-style-name="P17" svg:width="0.3543in" svg:height="0.4898in" svg:x="1.1398in" svg:y="0.998in"><text:p/><draw:enhanced-geometry draw:mirror-horizontal="false" draw:mirror-vertical="false" svg:viewBox="0 0 0 0" draw:glue-points="?f7 0 0 ?f5 ?f7 ?f13 ?f14 ?f5" draw:text-areas="?f8 0 ?f9 ?f12"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range-x-maximum="100000" draw:handle-range-x-minimum="0" draw:handle-position="?f8 0" draw:handle-position-x="?f8" draw:handle-position-y="0"/><draw:handle draw:handle-range-y-maximum="?f1" draw:handle-range-y-minimum="0" draw:handle-position="0 ?f5" draw:handle-position-x="0" draw:handle-position-y="?f5"/></draw:enhanced-geometry></draw:custom-shape><draw:frame draw:style-name="fr3" draw:name="Picture 5" text:anchor-type="char" svg:y="0.0083in" svg:width="2.4791in" svg:height="1.0626in" draw:z-index="1"><draw:image xlink:href="Pictures/10000001000002EC000000855EAA607A.png" xlink:type="simple" xlink:show="embed" xlink:actuate="onLoad" draw:mime-type="image/png"/><svg:desc>C:\Users\Richard\AppData\Local\Microsoft\Windows\INetCache\Content.Word\org2.png</svg:desc></draw:frame><draw:custom-shape text:anchor-type="char" draw:z-index="4" draw:name="Down Arrow 7" draw:style-name="gr3" draw:text-style-name="P17" svg:width="0.3543in" svg:height="0.4898in" svg:x="2.6484in" svg:y="1.0028in"><text:p/><draw:enhanced-geometry draw:mirror-horizontal="false" draw:mirror-vertical="false" svg:viewBox="0 0 0 0" draw:glue-points="?f7 0 0 ?f5 ?f7 ?f13 ?f14 ?f5" draw:text-areas="?f8 0 ?f9 ?f12"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range-x-maximum="100000" draw:handle-range-x-minimum="0" draw:handle-position="?f8 0" draw:handle-position-x="?f8" draw:handle-position-y="0"/><draw:handle draw:handle-range-y-maximum="?f1" draw:handle-range-y-minimum="0" draw:handle-position="0 ?f5" draw:handle-position-x="0" draw:handle-position-y="?f5"/></draw:enhanced-geometry></draw:custom-shape><draw:custom-shape text:anchor-type="char" draw:z-index="5" draw:name="Down Arrow 8" draw:style-name="gr4" draw:text-style-name="P17" svg:width="0.3543in" svg:height="0.4898in" svg:x="4.3854in" svg:y="1.0035in"><text:p/><draw:enhanced-geometry draw:mirror-horizontal="false" draw:mirror-vertical="false" svg:viewBox="0 0 0 0" draw:glue-points="?f7 0 0 ?f5 ?f7 ?f13 ?f14 ?f5" draw:text-areas="?f8 0 ?f9 ?f12"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range-x-maximum="100000" draw:handle-range-x-minimum="0" draw:handle-position="?f8 0" draw:handle-position-x="?f8" draw:handle-position-y="0"/><draw:handle draw:handle-range-y-maximum="?f1" draw:handle-range-y-minimum="0" draw:handle-position="0 ?f5" draw:handle-position-x="0" draw:handle-position-y="?f5"/></draw:enhanced-geometry></draw:custom-shape></text:p>
      <text:p text:style-name="P4" loext:marker-style-name="T4"/>
      <text:p text:style-name="P4" loext:marker-style-name="T4"/>
      <text:p text:style-name="P4" loext:marker-style-name="T4"/>
      <text:p text:style-name="P4" loext:marker-style-name="T4"/>
      <text:p text:style-name="P4" loext:marker-style-name="T4"/>
      <text:p text:style-name="P4" loext:marker-style-name="T4"><draw:custom-shape text:anchor-type="char" draw:z-index="6" draw:name="Rectangle 9" draw:style-name="gr5" draw:text-style-name="P17" svg:width="0.0496in" svg:height="0.7398in" svg:x="2.3063in" svg:y="0.2827i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Picture 3" text:anchor-type="char" svg:x="0.1709in" svg:y="0.0173in" svg:width="5.8752in" svg:height="1.198in" draw:z-index="2"><draw:image xlink:href="Pictures/10000001000002B70000008BD57A2983.png" xlink:type="simple" xlink:show="embed" xlink:actuate="onLoad" draw:mime-type="image/png"/><svg:desc>C:\Users\Richard\AppData\Local\Microsoft\Windows\INetCache\Content.Word\org1.png</svg:desc></draw:frame><draw:custom-shape text:anchor-type="char" draw:z-index="7" draw:name="Rectangle 10" draw:style-name="gr5" draw:text-style-name="P17" svg:width="0.0496in" svg:height="0.7398in" svg:x="3.3752in" svg:y="0.272i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Standard" loext:marker-style-name="T4"><text:span text:style-name="T4"><text:s text:c="3"/>…are mapped against the input audio file to find phrase breaks.</text:span><text:span text:style-name="T4"/></text:p>
      <text:p text:style-name="P18" loext:marker-style-name="T4"/>
      <text:p text:style-name="P11" loext:marker-style-name="T4"><text:span text:style-name="T4">Best results are obtained:</text:span><text:span text:style-name="T4"/></text:p>
      <text:list text:style-name="WWNum11">
        <text:list-item>
          <text:p text:style-name="P19" loext:marker-style-name="T4"><text:span text:style-name="T4">if you have a clearly spoken recording;</text:span><text:span text:style-name="T4"/></text:p>
        </text:list-item>
        <text:list-item>
          <text:p text:style-name="P19" loext:marker-style-name="T4"><text:span text:style-name="T4">if any background music is low enough in volume not to confuse the system;</text:span><text:span text:style-name="T4"/></text:p>
        </text:list-item>
        <text:list-item>
          <text:p text:style-name="P19" loext:marker-style-name="T4"><text:span text:style-name="T4">if the synthesized phrases correspond well enough to how the language is pronounced.</text:span><text:span text:style-name="T4"/></text:p>
        </text:list-item>
      </text:list>
      <text:p text:style-name="P4" loext:marker-style-name="T4"/>
      <text:h text:style-name="P20" text:outline-level="2"><text:bookmark-start text:name="_Toc138058877"/><text:soft-page-break/>Will it work with our language?<text:bookmark-end text:name="_Toc138058877"/></text:h>
      <text:p text:style-name="Standard" loext:marker-style-name="T4"><text:span text:style-name="T15">aeneas</text:span><text:span text:style-name="T4"> is producing impressively accurate timing files for languages around the world. We would recommend you try it out and see how well it works for your text and audio files.</text:span></text:p>
      <text:p text:style-name="P4" loext:marker-style-name="T4"/>
      <text:p text:style-name="Standard" loext:marker-style-name="T4"><text:span text:style-name="T4">What about special characters or tone marks? Since the text-to-speech engine copes best with simple A-Z Roman scripts, the </text:span><text:span text:style-name="T15">Synchronize using</text:span><text:span text:style-name="T4"> </text:span><text:span text:style-name="T15">aeneas</text:span><text:span text:style-name="T4"> wizard in Reading App Builder has a </text:span><text:span text:style-name="T15">Character Replacement</text:span><text:span text:style-name="T4"> page, designed to replace special characters with simple ones (ɓ to b, ɛ to e, etc.). It also strips out accents and tone marks. The comparison algorithms are tolerant enough to match up the phrases even though the pronunciation differs.</text:span></text:p>
      <text:p text:style-name="P4" loext:marker-style-name="T4"/>
      <text:p text:style-name="Standard" loext:marker-style-name="T4"><text:span text:style-name="T4">If you have a non-Roman script, you will need to define a set of character replacements, transliterating your non-Roman script into a simple A-Z Roman script (</text:span><text:span text:style-name="T18">अ to a, क to ka,</text:span><text:span text:style-name="T19"> </text:span><text:span text:style-name="T20">उ</text:span><text:span text:style-name="T21"> to u, etc.</text:span><text:span text:style-name="T4">). This approach has already been used successfully to synchronize text and audio in Hebrew. If you create a set of additional character replacements that work well for your script and language, please let us know so that we can add them to the default set of replacements.</text:span></text:p>
      <text:p text:style-name="P4" loext:marker-style-name="T4"/>
      <text:p text:style-name="Standard" loext:marker-style-name="T4"><text:span text:style-name="T4">You can find a selection of Romanization tables here:</text:span><text:span text:style-name="T4"/></text:p>
      <text:p text:style-name="P21" loext:marker-style-name="T4"><text:a xlink:type="simple" xlink:href="http://www.loc.gov/catdir/cpso/romansource.html" text:style-name="Internet_20_link" text:visited-style-name="Visited_20_Internet_20_Link"><text:span text:style-name="Internet_20_link"><text:span text:style-name="T4">http://www.loc.gov/catdir/cpso/romansource.html</text:span></text:span></text:a><text:span text:style-name="T4"> </text:span></text:p>
      <text:p text:style-name="P4" loext:marker-style-name="T4"/>
      <text:h text:style-name="P20" text:outline-level="2"><text:bookmark-start text:name="_Toc138058878"/>How long does it take?<text:bookmark-end text:name="_Toc138058878"/></text:h>
      <text:p text:style-name="Standard" loext:marker-style-name="T4"><text:span text:style-name="T4">For a typical phrase-by-phrase synchronisation, running </text:span><text:span text:style-name="T15">aeneas</text:span><text:span text:style-name="T4"> in </text:span><text:span text:style-name="T15">Windows</text:span><text:span text:style-name="T4"> takes 1-2 minutes to process an hour of audio. Actual times will depend on the speed of your computer.</text:span></text:p>
      <text:p text:style-name="P4" loext:marker-style-name="T4"/>
      <text:h text:style-name="P20" text:outline-level="2"><text:bookmark-start text:name="_Toc138058879"/>How do we run aeneas?<text:bookmark-end text:name="_Toc138058879"/></text:h>
      <text:p text:style-name="P11" loext:marker-style-name="T4"><text:span text:style-name="T4">You need to Install aeneas on your computer and use the </text:span><text:span text:style-name="T14">Synchronize using aeneas wizard</text:span><text:span text:style-name="T4"> in RAB to launch the synchronization process.</text:span></text:p>
      <text:p text:style-name="P11" loext:marker-style-name="T4"><text:span text:style-name="T4">See section 2 for instructions on how to install </text:span><text:span text:style-name="T14">aeneas</text:span><text:span text:style-name="T4"> on Windows, and section 3 on how to install </text:span><text:span text:style-name="T14">aeneas</text:span><text:span text:style-name="T4"> on Linux. This is especially easy for Ubuntu users since </text:span><text:span text:style-name="T14">aeneas</text:span><text:span text:style-name="T4"> is included automatically in the SAB installation.</text:span></text:p>
      <text:p text:style-name="P4" loext:marker-style-name="T4"/>
      <text:p text:style-name="P4" loext:marker-style-name="T4"/>
      <text:h text:style-name="Heading_20_1" text:outline-level="1" loext:marker-style-name="T5"><text:bookmark-start text:name="_Toc138058880"/>Windows<text:span text:style-name="T5"> Installation</text:span><text:bookmark-end text:name="_Toc138058880"/><text:span text:style-name="T5"/></text:h>
      <text:p text:style-name="P22" loext:marker-style-name="T22"><text:span text:style-name="T22">To set up </text:span><text:span text:style-name="T23">aeneas</text:span><text:span text:style-name="T22"> on Windows, there are several programs and modules to download and install: FFmpeg, eSpeak, Python and aeneas. These can all be installed with a single setup program.</text:span></text:p>
      <text:list text:style-name="WWNum20">
        <text:list-item>
          <text:p text:style-name="P23" loext:marker-style-name="T4"><text:soft-page-break/><text:span text:style-name="T4">Go to the </text:span><text:span text:style-name="T14">Download</text:span><text:span text:style-name="T4"> page on the Reading App Builder website </text:span><text:a xlink:type="simple" xlink:href="http://software.sil.org/readingappbuilder/download/" text:style-name="Internet_20_link" text:visited-style-name="Visited_20_Internet_20_Link"><text:span text:style-name="Internet_20_link"><text:span text:style-name="T4">http://software.sil.org/readingappbuilder/download/</text:span></text:span></text:a><text:span text:style-name="T4"> and download the latest aeneas setup program for Windows. You will find it under the heading </text:span><text:span text:style-name="T14">Audio Synchronization Tools</text:span><text:span text:style-name="T4">.</text:span></text:p>
        </text:list-item>
      </text:list>
      <text:p text:style-name="P24" loext:marker-style-name="T4"><text:span text:style-name="T4">The filename will be something like </text:span><text:span text:style-name="T14">aeneas-windows-setup-1.7.2.exe</text:span><text:span text:style-name="T4">.</text:span></text:p>
      <text:p text:style-name="P25" loext:marker-style-name="T4"/>
      <text:list text:continue-numbering="true" text:style-name="WWNum20">
        <text:list-item>
          <text:p text:style-name="P23" loext:marker-style-name="T4"><text:span text:style-name="T4">Double-click the file you have downloaded to start the installation wizard.</text:span><text:span text:style-name="T4"/></text:p>
        </text:list-item>
      </text:list>
      <text:p text:style-name="P26" loext:marker-style-name="T4"/>
      <text:p text:style-name="List_20_Paragraph" loext:marker-style-name="T4"><draw:frame draw:style-name="fr1" draw:name="Picture 1" text:anchor-type="as-char" svg:width="4.5756in" svg:height="3.7425in" draw:z-index="36"><draw:image xlink:href="Pictures/1000000000000246000001DC71ABC918.png" xlink:type="simple" xlink:show="embed" xlink:actuate="onLoad" draw:mime-type="image/png"/></draw:frame></text:p>
      <text:p text:style-name="P26" loext:marker-style-name="T4"/>
      <text:list text:continue-numbering="true" text:style-name="WWNum20">
        <text:list-item>
          <text:p text:style-name="P27" loext:marker-style-name="T4"><text:span text:style-name="T4">Follow the instructions in the wizard. You can accept all the defaults. </text:span><text:span text:style-name="T4"/></text:p>
        </text:list-item>
      </text:list>
      <text:p text:style-name="P25" loext:marker-style-name="T4"/>
      <text:list text:continue-numbering="true" text:style-name="WWNum20">
        <text:list-item>
          <text:p text:style-name="P23" loext:marker-style-name="T4"><text:span text:style-name="T4">On the </text:span><text:span text:style-name="T14">Select Components</text:span><text:span text:style-name="T4"> page, you need the </text:span><text:span text:style-name="T14">Full Installation</text:span><text:span text:style-name="T4"> which should be selected by default.</text:span></text:p>
        </text:list-item>
      </text:list>
      <text:p text:style-name="P6" loext:marker-style-name="T5"/>
      <text:p text:style-name="P2" loext:marker-style-name="T5"><text:soft-page-break/><draw:frame draw:style-name="fr1" draw:name="Picture 20" text:anchor-type="as-char" svg:width="4.3346in" svg:height="3.5453in" draw:z-index="38"><draw:image xlink:href="Pictures/1000000000000246000001DC0E031CCF.png" xlink:type="simple" xlink:show="embed" xlink:actuate="onLoad" draw:mime-type="image/png"/></draw:frame></text:p>
      <text:p text:style-name="P6" loext:marker-style-name="T5"/>
      <text:p text:style-name="P6" loext:marker-style-name="T5"/>
      <text:list text:continue-numbering="true" text:style-name="WWNum20">
        <text:list-item>
          <text:p text:style-name="P28" loext:marker-style-name="T4"><text:span text:style-name="T4">On the </text:span><text:span text:style-name="T14">Ready to Install</text:span><text:span text:style-name="T4"> page, click </text:span><text:span text:style-name="T14">Install</text:span><text:span text:style-name="T4">.</text:span></text:p>
        </text:list-item>
      </text:list>
      <text:p text:style-name="P6" loext:marker-style-name="T5"/>
      <text:p text:style-name="P29" loext:marker-style-name="T5"><text:span text:style-name="T5">You will see the wizard running several different installers: for FFmpeg, eSpeak, Python. It will also install three Python modules.</text:span><text:span text:style-name="T5"/></text:p>
      <text:p text:style-name="P30" loext:marker-style-name="T5"/>
      <text:p text:style-name="P29" loext:marker-style-name="T5"><text:span text:style-name="T5">Before the wizard completes, you should see a command box appear for a few seconds which verifies the aeneas installation. </text:span><text:span text:style-name="T5"/></text:p>
      <text:p text:style-name="P30" loext:marker-style-name="T5"/>
      <text:p text:style-name="P31" loext:marker-style-name="T5"><draw:frame draw:style-name="fr1" draw:name="Picture 12" text:anchor-type="as-char" svg:width="4.3228in" svg:height="2.1909in" draw:z-index="37"><draw:image xlink:href="Pictures/10000000000002930000014EBAE60B85.png" xlink:type="simple" xlink:show="embed" xlink:actuate="onLoad" draw:mime-type="image/png"/></draw:frame></text:p>
      <text:p text:style-name="P30" loext:marker-style-name="T5"/>
      <text:p text:style-name="P30" loext:marker-style-name="T5"/>
      <text:p text:style-name="P32" loext:marker-style-name="T5"><text:span text:style-name="T24">Important</text:span><text:span text:style-name="T5">: If Reading App Builder was open while you installed aeneas, close it and start it again to ensure that it picks up the changes to your Path settings.</text:span></text:p>
      <text:h text:style-name="P33" text:outline-level="1" loext:marker-style-name="T5"><text:bookmark-start text:name="_Toc138058881"/><text:bookmark-start text:name="_Toc44918738"/><text:soft-page-break/>Linux<text:span text:style-name="T5"> Installation</text:span><text:bookmark-end text:name="_Toc138058881"/><text:bookmark-end text:name="_Toc44918738"/><text:span text:style-name="T5"/></text:h>
      <text:p text:style-name="P34" loext:marker-style-name="T5"/>
      <text:p text:style-name="P35" loext:marker-style-name="T4"><text:span text:style-name="T4">If you are using Ubuntu, the </text:span><text:span text:style-name="T14">aeneas</text:span><text:span text:style-name="T4"> software is a required dependency of Reading App Builder. This means that aeneas is automatically installed or updated along with Reading App Builder and you do not have to install it manually.</text:span></text:p>
      <text:p text:style-name="P6" loext:marker-style-name="T5"/>
      <text:p text:style-name="P6" loext:marker-style-name="T5"/>
      <text:h text:style-name="Heading_20_1" text:outline-level="1" loext:marker-style-name="T5"><text:bookmark-start text:name="_Toc138058882"/><text:span text:style-name="T5">Using aeneas within Reading App Builder</text:span><text:bookmark-end text:name="_Toc138058882"/><text:span text:style-name="T5"/></text:h>
      <text:h text:style-name="Heading_20_2" text:outline-level="2"><text:bookmark-start text:name="_Toc138058883"/>Running the Audio Synchronization wizard<text:bookmark-end text:name="_Toc138058883"/></text:h>
      <text:p text:style-name="P11" loext:marker-style-name="T5"><text:span text:style-name="T5">You can run the </text:span><text:span text:style-name="T25">Audio Synchronization using aeneas</text:span><text:span text:style-name="T5"> wizard from four places within Reading App Builder:</text:span></text:p>
      <text:p text:style-name="P6" loext:marker-style-name="T5"/>
      <text:list text:style-name="WWNum12">
        <text:list-item>
          <text:p text:style-name="P36" loext:marker-style-name="T5"><text:span text:style-name="T5">The </text:span><text:span text:style-name="T26">Audio Files</text:span><text:span text:style-name="T5"> tab for a book. Select one or more rows in the table, right-click and select </text:span><text:span text:style-name="T25">Synchronize using aeneas</text:span><text:span text:style-name="T5">.</text:span></text:p>
        </text:list-item>
        <text:list-item>
          <text:p text:style-name="P37" loext:marker-style-name="T5"><text:span text:style-name="T5">The </text:span><text:span text:style-name="T25">Audio Synchronization </text:span><text:span text:style-name="T5">tab for a book. Click on the button </text:span><text:span text:style-name="T25">Synchronize using aeneas</text:span><text:span text:style-name="T5">.</text:span></text:p>
        </text:list-item>
        <text:list-item>
          <text:p text:style-name="P37" loext:marker-style-name="T5"><text:span text:style-name="T5">The </text:span><text:span text:style-name="T25">Books</text:span><text:span text:style-name="T5"> tab on the Books page. Right-click on a book and select </text:span><text:span text:style-name="T25">Synchronize using aeneas</text:span><text:span text:style-name="T5">.</text:span></text:p>
        </text:list-item>
        <text:list-item>
          <text:p text:style-name="P37" loext:marker-style-name="T5"><text:span text:style-name="T5">The Apps tree on the left of the screen. Right-click on a book and select </text:span><text:span text:style-name="T25">Synchronize using aeneas</text:span><text:span text:style-name="T5">.</text:span></text:p>
        </text:list-item>
      </text:list>
      <text:p text:style-name="P38" loext:marker-style-name="T5"><text:span text:style-name="T5">Follow the instructions in the wizard to configure the synchronization.</text:span><text:span text:style-name="T5"/></text:p>
      <text:p text:style-name="P38" loext:marker-style-name="T5"><text:span text:style-name="T5">For Windows users, if the wizard asks, “Where have you installed aeneas?”, please follow the installation instructions in section 2 of this document.</text:span><text:span text:style-name="T5"/></text:p>
      <text:p text:style-name="P12" loext:marker-style-name="T5"><text:span text:style-name="T5">After the final page of the wizard, the synchronization process will start in a separate command Window. It runs a batch file (or bash script) which calls an </text:span><text:span text:style-name="T25">aeneas</text:span><text:span text:style-name="T5"> task for each chapter of each book. </text:span></text:p>
      <text:p text:style-name="P12" loext:marker-style-name="T5"><text:span text:style-name="T5">As timing files are generated you will see their filenames being added to the table on the </text:span><text:span text:style-name="T25">Audio Files</text:span><text:span text:style-name="T5"> page. </text:span></text:p>
      <text:p text:style-name="P39" loext:marker-style-name="T5"/>
      <text:h text:style-name="Heading_20_2" text:outline-level="2"><text:bookmark-start text:name="_Toc138058884"/>Troubleshooting<text:bookmark-end text:name="_Toc138058884"/></text:h>
      <text:p text:style-name="P40"><text:span text:style-name="T5">If the synchronization fails, please ensure that aeneas has been installed correctly. You can check the installation by selecting </text:span><text:span text:style-name="T23">Tools</text:span><text:span text:style-name="T22"> </text:span><text:span text:style-name="T27"></text:span><text:span text:style-name="T22"> </text:span><text:span text:style-name="T23">Check aeneas Installation… </text:span><text:span text:style-name="T22">from the Reading App Builder main menu. </text:span></text:p>
      <text:p text:style-name="P38" loext:marker-style-name="T5"><text:span text:style-name="T5">A common problem on Windows is that </text:span><text:span text:style-name="T26">eSpeak</text:span><text:span text:style-name="T5"> stops working after a while. To correct this, run the aeneas Windows setup program again.</text:span></text:p>
      <text:p text:style-name="P41" loext:marker-style-name="T5"><text:soft-page-break/><text:span text:style-name="T5">To verify that eSpeak has been installed correctly and is in your path, open a new Windows command prompt and type:</text:span><text:span text:style-name="T5"/></text:p>
      <text:p text:style-name="Command_20_Line"><text:s/>espeak hello</text:p>
      <text:p text:style-name="P12" loext:marker-style-name="T5"><text:span text:style-name="T5">If all is well, you should hear the word “hello” pronounced.</text:span><text:span text:style-name="T5"/></text:p>
      <text:p text:style-name="P42" loext:marker-style-name="T5"/>
      <text:h text:style-name="Heading_20_2" text:outline-level="2"><text:bookmark-start text:name="_Toc138058885"/>Viewing and testing the timing files created by aeneas<text:bookmark-end text:name="_Toc138058885"/></text:h>
      <text:p text:style-name="P12" loext:marker-style-name="T5"><text:span text:style-name="T5">To view a generated timing file, select a row on the </text:span><text:span text:style-name="T25">Audio Files</text:span><text:span text:style-name="T5"> page, right-click, and select </text:span><text:span text:style-name="T25">View Timing File</text:span><text:span text:style-name="T5">.</text:span></text:p>
      <text:p text:style-name="P12" loext:marker-style-name="T5"><text:span text:style-name="T5">To test the generated timing files with the text and audio, select a row in the </text:span><text:span text:style-name="T25">Audio Files</text:span><text:span text:style-name="T5"> page, right-click and select </text:span><text:span text:style-name="T25">Export to HTML</text:span><text:span text:style-name="T5">.</text:span></text:p>
      <text:h text:style-name="P13" text:outline-level="1"><text:bookmark-start text:name="_Toc138058886"/><text:bookmark-start text:name="_Toc44918743"/>Fine Tune Timings<text:bookmark-end text:name="_Toc138058886"/><text:bookmark-end text:name="_Toc44918743"/></text:h>
      <text:h text:style-name="Heading_20_2" text:outline-level="2"><text:bookmark-start text:name="_Toc138058887"/><text:bookmark-start text:name="_Toc44918744"/>Fine tune timing files using the Fine Tune Timings viewer<text:bookmark-end text:name="_Toc138058887"/><text:bookmark-end text:name="_Toc44918744"/></text:h>
      <text:p text:style-name="P11" loext:marker-style-name="T5"><text:span text:style-name="T5">To fine tune a generated timing file:</text:span><text:span text:style-name="T5"/></text:p>
      <text:list text:style-name="WWNum23">
        <text:list-item>
          <text:p text:style-name="P43" loext:marker-style-name="T5"><text:span text:style-name="T5">Select a row on the </text:span><text:span text:style-name="T26">Audio Files</text:span><text:span text:style-name="T5"> page, right-click, and select </text:span><text:span text:style-name="T25">Fine Tune Timings</text:span><text:span text:style-name="T5">.</text:span></text:p>
        </text:list-item>
      </text:list>
      <text:p text:style-name="P44" loext:marker-style-name="T5"><text:span text:style-name="T5">A page should open in your default browser, looking something like this:</text:span><text:span text:style-name="T5"/></text:p>
      <text:p text:style-name="P45" loext:marker-style-name="T5"><draw:frame draw:style-name="fr1" draw:name="Image 24" text:anchor-type="as-char" svg:width="5.9846in" svg:height="4.8098in" draw:z-index="34"><draw:image xlink:href="Pictures/10000000000003C80000030ABDA134CF.png" xlink:type="simple" xlink:show="embed" xlink:actuate="onLoad" draw:mime-type="image/png"/></draw:frame><text:span text:style-name="T5"><text:line-break/></text:span></text:p>
      <text:list text:continue-numbering="true" text:style-name="WWNum23">
        <text:list-item>
          <text:p text:style-name="P46" loext:marker-style-name="T5"><text:span text:style-name="T5">Click on the first row of the table to start the audio playing. </text:span><text:span text:style-name="T5"/></text:p>
        </text:list-item>
      </text:list>
      <text:p text:style-name="P47" loext:marker-style-name="T5"/>
      <text:list text:continue-numbering="true" text:style-name="WWNum23">
        <text:list-item>
          <text:p text:style-name="P46" loext:marker-style-name="T5"><text:span text:style-name="T5">As soon as you hear the first word or two from the selected row, click on the next row.</text:span><text:span text:style-name="T5"/></text:p>
        </text:list-item>
      </text:list>
      <text:p text:style-name="P48" loext:marker-style-name="T5"/>
      <text:list text:continue-numbering="true" text:style-name="WWNum23">
        <text:list-item>
          <text:p text:style-name="P46" loext:marker-style-name="T5"><text:span text:style-name="T5">Continue clicking on each row to listen for enough time to determine whether the timing break has been placed in the right place, i.e. not too early and not too late.</text:span><text:span text:style-name="T5"/></text:p>
        </text:list-item>
      </text:list>
      <text:p text:style-name="P48" loext:marker-style-name="T5"/>
      <text:p text:style-name="P49" loext:marker-style-name="T5"><text:span text:style-name="T5">You can also use the </text:span><text:span text:style-name="T26">N</text:span><text:span text:style-name="T5"> keyboard shortcut to move to the next row.</text:span></text:p>
      <text:p text:style-name="P48" loext:marker-style-name="T5"/>
      <text:list text:continue-numbering="true" text:style-name="WWNum23">
        <text:list-item>
          <text:p text:style-name="P46" loext:marker-style-name="T5"><text:span text:style-name="T5">If you hear that the timing for a row needs to be fine-tuned, click the plus (+) button to move the start time forward by 0.1 seconds, the double-plus (++) to move </text:span><text:soft-page-break/><text:span text:style-name="T5">forward by 1 second, the minus (–) button to move the start time backwards by 0.1 seconds, or the double-minus (– –) to move back 1 second.</text:span><text:span text:style-name="T5"/></text:p>
        </text:list-item>
      </text:list>
      <text:p text:style-name="P50" loext:marker-style-name="T5"><draw:custom-shape text:anchor-type="char" draw:z-index="8" draw:name="AutoShape 13" draw:style-name="gr6" draw:text-style-name="P17" svg:width="2.0776in" svg:height="0.2685in" draw:transform="rotate (-1.82683612806247) translate (5.01527777777778in 3.16597222222222in)"><text:p/><draw:enhanced-geometry draw:mirror-horizontal="false" draw:mirror-vertical="false" svg:viewBox="0 0 0 0" draw:glue-points="?f5 0 0 ?f7 ?f5 ?f14 ?f13 ?f7" draw:text-areas="?f12 ?f8 ?f13 ?f9"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draw:custom-shape text:anchor-type="char" draw:z-index="9" draw:name="AutoShape 13" draw:style-name="gr7" draw:text-style-name="P17" svg:width="2.0441in" svg:height="0.2689in" draw:transform="rotate (-1.83451557677124) translate (2.20347222222222in 3.18472222222222in)"><text:p/><draw:enhanced-geometry draw:mirror-horizontal="false" draw:mirror-vertical="false" svg:viewBox="0 0 0 0" draw:glue-points="?f5 0 0 ?f7 ?f5 ?f14 ?f13 ?f7" draw:text-areas="?f12 ?f8 ?f13 ?f9"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text:s/><draw:frame draw:style-name="fr1" draw:name="Image 25" text:anchor-type="as-char" svg:width="5.9846in" svg:height="4.8098in" draw:z-index="33"><draw:image xlink:href="Pictures/10000000000003C80000030AB9D92968.png" xlink:type="simple" xlink:show="embed" xlink:actuate="onLoad" draw:mime-type="image/png"/></draw:frame></text:p>
      <text:p text:style-name="P48" loext:marker-style-name="T5"/>
      <text:p text:style-name="P48" loext:marker-style-name="T5"><draw:custom-shape text:anchor-type="char" style:rel-width="40%" style:rel-height="20%" draw:z-index="13" draw:name="Text Box 2" draw:style-name="gr8" draw:text-style-name="P17" svg:width="2.3823in" svg:height="0.7094in" svg:x="3.6736in" svg:y="0.0146in"><text:p text:style-name="Frame_20_contents" loext:marker-style-name="T5"><text:span text:style-name="T5">Adjust the start time of the currently selected timing using the plus and minus button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10" draw:name="Text Box 2" draw:style-name="gr9" draw:text-style-name="P51" svg:width="2.3823in" svg:height="0.7094in" svg:x="0.8701in" svg:y="0.0189in"><text:p text:style-name="Frame_20_contents" loext:marker-style-name="T5"><text:span text:style-name="T5">Click on each row for enough time to check if the audio starts at the right plac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 loext:marker-style-name="T5"/>
      <text:p text:style-name="P48" loext:marker-style-name="T5"/>
      <text:p text:style-name="P48" loext:marker-style-name="T5"/>
      <text:p text:style-name="P48" loext:marker-style-name="T5"/>
      <text:list text:continue-numbering="true" text:style-name="WWNum23">
        <text:list-item>
          <text:p text:style-name="P46" loext:marker-style-name="T5"><text:span text:style-name="T5">When you are happy with the current row, continue clicking on the subsequent rows in the same way, fine tuning those that need adjusting.</text:span><text:span text:style-name="T5"/></text:p>
        </text:list-item>
      </text:list>
      <text:p text:style-name="P48" loext:marker-style-name="T5"/>
      <text:list text:continue-numbering="true" text:style-name="WWNum23">
        <text:list-item>
          <text:p text:style-name="P46" loext:marker-style-name="T5"><text:span text:style-name="T5">When you have reached the last row of the table, save your changes by clicking on the button </text:span><text:span text:style-name="T26">Save Changes to Timing File </text:span><text:span text:style-name="T5">at the bottom of the page (or by using the keyboard shortcut </text:span><text:span text:style-name="T26">T</text:span><text:span text:style-name="T5">).</text:span></text:p>
        </text:list-item>
      </text:list>
      <text:p text:style-name="P6" loext:marker-style-name="T5"/>
      <text:p text:style-name="P32" loext:marker-style-name="T28"><text:span text:style-name="T24">Important</text:span><text:span text:style-name="T28"><text:line-break/>For security reasons, your browser does not have permission to save the modified timing file in its original location. It will be saved to your default Downloads folder. Reading App Builder can watch this folder for modified files and move them back to your project data folder. Specify the Downloads folder to watch in </text:span><text:span text:style-name="T26">Settings</text:span><text:span text:style-name="T28"> </text:span><text:span text:style-name="T27"></text:span><text:span text:style-name="T28"> </text:span><text:span text:style-name="T26">Files</text:span><text:span text:style-name="T28">. Otherwise, you will need to move the modified files back to your project manually, e.g. using the </text:span><text:span text:style-name="T26">Add Timing Files</text:span><text:span text:style-name="T28"> button.</text:span></text:p>
      <text:h text:style-name="Heading_20_2" text:outline-level="2"><text:bookmark-start text:name="_Toc138058888"/><text:bookmark-start text:name="_Toc44918745"/><text:soft-page-break/>Changing audio speed when doing fine tuning<text:bookmark-end text:name="_Toc138058888"/><text:bookmark-end text:name="_Toc44918745"/></text:h>
      <text:p text:style-name="P41" loext:marker-style-name="T5"><text:span text:style-name="T5">If the audio is playing too quickly for you to fine tune accurately, you can slow down the playback speed using the speed selector at the bottom of the screen.</text:span><text:span text:style-name="T5"/></text:p>
      <text:p text:style-name="P41" loext:marker-style-name="T5"><draw:custom-shape text:anchor-type="char" draw:z-index="11" draw:name="AutoShape 13" draw:style-name="gr10" draw:text-style-name="P17" svg:width="1.1161in" svg:height="0.2689in" draw:transform="rotate (2.30662713943571) translate (1.62638888888889in 5.37152777777778in)"><text:p/><draw:enhanced-geometry draw:mirror-horizontal="false" draw:mirror-vertical="true" svg:viewBox="0 0 0 0" draw:glue-points="?f5 0 0 ?f7 ?f5 ?f14 ?f13 ?f7" draw:text-areas="?f12 ?f8 ?f13 ?f9"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text:s/><draw:frame draw:style-name="fr1" draw:name="Image 26" text:anchor-type="as-char" svg:width="5.9846in" svg:height="4.8098in" draw:z-index="32"><draw:image xlink:href="Pictures/10000000000003C80000030A6434B54B.png" xlink:type="simple" xlink:show="embed" xlink:actuate="onLoad" draw:mime-type="image/png"/></draw:frame></text:p>
      <text:p text:style-name="P52" loext:marker-style-name="T5"><draw:custom-shape text:anchor-type="char" style:rel-height="20%" draw:z-index="12" draw:name="Text Box 2" draw:style-name="gr11" draw:text-style-name="P51" svg:width="2.5524in" svg:height="0.3024in" svg:x="0in" svg:y="0.2693in"><text:p text:style-name="Frame_20_contents" loext:marker-style-name="T5"><text:span text:style-name="T5">Change the playback speed her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2" loext:marker-style-name="T5"/>
      <text:p text:style-name="P52" loext:marker-style-name="T5"/>
      <text:h text:style-name="Heading_20_2" text:outline-level="2"><text:bookmark-start text:name="_Toc138058889"/><text:bookmark-start text:name="_Toc44918746"/>Keyboard shortcuts when doing fine tuning<text:bookmark-end text:name="_Toc138058889"/><text:bookmark-end text:name="_Toc44918746"/></text:h>
      <text:p text:style-name="P41" loext:marker-style-name="T5"><text:span text:style-name="T5">The following keyboard shortcuts are available in the Fine Tuning interface:</text:span><text:span text:style-name="T5"/></text:p>
      <text:p text:style-name="P52" loext:marker-style-name="T5"/>
      <table:table table:name="Table1" table:style-name="Table1">
        <table:table-column table:style-name="Table1.A"/>
        <table:table-column table:style-name="Table1.B"/>
        <table:table-row table:style-name="Table1.1">
          <table:table-cell table:style-name="Table1.A1" office:value-type="string">
            <text:p text:style-name="P53" loext:marker-style-name="T26"><text:span text:style-name="T26">Key</text:span><text:span text:style-name="T26"/></text:p>
          </table:table-cell>
          <table:table-cell table:style-name="Table1.A1" office:value-type="string">
            <text:p text:style-name="P54" loext:marker-style-name="T26"><text:span text:style-name="T26">Action</text:span><text:span text:style-name="T26"/></text:p>
          </table:table-cell>
        </table:table-row>
        <table:table-row table:style-name="Table1.1">
          <table:table-cell table:style-name="Table1.A2" office:value-type="string">
            <text:p text:style-name="P55" loext:marker-style-name="T5"><text:span text:style-name="T5">Spacebar</text:span><text:span text:style-name="T5"/></text:p>
          </table:table-cell>
          <table:table-cell table:style-name="Table1.B2" office:value-type="string">
            <text:p text:style-name="P56" loext:marker-style-name="T5"><text:span text:style-name="T5">Start/Pause audio</text:span><text:span text:style-name="T5"/></text:p>
          </table:table-cell>
        </table:table-row>
        <table:table-row table:style-name="Table1.1">
          <table:table-cell table:style-name="Table1.A3" office:value-type="string">
            <text:p text:style-name="P55" loext:marker-style-name="T5"><text:span text:style-name="T5">T</text:span><text:span text:style-name="T5"/></text:p>
          </table:table-cell>
          <table:table-cell table:style-name="Table1.B3" office:value-type="string">
            <text:p text:style-name="P56" loext:marker-style-name="T5"><text:span text:style-name="T5">Save timing file</text:span><text:span text:style-name="T5"/></text:p>
          </table:table-cell>
        </table:table-row>
        <table:table-row table:style-name="Table1.1">
          <table:table-cell table:style-name="Table1.A4" office:value-type="string">
            <text:p text:style-name="P55" loext:marker-style-name="T5"><text:span text:style-name="T5">N</text:span><text:span text:style-name="T5"/></text:p>
          </table:table-cell>
          <table:table-cell table:style-name="Table1.B4" office:value-type="string">
            <text:p text:style-name="P56" loext:marker-style-name="T5"><text:span text:style-name="T5">Start playing from the next row</text:span><text:span text:style-name="T5"/></text:p>
          </table:table-cell>
        </table:table-row>
        <table:table-row table:style-name="Table1.1">
          <table:table-cell table:style-name="Table1.A5" office:value-type="string">
            <text:p text:style-name="P55" loext:marker-style-name="T5"><text:span text:style-name="T5">P</text:span><text:span text:style-name="T5"/></text:p>
          </table:table-cell>
          <table:table-cell table:style-name="Table1.B5" office:value-type="string">
            <text:p text:style-name="P56" loext:marker-style-name="T5"><text:span text:style-name="T5">Start playing from the previous row</text:span><text:span text:style-name="T5"/></text:p>
          </table:table-cell>
        </table:table-row>
        <table:table-row table:style-name="Table1.1">
          <table:table-cell table:style-name="Table1.A6" office:value-type="string">
            <text:p text:style-name="P55" loext:marker-style-name="T5"><text:span text:style-name="T5">B</text:span><text:span text:style-name="T5"/></text:p>
          </table:table-cell>
          <table:table-cell table:style-name="Table1.B6" office:value-type="string">
            <text:p text:style-name="P56" loext:marker-style-name="T5"><text:span text:style-name="T5">Set the phrase start time to be at the current audio position</text:span><text:span text:style-name="T5"/></text:p>
          </table:table-cell>
        </table:table-row>
        <text:soft-page-break/>
        <table:table-row table:style-name="Table1.1">
          <table:table-cell table:style-name="Table1.A7" office:value-type="string">
            <text:p text:style-name="P55" loext:marker-style-name="T5"><text:span text:style-name="T5">A (or Q)</text:span><text:span text:style-name="T5"/></text:p>
          </table:table-cell>
          <table:table-cell table:style-name="Table1.B7" office:value-type="string">
            <text:p text:style-name="P56" loext:marker-style-name="T5"><text:span text:style-name="T5">Move the start time of the current row back 1 sec</text:span><text:span text:style-name="T5"/></text:p>
          </table:table-cell>
        </table:table-row>
        <table:table-row table:style-name="Table1.1">
          <table:table-cell table:style-name="Table1.A8" office:value-type="string">
            <text:p text:style-name="P55" loext:marker-style-name="T5"><text:span text:style-name="T5">S</text:span><text:span text:style-name="T5"/></text:p>
          </table:table-cell>
          <table:table-cell table:style-name="Table1.B8" office:value-type="string">
            <text:p text:style-name="P56" loext:marker-style-name="T5"><text:span text:style-name="T5">Move the start time of the current row back 0.1 secs</text:span><text:span text:style-name="T5"/></text:p>
          </table:table-cell>
        </table:table-row>
        <table:table-row table:style-name="Table1.1">
          <table:table-cell table:style-name="Table1.A9" office:value-type="string">
            <text:p text:style-name="P55" loext:marker-style-name="T5"><text:span text:style-name="T5">D</text:span><text:span text:style-name="T5"/></text:p>
          </table:table-cell>
          <table:table-cell table:style-name="Table1.B9" office:value-type="string">
            <text:p text:style-name="P56" loext:marker-style-name="T5"><text:span text:style-name="T5">Move the start time of the current row forward 0.1 secs</text:span><text:span text:style-name="T5"/></text:p>
          </table:table-cell>
        </table:table-row>
        <table:table-row table:style-name="Table1.1">
          <table:table-cell table:style-name="Table1.A10" office:value-type="string">
            <text:p text:style-name="P55" loext:marker-style-name="T5"><text:span text:style-name="T5">F</text:span><text:span text:style-name="T5"/></text:p>
          </table:table-cell>
          <table:table-cell table:style-name="Table1.B10" office:value-type="string">
            <text:p text:style-name="P56" loext:marker-style-name="T5"><text:span text:style-name="T5">Move the start time of the current row forward 1 sec</text:span><text:span text:style-name="T5"/></text:p>
          </table:table-cell>
        </table:table-row>
      </table:table>
      <text:p text:style-name="P39" loext:marker-style-name="T5"/>
      <text:h text:style-name="Heading_20_2" text:outline-level="2"><text:bookmark-start text:name="_Toc138058890"/><text:bookmark-start text:name="_Toc44918747"/>Sending Fine Tuning files to others<text:bookmark-end text:name="_Toc138058890"/><text:bookmark-end text:name="_Toc44918747"/></text:h>
      <text:p text:style-name="P12" loext:marker-style-name="T5"><text:span text:style-name="T5">If you want to do fine tuning well, it can take a lot of time of concentrated listening. You might have friends and colleagues who are willing to help with this. It is possible to send them the Fine Tuning files to work on without them needing to install Reading App Builder.</text:span><text:span text:style-name="T5"/></text:p>
      <text:p text:style-name="P12" loext:marker-style-name="T5"><text:span text:style-name="T5">To do this:</text:span><text:span text:style-name="T5"/></text:p>
      <text:list text:style-name="WWNum32">
        <text:list-item>
          <text:p text:style-name="P57" loext:marker-style-name="T5"><text:span text:style-name="T5">Select one or more books, right-click, and select </text:span><text:span text:style-name="T25">Fine Tune Timings</text:span><text:span text:style-name="T5">.</text:span></text:p>
        </text:list-item>
        <text:list-item>
          <text:p text:style-name="P58" loext:marker-style-name="T5"><text:span text:style-name="T5">In the Fine Tuning wizard, choose </text:span><text:span text:style-name="T26">The files will be sent to others to help with the fine tuning</text:span><text:span text:style-name="T5">.</text:span></text:p>
        </text:list-item>
        <text:list-item>
          <text:p text:style-name="P58" loext:marker-style-name="T5"><text:span text:style-name="T5">On the next page, </text:span><text:span text:style-name="T26">Audio Files</text:span><text:span text:style-name="T5">, choose to copy the audio files (if you have a good internet connection) or choose not to copy them (if your internet connection is limited and you will tell your friends where they can download the audio files).</text:span></text:p>
        </text:list-item>
        <text:list-item>
          <text:p text:style-name="P58" loext:marker-style-name="T5"><text:span text:style-name="T5">On the next page, </text:span><text:span text:style-name="T26">Zip Files</text:span><text:span text:style-name="T5">, choose to zip the fine tuning files together to send to your friends.</text:span></text:p>
        </text:list-item>
        <text:list-item>
          <text:p text:style-name="P58" loext:marker-style-name="T5"><text:span text:style-name="T5">On the next page, </text:span><text:span text:style-name="T26">Output Folder</text:span><text:span text:style-name="T5">, choose where you would like the files to be created, then click </text:span><text:span text:style-name="T26">Create Files</text:span><text:span text:style-name="T5">.</text:span></text:p>
        </text:list-item>
        <text:list-item>
          <text:p text:style-name="P58" loext:marker-style-name="T5"><text:span text:style-name="T5">Send the files to your friends, ask them to unzip them on their computer, and explain to them how they can work on the timings. They should send the modified timing files back to you.</text:span><text:span text:style-name="T5"/></text:p>
        </text:list-item>
      </text:list>
      <text:p text:style-name="P42" loext:marker-style-name="T5"/>
      <text:h text:style-name="Heading_20_2" text:outline-level="2"><text:bookmark-start text:name="_Toc138058891"/>Fine tune timing files using Audacity<text:bookmark-end text:name="_Toc138058891"/></text:h>
      <text:p text:style-name="P11" loext:marker-style-name="T5"><text:span text:style-name="T5">Instead of using the Fine Tune Timings viewer, you can make corrections in Audacity. To do this:</text:span><text:span text:style-name="T5"/></text:p>
      <text:list text:style-name="WWNum13">
        <text:list-item>
          <text:p text:style-name="P59" loext:marker-style-name="T5"><text:span text:style-name="T5">Open the audio MP3 file in Audacity.</text:span><text:span text:style-name="T5"/></text:p>
        </text:list-item>
        <text:list-item>
          <text:p text:style-name="P60" loext:marker-style-name="T5"><text:span text:style-name="T5">Import the timing file, by selecting </text:span><text:span text:style-name="T25">File</text:span><text:span text:style-name="T5"> </text:span><text:span text:style-name="T27"></text:span><text:span text:style-name="T22"> </text:span><text:span text:style-name="T25">Import</text:span><text:span text:style-name="T5"> </text:span><text:span text:style-name="T27"></text:span><text:span text:style-name="T22"> </text:span><text:span text:style-name="T23">Labels…</text:span></text:p>
        </text:list-item>
        <text:list-item>
          <text:p text:style-name="P60" loext:marker-style-name="T5"><text:span text:style-name="T22">Zoom into the waveform.</text:span><text:span text:style-name="T22"/></text:p>
        </text:list-item>
        <text:list-item>
          <text:p text:style-name="P60" loext:marker-style-name="T5"><text:span text:style-name="T22">Adjust the position of any labels that are not in the right place.</text:span><text:span text:style-name="T22"/></text:p>
        </text:list-item>
        <text:list-item>
          <text:p text:style-name="P60" loext:marker-style-name="T5"><text:span text:style-name="T22">Export the modified labels track, using </text:span><text:span text:style-name="T23">File</text:span><text:span text:style-name="T22"> &gt; </text:span><text:span text:style-name="T23">Export Labels…</text:span></text:p>
        </text:list-item>
        <text:list-item>
          <text:p text:style-name="P60" loext:marker-style-name="T5"><text:soft-page-break/><text:span text:style-name="T22">Test the synchronisation again within Reading App Builder using the </text:span><text:span text:style-name="T23">Export to HTML</text:span><text:span text:style-name="T22"> utility (see above) to see if the timing problems have been resolved.</text:span></text:p>
        </text:list-item>
      </text:list>
      <text:p text:style-name="P61" loext:marker-style-name="T5"/>
      <text:p text:style-name="P6" loext:marker-style-name="T5"/>
      <text:h text:style-name="Heading_20_1" text:outline-level="1" loext:marker-style-name="T5"><text:bookmark-start text:name="_Toc138058892"/><text:span text:style-name="T5">Adding voices to eSpeak</text:span><text:bookmark-end text:name="_Toc138058892"/><text:span text:style-name="T5"/></text:h>
      <text:p text:style-name="Standard" loext:marker-style-name="T5"><text:span text:style-name="T5">By using character replacements in the </text:span><text:span text:style-name="T26">Synchronize using aeneas</text:span><text:span text:style-name="T5"> wizard, you will find that you can get good synchronization results for many languages using the existing eSpeak voices.</text:span></text:p>
      <text:p text:style-name="P6" loext:marker-style-name="T5"/>
      <text:p text:style-name="Standard" loext:marker-style-name="T5"><text:span text:style-name="T5">Adding a new voice in eSpeak is not easy, but if you would like to try, please follow the instructions here: </text:span><text:a xlink:type="simple" xlink:href="http://espeak.sourceforge.net/add_language.html" text:style-name="Internet_20_link" text:visited-style-name="Visited_20_Internet_20_Link"><text:span text:style-name="Internet_20_link"><text:span text:style-name="T5">http://espeak.sourceforge.net/add_language.html</text:span></text:span></text:a><text:span text:style-name="T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1"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top="0.1665in" fo:margin-bottom="0.0417in" style:contextual-spacing="false" fo:keep-with-next="always">
        <style:tab-stops>
          <style:tab-stop style:position="0.1972in"/>
        </style:tab-stops>
      </style:paragraph-properties>
      <style:text-properties fo:font-size="13pt" fo:language="en" fo:country="GB" fo:font-weight="bold" style:font-size-asian="13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1">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654in" fo:margin-top="0.139in" fo:margin-bottom="0in" style:contextual-spacing="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background-color="#f2f2f2" fo:padding="0.0835in" fo:border="0.51pt solid #ffffff" style:shadow="none"/>
      <style:text-properties fo:color="#0070c0" loext:opacity="100%" style:font-name="Courier New1" fo:font-family="'Courier New'" style:font-family-generic="swiss" style:font-pitch="variable" fo:font-size="10pt" fo:language="en" fo:country="GB" fo:font-weight="bold" style:font-size-asian="10pt" style:font-weight-asian="bold" style:font-name-complex="Courier New2" style:font-family-complex="'Courier New'" style:font-family-generic-complex="system" style:font-pitch-complex="variable"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Footnote" style:family="paragraph" style:parent-style-name="Standard" loext:linked-style-name="Footnote_20_Text_20_Char" style:class="extra">
      <style:text-properties fo:font-size="10pt" style:font-size-asian="10pt" style:font-size-complex="10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swiss" style:font-pitch="variable" fo:font-size="10pt" fo:language="en" fo:country="GB" style:font-size-asian="10pt" style:language-asian="en" style:country-asian="GB" style:font-name-complex="Courier New2" style:font-family-complex="'Courier New'" style:font-family-generic-complex="system" style:font-pitch-complex="variable" style:font-size-complex="10pt" style:language-complex="he" style:country-complex="IL"/>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loext:linked-style-name="Heading_20_1">
      <style:text-properties style:font-name="Calibri1" fo:font-family="Calibri" style:font-family-generic="swiss" style:font-pitch="variable" fo:font-size="16pt" fo:language="fr" fo:country="FR" fo:font-weight="bold" style:letter-kerning="true" style:font-size-asian="16pt" style:language-asian="fr" style:country-asian="FR"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libri1" fo:font-family="Calibri" style:font-family-generic="swiss" style:font-pitch="variable" fo:font-size="13pt" fo:font-weight="bold" style:font-size-asian="13pt" style:language-asian="fr" style:country-asian="FR"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libri1" fo:font-family="Calibri" style:font-family-generic="swiss" style:font-pitch="variable" fo:font-size="12pt" fo:language="fr" fo:country="FR" fo:font-weight="bold" style:font-size-asian="12pt" style:language-asian="fr" style:country-asian="FR" style:font-weight-asian="bold" style:font-name-complex="Arial1" style:font-family-complex="Arial"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loext:linked-style-name="Footer">
      <style:text-properties style:font-name="Calibri1"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Header_20_Char" style:display-name="Header Char" style:family="text" loext:linked-style-name="Header">
      <style:text-properties style:font-name="Calibri1"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Text_20_Char" style:display-name="Footnote Text Char" style:family="text" style:parent-style-name="Default_20_Paragraph_20_Font" loext:linked-style-name="Footnote">
      <style:text-properties style:font-name="Calibri1" fo:font-family="Calibri" style:font-family-generic="swiss" style:font-pitch="variable" fo:language="fr" fo:country="FR" style:language-asian="fr" style:country-asian="F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complex="Courier New2" style:font-family-complex="'Courier New'" style:font-family-generic-complex="system" style:font-pitch-complex="variable" style:language-complex="he" style:country-complex="IL"/>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alibri1" fo:font-family="Calibri" style:font-family-generic="swiss"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weight="normal" style:font-weight-asian="normal"/>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Times New Roman" fo:font-family="'Times New Roman'" style:font-family-generic="roman" style:font-pitch="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Times New Roman" fo:font-family="'Times New Roman'" style:font-family-generic="roman" style:font-pitch="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Times New Roman" fo:font-family="'Times New Roman'" style:font-family-generic="roman" style:font-pitch="variable"/>
    </style:style>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Times New Roman" fo:font-family="'Times New Roman'" style:font-family-generic="roman" style:font-pitch="variable"/>
    </style:style>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alibri1" fo:font-family="Calibri" style:font-family-generic="swiss" style:font-pitch="variable"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Times New Roman" fo:font-family="'Times New Roman'" style:font-family-generic="roman" style:font-pitch="variable"/>
    </style:style>
    <style:style style:name="ListLabel_20_227" style:display-name="ListLabel 227" style:family="text">
      <style:text-properties style:font-name-complex="Courier New2"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Times New Roman" fo:font-family="'Times New Roman'" style:font-family-generic="roman" style:font-pitch="variable"/>
    </style:style>
    <style:style style:name="ListLabel_20_230" style:display-name="ListLabel 230" style:family="text">
      <style:text-properties style:font-name-complex="Courier New2"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Times New Roman" fo:font-family="'Times New Roman'" style:font-family-generic="roman" style:font-pitch="variable"/>
    </style:style>
    <style:style style:name="ListLabel_20_233" style:display-name="ListLabel 233" style:family="text">
      <style:text-properties style:font-name-complex="Courier New2"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Times New Roman" fo:font-family="'Times New Roman'" style:font-family-generic="roman" style:font-pitch="variable"/>
    </style:style>
    <style:style style:name="ListLabel_20_236" style:display-name="ListLabel 236" style:family="text">
      <style:text-properties style:font-name-complex="Courier New2"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Times New Roman" fo:font-family="'Times New Roman'" style:font-family-generic="roman" style:font-pitch="variable"/>
    </style:style>
    <style:style style:name="ListLabel_20_239" style:display-name="ListLabel 239" style:family="text">
      <style:text-properties style:font-name-complex="Courier New2"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Times New Roman" fo:font-family="'Times New Roman'" style:font-family-generic="roman" style:font-pitch="variable"/>
    </style:style>
    <style:style style:name="ListLabel_20_242" style:display-name="ListLabel 242" style:family="text">
      <style:text-properties style:font-name-complex="Courier New2"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Times New Roman" fo:font-family="'Times New Roman'" style:font-family-generic="roman" style:font-pitch="variable"/>
    </style:style>
    <style:style style:name="ListLabel_20_245" style:display-name="ListLabel 245" style:family="text">
      <style:text-properties style:font-name-complex="Courier New2"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Times New Roman" fo:font-family="'Times New Roman'" style:font-family-generic="roman" style:font-pitch="variable"/>
    </style:style>
    <style:style style:name="ListLabel_20_248" style:display-name="ListLabel 248" style:family="text">
      <style:text-properties style:font-name-complex="Courier New2"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Times New Roman" fo:font-family="'Times New Roman'" style:font-family-generic="roman" style:font-pitch="variable"/>
    </style:style>
    <style:style style:name="ListLabel_20_251" style:display-name="ListLabel 251" style:family="text">
      <style:text-properties style:font-name-complex="Courier New2"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Times New Roman" fo:font-family="'Times New Roman'" style:font-family-generic="roman" style:font-pitch="variable"/>
    </style:style>
    <style:style style:name="ListLabel_20_263" style:display-name="ListLabel 263" style:family="text">
      <style:text-properties style:font-name-complex="Courier New2"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Times New Roman" fo:font-family="'Times New Roman'" style:font-family-generic="roman" style:font-pitch="variable"/>
    </style:style>
    <style:style style:name="ListLabel_20_266" style:display-name="ListLabel 266" style:family="text">
      <style:text-properties style:font-name-complex="Courier New2"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Times New Roman" fo:font-family="'Times New Roman'" style:font-family-generic="roman" style:font-pitch="variable"/>
    </style:style>
    <style:style style:name="ListLabel_20_269" style:display-name="ListLabel 269" style:family="text">
      <style:text-properties style:font-name-complex="Courier New2"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fo:language="en" fo:country="GB"/>
    </style:style>
    <style:style style:name="ListLabel_20_290" style:display-name="ListLabel 290" style:family="text">
      <style:text-properties style:font-name="Calibri" fo:font-family="Calibri" style:font-family-generic="roman" style:font-pitch="variable" fo:language="en" fo:country="GB"/>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text:style-name="ListLabel_20_10"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5in" fo:margin-left="0.5984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917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917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917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917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917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917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811in" fo:margin-left="-0.2154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253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0.75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253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1.753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25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2.75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253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3.75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78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78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78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78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78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78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78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78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7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811in" fo:margin-left="0.5291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744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2.244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744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3.244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744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4.244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744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5.24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417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0417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417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0417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417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0417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417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0417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4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1.028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528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2.028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528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3.028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528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4.028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528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5.0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9957in"/>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4957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9957in"/>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4957in"/>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9957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4957in"/>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9957in"/>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4957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99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9957in"/>
        </style:list-level-properties>
        <style:text-properties fo:font-family="Symbol"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4957in"/>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9957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4957in"/>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9957in"/>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4957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9957in"/>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4957in"/>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99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9957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4957in"/>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9957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4957in"/>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9957in"/>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4957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9957in"/>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4957in"/>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99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1.0311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5311in"/>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2.0311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5311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3.0311in"/>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5311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4.0311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5311in"/>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5.0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5" text:anchor-type="paragraph" svg:y="0.0008in" draw:z-index="31"><draw:text-box fo:min-height="0.0161in" fo:min-width="0.0161in"><text:p text:style-name="MP1"><text:span text:style-name="Page_20_Number"><text:page-number text:select-page="current">15</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Reading App Builder - Using aeneas for Audio-Text Synchronization</dc:title>
    <meta:initial-creator>Richard Margetts</meta:initial-creator>
    <meta:editing-cycles>325</meta:editing-cycles>
    <meta:print-date>2017-12-04T11:28:00</meta:print-date>
    <meta:creation-date>2015-08-15T09:35:00</meta:creation-date>
    <dc:date>2026-06-03T12:20:10.248219663</dc:date>
    <meta:editing-duration>PT13M13S</meta:editing-duration>
    <meta:generator>LibreOffice/26.2.3.2$Linux_X86_64 LibreOffice_project/620$Build-2</meta:generator>
    <meta:document-statistic meta:table-count="1" meta:image-count="11" meta:object-count="0" meta:page-count="15" meta:paragraph-count="162" meta:word-count="2219" meta:character-count="12973" meta:non-whitespace-character-count="10931"/>
    <meta:user-defined meta:name="AppVersion">16.0000</meta:user-defined>
    <meta:template xlink:type="simple" xlink:actuate="onRequest" xlink:title="Normal.dotm" xlink:href=""/>
  </office:meta>
</office:document-meta>
</file>