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A00000080325039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611in" fo:margin-left="0in" fo:margin-top="0in" fo:margin-bottom="0in" table:align="left" style:writing-mode="lr-tb"/>
    </style:style>
    <style:style style:name="Table1.A" style:family="table-column">
      <style:table-column-properties style:column-width="3.4458in"/>
    </style:style>
    <style:style style:name="Table1.B" style:family="table-column">
      <style:table-column-properties style:column-width="2.815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0.3896in"/>
    </style:style>
    <style:style style:name="Table2.B" style:family="table-column">
      <style:table-column-properties style:column-width="5.8715in"/>
    </style:style>
    <style:style style:name="Table2.1" style:family="table-row">
      <style:table-row-properties fo:keep-together="auto"/>
    </style:style>
    <style:style style:name="Table2.A1" style:family="table-cell">
      <style:table-cell-properties fo:padding-left="0.075in" fo:padding-right="0.075in" fo:padding-top="0.1181in" fo:padding-bottom="0.1972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0.3896in"/>
    </style:style>
    <style:style style:name="Table3.B" style:family="table-column">
      <style:table-column-properties style:column-width="5.8715in"/>
    </style:style>
    <style:style style:name="Table3.1" style:family="table-row">
      <style:table-row-properties fo:keep-together="auto"/>
    </style:style>
    <style:style style:name="Table3.A1" style:family="table-cell">
      <style:table-cell-properties fo:padding-left="0.075in" fo:padding-right="0.075in" fo:padding-top="0.1181in" fo:padding-bottom="0.1972in" fo:border="0.5pt solid #000000" style:writing-mode="lr-tb"/>
    </style:style>
    <style:style style:name="P1" style:family="paragraph" style:parent-style-name="Standard">
      <style:paragraph-properties fo:margin-top="0.0417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 style:family="paragraph" style:parent-style-name="Standard">
      <style:paragraph-properties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 style:family="paragraph" style:parent-style-name="Standard">
      <style:paragraph-properties fo:margin-top="0in" fo:margin-bottom="0in" style:contextual-spacing="false" fo:line-height="100%" fo:text-align="righ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 style:family="paragraph" style:parent-style-name="Standard">
      <style:paragraph-properties fo:margin-top="0.25in" fo:margin-bottom="0.1665in" style:contextual-spacing="false"/>
    </style:style>
    <style:style style:name="P5" style:family="paragraph" style:parent-style-name="Standard">
      <style:paragraph-properties fo:margin-top="0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6" style:family="paragraph" style:parent-style-name="Heading_20_1" style:list-style-name="WWNum6">
      <style:paragraph-properties fo:margin-left="0in" fo:margin-top="0in" fo:margin-bottom="0in" style:contextual-spacing="false" fo:text-align="left" style:justify-single-word="false" fo:orphans="2" fo:widows="2" fo:text-indent="0in" style:auto-text-indent="false"/>
      <style:text-properties fo:font-size="11pt" fo:language="en" fo:country="GB" style:letter-kerning="false" style:font-size-asian="11pt" style:language-asian="en" style:country-asian="US" style:language-complex="ar" style:country-complex="SA"/>
    </style:style>
    <style:style style:name="P7" style:family="paragraph" style:parent-style-name="List_20_Paragraph" style:list-style-name="WWNum1">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8" style:family="paragraph" style:parent-style-name="List_20_Paragraph" style:list-style-name="WWNum1">
      <style:paragraph-properties fo:margin-left="0.4957in" fo:margin-top="0.0417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9" style:family="paragraph" style:parent-style-name="Standard">
      <style:paragraph-properties fo:margin-top="0.166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0" style:family="paragraph" style:parent-style-name="List_20_Paragraph" style:list-style-name="WWNum1">
      <style:paragraph-properties fo:margin-left="0.4957in" fo:margin-top="0.0417in" fo:margin-bottom="0in" style:contextual-spacing="tru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1" style:family="paragraph" style:parent-style-name="List_20_Paragraph" style:list-style-name="WWNum5">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2" style:family="paragraph" style:parent-style-name="List_20_Paragraph" style:list-style-name="WWNum5">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3" style:family="paragraph" style:parent-style-name="List_20_Paragraph" style:list-style-name="WWNum3">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4" style:family="paragraph" style:parent-style-name="List_20_Paragraph" style:list-style-name="WWNum3">
      <style:paragraph-properties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5" style:family="paragraph" style:parent-style-name="List_20_Paragraph" style:list-style-name="WWNum1">
      <style:paragraph-properties fo:margin-top="0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6" style:family="paragraph" style:parent-style-name="Heading_20_1" style:list-style-name="">
      <style:paragraph-properties fo:margin-left="0in" fo:margin-top="0in" fo:margin-bottom="0in" style:contextual-spacing="false" fo:text-align="left" style:justify-single-word="false" fo:orphans="2" fo:widows="2" fo:text-indent="0in" style:auto-text-indent="false"/>
      <style:text-properties fo:font-size="11pt" fo:language="en" fo:country="GB" style:letter-kerning="false" style:font-size-asian="11pt" style:language-asian="en" style:country-asian="US" style:language-complex="ar" style:country-complex="SA"/>
    </style:style>
    <style:style style:name="P17" style:family="paragraph" style:parent-style-name="List_20_Paragraph" style:list-style-name="WWNum7">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8" style:family="paragraph" style:parent-style-name="List_20_Paragraph" style:list-style-name="WWNum1">
      <style:paragraph-properties fo:margin-left="0.4957in" fo:margin-top="0.0835in" fo:margin-bottom="0in" style:contextual-spacing="tru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9" style:family="paragraph" style:parent-style-name="List_20_Paragraph" style:list-style-name="WWNum1">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0" style:family="paragraph" style:parent-style-name="Standard">
      <style:paragraph-properties fo:margin-left="0.7118in"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1" style:family="paragraph" style:parent-style-name="List_20_Paragraph" style:list-style-name="WWNum1">
      <style:paragraph-properties fo:margin-left="0.4957in" fo:margin-top="0.166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2" style:family="paragraph" style:parent-style-name="List_20_Paragraph">
      <style:paragraph-properties fo:margin-left="0.4957in" fo:margin-top="0.111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3" style:family="paragraph" style:parent-style-name="List_20_Paragraph" style:list-style-name="WWNum1">
      <style:paragraph-properties fo:margin-left="0.4957in" fo:margin-top="0.1665in" fo:margin-bottom="0in" style:contextual-spacing="false" fo:line-height="100%" fo:text-align="left" style:justify-single-word="false" fo:orphans="2" fo:widows="2" fo:text-indent="-0.248in" style:auto-text-indent="false"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4" style:family="paragraph" style:parent-style-name="List_20_Paragraph">
      <style:paragraph-properties fo:margin-left="0.7118in"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5" style:family="paragraph" style:parent-style-name="List_20_Paragraph">
      <style:paragraph-properties fo:margin-left="0.4957in" fo:margin-top="0.139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6" style:family="paragraph" style:parent-style-name="Standard">
      <style:paragraph-properties fo:margin-top="0.0835in" fo:margin-bottom="0in" style:contextual-spacing="false" fo:line-height="100%" fo:text-align="left" style:justify-single-word="false" fo:orphans="2" fo:widows="2"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7" style:family="paragraph" style:parent-style-name="List_20_Paragraph" style:list-style-name="WWNum1">
      <style:paragraph-properties fo:margin-left="0.4957in" fo:margin-top="0.0417in" fo:margin-bottom="0in" style:contextual-spacing="true" fo:line-height="100%" fo:text-align="left" style:justify-single-word="false" fo:orphans="2" fo:widows="2" fo:text-indent="-0.248in" style:auto-text-indent="false"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8" style:family="paragraph" style:parent-style-name="List_20_Paragraph" style:list-style-name="WWNum10">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9" style:family="paragraph" style:parent-style-name="List_20_Paragraph" style:list-style-name="WWNum10">
      <style:paragraph-properties fo:margin-left="0.4957in" fo:margin-top="0.0417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0" style:family="paragraph" style:parent-style-name="List_20_Paragraph" style:list-style-name="WWNum4">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1" style:family="paragraph" style:parent-style-name="List_20_Paragraph" style:list-style-name="WWNum4">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2" style:family="paragraph" style:parent-style-name="List_20_Paragraph" style:list-style-name="WWNum8">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3" style:family="paragraph" style:parent-style-name="List_20_Paragraph" style:list-style-name="WWNum8">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4" style:family="paragraph" style:parent-style-name="List_20_Paragraph" style:list-style-name="WWNum8">
      <style:paragraph-properties fo:margin-top="0.0835in" fo:margin-bottom="0in" style:contextual-spacing="true" fo:line-height="100%" fo:text-align="left" style:justify-single-word="false" fo:orphans="2" fo:widows="2"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5" style:family="paragraph" style:parent-style-name="List_20_Paragraph" style:list-style-name="WWNum8">
      <style:paragraph-properties fo:margin-left="0.4957in" fo:margin-top="0.0417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6" style:family="paragraph" style:parent-style-name="List_20_Paragraph">
      <style:paragraph-properties fo:margin-left="0.4957in"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7" style:family="paragraph" style:parent-style-name="List_20_Paragraph" style:list-style-name="WWNum1">
      <style:paragraph-properties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8" style:family="paragraph" style:parent-style-name="List_20_Paragraph" style:list-style-name="WWNum1">
      <style:paragraph-properties fo:margin-left="0.4957in" fo:margin-top="0.0835in" fo:margin-bottom="0in" style:contextual-spacing="false" fo:line-height="100%" fo:text-align="left" style:justify-single-word="false" fo:orphans="2" fo:widows="2" fo:text-indent="-0.248in" style:auto-text-indent="false"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9" style:family="paragraph" style:parent-style-name="List_20_Paragraph">
      <style:paragraph-properties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0" style:family="paragraph" style:parent-style-name="Standard">
      <style:text-properties fo:font-size="10pt" style:font-size-asian="10pt"/>
    </style:style>
    <style:style style:name="P41" style:family="paragraph" style:parent-style-name="Standard">
      <style:paragraph-properties fo:margin-top="0in" fo:margin-bottom="0in" style:contextual-spacing="false" fo:line-height="100%" fo:text-align="left" style:justify-single-word="false" fo:keep-together="always" fo:orphans="2" fo:widows="2"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2" style:family="paragraph" style:parent-style-name="Standard">
      <style:paragraph-properties fo:margin-top="0.0835in" fo:margin-bottom="0in" style:contextual-spacing="false" fo:line-height="100%" fo:text-align="left" style:justify-single-word="false" fo:keep-together="always" fo:orphans="2" fo:widows="2"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3" style:family="paragraph" style:parent-style-name="Standard">
      <style:paragraph-properties fo:keep-together="always" fo:keep-with-next="always"/>
      <style:text-properties fo:font-size="10pt" style:font-size-asian="10pt"/>
    </style:style>
    <style:style style:name="P44" style:family="paragraph" style:parent-style-name="Standard">
      <style:paragraph-properties fo:text-align="right" style:justify-single-word="false" fo:keep-together="always" fo:keep-with-next="always"/>
    </style:style>
    <style:style style:name="P45" style:family="paragraph" style:parent-style-name="Standard">
      <style:paragraph-properties fo:text-align="right" style:justify-single-word="false"/>
      <style:text-properties fo:font-size="10pt" style:font-size-asian="10pt"/>
    </style:style>
    <style:style style:name="T1" style:family="text">
      <style:text-properties fo:font-size="26pt" fo:font-weight="bold" style:font-size-asian="26pt" style:font-weight-asian="bold"/>
    </style:style>
    <style:style style:name="T2" style:family="text">
      <style:text-properties fo:font-size="22pt" fo:font-weight="bold" style:font-size-asian="22pt" style:font-weight-asian="bold"/>
    </style:style>
    <style:style style:name="T3" style:family="text">
      <style:text-properties fo:font-size="24pt" fo:font-weight="bold" style:font-size-asian="24pt" style:font-weight-asian="bold"/>
    </style:style>
    <style:style style:name="T4" style:family="text">
      <style:text-properties fo:font-style="italic" fo:font-weight="bold" style:font-style-asian="italic" style:font-weight-asian="bold"/>
    </style:style>
    <style:style style:name="T5" style:family="text">
      <style:text-properties fo:font-size="12pt" fo:font-style="italic" fo:font-weight="bold" style:font-size-asian="12pt" style:font-style-asian="italic" style:font-weight-asian="bold"/>
    </style:style>
    <style:style style:name="T6" style:family="text">
      <style:text-properties fo:font-weight="bold" style:font-weight-asian="bold"/>
    </style:style>
    <style:style style:name="T7" style:family="text">
      <style:text-properties fo:font-size="10pt" style:font-size-asian="10pt"/>
    </style:style>
    <style:style style:name="T8" style:family="text">
      <style:text-properties fo:font-family="'MS Gothic'" style:font-family-generic="roman" style:font-pitch="variable" style:font-family-asian="'MS Gothic'" style:font-family-generic-asian="system" style:font-pitch-asian="variable" style:script-type="asian"/>
    </style:style>
    <style:style style:name="T9" style:family="text">
      <style:text-properties fo:font-size="10pt" fo:font-weight="bold" style:font-size-asian="10pt" style:font-weight-asian="bold"/>
    </style:style>
    <style:style style:name="T10" style:family="text">
      <style:text-properties fo:font-size="10pt" fo:font-style="italic" style:font-size-asian="10pt" style:font-style-asian="italic"/>
    </style:style>
    <style:style style:name="T11" style:family="text">
      <style:text-properties fo:font-size="10pt" style:font-size-asian="10pt" style:font-size-complex="10pt"/>
    </style:style>
    <style:style style:name="T12" style:family="text">
      <style:text-properties fo:font-size="10pt" fo:font-weight="normal" style:font-size-asian="10pt" style:font-weight-asian="normal"/>
    </style:style>
    <style:style style:name="T13" style:family="text">
      <style:text-properties fo:color="#2e74b5" loext:opacity="100%" fo:font-size="10pt" fo:font-weight="normal" style:font-size-asian="10pt" style:font-weight-asian="normal">
        <loext:char-complex-color loext:theme-type="accent1" loext:color-type="theme">
          <loext:transformation loext:type="shade" loext:value="2509"/>
        </loext:char-complex-color>
      </style:text-properties>
    </style:style>
    <style:style style:name="T14" style:family="text">
      <style:text-properties fo:color="#2e74b5" loext:opacity="100%" fo:font-size="10pt" style:font-size-asian="10pt">
        <loext:char-complex-color loext:theme-type="accent1" loext:color-type="theme">
          <loext:transformation loext:type="shade" loext:value="2509"/>
        </loext:char-complex-color>
      </style:text-properties>
    </style:style>
    <style:style style:name="T15" style:family="text">
      <style:text-properties fo:font-size="10pt" fo:language="fr" fo:country="FR" style:font-size-asian="10pt"/>
    </style:style>
    <style:style style:name="T16" style:family="text">
      <style:text-properties fo:font-size="10pt" fo:font-style="italic" fo:font-weight="bold" style:font-size-asian="10pt" style:font-style-asian="italic" style:font-weight-asian="bold"/>
    </style:style>
    <style:style style:name="T17" style:family="text">
      <style:text-properties fo:font-family="'MS Gothic'" style:font-family-generic="roman" style:font-pitch="variable" style:font-family-asian="'MS Gothic'" style:font-family-generic-asian="system" style:font-pitch-asian="variable"/>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2">App Publishing Checklist</text:span><text:span text:style-name="T3"> </text:span></text:p>
            <text:p text:style-name="P2" loext:marker-style-name="T4"><text:span text:style-name="T5"><text:s text:c="3"/>Is your app ready to publish?</text:span><text:span text:style-name="T5"/></text:p>
          </table:table-cell>
          <table:table-cell table:style-name="Table1.A1" office:value-type="string">
            <text:p text:style-name="P3" loext:marker-style-name="T6"><draw:frame draw:style-name="fr1" draw:name="Picture 1" text:anchor-type="as-char" svg:width="2.4335in" svg:height="0.7598in"><draw:image xlink:href="Pictures/100000010000019A00000080325039FD.png" xlink:type="simple" xlink:show="embed" xlink:actuate="onLoad" draw:mime-type="image/png"/></draw:frame></text:p>
          </table:table-cell>
        </table:table-row>
      </table:table>
      <text:p text:style-name="Standard"/>
      <text:p text:style-name="P4" loext:marker-style-name="T7"><text:span text:style-name="T7">Before you release your app and make it available for users to install and share, here is a list of things to check. This checklist can be used by those responsible for checking digital publications in your organisation.</text:span><text:span text:style-name="T7"/></text:p>
      <table:table table:name="Table2" table:style-name="Table2">
        <table:table-column table:style-name="Table2.A"/>
        <table:table-column table:style-name="Table2.B"/>
        <table:table-row table:style-name="Table2.1">
          <table:table-cell table:style-name="Table2.A1" office:value-type="string">
            <text:p text:style-name="P5"><text:span text:style-name="T8">☐</text:span></text:p>
          </table:table-cell>
          <table:table-cell table:style-name="Table2.A1" office:value-type="string">
            <text:list xml:id="list2362139527" text:style-name="WWNum6">
              <text:list-item>
                <text:h text:style-name="P6" text:outline-level="1">Content Checks</text:h>
              </text:list-item>
            </text:list>
            <text:p text:style-name="P2" loext:marker-style-name="T7"><text:span text:style-name="T7">Ensure that the app content has passed through the checks required by your organisation: </text:span><text:span text:style-name="T7"/></text:p>
            <text:list xml:id="list920086011" text:style-name="WWNum1">
              <text:list-item>
                <text:p text:style-name="P7" loext:marker-style-name="T7"><text:span text:style-name="T7">Has it been proof-read for spelling mistakes and punctuation? </text:span><text:span text:style-name="T7"/></text:p>
              </text:list-item>
              <text:list-item>
                <text:p text:style-name="P8" loext:marker-style-name="T7"><text:span text:style-name="T7">Have any illustrations been checked for appropriateness and clarity?</text:span><text:span text:style-name="T7"/></text:p>
              </text:list-item>
              <text:list-item>
                <text:p text:style-name="P8" loext:marker-style-name="T7"><text:span text:style-name="T7">Is the formatting consistent, e.g. use of heading styles, line spacing, etc.? </text:span><text:span text:style-name="T7"/></text:p>
              </text:list-item>
              <text:list-item>
                <text:p text:style-name="P8" loext:marker-style-name="T7"><text:span text:style-name="T7">Has the content been approved for publication?</text:span><text:span text:style-name="T7"/></text:p>
              </text:list-item>
              <text:list-item>
                <text:p text:style-name="P8" loext:marker-style-name="T7"><text:span text:style-name="T7">Are you using an approved orthography?</text:span><text:span text:style-name="T7"/></text:p>
              </text:list-item>
            </text:list>
            <text:p text:style-name="P9"><text:span text:style-name="T7">If you are using RAB to create apps to be used by a limited number of users, such as a community reviewers’ committee, or if it is a trial orthography which you will want to update in a few months, please see the section below on ‘Expiry Date or Limited Device Distribution’.</text:span></text:p>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7142292513" text:continue-list="list2362139527" text:style-name="WWNum6">
              <text:list-item>
                <text:h text:style-name="P6" text:outline-level="1">Permission to Distribute Content</text:h>
              </text:list-item>
            </text:list>
            <text:p text:style-name="P2" loext:marker-style-name="T7"><text:span text:style-name="T7">Ensure that you have the necessary permissions to distribute the content in the app:</text:span><text:span text:style-name="T7"/></text:p>
            <text:list text:continue-list="list920086011" text:style-name="WWNum1">
              <text:list-item>
                <text:p text:style-name="P7" loext:marker-style-name="T7"><text:span text:style-name="T7">Do you have permission to distribute the text?</text:span><text:span text:style-name="T7"/></text:p>
              </text:list-item>
              <text:list-item>
                <text:p text:style-name="P8" loext:marker-style-name="T7"><text:span text:style-name="T7">Do you have permission to distribute the audio files, if any?</text:span><text:span text:style-name="T7"/></text:p>
              </text:list-item>
              <text:list-item>
                <text:p text:style-name="P8" loext:marker-style-name="T7"><text:span text:style-name="T7">Do you have permission to distribute each of the images, if any?</text:span><text:span text:style-name="T7"/></text:p>
              </text:list-item>
            </text:list>
            <text:p text:style-name="P9" loext:marker-style-name="T6"><text:span text:style-name="T7">Remember that for text, audio and images, the copyright can be held by different owners. You must have permission for each.</text:span><text:span text:style-name="T9"/></text:p>
            <text:p text:style-name="P9" loext:marker-style-name="T7"><text:span text:style-name="T7">You will have permission if:</text:span><text:span text:style-name="T7"/></text:p>
            <text:list xml:id="list131447931509594" text:continue-numbering="true" text:style-name="WWNum1">
              <text:list-item>
                <text:p text:style-name="P10" loext:marker-style-name="T7"><text:span text:style-name="T7">You are the owner (intellectual property rights holder) of the content, or</text:span><text:span text:style-name="T7"/></text:p>
              </text:list-item>
              <text:list-item>
                <text:p text:style-name="P8" loext:marker-style-name="T7"><text:span text:style-name="T7">You have been given permission from the rights holder to distribute their content. Such permission may be granted: (i) in a license, such as a Creative Commons license, or (ii) in a specific agreement signed between you and the rights holder. </text:span><text:span text:style-name="T7"/></text:p>
              </text:list-item>
            </text:list>
            <text:p text:style-name="P9" loext:marker-style-name="T7"><text:span text:style-name="T7">It is important to know whether you have permission to distribute the content in </text:span><text:span text:style-name="T10">digital</text:span><text:span text:style-name="T7"> publications. For example, if you know you have the permission to use a certain image in a printed booklet, you will also need to check whether you have permission to use it in an app.</text:span></text:p>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7611448753" text:continue-list="list131447142292513" text:style-name="WWNum6">
              <text:list-item>
                <text:h text:style-name="P6" text:outline-level="1">App Installation and Navigation</text:h>
              </text:list-item>
            </text:list>
            <text:p text:style-name="P2" loext:marker-style-name="T7"><text:span text:style-name="T7">Install the app on at least two different smartphones with different Android versions. Choose models of phones that are owned by typical users, i.e. test on low and mid-range phones and not simply the fastest and most expensive phones you can find.</text:span><text:span text:style-name="T7"/></text:p>
            <text:list text:style-name="WWNum5">
              <text:list-item>
                <text:p text:style-name="P11"><text:span text:style-name="T7">Does the app install OK?</text:span></text:p>
              </text:list-item>
              <text:list-item>
                <text:p text:style-name="P12"><text:span text:style-name="T7">Are you able to navigate around the app without any problems? Try selecting books, playing picture story books, scrolling, swiping between pages, searching for words, etc.</text:span></text:p>
              </text:list-item>
              <text:list-item>
                <text:p text:style-name="P12"><text:span text:style-name="T7">Is text highlighting synchronized correctly when the audio is playing?</text:span></text:p>
              </text:list-item>
              <text:list-item>
                <text:p text:style-name="P12"><text:span text:style-name="T7">Are you able to view the contents of the about box?</text:span></text:p>
              </text:list-item>
            </text:list>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6761653024" text:continue-list="list131447611448753" text:style-name="WWNum6">
              <text:list-item>
                <text:h text:style-name="P6" text:outline-level="1">App Name</text:h>
              </text:list-item>
            </text:list>
            <text:p text:style-name="P2" loext:marker-style-name="T6"><text:span text:style-name="T7">This is the main title of the app, displayed on the user’s phone under the app icon.</text:span><text:span text:style-name="T9"/></text:p>
            <text:list text:style-name="WWNum3">
              <text:list-item>
                <text:p text:style-name="P13" loext:marker-style-name="T11"><text:span text:style-name="T11">Is the name short enough, e.g. “Giryama Stories” rather than “A Collection of Short Stories in the Giryama Language”? Otherwise some of the name will be cut off when displayed on the phone.</text:span><text:span text:style-name="T11"/></text:p>
              </text:list-item>
              <text:list-item>
                <text:p text:style-name="P13" loext:marker-style-name="T11"><text:span text:style-name="T11">Is the name clear and understandable by speakers of the language? Is it better to use a name in a language of wider communication or a name in the local language?</text:span><text:span text:style-name="T11"/></text:p>
              </text:list-item>
              <text:list-item>
                <text:p text:style-name="P13" loext:marker-style-name="T11"><text:span text:style-name="T11">Is mixed case used, e.g. “Tharaka Stories”, not “THARAKA STORIES”?</text:span><text:span text:style-name="T11"/></text:p>
              </text:list-item>
              <text:list-item>
                <text:p text:style-name="P14" loext:marker-style-name="T11"><text:span text:style-name="T11">Remember that app names will be displayed using the system font and not the app font. Are special characters avoided in the name which would require a special font?</text:span><text:span text:style-name="T11"/></text:p>
              </text:list-item>
              <text:list-item>
                <text:p text:style-name="P13"><text:span text:style-name="T11">If</text:span><text:span text:style-name="T7"> the app will be used in different countries with different official languages, have you provided translations of the app name, where appropriate? E.g. if you want the app name to be ‘Suba Stories’ in English-speaking countries and ‘Contes en suba’ in French-speaking countries.</text:span></text:p>
              </text:list-item>
            </text:list>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7037985449" text:continue-list="list131446761653024" text:style-name="WWNum6">
              <text:list-item>
                <text:h text:style-name="P6" text:outline-level="1">App Icon</text:h>
              </text:list-item>
            </text:list>
            <text:p text:style-name="P2" loext:marker-style-name="T6"><text:span text:style-name="T7">The app icon is the icon that represents the app on a user’s smartphone or tablet.</text:span><text:span text:style-name="T9"/></text:p>
            <text:list xml:id="list131447071630308" text:continue-list="list131447931509594" text:style-name="WWNum1">
              <text:list-item>
                <text:p text:style-name="P10" loext:marker-style-name="T7"><text:span text:style-name="T7">Is the image clear and not blurred?</text:span><text:span text:style-name="T7"/></text:p>
              </text:list-item>
              <text:list-item>
                <text:p text:style-name="P10" loext:marker-style-name="T7"><text:span text:style-name="T7">Will typical users understand what it represents?</text:span><text:span text:style-name="T7"/></text:p>
              </text:list-item>
              <text:list-item>
                <text:p text:style-name="P15" loext:marker-style-name="T7"><text:span text:style-name="T7">Is it culturally appropriate?</text:span><text:span text:style-name="T7"/></text:p>
              </text:list-item>
              <text:list-item>
                <text:p text:style-name="P15" loext:marker-style-name="T7"><text:span text:style-name="T7">Is the quality of the design sufficiently professional?</text:span><text:span text:style-name="T7"/></text:p>
              </text:list-item>
              <text:list-item>
                <text:p text:style-name="P15" loext:marker-style-name="T7"><text:span text:style-name="T7">Have you defined adaptive icons for Android as well as legacy icons?</text:span><text:span text:style-name="T7"/></text:p>
              </text:list-item>
            </text:list>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8357327775" text:continue-list="list131447037985449" text:style-name="WWNum6">
              <text:list-item>
                <text:h text:style-name="P6" text:outline-level="1">Splash Screen</text:h>
              </text:list-item>
            </text:list>
            <text:p text:style-name="P2" loext:marker-style-name="T6"><text:span text:style-name="T7">The splash screen is the image that appears full screen when the app is loading. It is optional, but if it is included:</text:span><text:span text:style-name="T9"/></text:p>
            <text:list xml:id="list131446772702842" text:continue-list="list131447071630308" text:style-name="WWNum1">
              <text:list-item>
                <text:p text:style-name="P10" loext:marker-style-name="T7"><text:span text:style-name="T7">Is the image clear and not blurred?</text:span><text:span text:style-name="T7"/></text:p>
              </text:list-item>
              <text:list-item>
                <text:p text:style-name="P10" loext:marker-style-name="T7"><text:span text:style-name="T7">Will typical users understand what it represents?</text:span><text:span text:style-name="T7"/></text:p>
              </text:list-item>
              <text:list-item>
                <text:p text:style-name="P15" loext:marker-style-name="T7"><text:span text:style-name="T7">Is it culturally appropriate?</text:span><text:span text:style-name="T7"/></text:p>
              </text:list-item>
              <text:list-item>
                <text:p text:style-name="P15" loext:marker-style-name="T7"><text:span text:style-name="T7">Is the quality of the design sufficiently professional?</text:span><text:span text:style-name="T7"/></text:p>
              </text:list-item>
            </text:list>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7602276026" text:continue-list="list131448357327775" text:style-name="WWNum6">
              <text:list-item>
                <text:h text:style-name="P6" text:outline-level="1">Navigation Drawer Image</text:h>
              </text:list-item>
            </text:list>
            <text:p text:style-name="P2" loext:marker-style-name="T6"><text:span text:style-name="T7">The navigation drawer image is displayed at the top of the drawer that slides in from the side of the screen when the user taps the hamburger icon or swipes in from the side of the device.</text:span><text:span text:style-name="T9"/></text:p>
            <text:list xml:id="list131448378829476" text:continue-list="list131446772702842" text:style-name="WWNum1">
              <text:list-item>
                <text:p text:style-name="P10" loext:marker-style-name="T7"><text:span text:style-name="T7">Is the image clear and not blurred?</text:span><text:span text:style-name="T7"/></text:p>
              </text:list-item>
              <text:list-item>
                <text:p text:style-name="P10" loext:marker-style-name="T7"><text:span text:style-name="T7">Will typical users understand what it represents?</text:span><text:span text:style-name="T7"/></text:p>
              </text:list-item>
              <text:list-item>
                <text:p text:style-name="P15" loext:marker-style-name="T7"><text:span text:style-name="T7">Is it culturally appropriate?</text:span><text:span text:style-name="T7"/></text:p>
              </text:list-item>
              <text:list-item>
                <text:p text:style-name="P15" loext:marker-style-name="T7"><text:span text:style-name="T7">Is the quality of the design sufficiently professional?</text:span><text:span text:style-name="T7"/></text:p>
              </text:list-item>
            </text:list>
          </table:table-cell>
        </table:table-row>
        <table:table-row table:style-name="Table2.1">
          <table:table-cell table:style-name="Table2.A1" office:value-type="string">
            <text:p text:style-name="P5"><text:span text:style-name="T8">☐</text:span></text:p>
          </table:table-cell>
          <table:table-cell table:style-name="Table2.A1" office:value-type="string">
            <text:list text:continue-list="list131447602276026" text:style-name="WWNum6">
              <text:list-item>
                <text:h text:style-name="P6" text:outline-level="1">Fonts</text:h>
              </text:list-item>
            </text:list>
            <text:p text:style-name="P2" loext:marker-style-name="T7"><text:span text:style-name="T7">Are the font(s) readable and suitable for the language and app content? Are special characters displayed correctly?</text:span><text:span text:style-name="T7"/></text:p>
            <text:p text:style-name="P2" loext:marker-style-name="T7"><text:span text:style-name="T7">Is the default font size reasonable? i.e. the size of the text when someone launches the app for the first time. If you have an Arabic script, you may need to specify a default font size that is larger than the typical default Roman script font size.</text:span><text:span text:style-name="T7"/></text:p>
            <text:p text:style-name="P2" loext:marker-style-name="T6"><text:span text:style-name="T7">If you use a font with a non-Roman script (such as Arabic, Ethiopic, Thai), or if you use a Roman script with combining diacritics (ɔ́, ɛ̀), check that phones with different Android versions are displaying these correctly. In particular, Android versions 4.3 and lower will need Grandroid enabled within the app, otherwise the characters will not be displayed properly.</text:span><text:span text:style-name="T9"/></text:p>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7564711683" text:continue-numbering="true" text:style-name="WWNum6">
              <text:list-item>
                <text:h text:style-name="P6" text:outline-level="1">Package Name</text:h>
              </text:list-item>
            </text:list>
            <text:h text:style-name="P16" text:outline-level="1" loext:marker-style-name="T12"><text:span text:style-name="T12">The package name uniquely identifies the app. It is a lowercase dot-separated string without spaces, such as </text:span><text:span text:style-name="T13">org.mamara.stories</text:span><text:span text:style-name="T12">.</text:span></text:h>
            <text:list text:style-name="WWNum7">
              <text:list-item>
                <text:p text:style-name="P17"><text:span text:style-name="T11">Does the package name begin with your organisation’s website name reversed? E.g “org.mamara” rather than “mamara.org”. Ensure you have the right to use this organisation’s address.</text:span></text:p>
              </text:list-item>
              <text:list-item>
                <text:p text:style-name="P17"><text:span text:style-name="T7">Are the other components of the package name well chosen? It is a good idea to include the language name or code (e.g. ‘mamara’ or ‘myk’) and the type of publication (‘stories’).</text:span></text:p>
              </text:list-item>
            </text:list>
            <text:p text:style-name="P9" loext:marker-style-name="T7"><text:span text:style-name="T7">The package name can be seen by users when they view the app’s store details in Google Play so it is important to chose it well. You cannot change an app’s package name in the future if you want to update the same app.</text:span><text:span text:style-name="T7"/></text:p>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7968348645" text:continue-list="list131447564711683" text:style-name="WWNum6">
              <text:list-item>
                <text:h text:style-name="P6" text:outline-level="1">About Box Information</text:h>
              </text:list-item>
            </text:list>
            <text:p text:style-name="P2" loext:marker-style-name="T6"><text:span text:style-name="T7">Check that the About box of the app has the following information, where appropriate:</text:span><text:span text:style-name="T9"/></text:p>
            <text:list text:continue-list="list131448378829476" text:style-name="WWNum1">
              <text:list-item>
                <text:p text:style-name="P18" loext:marker-style-name="T7"><text:span text:style-name="T7">The </text:span><text:span text:style-name="T9">title</text:span><text:span text:style-name="T7"> of the app.</text:span></text:p>
              </text:list-item>
              <text:list-item>
                <text:p text:style-name="P19" loext:marker-style-name="T7"><text:span text:style-name="T7">A </text:span><text:span text:style-name="T9">description</text:span><text:span text:style-name="T7"> of the app, e.g.</text:span></text:p>
              </text:list-item>
            </text:list>
            <text:p text:style-name="P20" loext:marker-style-name="T14"><text:span text:style-name="T14">Stories in the Mamara Language of Mali</text:span><text:span text:style-name="T14"/></text:p>
            <text:list text:continue-numbering="true" text:style-name="WWNum1">
              <text:list-item>
                <text:p text:style-name="P21" loext:marker-style-name="T7"><text:span text:style-name="T9">Contact information</text:span><text:span text:style-name="T7"> for your organisation, <text:line-break/> <text:s text:c="2"/>e.g. your website address, telephone number, postal address, etc.</text:span></text:p>
              </text:list-item>
            </text:list>
            <text:p text:style-name="P22" loext:marker-style-name="T7"><text:span text:style-name="T7">Are hyperlinks used for websites and phone numbers so that the user can tap on the web address to go to the site, or tap on the phone number to launch the phone dialer?</text:span><text:span text:style-name="T7"/></text:p>
            <text:list text:continue-numbering="true" text:style-name="WWNum1">
              <text:list-item>
                <text:p text:style-name="P23" loext:marker-style-name="T7"><text:span text:style-name="T9">Copyright information for the text</text:span><text:span text:style-name="T7"> as required by the rights holder, e.g.</text:span></text:p>
              </text:list-item>
            </text:list>
            <text:p text:style-name="P20" loext:marker-style-name="T14"><text:span text:style-name="T14">Text: © 2014 Association pour la promotion de la langue Mamara.</text:span><text:span text:style-name="T14"/></text:p>
            <text:list text:continue-numbering="true" text:style-name="WWNum1">
              <text:list-item>
                <text:p text:style-name="P21" loext:marker-style-name="T7"><text:span text:style-name="T9">Copyright information for the</text:span><text:span text:style-name="T7"> </text:span><text:span text:style-name="T9">audio</text:span><text:span text:style-name="T7"> as required by the rights holder, e.g.</text:span></text:p>
              </text:list-item>
            </text:list>
            <text:p text:style-name="P24" loext:marker-style-name="T14"><text:span text:style-name="T14">Audio: ℗ 2015 Association pour la promotion de la langue Mamara.</text:span><text:span text:style-name="T14"/></text:p>
            <text:p text:style-name="P25" loext:marker-style-name="T7"><text:span text:style-name="T7">The ℗ symbol is used to represent the copyright of a sound recording. If the font you are using does not include ℗, you could use (P) instead.</text:span><text:span text:style-name="T7"/></text:p>
            <text:list text:continue-numbering="true" text:style-name="WWNum1">
              <text:list-item>
                <text:p text:style-name="P21" loext:marker-style-name="T7"><text:span text:style-name="T9">Copyright information for the</text:span><text:span text:style-name="T7"> </text:span><text:span text:style-name="T9">images</text:span><text:span text:style-name="T7"> as required by the rights holder, e.g.</text:span></text:p>
              </text:list-item>
            </text:list>
            <text:p text:style-name="P24" loext:marker-style-name="T7"><text:span text:style-name="T14">Illustrations: © 2015 Ousmane Diarra. Used with permission.</text:span><text:span text:style-name="T14"/></text:p>
            <text:list xml:id="list131446888058053" text:continue-numbering="true" text:style-name="WWNum1">
              <text:list-item>
                <text:p text:style-name="P23" loext:marker-style-name="T7"><text:span text:style-name="T9">License</text:span><text:span text:style-name="T7"> </text:span><text:span text:style-name="T9">information</text:span><text:span text:style-name="T7">: tell the users of the app what they can do with the app, e.g. if you want them to be able to distribute it freely:</text:span></text:p>
              </text:list-item>
            </text:list>
            <text:p text:style-name="P24" loext:marker-style-name="T14"><text:span text:style-name="T14">This app is made available to you under the terms of the Creative Commons License: Attribution-Noncommercial-No Derivative Works. http://creativecommons.org/licenses/by-nc-nd/4.0/</text:span><text:span text:style-name="T14"/></text:p>
            <text:p text:style-name="P5"/>
            <text:p text:style-name="P5" loext:marker-style-name="T7"><text:span text:style-name="T9">Choice of language: <text:line-break/></text:span><text:span text:style-name="T7">Ensure that the about box information is in a language that many of your users and members of the wider community will understand. Think of the way in which you would use an official language on the copyright</text:span><text:span text:style-name="T15"> page</text:span><text:span text:style-name="T7"> of a printed local language book. For example, for South American language apps, provide the license in Spanish or Portuguese rather than (or as well as) English. Creative Commons license wording in several languages is available via links on the Creative Commons website.</text:span></text:p>
            <text:p text:style-name="P9" loext:marker-style-name="T7"><text:span text:style-name="T9">IMPORTANT: <text:line-break/></text:span><text:span text:style-name="T7">If you are unsure about any of these details, please do not guess them. Please contact those responsible for digital publishing in your organisation for advice and suggested wording.</text:span></text:p>
            <text:p text:style-name="P2" loext:marker-style-name="T7"><text:span text:style-name="T7">Do not simply copy the About Box information from a printed copy of the text. The publisher information, licences, publishing date you find on a printed front matter page will often be different from what is needed for an app. A digital publication is not the same as a printed publication.</text:span><text:span text:style-name="T7"/></text:p>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8044899522" text:continue-list="list131447968348645" text:style-name="WWNum6">
              <text:list-item>
                <text:h text:style-name="P6" text:outline-level="1">Books and Book Names</text:h>
              </text:list-item>
            </text:list>
            <text:p text:style-name="P2" loext:marker-style-name="T7"><text:span text:style-name="T7">Are all the books included that should be included? Make sure that you are not missing out a book by accident.</text:span><text:span text:style-name="T7"/></text:p>
            <text:p text:style-name="P26" loext:marker-style-name="T6"><text:span text:style-name="T7">Look at the list of book names for the app:</text:span><text:span text:style-name="T9"/></text:p>
            <text:list xml:id="list131447449399921" text:continue-list="list131446888058053" text:style-name="WWNum1">
              <text:list-item>
                <text:p text:style-name="P27" loext:marker-style-name="T7"><text:span text:style-name="T7">Are they consistent, i.e. not a mixture of full names and abbreviations? </text:span><text:span text:style-name="T7"/></text:p>
              </text:list-item>
              <text:list-item>
                <text:p text:style-name="P10" loext:marker-style-name="T7"><text:span text:style-name="T7">Is mixed case used, i.e. “Chicken and Millipede”, not “CHICKEN AND MILLIPEDE”?</text:span><text:span text:style-name="T7"/></text:p>
              </text:list-item>
            </text:list>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7782939557" text:continue-list="list131448044899522" text:style-name="WWNum6">
              <text:list-item>
                <text:h text:style-name="P6" text:outline-level="1">Search</text:h>
              </text:list-item>
            </text:list>
            <text:p text:style-name="P2" loext:marker-style-name="T7"><text:span text:style-name="T7">If Search is enabled in the app:</text:span><text:span text:style-name="T7"/></text:p>
            <text:list text:style-name="WWNum10">
              <text:list-item>
                <text:p text:style-name="P28" loext:marker-style-name="T9"><text:span text:style-name="T7">Is search working OK?</text:span><text:span text:style-name="T9"/></text:p>
              </text:list-item>
              <text:list-item>
                <text:p text:style-name="P29" loext:marker-style-name="T9"><text:span text:style-name="T7">Have special character input buttons been specified for the search screen? These are the buttons that a user can press in addition to the phone’s system keyboard.</text:span><text:span text:style-name="T9"/></text:p>
              </text:list-item>
            </text:list>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7962023615" text:continue-list="list131447782939557" text:style-name="WWNum6">
              <text:list-item>
                <text:h text:style-name="P6" text:outline-level="1">Interface Language and Translations</text:h>
              </text:list-item>
            </text:list>
            <text:p text:style-name="P2" loext:marker-style-name="T6"><text:span text:style-name="T7">Look at the language used for the interface menu items and search screen, e.g. “Search”, “About”, “Match whole words”, etc.:</text:span><text:span text:style-name="T9"/></text:p>
            <text:list xml:id="list131448086166164" text:continue-list="list131447449399921" text:style-name="WWNum1">
              <text:list-item>
                <text:p text:style-name="P10" loext:marker-style-name="T7"><text:span text:style-name="T7">Is a choice of appropriate interface languages provided for typical users? What is the default interface language when users first install the app? Is it best to default to using English, French, Chinese, a local language, etc.? </text:span><text:span text:style-name="T7"/></text:p>
              </text:list-item>
              <text:list-item>
                <text:p text:style-name="P8" loext:marker-style-name="T7"><text:span text:style-name="T7">If the interface elements have been translated into a local language, have they been checked for comprehension?</text:span><text:span text:style-name="T7"/></text:p>
              </text:list-item>
            </text:list>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6729493267" text:continue-list="list131447962023615" text:style-name="WWNum6">
              <text:list-item>
                <text:h text:style-name="P6" text:outline-level="1">KeyStore for App Signing</text:h>
              </text:list-item>
            </text:list>
            <text:p text:style-name="P26" loext:marker-style-name="T7"><text:span text:style-name="T7">All Android apps are signed with a keystore key. You can use the same keystore for multiple apps, or a different keystore for each app.</text:span><text:span text:style-name="T7"/></text:p>
            <text:list text:style-name="WWNum4">
              <text:list-item>
                <text:p text:style-name="P30" loext:marker-style-name="T7"><text:span text:style-name="T7">Has the app been signed with a Keystore that you have generated for publishing? i.e. does the keystore contain some of your organisational details rather than being just a temporary keystore that you created quickly for in-house testing?</text:span><text:span text:style-name="T7"/></text:p>
              </text:list-item>
              <text:list-item>
                <text:p text:style-name="P31" loext:marker-style-name="T7"><text:span text:style-name="T9">IMPORTANT:</text:span><text:span text:style-name="T7"> Is the keystore file being kept safe somewhere? When you update your app, you will need to use exactly the same keystore file.</text:span></text:p>
              </text:list-item>
            </text:list>
          </table:table-cell>
        </table:table-row>
        <table:table-row table:style-name="Table2.1">
          <table:table-cell table:style-name="Table2.A1" office:value-type="string">
            <text:p text:style-name="P5"><text:span text:style-name="T8">☐</text:span></text:p>
          </table:table-cell>
          <table:table-cell table:style-name="Table2.A1" office:value-type="string">
            <text:list text:continue-list="list131446729493267" text:style-name="WWNum6">
              <text:list-item>
                <text:h text:style-name="P6" text:outline-level="1">Audio-Text Synchronization</text:h>
              </text:list-item>
            </text:list>
            <text:p text:style-name="P2" loext:marker-style-name="T7"><text:span text:style-name="T7">If you are using audio-text synchronization to highlight the text phrase-by-phrase as the audio is playing, is the highlighting working accurately?</text:span><text:span text:style-name="T7"/></text:p>
            <text:p text:style-name="P2" loext:marker-style-name="T7"><text:span text:style-name="T7">If the app contains picture story books, are the pages advancing at the right moments in time with the audio?</text:span><text:span text:style-name="T7"/></text:p>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8225257735" text:continue-numbering="true" text:style-name="WWNum6">
              <text:list-item>
                <text:h text:style-name="P6" text:outline-level="1">Audio File Distribution</text:h>
              </text:list-item>
            </text:list>
            <text:p text:style-name="P2" loext:marker-style-name="T7"><text:span text:style-name="T7">If your app uses audio, how have you decided to distribute the audio files?</text:span><text:span text:style-name="T7"/></text:p>
            <text:list xml:id="list1629124867" text:style-name="WWNum8">
              <text:list-item>
                <text:p text:style-name="P32" loext:marker-style-name="T16"><text:span text:style-name="T16">Package inside the app: </text:span><text:span text:style-name="T7">Check that the app size is not too large. The limit for publishing an app on Google Play is 100MB. If you want users to be able to share the app via Bluetooth, it would be better if it was much smaller than this.</text:span></text:p>
              </text:list-item>
              <text:list-item>
                <text:p text:style-name="P33" loext:marker-style-name="T16"><text:span text:style-name="T16">Distribute in an external folder: </text:span><text:span text:style-name="T7">Do you have a good distributation strategy for making the audio files available to people?</text:span></text:p>
              </text:list-item>
              <text:list-item>
                <text:p text:style-name="P33" loext:marker-style-name="T16"><text:span text:style-name="T16">Download from the internet: </text:span><text:span text:style-name="T7">Are you hosting the audio files on a reliable server? Test that this download works when you try to play an audio file in the app.</text:span></text:p>
              </text:list-item>
            </text:list>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6899249334" text:continue-list="list131448225257735" text:style-name="WWNum6">
              <text:list-item>
                <text:h text:style-name="P6" text:outline-level="1">Expiry Date or Limited Device Distribution</text:h>
              </text:list-item>
            </text:list>
            <text:p text:style-name="P26" loext:marker-style-name="T7"><text:span text:style-name="T7">If you want to limit the lifetime of the app, e.g. it is a trial version:</text:span><text:span text:style-name="T7"/></text:p>
            <text:list text:continue-list="list1629124867" text:style-name="WWNum8">
              <text:list-item>
                <text:p text:style-name="P34" loext:marker-style-name="T7"><text:span text:style-name="T7">Has an expiry date been specified? </text:span><text:span text:style-name="T7"/></text:p>
              </text:list-item>
              <text:list-item>
                <text:p text:style-name="P35" loext:marker-style-name="T7"><text:span text:style-name="T7">What message will be displayed to the user when the expiry date is reached?</text:span><text:span text:style-name="T7"/></text:p>
              </text:list-item>
              <text:list-item>
                <text:p text:style-name="P35" loext:marker-style-name="T7"><text:span text:style-name="T7">Will users continue to be able to use the app after seeing the expiry message?</text:span><text:span text:style-name="T7"/></text:p>
              </text:list-item>
            </text:list>
            <text:p text:style-name="P9" loext:marker-style-name="T7"><text:span text:style-name="T7">If you want to limit the devices that can install the app, e.g. you want a restricted team to be able to use it:</text:span><text:span text:style-name="T7"/></text:p>
            <text:list text:continue-numbering="true" text:style-name="WWNum8">
              <text:list-item>
                <text:p text:style-name="P32" loext:marker-style-name="T7"><text:span text:style-name="T7">Have you specified a list of approved device IMEI numbers in the app?</text:span><text:span text:style-name="T7"/></text:p>
              </text:list-item>
              <text:list-item>
                <text:p text:style-name="P35" loext:marker-style-name="T7"><text:span text:style-name="T7">If you try to run the app on a device which is not included in this list, does it show an error message?</text:span><text:span text:style-name="T7"/></text:p>
              </text:list-item>
            </text:list>
          </table:table-cell>
        </table:table-row>
        <table:table-row table:style-name="Table2.1">
          <table:table-cell table:style-name="Table2.A1" office:value-type="string">
            <text:p text:style-name="P5"><text:span text:style-name="T8">☐</text:span></text:p>
          </table:table-cell>
          <table:table-cell table:style-name="Table2.A1" office:value-type="string">
            <text:list text:continue-list="list131446899249334" text:style-name="WWNum6">
              <text:list-item>
                <text:h text:style-name="P6" text:outline-level="1">Archiving</text:h>
              </text:list-item>
            </text:list>
            <text:p text:style-name="P26"><text:span text:style-name="T7">If you are the rights holder of the app content, have you followed your organisation’s guidelines, if any, regarding archiving the text, images and recorded audio</text:span>.</text:p>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7948611600" text:continue-numbering="true" text:style-name="WWNum6">
              <text:list-item>
                <text:h text:style-name="P6" text:outline-level="1">Publishing, Distribution and Marketing Strategy</text:h>
              </text:list-item>
            </text:list>
            <text:p text:style-name="P1" loext:marker-style-name="T7"><text:span text:style-name="T7">Where are you going to make your app available? Which app store developer account would be the most strategic? </text:span><text:span text:style-name="T7"/></text:p>
            <text:list xml:id="list131446398698107" text:continue-list="list131448086166164" text:style-name="WWNum1">
              <text:list-item>
                <text:p text:style-name="P10" loext:marker-style-name="T7"><text:span text:style-name="T7">Will you publish your app on a store page together with other apps from around the world? </text:span><text:span text:style-name="T7"/></text:p>
              </text:list-item>
              <text:list-item>
                <text:p text:style-name="P10" loext:marker-style-name="T7"><text:span text:style-name="T7">Or on an app store page together with apps from your country or region? </text:span><text:span text:style-name="T7"/></text:p>
              </text:list-item>
              <text:list-item>
                <text:p text:style-name="P10" loext:marker-style-name="T7"><text:span text:style-name="T7">Or a store page together with other kinds of apps for the same language (e.g. dictionary apps)? </text:span><text:span text:style-name="T7"/></text:p>
              </text:list-item>
            </text:list>
            <text:p text:style-name="P2" loext:marker-style-name="T7"><text:span text:style-name="T7">Do you need to create a new developer account?</text:span><text:span text:style-name="T7"/></text:p>
            <text:p text:style-name="P2" loext:marker-style-name="T7"><text:span text:style-name="T7">Will you also distribute your apps offline, e.g. using a BibleBox or Lightstream, or via memory cards?</text:span><text:span text:style-name="T7"/></text:p>
            <text:p text:style-name="P2"><text:span text:style-name="T7">How are you going to let people know about your app? Will you use social media (e.g. Facebook) marketing? Do you have a budget for paid advertising, e.g. using Facebook Ads?</text:span></text:p>
            <text:p text:style-name="P1"><text:span text:style-name="T9">IMPORTANT:</text:span><text:span text:style-name="T7"> Please take this subject of app marketing strategy seriously. It is not enough to create and publish an app: we want to see it used!</text:span></text:p>
          </table:table-cell>
        </table:table-row>
        <table:table-row table:style-name="Table2.1">
          <table:table-cell table:style-name="Table2.A1" office:value-type="string">
            <text:p text:style-name="P5"><text:span text:style-name="T8">☐</text:span></text:p>
          </table:table-cell>
          <table:table-cell table:style-name="Table2.A1" office:value-type="string">
            <text:list xml:id="list131446390095707" text:continue-list="list131447948611600" text:style-name="WWNum6">
              <text:list-item>
                <text:h text:style-name="P6" text:outline-level="1">Google Play Store Details</text:h>
              </text:list-item>
            </text:list>
            <text:p text:style-name="P2" loext:marker-style-name="T7"><text:span text:style-name="T7">If the app will be published on the Google Play store, check the following store details:</text:span><text:span text:style-name="T7"/></text:p>
            <text:list text:continue-list="list131446398698107" text:style-name="WWNum1">
              <text:list-item>
                <text:p text:style-name="P19" loext:marker-style-name="T16"><text:span text:style-name="T16">App title</text:span><text:span text:style-name="T16"/></text:p>
              </text:list-item>
              <text:list-item>
                <text:p text:style-name="P19" loext:marker-style-name="T7"><text:span text:style-name="T16">Short and full descriptions:</text:span><text:span text:style-name="T7"> These should describe the app clearly to the target audience in the most appropriate language(s). Mention the country and alternative language names to increase the chance of users finding the app when they search on Google Play. </text:span></text:p>
              </text:list-item>
            </text:list>
            <text:p text:style-name="P36" loext:marker-style-name="T7"><text:span text:style-name="T7">Google encourages you to “highlight what's great about your app. Share interesting and exciting facts about your app to help users understand what makes your app special.” You must not include user testimonials, excessive details or long lists of keywords. See </text:span><text:a xlink:type="simple" xlink:href="https://play.google.com/about/storelisting-promotional/metadata/" text:style-name="Internet_20_link" text:visited-style-name="Visited_20_Internet_20_Link"><text:span text:style-name="Internet_20_link"><text:span text:style-name="T7">https://play.google.com/about/storelisting-promotional/metadata/</text:span></text:span></text:a><text:span text:style-name="T7"> for more details.</text:span></text:p>
            <text:list text:continue-numbering="true" text:style-name="WWNum1">
              <text:list-item>
                <text:p text:style-name="P19" loext:marker-style-name="T7"><text:span text:style-name="T16">High-res app icon:</text:span><text:span text:style-name="T7"> This should be the same as the app icon but a higher resolution 512x512 version. Ensure it is clear and not blurred, i.e. it might not work well to take a 144x144 icon and stretch it to 512x512.</text:span></text:p>
              </text:list-item>
              <text:list-item>
                <text:p text:style-name="P37" loext:marker-style-name="T16"><text:span text:style-name="T16">Feature graphic: </text:span><text:span text:style-name="T7">The feature graphic is displayed at the top of your store listing page in the Play Store app. Do not include any copy or important visual information near the borders of the image - specifically near the bottom third of the frame. Try to center align any logo or information in the vertical and horizontal center of the frame.</text:span></text:p>
              </text:list-item>
              <text:list-item>
                <text:p text:style-name="P37" loext:marker-style-name="T16"><text:span text:style-name="T16">Screenshots: </text:span><text:span text:style-name="T7">You need to specify at least 2 screenshots of the app running on a smartphone. You can add up to 8 screenshots for each device type: phone, 7-inch tablet and 10-inch tablet. Have the screenshots been chosen well to demonstrate the app’s features?</text:span></text:p>
              </text:list-item>
              <text:list-item>
                <text:p text:style-name="P38" loext:marker-style-name="T16"><text:span text:style-name="T16">Support email address: </text:span><text:span text:style-name="T7">Do you have an appropriate email address to publish on the app’s store page for support questions and feedback?</text:span></text:p>
              </text:list-item>
            </text:list>
            <text:p text:style-name="P39" loext:marker-style-name="T7"><text:span text:style-name="T7">Avoid using a personal email address such as john.smith@gmail.com, or a work email account that is unrelated to the publishing of your apps. It might be best to create a new email address for this purpose.</text:span><text:span text:style-name="T7"/></text:p>
          </table:table-cell>
        </table:table-row>
        <table:table-row table:style-name="Table2.1">
          <table:table-cell table:style-name="Table2.A1" office:value-type="string">
            <text:p text:style-name="P5" loext:marker-style-name="T17"><text:span text:style-name="T8">☐</text:span><text:span text:style-name="T8"/></text:p>
          </table:table-cell>
          <table:table-cell table:style-name="Table2.A1" office:value-type="string">
            <text:list text:continue-list="list131446390095707" text:style-name="WWNum6">
              <text:list-item>
                <text:h text:style-name="P6" text:outline-level="1">User Testing</text:h>
              </text:list-item>
            </text:list>
            <text:p text:style-name="P2" loext:marker-style-name="T11"><text:span text:style-name="T11">Ask a few people to install the app and give you their feedback before you make it available to the world.</text:span><text:span text:style-name="T11"/></text:p>
          </table:table-cell>
        </table:table-row>
      </table:table>
      <text:p text:style-name="P40" loext:marker-style-name="T7"/>
      <table:table table:name="Table3" table:style-name="Table3">
        <table:table-column table:style-name="Table3.A"/>
        <table:table-column table:style-name="Table3.B"/>
        <table:table-row table:style-name="Table3.1">
          <table:table-cell table:style-name="Table3.A1" office:value-type="string">
            <text:p text:style-name="P41" loext:marker-style-name="T17"><text:span text:style-name="T8">☐</text:span><text:span text:style-name="T8"/></text:p>
          </table:table-cell>
          <table:table-cell table:style-name="Table3.A1" office:value-type="string">
            <text:list text:continue-numbering="true" text:style-name="WWNum6">
              <text:list-item>
                <text:h text:style-name="P6" text:outline-level="1">Final Approval</text:h>
              </text:list-item>
            </text:list>
            <text:p text:style-name="P42" loext:marker-style-name="T11"><text:span text:style-name="T11">After completing this checklist, have you been given the go ahead to publish the app by the person responsible for approving digital publications in your organisation?<text:line-break/></text:span><text:span text:style-name="T11"/></text:p>
          </table:table-cell>
        </table:table-row>
      </table:table>
      <text:p text:style-name="P43" loext:marker-style-name="T7"/>
      <text:p text:style-name="P43" loext:marker-style-name="T7"/>
      <text:p text:style-name="P43" loext:marker-style-name="T7"><text:bookmark text:name="_GoBack"/></text:p>
      <text:p text:style-name="P43" loext:marker-style-name="T7"/>
      <text:p text:style-name="P44" loext:marker-style-name="T7"><text:span text:style-name="T7">Last updated: 06 August 2019</text:span><text:span text:style-name="T7"/></text:p>
      <text:p text:style-name="P45" loext:marker-style-name="T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false" style:font-name-asian="Calibri2"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WWNum6" style:class="chapter">
      <style:paragraph-properties fo:margin-left="0in" fo:margin-top="0in" fo:margin-bottom="0in" style:contextual-spacing="false" fo:line-height="100%" fo:keep-together="always" fo:text-indent="0in" style:auto-text-indent="false" fo:keep-with-next="always">
        <style:tab-stops>
          <style:tab-stop style:position="0.2362in"/>
        </style:tab-stops>
      </style:paragraph-properties>
      <style:text-properties style:font-name="Calibri1" fo:font-family="Calibri" style:font-family-generic="swiss" style:font-pitch="variable" fo:font-weight="bold" style:font-name-asian="F" style:font-family-generic-asian="system" style:font-pitch-asian="variable" style:font-weight-asian="bold" style:font-name-complex="Times New Roman" style:font-family-complex="'Times New Roman'" style:font-family-generic-complex="system" style:font-pitch-complex="variable" style:font-size-complex="16pt"/>
    </style:style>
    <style:style style:name="List_20_Paragraph" style:display-name="List Paragraph" style:family="paragraph" style:parent-style-name="Standard">
      <style:paragraph-properties fo:margin-left="0.5in" fo:margin-top="0in" fo:margin-bottom="0.111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style:font-name="Calibri1" fo:font-family="Calibri" style:font-family-generic="swiss" style:font-pitch="variable" fo:font-weight="bold" style:font-name-asian="F" style:font-family-generic-asian="system" style:font-pitch-asian="variable" style:font-weight-asian="bold" style:font-name-complex="Times New Roman" style:font-family-complex="'Times New Roman'"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normal" fo:font-weight="bold" style:font-style-asian="normal"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6228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1228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6228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1228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6228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1228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6228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1228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6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ize="10pt" style:font-size-asian="10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1</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eading App Builder - App Publishing Checklist</dc:title>
    <meta:initial-creator>Richard Margetts</meta:initial-creator>
    <dc:creator>Richard Margetts</dc:creator>
    <meta:editing-cycles>149</meta:editing-cycles>
    <meta:creation-date>2016-08-09T15:51:00</meta:creation-date>
    <dc:date>2019-08-06T18:14:00</dc:date>
    <meta:editing-duration>P1DT3H11M</meta:editing-duration>
    <meta:generator>LibreOffice/26.2.3.2$Linux_X86_64 LibreOffice_project/620$Build-2</meta:generator>
    <meta:document-statistic meta:table-count="3" meta:image-count="1" meta:object-count="0" meta:page-count="1" meta:paragraph-count="164" meta:word-count="2611" meta:character-count="14779" meta:non-whitespace-character-count="12396"/>
    <meta:user-defined meta:name="AppVersion">16.0000</meta:user-defined>
    <meta:template xlink:type="simple" xlink:actuate="onRequest" xlink:title="Normal.dotm" xlink:href=""/>
  </office:meta>
</office:document-meta>
</file>